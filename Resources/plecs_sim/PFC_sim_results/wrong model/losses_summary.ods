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4.039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903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6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es_summary" table:style-name="ta1">
        <table:shapes>
          <draw:frame draw:z-index="0" draw:style-name="gr1" draw:text-style-name="P1" svg:width="40.904cm" svg:height="20.613cm" svg:x="209.069cm" svg:y="0.708cm">
            <draw:object draw:notify-on-update-of-ranges="losses_summary.A2:losses_summary.A101 losses_summary.E2:losses_summary.E101 losses_summary.A112:losses_summary.A184 losses_summary.A110:losses_summary.A110 losses_summary.E112:losses_summary.E184 losses_summary.A255:losses_summary.A333 losses_summary.A254:losses_summary.A254 losses_summary.E255:losses_summary.E333 losses_summary.A336:losses_summary.A386 losses_summary.A335:losses_summary.A335 losses_summary.E336:losses_summary.E3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9.83cm" svg:height="22.484cm" svg:x="125.898cm" svg:y="1.354cm">
            <draw:object draw:notify-on-update-of-ranges="losses_summary.A2:losses_summary.A101 losses_summary.P2:losses_summary.P101 losses_summary.A391:losses_summary.A467 losses_summary.A390:losses_summary.A390 losses_summary.P391:losses_summary.P467 losses_summary.A472:losses_summary.A543 losses_summary.A471:losses_summary.A471 losses_summary.P472:losses_summary.P5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9.926cm" svg:height="22.326cm" svg:x="207.415cm" svg:y="26.429cm">
            <draw:object draw:notify-on-update-of-ranges="losses_summary.A112:losses_summary.A184 losses_summary.D112:losses_summary.D184 losses_summary.A2:losses_summary.A101 losses_summary.D1:losses_summary.D1 losses_summary.D2:losses_summary.D101 losses_summary.A2:losses_summary.A101 losses_summary.F1:losses_summary.F1 losses_summary.F2:losses_summary.F101 losses_summary.A2:losses_summary.A101 losses_summary.L1:losses_summary.L1 losses_summary.L2:losses_summary.L101 losses_summary.A2:losses_summary.A101 losses_summary.O1:losses_summary.O1 losses_summary.O2:losses_summary.O101 losses_summary.A2:losses_summary.A101 losses_summary.S1:losses_summary.S1 losses_summary.S2:losses_summary.S101 losses_summary.A2:losses_summary.A101 losses_summary.T1:losses_summary.T1 losses_summary.T2:losses_summary.T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9.932cm" svg:height="20.5cm" svg:x="120.141cm" svg:y="25.468cm">
            <draw:object draw:notify-on-update-of-ranges="losses_summary.A2:losses_summary.A101 losses_summary.F2:losses_summary.F101 losses_summary.A2:losses_summary.A101 losses_summary.G1:losses_summary.G1 losses_summary.G2:losses_summary.G101 losses_summary.A2:losses_summary.A101 losses_summary.H1:losses_summary.H1 losses_summary.H2:losses_summary.H101 losses_summary.A2:losses_summary.A101 losses_summary.I1:losses_summary.I1 losses_summary.I2:losses_summary.I101 losses_summary.A2:losses_summary.A101 losses_summary.J1:losses_summary.J1 losses_summary.J2:losses_summary.J101 losses_summary.A2:losses_summary.A101 losses_summary.K1:losses_summary.K1 losses_summary.K2:losses_summary.K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5.71cm" svg:height="20.086cm" svg:x="168.496cm" svg:y="1.793cm">
            <draw:object draw:notify-on-update-of-ranges="losses_summary.A2:losses_summary.A101 losses_summary.L1:losses_summary.L1 losses_summary.L2:losses_summary.L101 losses_summary.A2:losses_summary.A101 losses_summary.M1:losses_summary.M1 losses_summary.M2:losses_summary.M101 losses_summary.A2:losses_summary.A101 losses_summary.N1:losses_summary.N1 losses_summary.N2:losses_summary.N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7.051cm" svg:height="20.926cm" svg:x="166.632cm" svg:y="26.416cm">
            <draw:object draw:notify-on-update-of-ranges="losses_summary.A2:losses_summary.A101 losses_summary.S1:losses_summary.S1 losses_summary.S2:losses_summary.S101 losses_summary.A2:losses_summary.A101 losses_summary.Q1:losses_summary.Q1 losses_summary.Q2:losses_summary.Q101 losses_summary.A2:losses_summary.A101 losses_summary.R1:losses_summary.R1 losses_summary.R2:losses_summary.R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8.611cm" svg:height="23.21cm" svg:x="84.908cm" svg:y="0.09cm">
            <draw:object draw:notify-on-update-of-ranges="losses_summary.A1:losses_summary.A1 losses_summary.A2:losses_summary.A101 losses_summary.V1:losses_summary.V1 losses_summary.V2:losses_summary.V101 losses_summary.A1:losses_summary.A1 losses_summary.A2:losses_summary.A101 losses_summary.W1:losses_summary.W1 losses_summary.W2:losses_summary.W101 losses_summary.A1:losses_summary.A1 losses_summary.A2:losses_summary.A101 losses_summary.X1:losses_summary.X1 losses_summary.X2:losses_summary.X101 losses_summary.A1:losses_summary.A1 losses_summary.A2:losses_summary.A101 losses_summary.Y1:losses_summary.Y1 losses_summary.Y2:losses_summary.Y101 losses_summary.A1:losses_summary.A1 losses_summary.A2:losses_summary.A101 losses_summary.Z1:losses_summary.Z1 losses_summary.Z2:losses_summary.Z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Input_power</text:p>
          </table:table-cell>
          <table:table-cell office:value-type="string" calcext:value-type="string">
            <text:p>Output_power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Caps_losses</text:p>
          </table:table-cell>
          <table:table-cell office:value-type="string" calcext:value-type="string">
            <text:p>FL1_losses</text:p>
          </table:table-cell>
          <table:table-cell office:value-type="string" calcext:value-type="string">
            <text:p>HF1_losses</text:p>
          </table:table-cell>
          <table:table-cell office:value-type="string" calcext:value-type="string">
            <text:p>FL2_losses</text:p>
          </table:table-cell>
          <table:table-cell office:value-type="string" calcext:value-type="string">
            <text:p>HF2_losses</text:p>
          </table:table-cell>
          <table:table-cell office:value-type="string" calcext:value-type="string">
            <text:p>Bulkcap_losses</text:p>
          </table:table-cell>
          <table:table-cell office:value-type="string" calcext:value-type="string">
            <text:p>GaN_total_losses</text:p>
          </table:table-cell>
          <table:table-cell office:value-type="string" calcext:value-type="string">
            <text:p>GaN_switching_losses</text:p>
          </table:table-cell>
          <table:table-cell office:value-type="string" calcext:value-type="string">
            <text:p>GaN_ohmic_losses</text:p>
          </table:table-cell>
          <table:table-cell office:value-type="string" calcext:value-type="string">
            <text:p>L_losses</text:p>
          </table:table-cell>
          <table:table-cell office:value-type="string" calcext:value-type="string">
            <text:p>iTHD_percentage</text:p>
          </table:table-cell>
          <table:table-cell office:value-type="string" calcext:value-type="string">
            <text:p>Si_conduction</text:p>
          </table:table-cell>
          <table:table-cell office:value-type="string" calcext:value-type="string">
            <text:p>Si_switching</text:p>
          </table:table-cell>
          <table:table-cell office:value-type="string" calcext:value-type="string">
            <text:p>Si_total</text:p>
          </table:table-cell>
          <table:table-cell office:value-type="string" calcext:value-type="string">
            <text:p>EMI_losses</text:p>
          </table:table-cell>
          <table:table-cell/>
          <table:table-cell office:value-type="string" calcext:value-type="string">
            <text:p>GaN%</text:p>
          </table:table-cell>
          <table:table-cell office:value-type="string" calcext:value-type="string">
            <text:p>L%</text:p>
          </table:table-cell>
          <table:table-cell office:value-type="string" calcext:value-type="string">
            <text:p>Si%</text:p>
          </table:table-cell>
          <table:table-cell office:value-type="string" calcext:value-type="string">
            <text:p>Capacitor%</text:p>
          </table:table-cell>
          <table:table-cell office:value-type="string" calcext:value-type="string">
            <text:p>EMI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6662489378114" calcext:value-type="float">
            <text:p>52,6662489378114</text:p>
          </table:table-cell>
          <table:table-cell office:value-type="float" office:value="49.9984532403385" calcext:value-type="float">
            <text:p>49,9984532403385</text:p>
          </table:table-cell>
          <table:table-cell office:value-type="float" office:value="7.96072323593492" calcext:value-type="float">
            <text:p>7,96072323593492</text:p>
          </table:table-cell>
          <table:table-cell office:value-type="float" office:value="84.0780614357687" calcext:value-type="float">
            <text:p>84,0780614357687</text:p>
          </table:table-cell>
          <table:table-cell office:value-type="float" office:value="0.811799962001621" calcext:value-type="float">
            <text:p>0,811799962001621</text:p>
          </table:table-cell>
          <table:table-cell office:value-type="float" office:value="0.00783610935859498" calcext:value-type="float">
            <text:p>0,00783610935859498</text:p>
          </table:table-cell>
          <table:table-cell office:value-type="float" office:value="0.000169903057964117" calcext:value-type="float">
            <text:p>0,000169903057964117</text:p>
          </table:table-cell>
          <table:table-cell office:value-type="float" office:value="0.00351583242437758" calcext:value-type="float">
            <text:p>0,00351583242437758</text:p>
          </table:table-cell>
          <table:table-cell office:value-type="float" office:value="0.000117442401323734" calcext:value-type="float">
            <text:p>0,000117442401323734</text:p>
          </table:table-cell>
          <table:table-cell office:value-type="float" office:value="0.80018369264158" calcext:value-type="float">
            <text:p>0,80018369264158</text:p>
          </table:table-cell>
          <table:table-cell office:value-type="float" office:value="4.91783522941106" calcext:value-type="float">
            <text:p>4,91783522941106</text:p>
          </table:table-cell>
          <table:table-cell office:value-type="float" office:value="1.73876768288288" calcext:value-type="float">
            <text:p>1,73876768288288</text:p>
          </table:table-cell>
          <table:table-cell office:value-type="float" office:value="3.1790675465245" calcext:value-type="float">
            <text:p>3,1790675465245</text:p>
          </table:table-cell>
          <table:table-cell office:value-type="float" office:value="1.80529672281003" calcext:value-type="float">
            <text:p>1,80529672281003</text:p>
          </table:table-cell>
          <table:table-cell office:value-type="float" office:value="224.47134331826" calcext:value-type="float">
            <text:p>224,47134331826</text:p>
          </table:table-cell>
          <table:table-cell office:value-type="float" office:value="0.351104900816489" calcext:value-type="float">
            <text:p>0,351104900816489</text:p>
          </table:table-cell>
          <table:table-cell office:value-type="float" office:value="0.00199325626238002" calcext:value-type="float">
            <text:p>0,00199325626238002</text:p>
          </table:table-cell>
          <table:table-cell office:value-type="float" office:value="0.353098157078724" calcext:value-type="float">
            <text:p>0,353098157078724</text:p>
          </table:table-cell>
          <table:table-cell office:value-type="float" office:value="0.0726931646359359" calcext:value-type="float">
            <text:p>0,0726931646359359</text:p>
          </table:table-cell>
          <table:table-cell/>
          <table:table-cell table:formula="of:=([.L2]/[.D2])*100" office:value-type="float" office:value="61.7762367018592" calcext:value-type="float">
            <text:p>61,7762367018592</text:p>
          </table:table-cell>
          <table:table-cell table:formula="of:=([.O2]/[.D2])*100" office:value-type="float" office:value="22.6775466161274" calcext:value-type="float">
            <text:p>22,6775466161274</text:p>
          </table:table-cell>
          <table:table-cell table:formula="of:=([.S2]/[.D2])*100" office:value-type="float" office:value="4.43550349150225" calcext:value-type="float">
            <text:p>4,43550349150225</text:p>
          </table:table-cell>
          <table:table-cell table:formula="of:=([.F2]/[.D2])*100" office:value-type="float" office:value="10.1975654465305" calcext:value-type="float">
            <text:p>10,1975654465305</text:p>
          </table:table-cell>
          <table:table-cell table:formula="of:=([.T2]/[.D2])*100" office:value-type="float" office:value="0.913147744011461" calcext:value-type="float">
            <text:p>0,9131477440114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.475155546198" calcext:value-type="float">
            <text:p>102,475155546198</text:p>
          </table:table-cell>
          <table:table-cell office:value-type="float" office:value="99.9993002456102" calcext:value-type="float">
            <text:p>99,9993002456102</text:p>
          </table:table-cell>
          <table:table-cell office:value-type="float" office:value="8.32028109106539" calcext:value-type="float">
            <text:p>8,32028109106539</text:p>
          </table:table-cell>
          <table:table-cell office:value-type="float" office:value="91.6796606842046" calcext:value-type="float">
            <text:p>91,6796606842046</text:p>
          </table:table-cell>
          <table:table-cell office:value-type="float" office:value="0.812974857504904" calcext:value-type="float">
            <text:p>0,812974857504904</text:p>
          </table:table-cell>
          <table:table-cell office:value-type="float" office:value="0.00827818151178249" calcext:value-type="float">
            <text:p>0,00827818151178249</text:p>
          </table:table-cell>
          <table:table-cell office:value-type="float" office:value="0.000206789723360433" calcext:value-type="float">
            <text:p>0,000206789723360433</text:p>
          </table:table-cell>
          <table:table-cell office:value-type="float" office:value="0.00413464318099521" calcext:value-type="float">
            <text:p>0,00413464318099521</text:p>
          </table:table-cell>
          <table:table-cell office:value-type="float" office:value="0.000160388143422327" calcext:value-type="float">
            <text:p>0,000160388143422327</text:p>
          </table:table-cell>
          <table:table-cell office:value-type="float" office:value="0.800191326223486" calcext:value-type="float">
            <text:p>0,800191326223486</text:p>
          </table:table-cell>
          <table:table-cell office:value-type="float" office:value="5.22988035473526" calcext:value-type="float">
            <text:p>5,22988035473526</text:p>
          </table:table-cell>
          <table:table-cell office:value-type="float" office:value="1.74668696022505" calcext:value-type="float">
            <text:p>1,74668696022505</text:p>
          </table:table-cell>
          <table:table-cell office:value-type="float" office:value="3.4831933945174" calcext:value-type="float">
            <text:p>3,4831933945174</text:p>
          </table:table-cell>
          <table:table-cell office:value-type="float" office:value="1.80482783699536" calcext:value-type="float">
            <text:p>1,80482783699536</text:p>
          </table:table-cell>
          <table:table-cell office:value-type="float" office:value="142.751988602735" calcext:value-type="float">
            <text:p>142,751988602735</text:p>
          </table:table-cell>
          <table:table-cell office:value-type="float" office:value="0.42074664241102" calcext:value-type="float">
            <text:p>0,42074664241102</text:p>
          </table:table-cell>
          <table:table-cell office:value-type="float" office:value="0.0019652797321663" calcext:value-type="float">
            <text:p>0,0019652797321663</text:p>
          </table:table-cell>
          <table:table-cell office:value-type="float" office:value="0.422711922142738" calcext:value-type="float">
            <text:p>0,422711922142738</text:p>
          </table:table-cell>
          <table:table-cell office:value-type="float" office:value="0.0498861196944658" calcext:value-type="float">
            <text:p>0,0498861196944658</text:p>
          </table:table-cell>
          <table:table-cell/>
          <table:table-cell table:formula="of:=([.L3]/[.D3])*100" office:value-type="float" office:value="62.8570152557861" calcext:value-type="float">
            <text:p>62,8570152557861</text:p>
          </table:table-cell>
          <table:table-cell table:formula="of:=([.O3]/[.D3])*100" office:value-type="float" office:value="21.6919094107704" calcext:value-type="float">
            <text:p>21,6919094107704</text:p>
          </table:table-cell>
          <table:table-cell table:formula="of:=([.S3]/[.D3])*100" office:value-type="float" office:value="5.0805004965116" calcext:value-type="float">
            <text:p>5,0805004965116</text:p>
          </table:table-cell>
          <table:table-cell table:formula="of:=([.F3]/[.D3])*100" office:value-type="float" office:value="9.77100230877903" calcext:value-type="float">
            <text:p>9,77100230877903</text:p>
          </table:table-cell>
          <table:table-cell table:formula="of:=([.T3]/[.D3])*100" office:value-type="float" office:value="0.599572528241086" calcext:value-type="float">
            <text:p>0,5995725282410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.475104150698" calcext:value-type="float">
            <text:p>152,475104150698</text:p>
          </table:table-cell>
          <table:table-cell office:value-type="float" office:value="150.000083195606" calcext:value-type="float">
            <text:p>150,000083195606</text:p>
          </table:table-cell>
          <table:table-cell office:value-type="float" office:value="8.84817853162813" calcext:value-type="float">
            <text:p>8,84817853162813</text:p>
          </table:table-cell>
          <table:table-cell office:value-type="float" office:value="94.1012175660788" calcext:value-type="float">
            <text:p>94,1012175660788</text:p>
          </table:table-cell>
          <table:table-cell office:value-type="float" office:value="0.81490935660504" calcext:value-type="float">
            <text:p>0,81490935660504</text:p>
          </table:table-cell>
          <table:table-cell office:value-type="float" office:value="0.00908460288306538" calcext:value-type="float">
            <text:p>0,00908460288306538</text:p>
          </table:table-cell>
          <table:table-cell office:value-type="float" office:value="0.000262940753158773" calcext:value-type="float">
            <text:p>0,000262940753158773</text:p>
          </table:table-cell>
          <table:table-cell office:value-type="float" office:value="0.00513979567338615" calcext:value-type="float">
            <text:p>0,00513979567338615</text:p>
          </table:table-cell>
          <table:table-cell office:value-type="float" office:value="0.000215664062028328" calcext:value-type="float">
            <text:p>0,000215664062028328</text:p>
          </table:table-cell>
          <table:table-cell office:value-type="float" office:value="0.800202582209526" calcext:value-type="float">
            <text:p>0,800202582209526</text:p>
          </table:table-cell>
          <table:table-cell office:value-type="float" office:value="5.6786320952747" calcext:value-type="float">
            <text:p>5,6786320952747</text:p>
          </table:table-cell>
          <table:table-cell office:value-type="float" office:value="1.75602988910467" calcext:value-type="float">
            <text:p>1,75602988910467</text:p>
          </table:table-cell>
          <table:table-cell office:value-type="float" office:value="3.92260220617264" calcext:value-type="float">
            <text:p>3,92260220617264</text:p>
          </table:table-cell>
          <table:table-cell office:value-type="float" office:value="1.80521005550922" calcext:value-type="float">
            <text:p>1,80521005550922</text:p>
          </table:table-cell>
          <table:table-cell office:value-type="float" office:value="100.900581416217" calcext:value-type="float">
            <text:p>100,900581416217</text:p>
          </table:table-cell>
          <table:table-cell office:value-type="float" office:value="0.506256945667527" calcext:value-type="float">
            <text:p>0,506256945667527</text:p>
          </table:table-cell>
          <table:table-cell office:value-type="float" office:value="0.00192901796844545" calcext:value-type="float">
            <text:p>0,00192901796844545</text:p>
          </table:table-cell>
          <table:table-cell office:value-type="float" office:value="0.508185963635365" calcext:value-type="float">
            <text:p>0,508185963635365</text:p>
          </table:table-cell>
          <table:table-cell office:value-type="float" office:value="0.0412410606119529" calcext:value-type="float">
            <text:p>0,0412410606119529</text:p>
          </table:table-cell>
          <table:table-cell/>
          <table:table-cell table:formula="of:=([.L4]/[.D4])*100" office:value-type="float" office:value="64.1785433575535" calcext:value-type="float">
            <text:p>64,1785433575535</text:p>
          </table:table-cell>
          <table:table-cell table:formula="of:=([.O4]/[.D4])*100" office:value-type="float" office:value="20.4020527960239" calcext:value-type="float">
            <text:p>20,4020527960239</text:p>
          </table:table-cell>
          <table:table-cell table:formula="of:=([.S4]/[.D4])*100" office:value-type="float" office:value="5.74339635913579" calcext:value-type="float">
            <text:p>5,74339635913579</text:p>
          </table:table-cell>
          <table:table-cell table:formula="of:=([.F4]/[.D4])*100" office:value-type="float" office:value="9.20991087252724" calcext:value-type="float">
            <text:p>9,20991087252724</text:p>
          </table:table-cell>
          <table:table-cell table:formula="of:=([.T4]/[.D4])*100" office:value-type="float" office:value="0.466096614851692" calcext:value-type="float">
            <text:p>0,4660966148516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.548231639019" calcext:value-type="float">
            <text:p>202,548231639019</text:p>
          </table:table-cell>
          <table:table-cell office:value-type="float" office:value="200.000032188732" calcext:value-type="float">
            <text:p>200,000032188732</text:p>
          </table:table-cell>
          <table:table-cell office:value-type="float" office:value="9.48074626161961" calcext:value-type="float">
            <text:p>9,48074626161961</text:p>
          </table:table-cell>
          <table:table-cell office:value-type="float" office:value="95.259627624515" calcext:value-type="float">
            <text:p>95,259627624515</text:p>
          </table:table-cell>
          <table:table-cell office:value-type="float" office:value="0.81782278670652" calcext:value-type="float">
            <text:p>0,81782278670652</text:p>
          </table:table-cell>
          <table:table-cell office:value-type="float" office:value="0.0102810485421276" calcext:value-type="float">
            <text:p>0,0102810485421276</text:p>
          </table:table-cell>
          <table:table-cell office:value-type="float" office:value="0.00033644190615599" calcext:value-type="float">
            <text:p>0,00033644190615599</text:p>
          </table:table-cell>
          <table:table-cell office:value-type="float" office:value="0.00668088423121878" calcext:value-type="float">
            <text:p>0,00668088423121878</text:p>
          </table:table-cell>
          <table:table-cell office:value-type="float" office:value="0.000298784253105144" calcext:value-type="float">
            <text:p>0,000298784253105144</text:p>
          </table:table-cell>
          <table:table-cell office:value-type="float" office:value="0.800214387469486" calcext:value-type="float">
            <text:p>0,800214387469486</text:p>
          </table:table-cell>
          <table:table-cell office:value-type="float" office:value="6.19988238047612" calcext:value-type="float">
            <text:p>6,19988238047612</text:p>
          </table:table-cell>
          <table:table-cell office:value-type="float" office:value="1.7633197498568" calcext:value-type="float">
            <text:p>1,7633197498568</text:p>
          </table:table-cell>
          <table:table-cell office:value-type="float" office:value="4.43656263062189" calcext:value-type="float">
            <text:p>4,43656263062189</text:p>
          </table:table-cell>
          <table:table-cell office:value-type="float" office:value="1.8081795008168" calcext:value-type="float">
            <text:p>1,8081795008168</text:p>
          </table:table-cell>
          <table:table-cell office:value-type="float" office:value="77.6098511805879" calcext:value-type="float">
            <text:p>77,6098511805879</text:p>
          </table:table-cell>
          <table:table-cell office:value-type="float" office:value="0.607896008878813" calcext:value-type="float">
            <text:p>0,607896008878813</text:p>
          </table:table-cell>
          <table:table-cell office:value-type="float" office:value="0.00189597614683527" calcext:value-type="float">
            <text:p>0,00189597614683527</text:p>
          </table:table-cell>
          <table:table-cell office:value-type="float" office:value="0.609791985024823" calcext:value-type="float">
            <text:p>0,609791985024823</text:p>
          </table:table-cell>
          <table:table-cell office:value-type="float" office:value="0.0450696085872516" calcext:value-type="float">
            <text:p>0,0450696085872516</text:p>
          </table:table-cell>
          <table:table-cell/>
          <table:table-cell table:formula="of:=([.L5]/[.D5])*100" office:value-type="float" office:value="65.3944553455118" calcext:value-type="float">
            <text:p>65,3944553455118</text:p>
          </table:table-cell>
          <table:table-cell table:formula="of:=([.O5]/[.D5])*100" office:value-type="float" office:value="19.0721220768955" calcext:value-type="float">
            <text:p>19,0721220768955</text:p>
          </table:table-cell>
          <table:table-cell table:formula="of:=([.S5]/[.D5])*100" office:value-type="float" office:value="6.43189858896879" calcext:value-type="float">
            <text:p>6,43189858896879</text:p>
          </table:table-cell>
          <table:table-cell table:formula="of:=([.F5]/[.D5])*100" office:value-type="float" office:value="8.62614359818138" calcext:value-type="float">
            <text:p>8,62614359818138</text:p>
          </table:table-cell>
          <table:table-cell table:formula="of:=([.T5]/[.D5])*100" office:value-type="float" office:value="0.47538039035708" calcext:value-type="float">
            <text:p>0,475380390357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.5304" calcext:value-type="float">
            <text:p>252,5304</text:p>
          </table:table-cell>
          <table:table-cell office:value-type="float" office:value="250.0004" calcext:value-type="float">
            <text:p>250,0004</text:p>
          </table:table-cell>
          <table:table-cell office:value-type="float" office:value="10.36917" calcext:value-type="float">
            <text:p>10,36917</text:p>
          </table:table-cell>
          <table:table-cell office:value-type="float" office:value="95.85234" calcext:value-type="float">
            <text:p>95,85234</text:p>
          </table:table-cell>
          <table:table-cell office:value-type="float" office:value="0.8239494" calcext:value-type="float">
            <text:p>0,8239494</text:p>
          </table:table-cell>
          <table:table-cell office:value-type="float" office:value="0.01314764" calcext:value-type="float">
            <text:p>0,01314764</text:p>
          </table:table-cell>
          <table:table-cell office:value-type="float" office:value="0.0002500037" calcext:value-type="float">
            <text:p>0,0002500037</text:p>
          </table:table-cell>
          <table:table-cell office:value-type="float" office:value="0.01012213" calcext:value-type="float">
            <text:p>0,01012213</text:p>
          </table:table-cell>
          <table:table-cell office:value-type="float" office:value="0.0001829531" calcext:value-type="float">
            <text:p>0,0001829531</text:p>
          </table:table-cell>
          <table:table-cell office:value-type="float" office:value="0.8002462" calcext:value-type="float">
            <text:p>0,8002462</text:p>
          </table:table-cell>
          <table:table-cell office:value-type="float" office:value="6.857323" calcext:value-type="float">
            <text:p>6,857323</text:p>
          </table:table-cell>
          <table:table-cell office:value-type="float" office:value="1.769539" calcext:value-type="float">
            <text:p>1,769539</text:p>
          </table:table-cell>
          <table:table-cell office:value-type="float" office:value="5.087785" calcext:value-type="float">
            <text:p>5,087785</text:p>
          </table:table-cell>
          <table:table-cell office:value-type="float" office:value="1.811476" calcext:value-type="float">
            <text:p>1,811476</text:p>
          </table:table-cell>
          <table:table-cell office:value-type="float" office:value="52.92027" calcext:value-type="float">
            <text:p>52,92027</text:p>
          </table:table-cell>
          <table:table-cell office:value-type="float" office:value="0.7235861" calcext:value-type="float">
            <text:p>0,7235861</text:p>
          </table:table-cell>
          <table:table-cell office:value-type="float" office:value="0.001820053" calcext:value-type="float">
            <text:p>0,001820053</text:p>
          </table:table-cell>
          <table:table-cell office:value-type="float" office:value="0.7254062" calcext:value-type="float">
            <text:p>0,7254062</text:p>
          </table:table-cell>
          <table:table-cell office:value-type="float" office:value="0.1510153" calcext:value-type="float">
            <text:p>0,1510153</text:p>
          </table:table-cell>
          <table:table-cell/>
          <table:table-cell table:formula="of:=([.L6]/[.D6])*100" office:value-type="float" office:value="66.1318408320049" calcext:value-type="float">
            <text:p>66,1318408320049</text:p>
          </table:table-cell>
          <table:table-cell table:formula="of:=([.O6]/[.D6])*100" office:value-type="float" office:value="17.4698264181222" calcext:value-type="float">
            <text:p>17,4698264181222</text:p>
          </table:table-cell>
          <table:table-cell table:formula="of:=([.S6]/[.D6])*100" office:value-type="float" office:value="6.99579812077534" calcext:value-type="float">
            <text:p>6,99579812077534</text:p>
          </table:table-cell>
          <table:table-cell table:formula="of:=([.F6]/[.D6])*100" office:value-type="float" office:value="7.94614612355666" calcext:value-type="float">
            <text:p>7,94614612355666</text:p>
          </table:table-cell>
          <table:table-cell table:formula="of:=([.T6]/[.D6])*100" office:value-type="float" office:value="1.4563875411436" calcext:value-type="float">
            <text:p>1,45638754114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529246895854" calcext:value-type="float">
            <text:p>302,529246895854</text:p>
          </table:table-cell>
          <table:table-cell office:value-type="float" office:value="300.00058194966" calcext:value-type="float">
            <text:p>300,00058194966</text:p>
          </table:table-cell>
          <table:table-cell office:value-type="float" office:value="10.859989909994" calcext:value-type="float">
            <text:p>10,859989909994</text:p>
          </table:table-cell>
          <table:table-cell office:value-type="float" office:value="96.3800103875685" calcext:value-type="float">
            <text:p>96,3800103875685</text:p>
          </table:table-cell>
          <table:table-cell office:value-type="float" office:value="0.825240453951475" calcext:value-type="float">
            <text:p>0,825240453951475</text:p>
          </table:table-cell>
          <table:table-cell office:value-type="float" office:value="0.0135875405559949" calcext:value-type="float">
            <text:p>0,0135875405559949</text:p>
          </table:table-cell>
          <table:table-cell office:value-type="float" office:value="0.000510625980476833" calcext:value-type="float">
            <text:p>0,000510625980476833</text:p>
          </table:table-cell>
          <table:table-cell office:value-type="float" office:value="0.010424527344095" calcext:value-type="float">
            <text:p>0,010424527344095</text:p>
          </table:table-cell>
          <table:table-cell office:value-type="float" office:value="0.000478120416624122" calcext:value-type="float">
            <text:p>0,000478120416624122</text:p>
          </table:table-cell>
          <table:table-cell office:value-type="float" office:value="0.800241477596166" calcext:value-type="float">
            <text:p>0,800241477596166</text:p>
          </table:table-cell>
          <table:table-cell office:value-type="float" office:value="7.32700868348168" calcext:value-type="float">
            <text:p>7,32700868348168</text:p>
          </table:table-cell>
          <table:table-cell office:value-type="float" office:value="1.78438537485246" calcext:value-type="float">
            <text:p>1,78438537485246</text:p>
          </table:table-cell>
          <table:table-cell office:value-type="float" office:value="5.54262330863705" calcext:value-type="float">
            <text:p>5,54262330863705</text:p>
          </table:table-cell>
          <table:table-cell office:value-type="float" office:value="1.81620729931823" calcext:value-type="float">
            <text:p>1,81620729931823</text:p>
          </table:table-cell>
          <table:table-cell office:value-type="float" office:value="53.0558012574158" calcext:value-type="float">
            <text:p>53,0558012574158</text:p>
          </table:table-cell>
          <table:table-cell office:value-type="float" office:value="0.814906534325376" calcext:value-type="float">
            <text:p>0,814906534325376</text:p>
          </table:table-cell>
          <table:table-cell office:value-type="float" office:value="0.0015977622951063" calcext:value-type="float">
            <text:p>0,0015977622951063</text:p>
          </table:table-cell>
          <table:table-cell office:value-type="float" office:value="0.816504296621965" calcext:value-type="float">
            <text:p>0,816504296621965</text:p>
          </table:table-cell>
          <table:table-cell office:value-type="float" office:value="0.0750291766350748" calcext:value-type="float">
            <text:p>0,0750291766350748</text:p>
          </table:table-cell>
          <table:table-cell/>
          <table:table-cell table:formula="of:=([.L7]/[.D7])*100" office:value-type="float" office:value="67.4679142817521" calcext:value-type="float">
            <text:p>67,4679142817521</text:p>
          </table:table-cell>
          <table:table-cell table:formula="of:=([.O7]/[.D7])*100" office:value-type="float" office:value="16.723839657041" calcext:value-type="float">
            <text:p>16,723839657041</text:p>
          </table:table-cell>
          <table:table-cell table:formula="of:=([.S7]/[.D7])*100" office:value-type="float" office:value="7.51846275538958" calcext:value-type="float">
            <text:p>7,51846275538958</text:p>
          </table:table-cell>
          <table:table-cell table:formula="of:=([.F7]/[.D7])*100" office:value-type="float" office:value="7.59890626778613" calcext:value-type="float">
            <text:p>7,59890626778613</text:p>
          </table:table-cell>
          <table:table-cell table:formula="of:=([.T7]/[.D7])*100" office:value-type="float" office:value="0.690877038163991" calcext:value-type="float">
            <text:p>0,6908770381639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2.5568" calcext:value-type="float">
            <text:p>352,5568</text:p>
          </table:table-cell>
          <table:table-cell office:value-type="float" office:value="350.0009" calcext:value-type="float">
            <text:p>350,0009</text:p>
          </table:table-cell>
          <table:table-cell office:value-type="float" office:value="11.84022" calcext:value-type="float">
            <text:p>11,84022</text:p>
          </table:table-cell>
          <table:table-cell office:value-type="float" office:value="96.61709" calcext:value-type="float">
            <text:p>96,61709</text:p>
          </table:table-cell>
          <table:table-cell office:value-type="float" office:value="0.8313001" calcext:value-type="float">
            <text:p>0,8313001</text:p>
          </table:table-cell>
          <table:table-cell office:value-type="float" office:value="0.01652826" calcext:value-type="float">
            <text:p>0,01652826</text:p>
          </table:table-cell>
          <table:table-cell office:value-type="float" office:value="0.0004227699" calcext:value-type="float">
            <text:p>0,0004227699</text:p>
          </table:table-cell>
          <table:table-cell office:value-type="float" office:value="0.01369631" calcext:value-type="float">
            <text:p>0,01369631</text:p>
          </table:table-cell>
          <table:table-cell office:value-type="float" office:value="0.0003783201" calcext:value-type="float">
            <text:p>0,0003783201</text:p>
          </table:table-cell>
          <table:table-cell office:value-type="float" office:value="0.8002736" calcext:value-type="float">
            <text:p>0,8002736</text:p>
          </table:table-cell>
          <table:table-cell office:value-type="float" office:value="8.096946" calcext:value-type="float">
            <text:p>8,096946</text:p>
          </table:table-cell>
          <table:table-cell office:value-type="float" office:value="1.822563" calcext:value-type="float">
            <text:p>1,822563</text:p>
          </table:table-cell>
          <table:table-cell office:value-type="float" office:value="6.274383" calcext:value-type="float">
            <text:p>6,274383</text:p>
          </table:table-cell>
          <table:table-cell office:value-type="float" office:value="1.820473" calcext:value-type="float">
            <text:p>1,820473</text:p>
          </table:table-cell>
          <table:table-cell office:value-type="float" office:value="41.15312" calcext:value-type="float">
            <text:p>41,15312</text:p>
          </table:table-cell>
          <table:table-cell office:value-type="float" office:value="0.9372921" calcext:value-type="float">
            <text:p>0,9372921</text:p>
          </table:table-cell>
          <table:table-cell office:value-type="float" office:value="0.001556188" calcext:value-type="float">
            <text:p>0,001556188</text:p>
          </table:table-cell>
          <table:table-cell office:value-type="float" office:value="0.9388483" calcext:value-type="float">
            <text:p>0,9388483</text:p>
          </table:table-cell>
          <table:table-cell office:value-type="float" office:value="0.1526476" calcext:value-type="float">
            <text:p>0,1526476</text:p>
          </table:table-cell>
          <table:table-cell/>
          <table:table-cell table:formula="of:=([.L8]/[.D8])*100" office:value-type="float" office:value="68.3850975742005" calcext:value-type="float">
            <text:p>68,3850975742005</text:p>
          </table:table-cell>
          <table:table-cell table:formula="of:=([.O8]/[.D8])*100" office:value-type="float" office:value="15.3753308637846" calcext:value-type="float">
            <text:p>15,3753308637846</text:p>
          </table:table-cell>
          <table:table-cell table:formula="of:=([.S8]/[.D8])*100" office:value-type="float" office:value="7.92931465800467" calcext:value-type="float">
            <text:p>7,92931465800467</text:p>
          </table:table-cell>
          <table:table-cell table:formula="of:=([.F8]/[.D8])*100" office:value-type="float" office:value="7.02098525196322" calcext:value-type="float">
            <text:p>7,02098525196322</text:p>
          </table:table-cell>
          <table:table-cell table:formula="of:=([.T8]/[.D8])*100" office:value-type="float" office:value="1.28922942310194" calcext:value-type="float">
            <text:p>1,289229423101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2.5768" calcext:value-type="float">
            <text:p>402,5768</text:p>
          </table:table-cell>
          <table:table-cell office:value-type="float" office:value="400.0012" calcext:value-type="float">
            <text:p>400,0012</text:p>
          </table:table-cell>
          <table:table-cell office:value-type="float" office:value="12.694" calcext:value-type="float">
            <text:p>12,694</text:p>
          </table:table-cell>
          <table:table-cell office:value-type="float" office:value="96.82651" calcext:value-type="float">
            <text:p>96,82651</text:p>
          </table:table-cell>
          <table:table-cell office:value-type="float" office:value="0.8351975" calcext:value-type="float">
            <text:p>0,8351975</text:p>
          </table:table-cell>
          <table:table-cell office:value-type="float" office:value="0.01834988" calcext:value-type="float">
            <text:p>0,01834988</text:p>
          </table:table-cell>
          <table:table-cell office:value-type="float" office:value="0.0005078211" calcext:value-type="float">
            <text:p>0,0005078211</text:p>
          </table:table-cell>
          <table:table-cell office:value-type="float" office:value="0.01558413" calcext:value-type="float">
            <text:p>0,01558413</text:p>
          </table:table-cell>
          <table:table-cell office:value-type="float" office:value="0.0004654197" calcext:value-type="float">
            <text:p>0,0004654197</text:p>
          </table:table-cell>
          <table:table-cell office:value-type="float" office:value="0.8002899" calcext:value-type="float">
            <text:p>0,8002899</text:p>
          </table:table-cell>
          <table:table-cell office:value-type="float" office:value="8.825287" calcext:value-type="float">
            <text:p>8,825287</text:p>
          </table:table-cell>
          <table:table-cell office:value-type="float" office:value="1.871179" calcext:value-type="float">
            <text:p>1,871179</text:p>
          </table:table-cell>
          <table:table-cell office:value-type="float" office:value="6.954108" calcext:value-type="float">
            <text:p>6,954108</text:p>
          </table:table-cell>
          <table:table-cell office:value-type="float" office:value="1.825717" calcext:value-type="float">
            <text:p>1,825717</text:p>
          </table:table-cell>
          <table:table-cell office:value-type="float" office:value="37.8047" calcext:value-type="float">
            <text:p>37,8047</text:p>
          </table:table-cell>
          <table:table-cell office:value-type="float" office:value="1.052493" calcext:value-type="float">
            <text:p>1,052493</text:p>
          </table:table-cell>
          <table:table-cell office:value-type="float" office:value="0.001609294" calcext:value-type="float">
            <text:p>0,001609294</text:p>
          </table:table-cell>
          <table:table-cell office:value-type="float" office:value="1.054102" calcext:value-type="float">
            <text:p>1,054102</text:p>
          </table:table-cell>
          <table:table-cell office:value-type="float" office:value="0.1536974" calcext:value-type="float">
            <text:p>0,1536974</text:p>
          </table:table-cell>
          <table:table-cell/>
          <table:table-cell table:formula="of:=([.L9]/[.D9])*100" office:value-type="float" office:value="69.5232944698283" calcext:value-type="float">
            <text:p>69,5232944698283</text:p>
          </table:table-cell>
          <table:table-cell table:formula="of:=([.O9]/[.D9])*100" office:value-type="float" office:value="14.3825193004569" calcext:value-type="float">
            <text:p>14,3825193004569</text:p>
          </table:table-cell>
          <table:table-cell table:formula="of:=([.S9]/[.D9])*100" office:value-type="float" office:value="8.30393886875689" calcext:value-type="float">
            <text:p>8,30393886875689</text:p>
          </table:table-cell>
          <table:table-cell table:formula="of:=([.F9]/[.D9])*100" office:value-type="float" office:value="6.57946667717032" calcext:value-type="float">
            <text:p>6,57946667717032</text:p>
          </table:table-cell>
          <table:table-cell table:formula="of:=([.T9]/[.D9])*100" office:value-type="float" office:value="1.21078777375138" calcext:value-type="float">
            <text:p>1,210787773751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2.5978" calcext:value-type="float">
            <text:p>452,5978</text:p>
          </table:table-cell>
          <table:table-cell office:value-type="float" office:value="450.0016" calcext:value-type="float">
            <text:p>450,0016</text:p>
          </table:table-cell>
          <table:table-cell office:value-type="float" office:value="13.61091" calcext:value-type="float">
            <text:p>13,61091</text:p>
          </table:table-cell>
          <table:table-cell office:value-type="float" office:value="96.97536" calcext:value-type="float">
            <text:p>96,97536</text:p>
          </table:table-cell>
          <table:table-cell office:value-type="float" office:value="0.8383315" calcext:value-type="float">
            <text:p>0,8383315</text:p>
          </table:table-cell>
          <table:table-cell office:value-type="float" office:value="0.0198032" calcext:value-type="float">
            <text:p>0,0198032</text:p>
          </table:table-cell>
          <table:table-cell office:value-type="float" office:value="0.0005815456" calcext:value-type="float">
            <text:p>0,0005815456</text:p>
          </table:table-cell>
          <table:table-cell office:value-type="float" office:value="0.01707909" calcext:value-type="float">
            <text:p>0,01707909</text:p>
          </table:table-cell>
          <table:table-cell office:value-type="float" office:value="0.0005618603" calcext:value-type="float">
            <text:p>0,0005618603</text:p>
          </table:table-cell>
          <table:table-cell office:value-type="float" office:value="0.8003052" calcext:value-type="float">
            <text:p>0,8003052</text:p>
          </table:table-cell>
          <table:table-cell office:value-type="float" office:value="9.61248" calcext:value-type="float">
            <text:p>9,61248</text:p>
          </table:table-cell>
          <table:table-cell office:value-type="float" office:value="1.943335" calcext:value-type="float">
            <text:p>1,943335</text:p>
          </table:table-cell>
          <table:table-cell office:value-type="float" office:value="7.669144" calcext:value-type="float">
            <text:p>7,669144</text:p>
          </table:table-cell>
          <table:table-cell office:value-type="float" office:value="1.831502" calcext:value-type="float">
            <text:p>1,831502</text:p>
          </table:table-cell>
          <table:table-cell office:value-type="float" office:value="33.53494" calcext:value-type="float">
            <text:p>33,53494</text:p>
          </table:table-cell>
          <table:table-cell office:value-type="float" office:value="1.175841" calcext:value-type="float">
            <text:p>1,175841</text:p>
          </table:table-cell>
          <table:table-cell office:value-type="float" office:value="0.001599582" calcext:value-type="float">
            <text:p>0,001599582</text:p>
          </table:table-cell>
          <table:table-cell office:value-type="float" office:value="1.17744" calcext:value-type="float">
            <text:p>1,17744</text:p>
          </table:table-cell>
          <table:table-cell office:value-type="float" office:value="0.1511576" calcext:value-type="float">
            <text:p>0,1511576</text:p>
          </table:table-cell>
          <table:table-cell/>
          <table:table-cell table:formula="of:=([.L10]/[.D10])*100" office:value-type="float" office:value="70.6233455367789" calcext:value-type="float">
            <text:p>70,6233455367789</text:p>
          </table:table-cell>
          <table:table-cell table:formula="of:=([.O10]/[.D10])*100" office:value-type="float" office:value="13.4561318824384" calcext:value-type="float">
            <text:p>13,4561318824384</text:p>
          </table:table-cell>
          <table:table-cell table:formula="of:=([.S10]/[.D10])*100" office:value-type="float" office:value="8.65070741045235" calcext:value-type="float">
            <text:p>8,65070741045235</text:p>
          </table:table-cell>
          <table:table-cell table:formula="of:=([.F10]/[.D10])*100" office:value-type="float" office:value="6.1592612103085" calcext:value-type="float">
            <text:p>6,1592612103085</text:p>
          </table:table-cell>
          <table:table-cell table:formula="of:=([.T10]/[.D10])*100" office:value-type="float" office:value="1.11056204177384" calcext:value-type="float">
            <text:p>1,110562041773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2.6239" calcext:value-type="float">
            <text:p>502,6239</text:p>
          </table:table-cell>
          <table:table-cell office:value-type="float" office:value="500.0023" calcext:value-type="float">
            <text:p>500,0023</text:p>
          </table:table-cell>
          <table:table-cell office:value-type="float" office:value="14.56406" calcext:value-type="float">
            <text:p>14,56406</text:p>
          </table:table-cell>
          <table:table-cell office:value-type="float" office:value="97.0872" calcext:value-type="float">
            <text:p>97,0872</text:p>
          </table:table-cell>
          <table:table-cell office:value-type="float" office:value="0.8427263" calcext:value-type="float">
            <text:p>0,8427263</text:p>
          </table:table-cell>
          <table:table-cell office:value-type="float" office:value="0.02196626" calcext:value-type="float">
            <text:p>0,02196626</text:p>
          </table:table-cell>
          <table:table-cell office:value-type="float" office:value="0.0006911697" calcext:value-type="float">
            <text:p>0,0006911697</text:p>
          </table:table-cell>
          <table:table-cell office:value-type="float" office:value="0.01908221" calcext:value-type="float">
            <text:p>0,01908221</text:p>
          </table:table-cell>
          <table:table-cell office:value-type="float" office:value="0.0006605597" calcext:value-type="float">
            <text:p>0,0006605597</text:p>
          </table:table-cell>
          <table:table-cell office:value-type="float" office:value="0.8003258" calcext:value-type="float">
            <text:p>0,8003258</text:p>
          </table:table-cell>
          <table:table-cell office:value-type="float" office:value="10.42813" calcext:value-type="float">
            <text:p>10,42813</text:p>
          </table:table-cell>
          <table:table-cell office:value-type="float" office:value="2.015266" calcext:value-type="float">
            <text:p>2,015266</text:p>
          </table:table-cell>
          <table:table-cell office:value-type="float" office:value="8.412867" calcext:value-type="float">
            <text:p>8,412867</text:p>
          </table:table-cell>
          <table:table-cell office:value-type="float" office:value="1.83886" calcext:value-type="float">
            <text:p>1,83886</text:p>
          </table:table-cell>
          <table:table-cell office:value-type="float" office:value="30.74423" calcext:value-type="float">
            <text:p>30,74423</text:p>
          </table:table-cell>
          <table:table-cell office:value-type="float" office:value="1.302484" calcext:value-type="float">
            <text:p>1,302484</text:p>
          </table:table-cell>
          <table:table-cell office:value-type="float" office:value="0.001272077" calcext:value-type="float">
            <text:p>0,001272077</text:p>
          </table:table-cell>
          <table:table-cell office:value-type="float" office:value="1.303756" calcext:value-type="float">
            <text:p>1,303756</text:p>
          </table:table-cell>
          <table:table-cell office:value-type="float" office:value="0.1505846" calcext:value-type="float">
            <text:p>0,1505846</text:p>
          </table:table-cell>
          <table:table-cell/>
          <table:table-cell table:formula="of:=([.L11]/[.D11])*100" office:value-type="float" office:value="71.6018060897854" calcext:value-type="float">
            <text:p>71,6018060897854</text:p>
          </table:table-cell>
          <table:table-cell table:formula="of:=([.O11]/[.D11])*100" office:value-type="float" office:value="12.6260122520781" calcext:value-type="float">
            <text:p>12,6260122520781</text:p>
          </table:table-cell>
          <table:table-cell table:formula="of:=([.S11]/[.D11])*100" office:value-type="float" office:value="8.95187193680883" calcext:value-type="float">
            <text:p>8,95187193680883</text:p>
          </table:table-cell>
          <table:table-cell table:formula="of:=([.F11]/[.D11])*100" office:value-type="float" office:value="5.78634185797092" calcext:value-type="float">
            <text:p>5,78634185797092</text:p>
          </table:table-cell>
          <table:table-cell table:formula="of:=([.T11]/[.D11])*100" office:value-type="float" office:value="1.03394657808331" calcext:value-type="float">
            <text:p>1,0339465780833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2.6508" calcext:value-type="float">
            <text:p>552,6508</text:p>
          </table:table-cell>
          <table:table-cell office:value-type="float" office:value="550.0031" calcext:value-type="float">
            <text:p>550,0031</text:p>
          </table:table-cell>
          <table:table-cell office:value-type="float" office:value="15.54258" calcext:value-type="float">
            <text:p>15,54258</text:p>
          </table:table-cell>
          <table:table-cell office:value-type="float" office:value="97.17409" calcext:value-type="float">
            <text:p>97,17409</text:p>
          </table:table-cell>
          <table:table-cell office:value-type="float" office:value="0.8480639" calcext:value-type="float">
            <text:p>0,8480639</text:p>
          </table:table-cell>
          <table:table-cell office:value-type="float" office:value="0.02450383" calcext:value-type="float">
            <text:p>0,02450383</text:p>
          </table:table-cell>
          <table:table-cell office:value-type="float" office:value="0.0007972899" calcext:value-type="float">
            <text:p>0,0007972899</text:p>
          </table:table-cell>
          <table:table-cell office:value-type="float" office:value="0.02164226" calcext:value-type="float">
            <text:p>0,02164226</text:p>
          </table:table-cell>
          <table:table-cell office:value-type="float" office:value="0.0007705891" calcext:value-type="float">
            <text:p>0,0007705891</text:p>
          </table:table-cell>
          <table:table-cell office:value-type="float" office:value="0.8003497" calcext:value-type="float">
            <text:p>0,8003497</text:p>
          </table:table-cell>
          <table:table-cell office:value-type="float" office:value="11.26484" calcext:value-type="float">
            <text:p>11,26484</text:p>
          </table:table-cell>
          <table:table-cell office:value-type="float" office:value="2.088458" calcext:value-type="float">
            <text:p>2,088458</text:p>
          </table:table-cell>
          <table:table-cell office:value-type="float" office:value="9.176385" calcext:value-type="float">
            <text:p>9,176385</text:p>
          </table:table-cell>
          <table:table-cell office:value-type="float" office:value="1.846072" calcext:value-type="float">
            <text:p>1,846072</text:p>
          </table:table-cell>
          <table:table-cell office:value-type="float" office:value="28.71033" calcext:value-type="float">
            <text:p>28,71033</text:p>
          </table:table-cell>
          <table:table-cell office:value-type="float" office:value="1.430377" calcext:value-type="float">
            <text:p>1,430377</text:p>
          </table:table-cell>
          <table:table-cell office:value-type="float" office:value="0.0007460934" calcext:value-type="float">
            <text:p>0,0007460934</text:p>
          </table:table-cell>
          <table:table-cell office:value-type="float" office:value="1.431123" calcext:value-type="float">
            <text:p>1,431123</text:p>
          </table:table-cell>
          <table:table-cell office:value-type="float" office:value="0.1524754" calcext:value-type="float">
            <text:p>0,1524754</text:p>
          </table:table-cell>
          <table:table-cell/>
          <table:table-cell table:formula="of:=([.L12]/[.D12])*100" office:value-type="float" office:value="72.4772849810006" calcext:value-type="float">
            <text:p>72,4772849810006</text:p>
          </table:table-cell>
          <table:table-cell table:formula="of:=([.O12]/[.D12])*100" office:value-type="float" office:value="11.8775132571298" calcext:value-type="float">
            <text:p>11,8775132571298</text:p>
          </table:table-cell>
          <table:table-cell table:formula="of:=([.S12]/[.D12])*100" office:value-type="float" office:value="9.20775701331439" calcext:value-type="float">
            <text:p>9,20775701331439</text:p>
          </table:table-cell>
          <table:table-cell table:formula="of:=([.F12]/[.D12])*100" office:value-type="float" office:value="5.45639076652654" calcext:value-type="float">
            <text:p>5,45639076652654</text:p>
          </table:table-cell>
          <table:table-cell table:formula="of:=([.T12]/[.D12])*100" office:value-type="float" office:value="0.981017308580686" calcext:value-type="float">
            <text:p>0,9810173085806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2.6796" calcext:value-type="float">
            <text:p>602,6796</text:p>
          </table:table-cell>
          <table:table-cell office:value-type="float" office:value="600.004" calcext:value-type="float">
            <text:p>600,004</text:p>
          </table:table-cell>
          <table:table-cell office:value-type="float" office:value="16.52622" calcext:value-type="float">
            <text:p>16,52622</text:p>
          </table:table-cell>
          <table:table-cell office:value-type="float" office:value="97.24565" calcext:value-type="float">
            <text:p>97,24565</text:p>
          </table:table-cell>
          <table:table-cell office:value-type="float" office:value="0.8536427" calcext:value-type="float">
            <text:p>0,8536427</text:p>
          </table:table-cell>
          <table:table-cell office:value-type="float" office:value="0.02716005" calcext:value-type="float">
            <text:p>0,02716005</text:p>
          </table:table-cell>
          <table:table-cell office:value-type="float" office:value="0.0008969955" calcext:value-type="float">
            <text:p>0,0008969955</text:p>
          </table:table-cell>
          <table:table-cell office:value-type="float" office:value="0.02432357" calcext:value-type="float">
            <text:p>0,02432357</text:p>
          </table:table-cell>
          <table:table-cell office:value-type="float" office:value="0.0008866369" calcext:value-type="float">
            <text:p>0,0008866369</text:p>
          </table:table-cell>
          <table:table-cell office:value-type="float" office:value="0.8003758" calcext:value-type="float">
            <text:p>0,8003758</text:p>
          </table:table-cell>
          <table:table-cell office:value-type="float" office:value="12.10329" calcext:value-type="float">
            <text:p>12,10329</text:p>
          </table:table-cell>
          <table:table-cell office:value-type="float" office:value="2.153029" calcext:value-type="float">
            <text:p>2,153029</text:p>
          </table:table-cell>
          <table:table-cell office:value-type="float" office:value="9.950258" calcext:value-type="float">
            <text:p>9,950258</text:p>
          </table:table-cell>
          <table:table-cell office:value-type="float" office:value="1.853946" calcext:value-type="float">
            <text:p>1,853946</text:p>
          </table:table-cell>
          <table:table-cell office:value-type="float" office:value="26.64918" calcext:value-type="float">
            <text:p>26,64918</text:p>
          </table:table-cell>
          <table:table-cell office:value-type="float" office:value="1.560483" calcext:value-type="float">
            <text:p>1,560483</text:p>
          </table:table-cell>
          <table:table-cell office:value-type="float" office:value="0.001125508" calcext:value-type="float">
            <text:p>0,001125508</text:p>
          </table:table-cell>
          <table:table-cell office:value-type="float" office:value="1.561608" calcext:value-type="float">
            <text:p>1,561608</text:p>
          </table:table-cell>
          <table:table-cell office:value-type="float" office:value="0.153742" calcext:value-type="float">
            <text:p>0,153742</text:p>
          </table:table-cell>
          <table:table-cell/>
          <table:table-cell table:formula="of:=([.L13]/[.D13])*100" office:value-type="float" office:value="73.2368926469574" calcext:value-type="float">
            <text:p>73,2368926469574</text:p>
          </table:table-cell>
          <table:table-cell table:formula="of:=([.O13]/[.D13])*100" office:value-type="float" office:value="11.2182096087309" calcext:value-type="float">
            <text:p>11,2182096087309</text:p>
          </table:table-cell>
          <table:table-cell table:formula="of:=([.S13]/[.D13])*100" office:value-type="float" office:value="9.44927515184961" calcext:value-type="float">
            <text:p>9,44927515184961</text:p>
          </table:table-cell>
          <table:table-cell table:formula="of:=([.F13]/[.D13])*100" office:value-type="float" office:value="5.1653838566835" calcext:value-type="float">
            <text:p>5,1653838566835</text:p>
          </table:table-cell>
          <table:table-cell table:formula="of:=([.T13]/[.D13])*100" office:value-type="float" office:value="0.930291379395893" calcext:value-type="float">
            <text:p>0,93029137939589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2.7107" calcext:value-type="float">
            <text:p>652,7107</text:p>
          </table:table-cell>
          <table:table-cell office:value-type="float" office:value="650.0051" calcext:value-type="float">
            <text:p>650,0051</text:p>
          </table:table-cell>
          <table:table-cell office:value-type="float" office:value="17.53242" calcext:value-type="float">
            <text:p>17,53242</text:p>
          </table:table-cell>
          <table:table-cell office:value-type="float" office:value="97.30273" calcext:value-type="float">
            <text:p>97,30273</text:p>
          </table:table-cell>
          <table:table-cell office:value-type="float" office:value="0.8594937" calcext:value-type="float">
            <text:p>0,8594937</text:p>
          </table:table-cell>
          <table:table-cell office:value-type="float" office:value="0.02996144" calcext:value-type="float">
            <text:p>0,02996144</text:p>
          </table:table-cell>
          <table:table-cell office:value-type="float" office:value="0.0009959776" calcext:value-type="float">
            <text:p>0,0009959776</text:p>
          </table:table-cell>
          <table:table-cell office:value-type="float" office:value="0.02712903" calcext:value-type="float">
            <text:p>0,02712903</text:p>
          </table:table-cell>
          <table:table-cell office:value-type="float" office:value="0.001002885" calcext:value-type="float">
            <text:p>0,001002885</text:p>
          </table:table-cell>
          <table:table-cell office:value-type="float" office:value="0.8004034" calcext:value-type="float">
            <text:p>0,8004034</text:p>
          </table:table-cell>
          <table:table-cell office:value-type="float" office:value="12.96016" calcext:value-type="float">
            <text:p>12,96016</text:p>
          </table:table-cell>
          <table:table-cell office:value-type="float" office:value="2.214613" calcext:value-type="float">
            <text:p>2,214613</text:p>
          </table:table-cell>
          <table:table-cell office:value-type="float" office:value="10.74554" calcext:value-type="float">
            <text:p>10,74554</text:p>
          </table:table-cell>
          <table:table-cell office:value-type="float" office:value="1.862814" calcext:value-type="float">
            <text:p>1,862814</text:p>
          </table:table-cell>
          <table:table-cell office:value-type="float" office:value="24.23697" calcext:value-type="float">
            <text:p>24,23697</text:p>
          </table:table-cell>
          <table:table-cell office:value-type="float" office:value="1.693314" calcext:value-type="float">
            <text:p>1,693314</text:p>
          </table:table-cell>
          <table:table-cell office:value-type="float" office:value="0.001592759" calcext:value-type="float">
            <text:p>0,001592759</text:p>
          </table:table-cell>
          <table:table-cell office:value-type="float" office:value="1.694906" calcext:value-type="float">
            <text:p>1,694906</text:p>
          </table:table-cell>
          <table:table-cell office:value-type="float" office:value="0.1550494" calcext:value-type="float">
            <text:p>0,1550494</text:p>
          </table:table-cell>
          <table:table-cell/>
          <table:table-cell table:formula="of:=([.L14]/[.D14])*100" office:value-type="float" office:value="73.9211130009434" calcext:value-type="float">
            <text:p>73,9211130009434</text:p>
          </table:table-cell>
          <table:table-cell table:formula="of:=([.O14]/[.D14])*100" office:value-type="float" office:value="10.6249679165797" calcext:value-type="float">
            <text:p>10,6249679165797</text:p>
          </table:table-cell>
          <table:table-cell table:formula="of:=([.S14]/[.D14])*100" office:value-type="float" office:value="9.66726783866688" calcext:value-type="float">
            <text:p>9,66726783866688</text:p>
          </table:table-cell>
          <table:table-cell table:formula="of:=([.F14]/[.D14])*100" office:value-type="float" office:value="4.90231069070898" calcext:value-type="float">
            <text:p>4,90231069070898</text:p>
          </table:table-cell>
          <table:table-cell table:formula="of:=([.T14]/[.D14])*100" office:value-type="float" office:value="0.884358234630473" calcext:value-type="float">
            <text:p>0,8843582346304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.7445" calcext:value-type="float">
            <text:p>702,7445</text:p>
          </table:table-cell>
          <table:table-cell office:value-type="float" office:value="700.0064" calcext:value-type="float">
            <text:p>700,0064</text:p>
          </table:table-cell>
          <table:table-cell office:value-type="float" office:value="18.55459" calcext:value-type="float">
            <text:p>18,55459</text:p>
          </table:table-cell>
          <table:table-cell office:value-type="float" office:value="97.34937" calcext:value-type="float">
            <text:p>97,34937</text:p>
          </table:table-cell>
          <table:table-cell office:value-type="float" office:value="0.8659053" calcext:value-type="float">
            <text:p>0,8659053</text:p>
          </table:table-cell>
          <table:table-cell office:value-type="float" office:value="0.03296698" calcext:value-type="float">
            <text:p>0,03296698</text:p>
          </table:table-cell>
          <table:table-cell office:value-type="float" office:value="0.001163055" calcext:value-type="float">
            <text:p>0,001163055</text:p>
          </table:table-cell>
          <table:table-cell office:value-type="float" office:value="0.03017072" calcext:value-type="float">
            <text:p>0,03017072</text:p>
          </table:table-cell>
          <table:table-cell office:value-type="float" office:value="0.001170605" calcext:value-type="float">
            <text:p>0,001170605</text:p>
          </table:table-cell>
          <table:table-cell office:value-type="float" office:value="0.8004335" calcext:value-type="float">
            <text:p>0,8004335</text:p>
          </table:table-cell>
          <table:table-cell office:value-type="float" office:value="13.8309" calcext:value-type="float">
            <text:p>13,8309</text:p>
          </table:table-cell>
          <table:table-cell office:value-type="float" office:value="2.278694" calcext:value-type="float">
            <text:p>2,278694</text:p>
          </table:table-cell>
          <table:table-cell office:value-type="float" office:value="11.5522" calcext:value-type="float">
            <text:p>11,5522</text:p>
          </table:table-cell>
          <table:table-cell office:value-type="float" office:value="1.872899" calcext:value-type="float">
            <text:p>1,872899</text:p>
          </table:table-cell>
          <table:table-cell office:value-type="float" office:value="22.39759" calcext:value-type="float">
            <text:p>22,39759</text:p>
          </table:table-cell>
          <table:table-cell office:value-type="float" office:value="1.826416" calcext:value-type="float">
            <text:p>1,826416</text:p>
          </table:table-cell>
          <table:table-cell office:value-type="float" office:value="0.001347687" calcext:value-type="float">
            <text:p>0,001347687</text:p>
          </table:table-cell>
          <table:table-cell office:value-type="float" office:value="1.827763" calcext:value-type="float">
            <text:p>1,827763</text:p>
          </table:table-cell>
          <table:table-cell office:value-type="float" office:value="0.1571306" calcext:value-type="float">
            <text:p>0,1571306</text:p>
          </table:table-cell>
          <table:table-cell/>
          <table:table-cell table:formula="of:=([.L15]/[.D15])*100" office:value-type="float" office:value="74.5416632757717" calcext:value-type="float">
            <text:p>74,5416632757717</text:p>
          </table:table-cell>
          <table:table-cell table:formula="of:=([.O15]/[.D15])*100" office:value-type="float" office:value="10.0939929149607" calcext:value-type="float">
            <text:p>10,0939929149607</text:p>
          </table:table-cell>
          <table:table-cell table:formula="of:=([.S15]/[.D15])*100" office:value-type="float" office:value="9.8507323524799" calcext:value-type="float">
            <text:p>9,8507323524799</text:p>
          </table:table-cell>
          <table:table-cell table:formula="of:=([.F15]/[.D15])*100" office:value-type="float" office:value="4.66679835016565" calcext:value-type="float">
            <text:p>4,66679835016565</text:p>
          </table:table-cell>
          <table:table-cell table:formula="of:=([.T15]/[.D15])*100" office:value-type="float" office:value="0.846855683687972" calcext:value-type="float">
            <text:p>0,84685568368797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2.7812" calcext:value-type="float">
            <text:p>752,7812</text:p>
          </table:table-cell>
          <table:table-cell office:value-type="float" office:value="750.0079" calcext:value-type="float">
            <text:p>750,0079</text:p>
          </table:table-cell>
          <table:table-cell office:value-type="float" office:value="19.58205" calcext:value-type="float">
            <text:p>19,58205</text:p>
          </table:table-cell>
          <table:table-cell office:value-type="float" office:value="97.38909" calcext:value-type="float">
            <text:p>97,38909</text:p>
          </table:table-cell>
          <table:table-cell office:value-type="float" office:value="0.8729021" calcext:value-type="float">
            <text:p>0,8729021</text:p>
          </table:table-cell>
          <table:table-cell office:value-type="float" office:value="0.03632093" calcext:value-type="float">
            <text:p>0,03632093</text:p>
          </table:table-cell>
          <table:table-cell office:value-type="float" office:value="0.001313594" calcext:value-type="float">
            <text:p>0,001313594</text:p>
          </table:table-cell>
          <table:table-cell office:value-type="float" office:value="0.03348325" calcext:value-type="float">
            <text:p>0,03348325</text:p>
          </table:table-cell>
          <table:table-cell office:value-type="float" office:value="0.001317542" calcext:value-type="float">
            <text:p>0,001317542</text:p>
          </table:table-cell>
          <table:table-cell office:value-type="float" office:value="0.8004663" calcext:value-type="float">
            <text:p>0,8004663</text:p>
          </table:table-cell>
          <table:table-cell office:value-type="float" office:value="14.7053" calcext:value-type="float">
            <text:p>14,7053</text:p>
          </table:table-cell>
          <table:table-cell office:value-type="float" office:value="2.337472" calcext:value-type="float">
            <text:p>2,337472</text:p>
          </table:table-cell>
          <table:table-cell office:value-type="float" office:value="12.36783" calcext:value-type="float">
            <text:p>12,36783</text:p>
          </table:table-cell>
          <table:table-cell office:value-type="float" office:value="1.883519" calcext:value-type="float">
            <text:p>1,883519</text:p>
          </table:table-cell>
          <table:table-cell office:value-type="float" office:value="20.87613" calcext:value-type="float">
            <text:p>20,87613</text:p>
          </table:table-cell>
          <table:table-cell office:value-type="float" office:value="1.960068" calcext:value-type="float">
            <text:p>1,960068</text:p>
          </table:table-cell>
          <table:table-cell office:value-type="float" office:value="0.0008671656" calcext:value-type="float">
            <text:p>0,0008671656</text:p>
          </table:table-cell>
          <table:table-cell office:value-type="float" office:value="1.960935" calcext:value-type="float">
            <text:p>1,960935</text:p>
          </table:table-cell>
          <table:table-cell office:value-type="float" office:value="0.1593934" calcext:value-type="float">
            <text:p>0,1593934</text:p>
          </table:table-cell>
          <table:table-cell/>
          <table:table-cell table:formula="of:=([.L16]/[.D16])*100" office:value-type="float" office:value="75.0958147895649" calcext:value-type="float">
            <text:p>75,0958147895649</text:p>
          </table:table-cell>
          <table:table-cell table:formula="of:=([.O16]/[.D16])*100" office:value-type="float" office:value="9.61859968695821" calcext:value-type="float">
            <text:p>9,61859968695821</text:p>
          </table:table-cell>
          <table:table-cell table:formula="of:=([.S16]/[.D16])*100" office:value-type="float" office:value="10.0139413391346" calcext:value-type="float">
            <text:p>10,0139413391346</text:p>
          </table:table-cell>
          <table:table-cell table:formula="of:=([.F16]/[.D16])*100" office:value-type="float" office:value="4.45766454482549" calcext:value-type="float">
            <text:p>4,45766454482549</text:p>
          </table:table-cell>
          <table:table-cell table:formula="of:=([.T16]/[.D16])*100" office:value-type="float" office:value="0.813977086157987" calcext:value-type="float">
            <text:p>0,8139770861579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2.8204" calcext:value-type="float">
            <text:p>802,8204</text:p>
          </table:table-cell>
          <table:table-cell office:value-type="float" office:value="800.0096" calcext:value-type="float">
            <text:p>800,0096</text:p>
          </table:table-cell>
          <table:table-cell office:value-type="float" office:value="20.61164" calcext:value-type="float">
            <text:p>20,61164</text:p>
          </table:table-cell>
          <table:table-cell office:value-type="float" office:value="97.42358" calcext:value-type="float">
            <text:p>97,42358</text:p>
          </table:table-cell>
          <table:table-cell office:value-type="float" office:value="0.8805299" calcext:value-type="float">
            <text:p>0,8805299</text:p>
          </table:table-cell>
          <table:table-cell office:value-type="float" office:value="0.0399864" calcext:value-type="float">
            <text:p>0,0399864</text:p>
          </table:table-cell>
          <table:table-cell office:value-type="float" office:value="0.00145487" calcext:value-type="float">
            <text:p>0,00145487</text:p>
          </table:table-cell>
          <table:table-cell office:value-type="float" office:value="0.03713778" calcext:value-type="float">
            <text:p>0,03713778</text:p>
          </table:table-cell>
          <table:table-cell office:value-type="float" office:value="0.001448377" calcext:value-type="float">
            <text:p>0,001448377</text:p>
          </table:table-cell>
          <table:table-cell office:value-type="float" office:value="0.8005016" calcext:value-type="float">
            <text:p>0,8005016</text:p>
          </table:table-cell>
          <table:table-cell office:value-type="float" office:value="15.58073" calcext:value-type="float">
            <text:p>15,58073</text:p>
          </table:table-cell>
          <table:table-cell office:value-type="float" office:value="2.392614" calcext:value-type="float">
            <text:p>2,392614</text:p>
          </table:table-cell>
          <table:table-cell office:value-type="float" office:value="13.18812" calcext:value-type="float">
            <text:p>13,18812</text:p>
          </table:table-cell>
          <table:table-cell office:value-type="float" office:value="1.894171" calcext:value-type="float">
            <text:p>1,894171</text:p>
          </table:table-cell>
          <table:table-cell office:value-type="float" office:value="19.5318" calcext:value-type="float">
            <text:p>19,5318</text:p>
          </table:table-cell>
          <table:table-cell office:value-type="float" office:value="2.094079" calcext:value-type="float">
            <text:p>2,094079</text:p>
          </table:table-cell>
          <table:table-cell office:value-type="float" office:value="0.0003595766" calcext:value-type="float">
            <text:p>0,0003595766</text:p>
          </table:table-cell>
          <table:table-cell office:value-type="float" office:value="2.094439" calcext:value-type="float">
            <text:p>2,094439</text:p>
          </table:table-cell>
          <table:table-cell office:value-type="float" office:value="0.1617709" calcext:value-type="float">
            <text:p>0,1617709</text:p>
          </table:table-cell>
          <table:table-cell/>
          <table:table-cell table:formula="of:=([.L17]/[.D17])*100" office:value-type="float" office:value="75.5918985582904" calcext:value-type="float">
            <text:p>75,5918985582904</text:p>
          </table:table-cell>
          <table:table-cell table:formula="of:=([.O17]/[.D17])*100" office:value-type="float" office:value="9.18981216438866" calcext:value-type="float">
            <text:p>9,18981216438866</text:p>
          </table:table-cell>
          <table:table-cell table:formula="of:=([.S17]/[.D17])*100" office:value-type="float" office:value="10.1614379059599" calcext:value-type="float">
            <text:p>10,1614379059599</text:p>
          </table:table-cell>
          <table:table-cell table:formula="of:=([.F17]/[.D17])*100" office:value-type="float" office:value="4.27200310116032" calcext:value-type="float">
            <text:p>4,27200310116032</text:p>
          </table:table-cell>
          <table:table-cell table:formula="of:=([.T17]/[.D17])*100" office:value-type="float" office:value="0.784852151502743" calcext:value-type="float">
            <text:p>0,78485215150274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2.8624" calcext:value-type="float">
            <text:p>852,8624</text:p>
          </table:table-cell>
          <table:table-cell office:value-type="float" office:value="850.0115" calcext:value-type="float">
            <text:p>850,0115</text:p>
          </table:table-cell>
          <table:table-cell office:value-type="float" office:value="21.64852" calcext:value-type="float">
            <text:p>21,64852</text:p>
          </table:table-cell>
          <table:table-cell office:value-type="float" office:value="97.45315" calcext:value-type="float">
            <text:p>97,45315</text:p>
          </table:table-cell>
          <table:table-cell office:value-type="float" office:value="0.8886793" calcext:value-type="float">
            <text:p>0,8886793</text:p>
          </table:table-cell>
          <table:table-cell office:value-type="float" office:value="0.04389853" calcext:value-type="float">
            <text:p>0,04389853</text:p>
          </table:table-cell>
          <table:table-cell office:value-type="float" office:value="0.001583678" calcext:value-type="float">
            <text:p>0,001583678</text:p>
          </table:table-cell>
          <table:table-cell office:value-type="float" office:value="0.04104675" calcext:value-type="float">
            <text:p>0,04104675</text:p>
          </table:table-cell>
          <table:table-cell office:value-type="float" office:value="0.001610482" calcext:value-type="float">
            <text:p>0,001610482</text:p>
          </table:table-cell>
          <table:table-cell office:value-type="float" office:value="0.8005392" calcext:value-type="float">
            <text:p>0,8005392</text:p>
          </table:table-cell>
          <table:table-cell office:value-type="float" office:value="16.45931" calcext:value-type="float">
            <text:p>16,45931</text:p>
          </table:table-cell>
          <table:table-cell office:value-type="float" office:value="2.444915" calcext:value-type="float">
            <text:p>2,444915</text:p>
          </table:table-cell>
          <table:table-cell office:value-type="float" office:value="14.01439" calcext:value-type="float">
            <text:p>14,01439</text:p>
          </table:table-cell>
          <table:table-cell office:value-type="float" office:value="1.906006" calcext:value-type="float">
            <text:p>1,906006</text:p>
          </table:table-cell>
          <table:table-cell office:value-type="float" office:value="18.44495" calcext:value-type="float">
            <text:p>18,44495</text:p>
          </table:table-cell>
          <table:table-cell office:value-type="float" office:value="2.229539" calcext:value-type="float">
            <text:p>2,229539</text:p>
          </table:table-cell>
          <table:table-cell office:value-type="float" office:value="0.0003499901" calcext:value-type="float">
            <text:p>0,0003499901</text:p>
          </table:table-cell>
          <table:table-cell office:value-type="float" office:value="2.229889" calcext:value-type="float">
            <text:p>2,229889</text:p>
          </table:table-cell>
          <table:table-cell office:value-type="float" office:value="0.1646379" calcext:value-type="float">
            <text:p>0,1646379</text:p>
          </table:table-cell>
          <table:table-cell/>
          <table:table-cell table:formula="of:=([.L18]/[.D18])*100" office:value-type="float" office:value="76.0297239718928" calcext:value-type="float">
            <text:p>76,0297239718928</text:p>
          </table:table-cell>
          <table:table-cell table:formula="of:=([.O18]/[.D18])*100" office:value-type="float" office:value="8.80432472981987" calcext:value-type="float">
            <text:p>8,80432472981987</text:p>
          </table:table-cell>
          <table:table-cell table:formula="of:=([.S18]/[.D18])*100" office:value-type="float" office:value="10.3004223845325" calcext:value-type="float">
            <text:p>10,3004223845325</text:p>
          </table:table-cell>
          <table:table-cell table:formula="of:=([.F18]/[.D18])*100" office:value-type="float" office:value="4.10503489384032" calcext:value-type="float">
            <text:p>4,10503489384032</text:p>
          </table:table-cell>
          <table:table-cell table:formula="of:=([.T18]/[.D18])*100" office:value-type="float" office:value="0.760504182272044" calcext:value-type="float">
            <text:p>0,7605041822720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2.9071" calcext:value-type="float">
            <text:p>902,9071</text:p>
          </table:table-cell>
          <table:table-cell office:value-type="float" office:value="900.0137" calcext:value-type="float">
            <text:p>900,0137</text:p>
          </table:table-cell>
          <table:table-cell office:value-type="float" office:value="22.68906" calcext:value-type="float">
            <text:p>22,68906</text:p>
          </table:table-cell>
          <table:table-cell office:value-type="float" office:value="97.47903" calcext:value-type="float">
            <text:p>97,47903</text:p>
          </table:table-cell>
          <table:table-cell office:value-type="float" office:value="0.8974331" calcext:value-type="float">
            <text:p>0,8974331</text:p>
          </table:table-cell>
          <table:table-cell office:value-type="float" office:value="0.04804562" calcext:value-type="float">
            <text:p>0,04804562</text:p>
          </table:table-cell>
          <table:table-cell office:value-type="float" office:value="0.001782118" calcext:value-type="float">
            <text:p>0,001782118</text:p>
          </table:table-cell>
          <table:table-cell office:value-type="float" office:value="0.04519994" calcext:value-type="float">
            <text:p>0,04519994</text:p>
          </table:table-cell>
          <table:table-cell office:value-type="float" office:value="0.001825659" calcext:value-type="float">
            <text:p>0,001825659</text:p>
          </table:table-cell>
          <table:table-cell office:value-type="float" office:value="0.8005791" calcext:value-type="float">
            <text:p>0,8005791</text:p>
          </table:table-cell>
          <table:table-cell office:value-type="float" office:value="17.3389" calcext:value-type="float">
            <text:p>17,3389</text:p>
          </table:table-cell>
          <table:table-cell office:value-type="float" office:value="2.49357" calcext:value-type="float">
            <text:p>2,49357</text:p>
          </table:table-cell>
          <table:table-cell office:value-type="float" office:value="14.84533" calcext:value-type="float">
            <text:p>14,84533</text:p>
          </table:table-cell>
          <table:table-cell office:value-type="float" office:value="1.918662" calcext:value-type="float">
            <text:p>1,918662</text:p>
          </table:table-cell>
          <table:table-cell office:value-type="float" office:value="17.55746" calcext:value-type="float">
            <text:p>17,55746</text:p>
          </table:table-cell>
          <table:table-cell office:value-type="float" office:value="2.36598" calcext:value-type="float">
            <text:p>2,36598</text:p>
          </table:table-cell>
          <table:table-cell office:value-type="float" office:value="0.0002603136" calcext:value-type="float">
            <text:p>0,0002603136</text:p>
          </table:table-cell>
          <table:table-cell office:value-type="float" office:value="2.366241" calcext:value-type="float">
            <text:p>2,366241</text:p>
          </table:table-cell>
          <table:table-cell office:value-type="float" office:value="0.167817" calcext:value-type="float">
            <text:p>0,167817</text:p>
          </table:table-cell>
          <table:table-cell/>
          <table:table-cell table:formula="of:=([.L19]/[.D19])*100" office:value-type="float" office:value="76.4196489409433" calcext:value-type="float">
            <text:p>76,4196489409433</text:p>
          </table:table-cell>
          <table:table-cell table:formula="of:=([.O19]/[.D19])*100" office:value-type="float" office:value="8.45633093658353" calcext:value-type="float">
            <text:p>8,45633093658353</text:p>
          </table:table-cell>
          <table:table-cell table:formula="of:=([.S19]/[.D19])*100" office:value-type="float" office:value="10.4289952955301" calcext:value-type="float">
            <text:p>10,4289952955301</text:p>
          </table:table-cell>
          <table:table-cell table:formula="of:=([.F19]/[.D19])*100" office:value-type="float" office:value="3.9553560173934" calcext:value-type="float">
            <text:p>3,9553560173934</text:p>
          </table:table-cell>
          <table:table-cell table:formula="of:=([.T19]/[.D19])*100" office:value-type="float" office:value="0.739638398417563" calcext:value-type="float">
            <text:p>0,73963839841756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2.9543" calcext:value-type="float">
            <text:p>952,9543</text:p>
          </table:table-cell>
          <table:table-cell office:value-type="float" office:value="950.016" calcext:value-type="float">
            <text:p>950,016</text:p>
          </table:table-cell>
          <table:table-cell office:value-type="float" office:value="23.732" calcext:value-type="float">
            <text:p>23,732</text:p>
          </table:table-cell>
          <table:table-cell office:value-type="float" office:value="97.50194" calcext:value-type="float">
            <text:p>97,50194</text:p>
          </table:table-cell>
          <table:table-cell office:value-type="float" office:value="0.9065527" calcext:value-type="float">
            <text:p>0,9065527</text:p>
          </table:table-cell>
          <table:table-cell office:value-type="float" office:value="0.05242653" calcext:value-type="float">
            <text:p>0,05242653</text:p>
          </table:table-cell>
          <table:table-cell office:value-type="float" office:value="0.001931227" calcext:value-type="float">
            <text:p>0,001931227</text:p>
          </table:table-cell>
          <table:table-cell office:value-type="float" office:value="0.04957921" calcext:value-type="float">
            <text:p>0,04957921</text:p>
          </table:table-cell>
          <table:table-cell office:value-type="float" office:value="0.001994077" calcext:value-type="float">
            <text:p>0,001994077</text:p>
          </table:table-cell>
          <table:table-cell office:value-type="float" office:value="0.8006212" calcext:value-type="float">
            <text:p>0,8006212</text:p>
          </table:table-cell>
          <table:table-cell office:value-type="float" office:value="18.21917" calcext:value-type="float">
            <text:p>18,21917</text:p>
          </table:table-cell>
          <table:table-cell office:value-type="float" office:value="2.539693" calcext:value-type="float">
            <text:p>2,539693</text:p>
          </table:table-cell>
          <table:table-cell office:value-type="float" office:value="15.67948" calcext:value-type="float">
            <text:p>15,67948</text:p>
          </table:table-cell>
          <table:table-cell office:value-type="float" office:value="1.931762" calcext:value-type="float">
            <text:p>1,931762</text:p>
          </table:table-cell>
          <table:table-cell office:value-type="float" office:value="16.67848" calcext:value-type="float">
            <text:p>16,67848</text:p>
          </table:table-cell>
          <table:table-cell office:value-type="float" office:value="2.503257" calcext:value-type="float">
            <text:p>2,503257</text:p>
          </table:table-cell>
          <table:table-cell office:value-type="float" office:value="0.0001353572" calcext:value-type="float">
            <text:p>0,0001353572</text:p>
          </table:table-cell>
          <table:table-cell office:value-type="float" office:value="2.503392" calcext:value-type="float">
            <text:p>2,503392</text:p>
          </table:table-cell>
          <table:table-cell office:value-type="float" office:value="0.1711229" calcext:value-type="float">
            <text:p>0,1711229</text:p>
          </table:table-cell>
          <table:table-cell/>
          <table:table-cell table:formula="of:=([.L20]/[.D20])*100" office:value-type="float" office:value="76.7704786785775" calcext:value-type="float">
            <text:p>76,7704786785775</text:p>
          </table:table-cell>
          <table:table-cell table:formula="of:=([.O20]/[.D20])*100" office:value-type="float" office:value="8.13990392718692" calcext:value-type="float">
            <text:p>8,13990392718692</text:p>
          </table:table-cell>
          <table:table-cell table:formula="of:=([.S20]/[.D20])*100" office:value-type="float" office:value="10.5485926175628" calcext:value-type="float">
            <text:p>10,5485926175628</text:p>
          </table:table-cell>
          <table:table-cell table:formula="of:=([.F20]/[.D20])*100" office:value-type="float" office:value="3.81995912691724" calcext:value-type="float">
            <text:p>3,81995912691724</text:p>
          </table:table-cell>
          <table:table-cell table:formula="of:=([.T20]/[.D20])*100" office:value-type="float" office:value="0.721063964267656" calcext:value-type="float">
            <text:p>0,7210639642676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3.004" calcext:value-type="float">
            <text:p>1003,004</text:p>
          </table:table-cell>
          <table:table-cell office:value-type="float" office:value="1000.019" calcext:value-type="float">
            <text:p>1000,019</text:p>
          </table:table-cell>
          <table:table-cell office:value-type="float" office:value="24.77889" calcext:value-type="float">
            <text:p>24,77889</text:p>
          </table:table-cell>
          <table:table-cell office:value-type="float" office:value="97.52216" calcext:value-type="float">
            <text:p>97,52216</text:p>
          </table:table-cell>
          <table:table-cell office:value-type="float" office:value="0.9160255" calcext:value-type="float">
            <text:p>0,9160255</text:p>
          </table:table-cell>
          <table:table-cell office:value-type="float" office:value="0.05701904" calcext:value-type="float">
            <text:p>0,05701904</text:p>
          </table:table-cell>
          <table:table-cell office:value-type="float" office:value="0.002040425" calcext:value-type="float">
            <text:p>0,002040425</text:p>
          </table:table-cell>
          <table:table-cell office:value-type="float" office:value="0.05417128" calcext:value-type="float">
            <text:p>0,05417128</text:p>
          </table:table-cell>
          <table:table-cell office:value-type="float" office:value="0.002128686" calcext:value-type="float">
            <text:p>0,002128686</text:p>
          </table:table-cell>
          <table:table-cell office:value-type="float" office:value="0.8006655" calcext:value-type="float">
            <text:p>0,8006655</text:p>
          </table:table-cell>
          <table:table-cell office:value-type="float" office:value="19.10208" calcext:value-type="float">
            <text:p>19,10208</text:p>
          </table:table-cell>
          <table:table-cell office:value-type="float" office:value="2.582613" calcext:value-type="float">
            <text:p>2,582613</text:p>
          </table:table-cell>
          <table:table-cell office:value-type="float" office:value="16.51947" calcext:value-type="float">
            <text:p>16,51947</text:p>
          </table:table-cell>
          <table:table-cell office:value-type="float" office:value="1.944916" calcext:value-type="float">
            <text:p>1,944916</text:p>
          </table:table-cell>
          <table:table-cell office:value-type="float" office:value="15.8156" calcext:value-type="float">
            <text:p>15,8156</text:p>
          </table:table-cell>
          <table:table-cell office:value-type="float" office:value="2.641361" calcext:value-type="float">
            <text:p>2,641361</text:p>
          </table:table-cell>
          <table:table-cell office:value-type="float" office:value="0.0002602985" calcext:value-type="float">
            <text:p>0,0002602985</text:p>
          </table:table-cell>
          <table:table-cell office:value-type="float" office:value="2.641621" calcext:value-type="float">
            <text:p>2,641621</text:p>
          </table:table-cell>
          <table:table-cell office:value-type="float" office:value="0.1742404" calcext:value-type="float">
            <text:p>0,1742404</text:p>
          </table:table-cell>
          <table:table-cell/>
          <table:table-cell table:formula="of:=([.L21]/[.D21])*100" office:value-type="float" office:value="77.090135998828" calcext:value-type="float">
            <text:p>77,090135998828</text:p>
          </table:table-cell>
          <table:table-cell table:formula="of:=([.O21]/[.D21])*100" office:value-type="float" office:value="7.84908444244274" calcext:value-type="float">
            <text:p>7,84908444244274</text:p>
          </table:table-cell>
          <table:table-cell table:formula="of:=([.S21]/[.D21])*100" office:value-type="float" office:value="10.6607721330536" calcext:value-type="float">
            <text:p>10,6607721330536</text:p>
          </table:table-cell>
          <table:table-cell table:formula="of:=([.F21]/[.D21])*100" office:value-type="float" office:value="3.69679795987633" calcext:value-type="float">
            <text:p>3,69679795987633</text:p>
          </table:table-cell>
          <table:table-cell table:formula="of:=([.T21]/[.D21])*100" office:value-type="float" office:value="0.703180812376987" calcext:value-type="float">
            <text:p>0,70318081237698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3.057" calcext:value-type="float">
            <text:p>1053,057</text:p>
          </table:table-cell>
          <table:table-cell office:value-type="float" office:value="1050.022" calcext:value-type="float">
            <text:p>1050,022</text:p>
          </table:table-cell>
          <table:table-cell office:value-type="float" office:value="25.8323" calcext:value-type="float">
            <text:p>25,8323</text:p>
          </table:table-cell>
          <table:table-cell office:value-type="float" office:value="97.53983" calcext:value-type="float">
            <text:p>97,53983</text:p>
          </table:table-cell>
          <table:table-cell office:value-type="float" office:value="0.9262307" calcext:value-type="float">
            <text:p>0,9262307</text:p>
          </table:table-cell>
          <table:table-cell office:value-type="float" office:value="0.06185319" calcext:value-type="float">
            <text:p>0,06185319</text:p>
          </table:table-cell>
          <table:table-cell office:value-type="float" office:value="0.002291572" calcext:value-type="float">
            <text:p>0,002291572</text:p>
          </table:table-cell>
          <table:table-cell office:value-type="float" office:value="0.05900812" calcext:value-type="float">
            <text:p>0,05900812</text:p>
          </table:table-cell>
          <table:table-cell office:value-type="float" office:value="0.002364686" calcext:value-type="float">
            <text:p>0,002364686</text:p>
          </table:table-cell>
          <table:table-cell office:value-type="float" office:value="0.8007121" calcext:value-type="float">
            <text:p>0,8007121</text:p>
          </table:table-cell>
          <table:table-cell office:value-type="float" office:value="19.98783" calcext:value-type="float">
            <text:p>19,98783</text:p>
          </table:table-cell>
          <table:table-cell office:value-type="float" office:value="2.623329" calcext:value-type="float">
            <text:p>2,623329</text:p>
          </table:table-cell>
          <table:table-cell office:value-type="float" office:value="17.3645" calcext:value-type="float">
            <text:p>17,3645</text:p>
          </table:table-cell>
          <table:table-cell office:value-type="float" office:value="1.95994" calcext:value-type="float">
            <text:p>1,95994</text:p>
          </table:table-cell>
          <table:table-cell office:value-type="float" office:value="15.08548" calcext:value-type="float">
            <text:p>15,08548</text:p>
          </table:table-cell>
          <table:table-cell office:value-type="float" office:value="2.77995" calcext:value-type="float">
            <text:p>2,77995</text:p>
          </table:table-cell>
          <table:table-cell office:value-type="float" office:value="0.0003550987" calcext:value-type="float">
            <text:p>0,0003550987</text:p>
          </table:table-cell>
          <table:table-cell office:value-type="float" office:value="2.780305" calcext:value-type="float">
            <text:p>2,780305</text:p>
          </table:table-cell>
          <table:table-cell office:value-type="float" office:value="0.1779899" calcext:value-type="float">
            <text:p>0,1779899</text:p>
          </table:table-cell>
          <table:table-cell/>
          <table:table-cell table:formula="of:=([.L22]/[.D22])*100" office:value-type="float" office:value="77.3753401748973" calcext:value-type="float">
            <text:p>77,3753401748973</text:p>
          </table:table-cell>
          <table:table-cell table:formula="of:=([.O22]/[.D22])*100" office:value-type="float" office:value="7.58716800284915" calcext:value-type="float">
            <text:p>7,58716800284915</text:p>
          </table:table-cell>
          <table:table-cell table:formula="of:=([.S22]/[.D22])*100" office:value-type="float" office:value="10.7629014838013" calcext:value-type="float">
            <text:p>10,7629014838013</text:p>
          </table:table-cell>
          <table:table-cell table:formula="of:=([.F22]/[.D22])*100" office:value-type="float" office:value="3.58555258339366" calcext:value-type="float">
            <text:p>3,58555258339366</text:p>
          </table:table-cell>
          <table:table-cell table:formula="of:=([.T22]/[.D22])*100" office:value-type="float" office:value="0.689020722119207" calcext:value-type="float">
            <text:p>0,6890207221192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3.112" calcext:value-type="float">
            <text:p>1103,112</text:p>
          </table:table-cell>
          <table:table-cell office:value-type="float" office:value="1100.025" calcext:value-type="float">
            <text:p>1100,025</text:p>
          </table:table-cell>
          <table:table-cell office:value-type="float" office:value="26.88897" calcext:value-type="float">
            <text:p>26,88897</text:p>
          </table:table-cell>
          <table:table-cell office:value-type="float" office:value="97.5556" calcext:value-type="float">
            <text:p>97,5556</text:p>
          </table:table-cell>
          <table:table-cell office:value-type="float" office:value="0.9367008" calcext:value-type="float">
            <text:p>0,9367008</text:p>
          </table:table-cell>
          <table:table-cell office:value-type="float" office:value="0.06690416" calcext:value-type="float">
            <text:p>0,06690416</text:p>
          </table:table-cell>
          <table:table-cell office:value-type="float" office:value="0.002449764" calcext:value-type="float">
            <text:p>0,002449764</text:p>
          </table:table-cell>
          <table:table-cell office:value-type="float" office:value="0.06405997" calcext:value-type="float">
            <text:p>0,06405997</text:p>
          </table:table-cell>
          <table:table-cell office:value-type="float" office:value="0.002525386" calcext:value-type="float">
            <text:p>0,002525386</text:p>
          </table:table-cell>
          <table:table-cell office:value-type="float" office:value="0.8007609" calcext:value-type="float">
            <text:p>0,8007609</text:p>
          </table:table-cell>
          <table:table-cell office:value-type="float" office:value="20.87514" calcext:value-type="float">
            <text:p>20,87514</text:p>
          </table:table-cell>
          <table:table-cell office:value-type="float" office:value="2.662318" calcext:value-type="float">
            <text:p>2,662318</text:p>
          </table:table-cell>
          <table:table-cell office:value-type="float" office:value="18.21283" calcext:value-type="float">
            <text:p>18,21283</text:p>
          </table:table-cell>
          <table:table-cell office:value-type="float" office:value="1.975487" calcext:value-type="float">
            <text:p>1,975487</text:p>
          </table:table-cell>
          <table:table-cell office:value-type="float" office:value="14.50796" calcext:value-type="float">
            <text:p>14,50796</text:p>
          </table:table-cell>
          <table:table-cell office:value-type="float" office:value="2.919265" calcext:value-type="float">
            <text:p>2,919265</text:p>
          </table:table-cell>
          <table:table-cell office:value-type="float" office:value="0.0003364294" calcext:value-type="float">
            <text:p>0,0003364294</text:p>
          </table:table-cell>
          <table:table-cell office:value-type="float" office:value="2.919601" calcext:value-type="float">
            <text:p>2,919601</text:p>
          </table:table-cell>
          <table:table-cell office:value-type="float" office:value="0.1820344" calcext:value-type="float">
            <text:p>0,1820344</text:p>
          </table:table-cell>
          <table:table-cell/>
          <table:table-cell table:formula="of:=([.L23]/[.D23])*100" office:value-type="float" office:value="77.6345839948499" calcext:value-type="float">
            <text:p>77,6345839948499</text:p>
          </table:table-cell>
          <table:table-cell table:formula="of:=([.O23]/[.D23])*100" office:value-type="float" office:value="7.34683031741268" calcext:value-type="float">
            <text:p>7,34683031741268</text:p>
          </table:table-cell>
          <table:table-cell table:formula="of:=([.S23]/[.D23])*100" office:value-type="float" office:value="10.8579874945005" calcext:value-type="float">
            <text:p>10,8579874945005</text:p>
          </table:table-cell>
          <table:table-cell table:formula="of:=([.F23]/[.D23])*100" office:value-type="float" office:value="3.48358750818644" calcext:value-type="float">
            <text:p>3,48358750818644</text:p>
          </table:table-cell>
          <table:table-cell table:formula="of:=([.T23]/[.D23])*100" office:value-type="float" office:value="0.6769853958705" calcext:value-type="float">
            <text:p>0,676985395870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3.17" calcext:value-type="float">
            <text:p>1153,17</text:p>
          </table:table-cell>
          <table:table-cell office:value-type="float" office:value="1150.028" calcext:value-type="float">
            <text:p>1150,028</text:p>
          </table:table-cell>
          <table:table-cell office:value-type="float" office:value="27.95189" calcext:value-type="float">
            <text:p>27,95189</text:p>
          </table:table-cell>
          <table:table-cell office:value-type="float" office:value="97.56946" calcext:value-type="float">
            <text:p>97,56946</text:p>
          </table:table-cell>
          <table:table-cell office:value-type="float" office:value="0.9478801" calcext:value-type="float">
            <text:p>0,9478801</text:p>
          </table:table-cell>
          <table:table-cell office:value-type="float" office:value="0.07219933" calcext:value-type="float">
            <text:p>0,07219933</text:p>
          </table:table-cell>
          <table:table-cell office:value-type="float" office:value="0.002693241" calcext:value-type="float">
            <text:p>0,002693241</text:p>
          </table:table-cell>
          <table:table-cell office:value-type="float" office:value="0.06936046" calcext:value-type="float">
            <text:p>0,06936046</text:p>
          </table:table-cell>
          <table:table-cell office:value-type="float" office:value="0.002814363" calcext:value-type="float">
            <text:p>0,002814363</text:p>
          </table:table-cell>
          <table:table-cell office:value-type="float" office:value="0.8008121" calcext:value-type="float">
            <text:p>0,8008121</text:p>
          </table:table-cell>
          <table:table-cell office:value-type="float" office:value="21.76571" calcext:value-type="float">
            <text:p>21,76571</text:p>
          </table:table-cell>
          <table:table-cell office:value-type="float" office:value="2.700133" calcext:value-type="float">
            <text:p>2,700133</text:p>
          </table:table-cell>
          <table:table-cell office:value-type="float" office:value="19.06558" calcext:value-type="float">
            <text:p>19,06558</text:p>
          </table:table-cell>
          <table:table-cell office:value-type="float" office:value="1.991871" calcext:value-type="float">
            <text:p>1,991871</text:p>
          </table:table-cell>
          <table:table-cell office:value-type="float" office:value="13.96622" calcext:value-type="float">
            <text:p>13,96622</text:p>
          </table:table-cell>
          <table:table-cell office:value-type="float" office:value="3.059456" calcext:value-type="float">
            <text:p>3,059456</text:p>
          </table:table-cell>
          <table:table-cell office:value-type="float" office:value="0.0006962313" calcext:value-type="float">
            <text:p>0,0006962313</text:p>
          </table:table-cell>
          <table:table-cell office:value-type="float" office:value="3.060152" calcext:value-type="float">
            <text:p>3,060152</text:p>
          </table:table-cell>
          <table:table-cell office:value-type="float" office:value="0.1862788" calcext:value-type="float">
            <text:p>0,1862788</text:p>
          </table:table-cell>
          <table:table-cell/>
          <table:table-cell table:formula="of:=([.L24]/[.D24])*100" office:value-type="float" office:value="77.8684732946502" calcext:value-type="float">
            <text:p>77,8684732946502</text:p>
          </table:table-cell>
          <table:table-cell table:formula="of:=([.O24]/[.D24])*100" office:value-type="float" office:value="7.12606911375224" calcext:value-type="float">
            <text:p>7,12606911375224</text:p>
          </table:table-cell>
          <table:table-cell table:formula="of:=([.S24]/[.D24])*100" office:value-type="float" office:value="10.9479251671354" calcext:value-type="float">
            <text:p>10,9479251671354</text:p>
          </table:table-cell>
          <table:table-cell table:formula="of:=([.F24]/[.D24])*100" office:value-type="float" office:value="3.39111272976532" calcext:value-type="float">
            <text:p>3,39111272976532</text:p>
          </table:table-cell>
          <table:table-cell table:formula="of:=([.T24]/[.D24])*100" office:value-type="float" office:value="0.666426492090517" calcext:value-type="float">
            <text:p>0,6664264920905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3.231" calcext:value-type="float">
            <text:p>1203,231</text:p>
          </table:table-cell>
          <table:table-cell office:value-type="float" office:value="1200.032" calcext:value-type="float">
            <text:p>1200,032</text:p>
          </table:table-cell>
          <table:table-cell office:value-type="float" office:value="29.01815" calcext:value-type="float">
            <text:p>29,01815</text:p>
          </table:table-cell>
          <table:table-cell office:value-type="float" office:value="97.58189" calcext:value-type="float">
            <text:p>97,58189</text:p>
          </table:table-cell>
          <table:table-cell office:value-type="float" office:value="0.9593018" calcext:value-type="float">
            <text:p>0,9593018</text:p>
          </table:table-cell>
          <table:table-cell office:value-type="float" office:value="0.07771788" calcext:value-type="float">
            <text:p>0,07771788</text:p>
          </table:table-cell>
          <table:table-cell office:value-type="float" office:value="0.002828504" calcext:value-type="float">
            <text:p>0,002828504</text:p>
          </table:table-cell>
          <table:table-cell office:value-type="float" office:value="0.07488109" calcext:value-type="float">
            <text:p>0,07488109</text:p>
          </table:table-cell>
          <table:table-cell office:value-type="float" office:value="0.003008364" calcext:value-type="float">
            <text:p>0,003008364</text:p>
          </table:table-cell>
          <table:table-cell office:value-type="float" office:value="0.8008655" calcext:value-type="float">
            <text:p>0,8008655</text:p>
          </table:table-cell>
          <table:table-cell office:value-type="float" office:value="22.65811" calcext:value-type="float">
            <text:p>22,65811</text:p>
          </table:table-cell>
          <table:table-cell office:value-type="float" office:value="2.736147" calcext:value-type="float">
            <text:p>2,736147</text:p>
          </table:table-cell>
          <table:table-cell office:value-type="float" office:value="19.92197" calcext:value-type="float">
            <text:p>19,92197</text:p>
          </table:table-cell>
          <table:table-cell office:value-type="float" office:value="2.008839" calcext:value-type="float">
            <text:p>2,008839</text:p>
          </table:table-cell>
          <table:table-cell office:value-type="float" office:value="13.37075" calcext:value-type="float">
            <text:p>13,37075</text:p>
          </table:table-cell>
          <table:table-cell office:value-type="float" office:value="3.200276" calcext:value-type="float">
            <text:p>3,200276</text:p>
          </table:table-cell>
          <table:table-cell office:value-type="float" office:value="0.0008379703" calcext:value-type="float">
            <text:p>0,0008379703</text:p>
          </table:table-cell>
          <table:table-cell office:value-type="float" office:value="3.201114" calcext:value-type="float">
            <text:p>3,201114</text:p>
          </table:table-cell>
          <table:table-cell office:value-type="float" office:value="0.1907812" calcext:value-type="float">
            <text:p>0,1907812</text:p>
          </table:table-cell>
          <table:table-cell/>
          <table:table-cell table:formula="of:=([.L25]/[.D25])*100" office:value-type="float" office:value="78.0825448900085" calcext:value-type="float">
            <text:p>78,0825448900085</text:p>
          </table:table-cell>
          <table:table-cell table:formula="of:=([.O25]/[.D25])*100" office:value-type="float" office:value="6.92269838015173" calcext:value-type="float">
            <text:p>6,92269838015173</text:p>
          </table:table-cell>
          <table:table-cell table:formula="of:=([.S25]/[.D25])*100" office:value-type="float" office:value="11.0314199905921" calcext:value-type="float">
            <text:p>11,0314199905921</text:p>
          </table:table-cell>
          <table:table-cell table:formula="of:=([.F25]/[.D25])*100" office:value-type="float" office:value="3.305868223853" calcext:value-type="float">
            <text:p>3,305868223853</text:p>
          </table:table-cell>
          <table:table-cell table:formula="of:=([.T25]/[.D25])*100" office:value-type="float" office:value="0.657454730918408" calcext:value-type="float">
            <text:p>0,65745473091840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53.295" calcext:value-type="float">
            <text:p>1253,295</text:p>
          </table:table-cell>
          <table:table-cell office:value-type="float" office:value="1250.036" calcext:value-type="float">
            <text:p>1250,036</text:p>
          </table:table-cell>
          <table:table-cell office:value-type="float" office:value="30.08992" calcext:value-type="float">
            <text:p>30,08992</text:p>
          </table:table-cell>
          <table:table-cell office:value-type="float" office:value="97.59288" calcext:value-type="float">
            <text:p>97,59288</text:p>
          </table:table-cell>
          <table:table-cell office:value-type="float" office:value="0.9712056" calcext:value-type="float">
            <text:p>0,9712056</text:p>
          </table:table-cell>
          <table:table-cell office:value-type="float" office:value="0.08347474" calcext:value-type="float">
            <text:p>0,08347474</text:p>
          </table:table-cell>
          <table:table-cell office:value-type="float" office:value="0.002988667" calcext:value-type="float">
            <text:p>0,002988667</text:p>
          </table:table-cell>
          <table:table-cell office:value-type="float" office:value="0.08062878" calcext:value-type="float">
            <text:p>0,08062878</text:p>
          </table:table-cell>
          <table:table-cell office:value-type="float" office:value="0.003191891" calcext:value-type="float">
            <text:p>0,003191891</text:p>
          </table:table-cell>
          <table:table-cell office:value-type="float" office:value="0.8009211" calcext:value-type="float">
            <text:p>0,8009211</text:p>
          </table:table-cell>
          <table:table-cell office:value-type="float" office:value="23.55372" calcext:value-type="float">
            <text:p>23,55372</text:p>
          </table:table-cell>
          <table:table-cell office:value-type="float" office:value="2.77074" calcext:value-type="float">
            <text:p>2,77074</text:p>
          </table:table-cell>
          <table:table-cell office:value-type="float" office:value="20.78298" calcext:value-type="float">
            <text:p>20,78298</text:p>
          </table:table-cell>
          <table:table-cell office:value-type="float" office:value="2.026514" calcext:value-type="float">
            <text:p>2,026514</text:p>
          </table:table-cell>
          <table:table-cell office:value-type="float" office:value="13.02337" calcext:value-type="float">
            <text:p>13,02337</text:p>
          </table:table-cell>
          <table:table-cell office:value-type="float" office:value="3.342018" calcext:value-type="float">
            <text:p>3,342018</text:p>
          </table:table-cell>
          <table:table-cell office:value-type="float" office:value="0.0005540931" calcext:value-type="float">
            <text:p>0,0005540931</text:p>
          </table:table-cell>
          <table:table-cell office:value-type="float" office:value="3.342572" calcext:value-type="float">
            <text:p>3,342572</text:p>
          </table:table-cell>
          <table:table-cell office:value-type="float" office:value="0.1959065" calcext:value-type="float">
            <text:p>0,1959065</text:p>
          </table:table-cell>
          <table:table-cell/>
          <table:table-cell table:formula="of:=([.L26]/[.D26])*100" office:value-type="float" office:value="78.277775414491" calcext:value-type="float">
            <text:p>78,277775414491</text:p>
          </table:table-cell>
          <table:table-cell table:formula="of:=([.O26]/[.D26])*100" office:value-type="float" office:value="6.73486004615499" calcext:value-type="float">
            <text:p>6,73486004615499</text:p>
          </table:table-cell>
          <table:table-cell table:formula="of:=([.S26]/[.D26])*100" office:value-type="float" office:value="11.1086104582531" calcext:value-type="float">
            <text:p>11,1086104582531</text:p>
          </table:table-cell>
          <table:table-cell table:formula="of:=([.F26]/[.D26])*100" office:value-type="float" office:value="3.22767757441695" calcext:value-type="float">
            <text:p>3,22767757441695</text:p>
          </table:table-cell>
          <table:table-cell table:formula="of:=([.T26]/[.D26])*100" office:value-type="float" office:value="0.651070192277015" calcext:value-type="float">
            <text:p>0,65107019227701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3.361" calcext:value-type="float">
            <text:p>1303,361</text:p>
          </table:table-cell>
          <table:table-cell office:value-type="float" office:value="1300.041" calcext:value-type="float">
            <text:p>1300,041</text:p>
          </table:table-cell>
          <table:table-cell office:value-type="float" office:value="31.16843" calcext:value-type="float">
            <text:p>31,16843</text:p>
          </table:table-cell>
          <table:table-cell office:value-type="float" office:value="97.6025" calcext:value-type="float">
            <text:p>97,6025</text:p>
          </table:table-cell>
          <table:table-cell office:value-type="float" office:value="0.983714" calcext:value-type="float">
            <text:p>0,983714</text:p>
          </table:table-cell>
          <table:table-cell office:value-type="float" office:value="0.08946511" calcext:value-type="float">
            <text:p>0,08946511</text:p>
          </table:table-cell>
          <table:table-cell office:value-type="float" office:value="0.003194893" calcext:value-type="float">
            <text:p>0,003194893</text:p>
          </table:table-cell>
          <table:table-cell office:value-type="float" office:value="0.08661894" calcext:value-type="float">
            <text:p>0,08661894</text:p>
          </table:table-cell>
          <table:table-cell office:value-type="float" office:value="0.003455443" calcext:value-type="float">
            <text:p>0,003455443</text:p>
          </table:table-cell>
          <table:table-cell office:value-type="float" office:value="0.8009791" calcext:value-type="float">
            <text:p>0,8009791</text:p>
          </table:table-cell>
          <table:table-cell office:value-type="float" office:value="24.45378" calcext:value-type="float">
            <text:p>24,45378</text:p>
          </table:table-cell>
          <table:table-cell office:value-type="float" office:value="2.804346" calcext:value-type="float">
            <text:p>2,804346</text:p>
          </table:table-cell>
          <table:table-cell office:value-type="float" office:value="21.64943" calcext:value-type="float">
            <text:p>21,64943</text:p>
          </table:table-cell>
          <table:table-cell office:value-type="float" office:value="2.045008" calcext:value-type="float">
            <text:p>2,045008</text:p>
          </table:table-cell>
          <table:table-cell office:value-type="float" office:value="12.50268" calcext:value-type="float">
            <text:p>12,50268</text:p>
          </table:table-cell>
          <table:table-cell office:value-type="float" office:value="3.484651" calcext:value-type="float">
            <text:p>3,484651</text:p>
          </table:table-cell>
          <table:table-cell office:value-type="float" office:value="0.0003244105" calcext:value-type="float">
            <text:p>0,0003244105</text:p>
          </table:table-cell>
          <table:table-cell office:value-type="float" office:value="3.484975" calcext:value-type="float">
            <text:p>3,484975</text:p>
          </table:table-cell>
          <table:table-cell office:value-type="float" office:value="0.2009566" calcext:value-type="float">
            <text:p>0,2009566</text:p>
          </table:table-cell>
          <table:table-cell/>
          <table:table-cell table:formula="of:=([.L27]/[.D27])*100" office:value-type="float" office:value="78.4568873055204" calcext:value-type="float">
            <text:p>78,4568873055204</text:p>
          </table:table-cell>
          <table:table-cell table:formula="of:=([.O27]/[.D27])*100" office:value-type="float" office:value="6.56115178082438" calcext:value-type="float">
            <text:p>6,56115178082438</text:p>
          </table:table-cell>
          <table:table-cell table:formula="of:=([.S27]/[.D27])*100" office:value-type="float" office:value="11.181105368477" calcext:value-type="float">
            <text:p>11,181105368477</text:p>
          </table:table-cell>
          <table:table-cell table:formula="of:=([.F27]/[.D27])*100" office:value-type="float" office:value="3.15612303860028" calcext:value-type="float">
            <text:p>3,15612303860028</text:p>
          </table:table-cell>
          <table:table-cell table:formula="of:=([.T27]/[.D27])*100" office:value-type="float" office:value="0.64474405672663" calcext:value-type="float">
            <text:p>0,6447440567266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3.43" calcext:value-type="float">
            <text:p>1353,43</text:p>
          </table:table-cell>
          <table:table-cell office:value-type="float" office:value="1350.046" calcext:value-type="float">
            <text:p>1350,046</text:p>
          </table:table-cell>
          <table:table-cell office:value-type="float" office:value="32.25132" calcext:value-type="float">
            <text:p>32,25132</text:p>
          </table:table-cell>
          <table:table-cell office:value-type="float" office:value="97.61109" calcext:value-type="float">
            <text:p>97,61109</text:p>
          </table:table-cell>
          <table:table-cell office:value-type="float" office:value="0.9968885" calcext:value-type="float">
            <text:p>0,9968885</text:p>
          </table:table-cell>
          <table:table-cell office:value-type="float" office:value="0.09568048" calcext:value-type="float">
            <text:p>0,09568048</text:p>
          </table:table-cell>
          <table:table-cell office:value-type="float" office:value="0.003502596" calcext:value-type="float">
            <text:p>0,003502596</text:p>
          </table:table-cell>
          <table:table-cell office:value-type="float" office:value="0.09284105" calcext:value-type="float">
            <text:p>0,09284105</text:p>
          </table:table-cell>
          <table:table-cell office:value-type="float" office:value="0.003824047" calcext:value-type="float">
            <text:p>0,003824047</text:p>
          </table:table-cell>
          <table:table-cell office:value-type="float" office:value="0.8010393" calcext:value-type="float">
            <text:p>0,8010393</text:p>
          </table:table-cell>
          <table:table-cell office:value-type="float" office:value="25.35581" calcext:value-type="float">
            <text:p>25,35581</text:p>
          </table:table-cell>
          <table:table-cell office:value-type="float" office:value="2.837227" calcext:value-type="float">
            <text:p>2,837227</text:p>
          </table:table-cell>
          <table:table-cell office:value-type="float" office:value="22.51859" calcext:value-type="float">
            <text:p>22,51859</text:p>
          </table:table-cell>
          <table:table-cell office:value-type="float" office:value="2.06463" calcext:value-type="float">
            <text:p>2,06463</text:p>
          </table:table-cell>
          <table:table-cell office:value-type="float" office:value="12.06279" calcext:value-type="float">
            <text:p>12,06279</text:p>
          </table:table-cell>
          <table:table-cell office:value-type="float" office:value="3.627587" calcext:value-type="float">
            <text:p>3,627587</text:p>
          </table:table-cell>
          <table:table-cell office:value-type="float" office:value="0.0001244322" calcext:value-type="float">
            <text:p>0,0001244322</text:p>
          </table:table-cell>
          <table:table-cell office:value-type="float" office:value="3.627712" calcext:value-type="float">
            <text:p>3,627712</text:p>
          </table:table-cell>
          <table:table-cell office:value-type="float" office:value="0.2062734" calcext:value-type="float">
            <text:p>0,2062734</text:p>
          </table:table-cell>
          <table:table-cell/>
          <table:table-cell table:formula="of:=([.L28]/[.D28])*100" office:value-type="float" office:value="78.6194487543456" calcext:value-type="float">
            <text:p>78,6194487543456</text:p>
          </table:table-cell>
          <table:table-cell table:formula="of:=([.O28]/[.D28])*100" office:value-type="float" office:value="6.40169146565164" calcext:value-type="float">
            <text:p>6,40169146565164</text:p>
          </table:table-cell>
          <table:table-cell table:formula="of:=([.S28]/[.D28])*100" office:value-type="float" office:value="11.2482589859888" calcext:value-type="float">
            <text:p>11,2482589859888</text:p>
          </table:table-cell>
          <table:table-cell table:formula="of:=([.F28]/[.D28])*100" office:value-type="float" office:value="3.09100061640888" calcext:value-type="float">
            <text:p>3,09100061640888</text:p>
          </table:table-cell>
          <table:table-cell table:formula="of:=([.T28]/[.D28])*100" office:value-type="float" office:value="0.639581263650604" calcext:value-type="float">
            <text:p>0,6395812636506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3.502" calcext:value-type="float">
            <text:p>1403,502</text:p>
          </table:table-cell>
          <table:table-cell office:value-type="float" office:value="1400.051" calcext:value-type="float">
            <text:p>1400,051</text:p>
          </table:table-cell>
          <table:table-cell office:value-type="float" office:value="33.33784" calcext:value-type="float">
            <text:p>33,33784</text:p>
          </table:table-cell>
          <table:table-cell office:value-type="float" office:value="97.61881" calcext:value-type="float">
            <text:p>97,61881</text:p>
          </table:table-cell>
          <table:table-cell office:value-type="float" office:value="1.010276" calcext:value-type="float">
            <text:p>1,010276</text:p>
          </table:table-cell>
          <table:table-cell office:value-type="float" office:value="0.1021336" calcext:value-type="float">
            <text:p>0,1021336</text:p>
          </table:table-cell>
          <table:table-cell office:value-type="float" office:value="0.00373689" calcext:value-type="float">
            <text:p>0,00373689</text:p>
          </table:table-cell>
          <table:table-cell office:value-type="float" office:value="0.09928152" calcext:value-type="float">
            <text:p>0,09928152</text:p>
          </table:table-cell>
          <table:table-cell office:value-type="float" office:value="0.004022017" calcext:value-type="float">
            <text:p>0,004022017</text:p>
          </table:table-cell>
          <table:table-cell office:value-type="float" office:value="0.8011018" calcext:value-type="float">
            <text:p>0,8011018</text:p>
          </table:table-cell>
          <table:table-cell office:value-type="float" office:value="26.25969" calcext:value-type="float">
            <text:p>26,25969</text:p>
          </table:table-cell>
          <table:table-cell office:value-type="float" office:value="2.869092" calcext:value-type="float">
            <text:p>2,869092</text:p>
          </table:table-cell>
          <table:table-cell office:value-type="float" office:value="23.3906" calcext:value-type="float">
            <text:p>23,3906</text:p>
          </table:table-cell>
          <table:table-cell office:value-type="float" office:value="2.084914" calcext:value-type="float">
            <text:p>2,084914</text:p>
          </table:table-cell>
          <table:table-cell office:value-type="float" office:value="11.59471" calcext:value-type="float">
            <text:p>11,59471</text:p>
          </table:table-cell>
          <table:table-cell office:value-type="float" office:value="3.77115" calcext:value-type="float">
            <text:p>3,77115</text:p>
          </table:table-cell>
          <table:table-cell office:value-type="float" office:value="0.00004676148" calcext:value-type="float">
            <text:p>0,00004676148</text:p>
          </table:table-cell>
          <table:table-cell office:value-type="float" office:value="3.771196" calcext:value-type="float">
            <text:p>3,771196</text:p>
          </table:table-cell>
          <table:table-cell office:value-type="float" office:value="0.2117669" calcext:value-type="float">
            <text:p>0,2117669</text:p>
          </table:table-cell>
          <table:table-cell/>
          <table:table-cell table:formula="of:=([.L29]/[.D29])*100" office:value-type="float" office:value="78.7684205095471" calcext:value-type="float">
            <text:p>78,7684205095471</text:p>
          </table:table-cell>
          <table:table-cell table:formula="of:=([.O29]/[.D29])*100" office:value-type="float" office:value="6.25389647319682" calcext:value-type="float">
            <text:p>6,25389647319682</text:p>
          </table:table-cell>
          <table:table-cell table:formula="of:=([.S29]/[.D29])*100" office:value-type="float" office:value="11.312058609676" calcext:value-type="float">
            <text:p>11,312058609676</text:p>
          </table:table-cell>
          <table:table-cell table:formula="of:=([.F29]/[.D29])*100" office:value-type="float" office:value="3.03041828744754" calcext:value-type="float">
            <text:p>3,03041828744754</text:p>
          </table:table-cell>
          <table:table-cell table:formula="of:=([.T29]/[.D29])*100" office:value-type="float" office:value="0.635214818956477" calcext:value-type="float">
            <text:p>0,63521481895647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3.576" calcext:value-type="float">
            <text:p>1453,576</text:p>
          </table:table-cell>
          <table:table-cell office:value-type="float" office:value="1450.056" calcext:value-type="float">
            <text:p>1450,056</text:p>
          </table:table-cell>
          <table:table-cell office:value-type="float" office:value="34.42754" calcext:value-type="float">
            <text:p>34,42754</text:p>
          </table:table-cell>
          <table:table-cell office:value-type="float" office:value="97.62578" calcext:value-type="float">
            <text:p>97,62578</text:p>
          </table:table-cell>
          <table:table-cell office:value-type="float" office:value="1.024059" calcext:value-type="float">
            <text:p>1,024059</text:p>
          </table:table-cell>
          <table:table-cell office:value-type="float" office:value="0.1088143" calcext:value-type="float">
            <text:p>0,1088143</text:p>
          </table:table-cell>
          <table:table-cell office:value-type="float" office:value="0.003889468" calcext:value-type="float">
            <text:p>0,003889468</text:p>
          </table:table-cell>
          <table:table-cell office:value-type="float" office:value="0.1059572" calcext:value-type="float">
            <text:p>0,1059572</text:p>
          </table:table-cell>
          <table:table-cell office:value-type="float" office:value="0.004230903" calcext:value-type="float">
            <text:p>0,004230903</text:p>
          </table:table-cell>
          <table:table-cell office:value-type="float" office:value="0.8011665" calcext:value-type="float">
            <text:p>0,8011665</text:p>
          </table:table-cell>
          <table:table-cell office:value-type="float" office:value="27.16522" calcext:value-type="float">
            <text:p>27,16522</text:p>
          </table:table-cell>
          <table:table-cell office:value-type="float" office:value="2.900055" calcext:value-type="float">
            <text:p>2,900055</text:p>
          </table:table-cell>
          <table:table-cell office:value-type="float" office:value="24.26517" calcext:value-type="float">
            <text:p>24,26517</text:p>
          </table:table-cell>
          <table:table-cell office:value-type="float" office:value="2.105895" calcext:value-type="float">
            <text:p>2,105895</text:p>
          </table:table-cell>
          <table:table-cell office:value-type="float" office:value="11.20085" calcext:value-type="float">
            <text:p>11,20085</text:p>
          </table:table-cell>
          <table:table-cell office:value-type="float" office:value="3.914708" calcext:value-type="float">
            <text:p>3,914708</text:p>
          </table:table-cell>
          <table:table-cell office:value-type="float" office:value="0.00004672922" calcext:value-type="float">
            <text:p>0,00004672922</text:p>
          </table:table-cell>
          <table:table-cell office:value-type="float" office:value="3.914755" calcext:value-type="float">
            <text:p>3,914755</text:p>
          </table:table-cell>
          <table:table-cell office:value-type="float" office:value="0.2176123" calcext:value-type="float">
            <text:p>0,2176123</text:p>
          </table:table-cell>
          <table:table-cell/>
          <table:table-cell table:formula="of:=([.L30]/[.D30])*100" office:value-type="float" office:value="78.9054925213942" calcext:value-type="float">
            <text:p>78,9054925213942</text:p>
          </table:table-cell>
          <table:table-cell table:formula="of:=([.O30]/[.D30])*100" office:value-type="float" office:value="6.11689072178843" calcext:value-type="float">
            <text:p>6,11689072178843</text:p>
          </table:table-cell>
          <table:table-cell table:formula="of:=([.S30]/[.D30])*100" office:value-type="float" office:value="11.3709983344729" calcext:value-type="float">
            <text:p>11,3709983344729</text:p>
          </table:table-cell>
          <table:table-cell table:formula="of:=([.F30]/[.D30])*100" office:value-type="float" office:value="2.97453434082133" calcext:value-type="float">
            <text:p>2,97453434082133</text:p>
          </table:table-cell>
          <table:table-cell table:formula="of:=([.T30]/[.D30])*100" office:value-type="float" office:value="0.632087857569841" calcext:value-type="float">
            <text:p>0,6320878575698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3.654" calcext:value-type="float">
            <text:p>1503,654</text:p>
          </table:table-cell>
          <table:table-cell office:value-type="float" office:value="1500.062" calcext:value-type="float">
            <text:p>1500,062</text:p>
          </table:table-cell>
          <table:table-cell office:value-type="float" office:value="35.52175" calcext:value-type="float">
            <text:p>35,52175</text:p>
          </table:table-cell>
          <table:table-cell office:value-type="float" office:value="97.63198" calcext:value-type="float">
            <text:p>97,63198</text:p>
          </table:table-cell>
          <table:table-cell office:value-type="float" office:value="1.03835" calcext:value-type="float">
            <text:p>1,03835</text:p>
          </table:table-cell>
          <table:table-cell office:value-type="float" office:value="0.1157318" calcext:value-type="float">
            <text:p>0,1157318</text:p>
          </table:table-cell>
          <table:table-cell office:value-type="float" office:value="0.004100443" calcext:value-type="float">
            <text:p>0,004100443</text:p>
          </table:table-cell>
          <table:table-cell office:value-type="float" office:value="0.1128674" calcext:value-type="float">
            <text:p>0,1128674</text:p>
          </table:table-cell>
          <table:table-cell office:value-type="float" office:value="0.004416862" calcext:value-type="float">
            <text:p>0,004416862</text:p>
          </table:table-cell>
          <table:table-cell office:value-type="float" office:value="0.8012336" calcext:value-type="float">
            <text:p>0,8012336</text:p>
          </table:table-cell>
          <table:table-cell office:value-type="float" office:value="28.07324" calcext:value-type="float">
            <text:p>28,07324</text:p>
          </table:table-cell>
          <table:table-cell office:value-type="float" office:value="2.930407" calcext:value-type="float">
            <text:p>2,930407</text:p>
          </table:table-cell>
          <table:table-cell office:value-type="float" office:value="25.14283" calcext:value-type="float">
            <text:p>25,14283</text:p>
          </table:table-cell>
          <table:table-cell office:value-type="float" office:value="2.127802" calcext:value-type="float">
            <text:p>2,127802</text:p>
          </table:table-cell>
          <table:table-cell office:value-type="float" office:value="10.83844" calcext:value-type="float">
            <text:p>10,83844</text:p>
          </table:table-cell>
          <table:table-cell office:value-type="float" office:value="4.058529" calcext:value-type="float">
            <text:p>4,058529</text:p>
          </table:table-cell>
          <table:table-cell office:value-type="float" office:value="0.00004669884" calcext:value-type="float">
            <text:p>0,00004669884</text:p>
          </table:table-cell>
          <table:table-cell office:value-type="float" office:value="4.058576" calcext:value-type="float">
            <text:p>4,058576</text:p>
          </table:table-cell>
          <table:table-cell office:value-type="float" office:value="0.223783" calcext:value-type="float">
            <text:p>0,223783</text:p>
          </table:table-cell>
          <table:table-cell/>
          <table:table-cell table:formula="of:=([.L31]/[.D31])*100" office:value-type="float" office:value="79.0311288154441" calcext:value-type="float">
            <text:p>79,0311288154441</text:p>
          </table:table-cell>
          <table:table-cell table:formula="of:=([.O31]/[.D31])*100" office:value-type="float" office:value="5.99013843631015" calcext:value-type="float">
            <text:p>5,99013843631015</text:p>
          </table:table-cell>
          <table:table-cell table:formula="of:=([.S31]/[.D31])*100" office:value-type="float" office:value="11.4256082540978" calcext:value-type="float">
            <text:p>11,4256082540978</text:p>
          </table:table-cell>
          <table:table-cell table:formula="of:=([.F31]/[.D31])*100" office:value-type="float" office:value="2.92313864041045" calcext:value-type="float">
            <text:p>2,92313864041045</text:p>
          </table:table-cell>
          <table:table-cell table:formula="of:=([.T31]/[.D31])*100" office:value-type="float" office:value="0.629988668914116" calcext:value-type="float">
            <text:p>0,62998866891411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53.734" calcext:value-type="float">
            <text:p>1553,734</text:p>
          </table:table-cell>
          <table:table-cell office:value-type="float" office:value="1550.069" calcext:value-type="float">
            <text:p>1550,069</text:p>
          </table:table-cell>
          <table:table-cell office:value-type="float" office:value="36.62197" calcext:value-type="float">
            <text:p>36,62197</text:p>
          </table:table-cell>
          <table:table-cell office:value-type="float" office:value="97.6374" calcext:value-type="float">
            <text:p>97,6374</text:p>
          </table:table-cell>
          <table:table-cell office:value-type="float" office:value="1.053056" calcext:value-type="float">
            <text:p>1,053056</text:p>
          </table:table-cell>
          <table:table-cell office:value-type="float" office:value="0.122877" calcext:value-type="float">
            <text:p>0,122877</text:p>
          </table:table-cell>
          <table:table-cell office:value-type="float" office:value="0.004292941" calcext:value-type="float">
            <text:p>0,004292941</text:p>
          </table:table-cell>
          <table:table-cell office:value-type="float" office:value="0.1199945" calcext:value-type="float">
            <text:p>0,1199945</text:p>
          </table:table-cell>
          <table:table-cell office:value-type="float" office:value="0.004584724" calcext:value-type="float">
            <text:p>0,004584724</text:p>
          </table:table-cell>
          <table:table-cell office:value-type="float" office:value="0.8013029" calcext:value-type="float">
            <text:p>0,8013029</text:p>
          </table:table-cell>
          <table:table-cell office:value-type="float" office:value="28.98545" calcext:value-type="float">
            <text:p>28,98545</text:p>
          </table:table-cell>
          <table:table-cell office:value-type="float" office:value="2.960619" calcext:value-type="float">
            <text:p>2,960619</text:p>
          </table:table-cell>
          <table:table-cell office:value-type="float" office:value="26.02483" calcext:value-type="float">
            <text:p>26,02483</text:p>
          </table:table-cell>
          <table:table-cell office:value-type="float" office:value="2.150401" calcext:value-type="float">
            <text:p>2,150401</text:p>
          </table:table-cell>
          <table:table-cell office:value-type="float" office:value="10.50916" calcext:value-type="float">
            <text:p>10,50916</text:p>
          </table:table-cell>
          <table:table-cell office:value-type="float" office:value="4.202815" calcext:value-type="float">
            <text:p>4,202815</text:p>
          </table:table-cell>
          <table:table-cell office:value-type="float" office:value="0.00004667175" calcext:value-type="float">
            <text:p>0,00004667175</text:p>
          </table:table-cell>
          <table:table-cell office:value-type="float" office:value="4.202861" calcext:value-type="float">
            <text:p>4,202861</text:p>
          </table:table-cell>
          <table:table-cell office:value-type="float" office:value="0.2302038" calcext:value-type="float">
            <text:p>0,2302038</text:p>
          </table:table-cell>
          <table:table-cell/>
          <table:table-cell table:formula="of:=([.L32]/[.D32])*100" office:value-type="float" office:value="79.1477083291806" calcext:value-type="float">
            <text:p>79,1477083291806</text:p>
          </table:table-cell>
          <table:table-cell table:formula="of:=([.O32]/[.D32])*100" office:value-type="float" office:value="5.87188783126631" calcext:value-type="float">
            <text:p>5,87188783126631</text:p>
          </table:table-cell>
          <table:table-cell table:formula="of:=([.S32]/[.D32])*100" office:value-type="float" office:value="11.4763378376423" calcext:value-type="float">
            <text:p>11,4763378376423</text:p>
          </table:table-cell>
          <table:table-cell table:formula="of:=([.F32]/[.D32])*100" office:value-type="float" office:value="2.87547611447445" calcext:value-type="float">
            <text:p>2,87547611447445</text:p>
          </table:table-cell>
          <table:table-cell table:formula="of:=([.T32]/[.D32])*100" office:value-type="float" office:value="0.628594802518816" calcext:value-type="float">
            <text:p>0,6285948025188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3.817" calcext:value-type="float">
            <text:p>1603,817</text:p>
          </table:table-cell>
          <table:table-cell office:value-type="float" office:value="1600.076" calcext:value-type="float">
            <text:p>1600,076</text:p>
          </table:table-cell>
          <table:table-cell office:value-type="float" office:value="37.72819" calcext:value-type="float">
            <text:p>37,72819</text:p>
          </table:table-cell>
          <table:table-cell office:value-type="float" office:value="97.6421" calcext:value-type="float">
            <text:p>97,6421</text:p>
          </table:table-cell>
          <table:table-cell office:value-type="float" office:value="1.068517" calcext:value-type="float">
            <text:p>1,068517</text:p>
          </table:table-cell>
          <table:table-cell office:value-type="float" office:value="0.1302714" calcext:value-type="float">
            <text:p>0,1302714</text:p>
          </table:table-cell>
          <table:table-cell office:value-type="float" office:value="0.00456159" calcext:value-type="float">
            <text:p>0,00456159</text:p>
          </table:table-cell>
          <table:table-cell office:value-type="float" office:value="0.1273839" calcext:value-type="float">
            <text:p>0,1273839</text:p>
          </table:table-cell>
          <table:table-cell office:value-type="float" office:value="0.004924044" calcext:value-type="float">
            <text:p>0,004924044</text:p>
          </table:table-cell>
          <table:table-cell office:value-type="float" office:value="0.8013745" calcext:value-type="float">
            <text:p>0,8013745</text:p>
          </table:table-cell>
          <table:table-cell office:value-type="float" office:value="29.90123" calcext:value-type="float">
            <text:p>29,90123</text:p>
          </table:table-cell>
          <table:table-cell office:value-type="float" office:value="2.99056" calcext:value-type="float">
            <text:p>2,99056</text:p>
          </table:table-cell>
          <table:table-cell office:value-type="float" office:value="26.91067" calcext:value-type="float">
            <text:p>26,91067</text:p>
          </table:table-cell>
          <table:table-cell office:value-type="float" office:value="2.173925" calcext:value-type="float">
            <text:p>2,173925</text:p>
          </table:table-cell>
          <table:table-cell office:value-type="float" office:value="10.23655" calcext:value-type="float">
            <text:p>10,23655</text:p>
          </table:table-cell>
          <table:table-cell office:value-type="float" office:value="4.347362" calcext:value-type="float">
            <text:p>4,347362</text:p>
          </table:table-cell>
          <table:table-cell office:value-type="float" office:value="0.00007835512" calcext:value-type="float">
            <text:p>0,00007835512</text:p>
          </table:table-cell>
          <table:table-cell office:value-type="float" office:value="4.347441" calcext:value-type="float">
            <text:p>4,347441</text:p>
          </table:table-cell>
          <table:table-cell office:value-type="float" office:value="0.2370772" calcext:value-type="float">
            <text:p>0,2370772</text:p>
          </table:table-cell>
          <table:table-cell/>
          <table:table-cell table:formula="of:=([.L33]/[.D33])*100" office:value-type="float" office:value="79.2543453582056" calcext:value-type="float">
            <text:p>79,2543453582056</text:p>
          </table:table-cell>
          <table:table-cell table:formula="of:=([.O33]/[.D33])*100" office:value-type="float" office:value="5.76207074868951" calcext:value-type="float">
            <text:p>5,76207074868951</text:p>
          </table:table-cell>
          <table:table-cell table:formula="of:=([.S33]/[.D33])*100" office:value-type="float" office:value="11.5230574273507" calcext:value-type="float">
            <text:p>11,5230574273507</text:p>
          </table:table-cell>
          <table:table-cell table:formula="of:=([.F33]/[.D33])*100" office:value-type="float" office:value="2.83214487628482" calcext:value-type="float">
            <text:p>2,83214487628482</text:p>
          </table:table-cell>
          <table:table-cell table:formula="of:=([.T33]/[.D33])*100" office:value-type="float" office:value="0.6283821195769" calcext:value-type="float">
            <text:p>0,628382119576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53.903" calcext:value-type="float">
            <text:p>1653,903</text:p>
          </table:table-cell>
          <table:table-cell office:value-type="float" office:value="1650.083" calcext:value-type="float">
            <text:p>1650,083</text:p>
          </table:table-cell>
          <table:table-cell office:value-type="float" office:value="38.84187" calcext:value-type="float">
            <text:p>38,84187</text:p>
          </table:table-cell>
          <table:table-cell office:value-type="float" office:value="97.64607" calcext:value-type="float">
            <text:p>97,64607</text:p>
          </table:table-cell>
          <table:table-cell office:value-type="float" office:value="1.084829" calcext:value-type="float">
            <text:p>1,084829</text:p>
          </table:table-cell>
          <table:table-cell office:value-type="float" office:value="0.1378935" calcext:value-type="float">
            <text:p>0,1378935</text:p>
          </table:table-cell>
          <table:table-cell office:value-type="float" office:value="0.004993821" calcext:value-type="float">
            <text:p>0,004993821</text:p>
          </table:table-cell>
          <table:table-cell office:value-type="float" office:value="0.1350303" calcext:value-type="float">
            <text:p>0,1350303</text:p>
          </table:table-cell>
          <table:table-cell office:value-type="float" office:value="0.005462092" calcext:value-type="float">
            <text:p>0,005462092</text:p>
          </table:table-cell>
          <table:table-cell office:value-type="float" office:value="0.8014484" calcext:value-type="float">
            <text:p>0,8014484</text:p>
          </table:table-cell>
          <table:table-cell office:value-type="float" office:value="30.82126" calcext:value-type="float">
            <text:p>30,82126</text:p>
          </table:table-cell>
          <table:table-cell office:value-type="float" office:value="3.020315" calcext:value-type="float">
            <text:p>3,020315</text:p>
          </table:table-cell>
          <table:table-cell office:value-type="float" office:value="27.80095" calcext:value-type="float">
            <text:p>27,80095</text:p>
          </table:table-cell>
          <table:table-cell office:value-type="float" office:value="2.198939" calcext:value-type="float">
            <text:p>2,198939</text:p>
          </table:table-cell>
          <table:table-cell office:value-type="float" office:value="9.937587" calcext:value-type="float">
            <text:p>9,937587</text:p>
          </table:table-cell>
          <table:table-cell office:value-type="float" office:value="4.492395" calcext:value-type="float">
            <text:p>4,492395</text:p>
          </table:table-cell>
          <table:table-cell office:value-type="float" office:value="0.0002642587" calcext:value-type="float">
            <text:p>0,0002642587</text:p>
          </table:table-cell>
          <table:table-cell office:value-type="float" office:value="4.492659" calcext:value-type="float">
            <text:p>4,492659</text:p>
          </table:table-cell>
          <table:table-cell office:value-type="float" office:value="0.2441807" calcext:value-type="float">
            <text:p>0,2441807</text:p>
          </table:table-cell>
          <table:table-cell/>
          <table:table-cell table:formula="of:=([.L34]/[.D34])*100" office:value-type="float" office:value="79.3506079908099" calcext:value-type="float">
            <text:p>79,3506079908099</text:p>
          </table:table-cell>
          <table:table-cell table:formula="of:=([.O34]/[.D34])*100" office:value-type="float" office:value="5.66125935749231" calcext:value-type="float">
            <text:p>5,66125935749231</text:p>
          </table:table-cell>
          <table:table-cell table:formula="of:=([.S34]/[.D34])*100" office:value-type="float" office:value="11.5665363176387" calcext:value-type="float">
            <text:p>11,5665363176387</text:p>
          </table:table-cell>
          <table:table-cell table:formula="of:=([.F34]/[.D34])*100" office:value-type="float" office:value="2.79293710627218" calcext:value-type="float">
            <text:p>2,79293710627218</text:p>
          </table:table-cell>
          <table:table-cell table:formula="of:=([.T34]/[.D34])*100" office:value-type="float" office:value="0.628653306341842" calcext:value-type="float">
            <text:p>0,6286533063418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3.992" calcext:value-type="float">
            <text:p>1703,992</text:p>
          </table:table-cell>
          <table:table-cell office:value-type="float" office:value="1700.091" calcext:value-type="float">
            <text:p>1700,091</text:p>
          </table:table-cell>
          <table:table-cell office:value-type="float" office:value="39.96062" calcext:value-type="float">
            <text:p>39,96062</text:p>
          </table:table-cell>
          <table:table-cell office:value-type="float" office:value="97.6495" calcext:value-type="float">
            <text:p>97,6495</text:p>
          </table:table-cell>
          <table:table-cell office:value-type="float" office:value="1.101162" calcext:value-type="float">
            <text:p>1,101162</text:p>
          </table:table-cell>
          <table:table-cell office:value-type="float" office:value="0.145752" calcext:value-type="float">
            <text:p>0,145752</text:p>
          </table:table-cell>
          <table:table-cell office:value-type="float" office:value="0.00516854" calcext:value-type="float">
            <text:p>0,00516854</text:p>
          </table:table-cell>
          <table:table-cell office:value-type="float" office:value="0.1429159" calcext:value-type="float">
            <text:p>0,1429159</text:p>
          </table:table-cell>
          <table:table-cell office:value-type="float" office:value="0.005800723" calcext:value-type="float">
            <text:p>0,005800723</text:p>
          </table:table-cell>
          <table:table-cell office:value-type="float" office:value="0.8015246" calcext:value-type="float">
            <text:p>0,8015246</text:p>
          </table:table-cell>
          <table:table-cell office:value-type="float" office:value="31.74541" calcext:value-type="float">
            <text:p>31,74541</text:p>
          </table:table-cell>
          <table:table-cell office:value-type="float" office:value="3.050005" calcext:value-type="float">
            <text:p>3,050005</text:p>
          </table:table-cell>
          <table:table-cell office:value-type="float" office:value="28.6954" calcext:value-type="float">
            <text:p>28,6954</text:p>
          </table:table-cell>
          <table:table-cell office:value-type="float" office:value="2.224478" calcext:value-type="float">
            <text:p>2,224478</text:p>
          </table:table-cell>
          <table:table-cell office:value-type="float" office:value="9.627526" calcext:value-type="float">
            <text:p>9,627526</text:p>
          </table:table-cell>
          <table:table-cell office:value-type="float" office:value="4.637715" calcext:value-type="float">
            <text:p>4,637715</text:p>
          </table:table-cell>
          <table:table-cell office:value-type="float" office:value="0.0003059354" calcext:value-type="float">
            <text:p>0,0003059354</text:p>
          </table:table-cell>
          <table:table-cell office:value-type="float" office:value="4.638021" calcext:value-type="float">
            <text:p>4,638021</text:p>
          </table:table-cell>
          <table:table-cell office:value-type="float" office:value="0.2515567" calcext:value-type="float">
            <text:p>0,2515567</text:p>
          </table:table-cell>
          <table:table-cell/>
          <table:table-cell table:formula="of:=([.L35]/[.D35])*100" office:value-type="float" office:value="79.44173538849" calcext:value-type="float">
            <text:p>79,44173538849</text:p>
          </table:table-cell>
          <table:table-cell table:formula="of:=([.O35]/[.D35])*100" office:value-type="float" office:value="5.56667539192335" calcext:value-type="float">
            <text:p>5,56667539192335</text:p>
          </table:table-cell>
          <table:table-cell table:formula="of:=([.S35]/[.D35])*100" office:value-type="float" office:value="11.6064790786529" calcext:value-type="float">
            <text:p>11,6064790786529</text:p>
          </table:table-cell>
          <table:table-cell table:formula="of:=([.F35]/[.D35])*100" office:value-type="float" office:value="2.75561790582829" calcext:value-type="float">
            <text:p>2,75561790582829</text:p>
          </table:table-cell>
          <table:table-cell table:formula="of:=([.T35]/[.D35])*100" office:value-type="float" office:value="0.629511504075763" calcext:value-type="float">
            <text:p>0,62951150407576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4.084" calcext:value-type="float">
            <text:p>1754,084</text:p>
          </table:table-cell>
          <table:table-cell office:value-type="float" office:value="1750.099" calcext:value-type="float">
            <text:p>1750,099</text:p>
          </table:table-cell>
          <table:table-cell office:value-type="float" office:value="41.08304" calcext:value-type="float">
            <text:p>41,08304</text:p>
          </table:table-cell>
          <table:table-cell office:value-type="float" office:value="97.65253" calcext:value-type="float">
            <text:p>97,65253</text:p>
          </table:table-cell>
          <table:table-cell office:value-type="float" office:value="1.117707" calcext:value-type="float">
            <text:p>1,117707</text:p>
          </table:table-cell>
          <table:table-cell office:value-type="float" office:value="0.1538036" calcext:value-type="float">
            <text:p>0,1538036</text:p>
          </table:table-cell>
          <table:table-cell office:value-type="float" office:value="0.005310348" calcext:value-type="float">
            <text:p>0,005310348</text:p>
          </table:table-cell>
          <table:table-cell office:value-type="float" office:value="0.150948" calcext:value-type="float">
            <text:p>0,150948</text:p>
          </table:table-cell>
          <table:table-cell office:value-type="float" office:value="0.006042003" calcext:value-type="float">
            <text:p>0,006042003</text:p>
          </table:table-cell>
          <table:table-cell office:value-type="float" office:value="0.8016028" calcext:value-type="float">
            <text:p>0,8016028</text:p>
          </table:table-cell>
          <table:table-cell office:value-type="float" office:value="32.67256" calcext:value-type="float">
            <text:p>32,67256</text:p>
          </table:table-cell>
          <table:table-cell office:value-type="float" office:value="3.07959" calcext:value-type="float">
            <text:p>3,07959</text:p>
          </table:table-cell>
          <table:table-cell office:value-type="float" office:value="29.59297" calcext:value-type="float">
            <text:p>29,59297</text:p>
          </table:table-cell>
          <table:table-cell office:value-type="float" office:value="2.250707" calcext:value-type="float">
            <text:p>2,250707</text:p>
          </table:table-cell>
          <table:table-cell office:value-type="float" office:value="9.322042" calcext:value-type="float">
            <text:p>9,322042</text:p>
          </table:table-cell>
          <table:table-cell office:value-type="float" office:value="4.782929" calcext:value-type="float">
            <text:p>4,782929</text:p>
          </table:table-cell>
          <table:table-cell office:value-type="float" office:value="0.0003039783" calcext:value-type="float">
            <text:p>0,0003039783</text:p>
          </table:table-cell>
          <table:table-cell office:value-type="float" office:value="4.783233" calcext:value-type="float">
            <text:p>4,783233</text:p>
          </table:table-cell>
          <table:table-cell office:value-type="float" office:value="0.2588355" calcext:value-type="float">
            <text:p>0,2588355</text:p>
          </table:table-cell>
          <table:table-cell/>
          <table:table-cell table:formula="of:=([.L36]/[.D36])*100" office:value-type="float" office:value="79.5280972391527" calcext:value-type="float">
            <text:p>79,5280972391527</text:p>
          </table:table-cell>
          <table:table-cell table:formula="of:=([.O36]/[.D36])*100" office:value-type="float" office:value="5.4784334362793" calcext:value-type="float">
            <text:p>5,4784334362793</text:p>
          </table:table-cell>
          <table:table-cell table:formula="of:=([.S36]/[.D36])*100" office:value-type="float" office:value="11.6428409387426" calcext:value-type="float">
            <text:p>11,6428409387426</text:p>
          </table:table-cell>
          <table:table-cell table:formula="of:=([.F36]/[.D36])*100" office:value-type="float" office:value="2.72060441486317" calcext:value-type="float">
            <text:p>2,72060441486317</text:p>
          </table:table-cell>
          <table:table-cell table:formula="of:=([.T36]/[.D36])*100" office:value-type="float" office:value="0.630030056198373" calcext:value-type="float">
            <text:p>0,63003005619837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4.179" calcext:value-type="float">
            <text:p>1804,179</text:p>
          </table:table-cell>
          <table:table-cell office:value-type="float" office:value="1800.108" calcext:value-type="float">
            <text:p>1800,108</text:p>
          </table:table-cell>
          <table:table-cell office:value-type="float" office:value="42.21081" calcext:value-type="float">
            <text:p>42,21081</text:p>
          </table:table-cell>
          <table:table-cell office:value-type="float" office:value="97.6551" calcext:value-type="float">
            <text:p>97,6551</text:p>
          </table:table-cell>
          <table:table-cell office:value-type="float" office:value="1.134891" calcext:value-type="float">
            <text:p>1,134891</text:p>
          </table:table-cell>
          <table:table-cell office:value-type="float" office:value="0.1621325" calcext:value-type="float">
            <text:p>0,1621325</text:p>
          </table:table-cell>
          <table:table-cell office:value-type="float" office:value="0.005553292" calcext:value-type="float">
            <text:p>0,005553292</text:p>
          </table:table-cell>
          <table:table-cell office:value-type="float" office:value="0.1592683" calcext:value-type="float">
            <text:p>0,1592683</text:p>
          </table:table-cell>
          <table:table-cell office:value-type="float" office:value="0.006253104" calcext:value-type="float">
            <text:p>0,006253104</text:p>
          </table:table-cell>
          <table:table-cell office:value-type="float" office:value="0.8016836" calcext:value-type="float">
            <text:p>0,8016836</text:p>
          </table:table-cell>
          <table:table-cell office:value-type="float" office:value="33.60353" calcext:value-type="float">
            <text:p>33,60353</text:p>
          </table:table-cell>
          <table:table-cell office:value-type="float" office:value="3.109323" calcext:value-type="float">
            <text:p>3,109323</text:p>
          </table:table-cell>
          <table:table-cell office:value-type="float" office:value="30.49421" calcext:value-type="float">
            <text:p>30,49421</text:p>
          </table:table-cell>
          <table:table-cell office:value-type="float" office:value="2.277495" calcext:value-type="float">
            <text:p>2,277495</text:p>
          </table:table-cell>
          <table:table-cell office:value-type="float" office:value="9.063236" calcext:value-type="float">
            <text:p>9,063236</text:p>
          </table:table-cell>
          <table:table-cell office:value-type="float" office:value="4.928054" calcext:value-type="float">
            <text:p>4,928054</text:p>
          </table:table-cell>
          <table:table-cell office:value-type="float" office:value="0.0001318261" calcext:value-type="float">
            <text:p>0,0001318261</text:p>
          </table:table-cell>
          <table:table-cell office:value-type="float" office:value="4.928186" calcext:value-type="float">
            <text:p>4,928186</text:p>
          </table:table-cell>
          <table:table-cell office:value-type="float" office:value="0.2667023" calcext:value-type="float">
            <text:p>0,2667023</text:p>
          </table:table-cell>
          <table:table-cell/>
          <table:table-cell table:formula="of:=([.L37]/[.D37])*100" office:value-type="float" office:value="79.6088253222338" calcext:value-type="float">
            <text:p>79,6088253222338</text:p>
          </table:table-cell>
          <table:table-cell table:formula="of:=([.O37]/[.D37])*100" office:value-type="float" office:value="5.39552545899972" calcext:value-type="float">
            <text:p>5,39552545899972</text:p>
          </table:table-cell>
          <table:table-cell table:formula="of:=([.S37]/[.D37])*100" office:value-type="float" office:value="11.6751751506308" calcext:value-type="float">
            <text:p>11,6751751506308</text:p>
          </table:table-cell>
          <table:table-cell table:formula="of:=([.F37]/[.D37])*100" office:value-type="float" office:value="2.68862644426866" calcext:value-type="float">
            <text:p>2,68862644426866</text:p>
          </table:table-cell>
          <table:table-cell table:formula="of:=([.T37]/[.D37])*100" office:value-type="float" office:value="0.631834120217072" calcext:value-type="float">
            <text:p>0,63183412021707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54.276" calcext:value-type="float">
            <text:p>1854,276</text:p>
          </table:table-cell>
          <table:table-cell office:value-type="float" office:value="1850.117" calcext:value-type="float">
            <text:p>1850,117</text:p>
          </table:table-cell>
          <table:table-cell office:value-type="float" office:value="43.34531" calcext:value-type="float">
            <text:p>43,34531</text:p>
          </table:table-cell>
          <table:table-cell office:value-type="float" office:value="97.65716" calcext:value-type="float">
            <text:p>97,65716</text:p>
          </table:table-cell>
          <table:table-cell office:value-type="float" office:value="1.152606" calcext:value-type="float">
            <text:p>1,152606</text:p>
          </table:table-cell>
          <table:table-cell office:value-type="float" office:value="0.1706748" calcext:value-type="float">
            <text:p>0,1706748</text:p>
          </table:table-cell>
          <table:table-cell office:value-type="float" office:value="0.005701468" calcext:value-type="float">
            <text:p>0,005701468</text:p>
          </table:table-cell>
          <table:table-cell office:value-type="float" office:value="0.1679053" calcext:value-type="float">
            <text:p>0,1679053</text:p>
          </table:table-cell>
          <table:table-cell office:value-type="float" office:value="0.00655743" calcext:value-type="float">
            <text:p>0,00655743</text:p>
          </table:table-cell>
          <table:table-cell office:value-type="float" office:value="0.8017668" calcext:value-type="float">
            <text:p>0,8017668</text:p>
          </table:table-cell>
          <table:table-cell office:value-type="float" office:value="34.5389" calcext:value-type="float">
            <text:p>34,5389</text:p>
          </table:table-cell>
          <table:table-cell office:value-type="float" office:value="3.139193" calcext:value-type="float">
            <text:p>3,139193</text:p>
          </table:table-cell>
          <table:table-cell office:value-type="float" office:value="31.3997" calcext:value-type="float">
            <text:p>31,3997</text:p>
          </table:table-cell>
          <table:table-cell office:value-type="float" office:value="2.305527" calcext:value-type="float">
            <text:p>2,305527</text:p>
          </table:table-cell>
          <table:table-cell office:value-type="float" office:value="8.79719" calcext:value-type="float">
            <text:p>8,79719</text:p>
          </table:table-cell>
          <table:table-cell office:value-type="float" office:value="5.073083" calcext:value-type="float">
            <text:p>5,073083</text:p>
          </table:table-cell>
          <table:table-cell office:value-type="float" office:value="0.00004654007" calcext:value-type="float">
            <text:p>0,00004654007</text:p>
          </table:table-cell>
          <table:table-cell office:value-type="float" office:value="5.07313" calcext:value-type="float">
            <text:p>5,07313</text:p>
          </table:table-cell>
          <table:table-cell office:value-type="float" office:value="0.2751511" calcext:value-type="float">
            <text:p>0,2751511</text:p>
          </table:table-cell>
          <table:table-cell/>
          <table:table-cell table:formula="of:=([.L38]/[.D38])*100" office:value-type="float" office:value="79.6831306547352" calcext:value-type="float">
            <text:p>79,6831306547352</text:p>
          </table:table-cell>
          <table:table-cell table:formula="of:=([.O38]/[.D38])*100" office:value-type="float" office:value="5.31897683970884" calcext:value-type="float">
            <text:p>5,31897683970884</text:p>
          </table:table-cell>
          <table:table-cell table:formula="of:=([.S38]/[.D38])*100" office:value-type="float" office:value="11.7039882746253" calcext:value-type="float">
            <text:p>11,7039882746253</text:p>
          </table:table-cell>
          <table:table-cell table:formula="of:=([.F38]/[.D38])*100" office:value-type="float" office:value="2.65912505874338" calcext:value-type="float">
            <text:p>2,65912505874338</text:p>
          </table:table-cell>
          <table:table-cell table:formula="of:=([.T38]/[.D38])*100" office:value-type="float" office:value="0.634788631111417" calcext:value-type="float">
            <text:p>0,6347886311114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4.377" calcext:value-type="float">
            <text:p>1904,377</text:p>
          </table:table-cell>
          <table:table-cell office:value-type="float" office:value="1900.126" calcext:value-type="float">
            <text:p>1900,126</text:p>
          </table:table-cell>
          <table:table-cell office:value-type="float" office:value="44.48647" calcext:value-type="float">
            <text:p>44,48647</text:p>
          </table:table-cell>
          <table:table-cell office:value-type="float" office:value="97.65876" calcext:value-type="float">
            <text:p>97,65876</text:p>
          </table:table-cell>
          <table:table-cell office:value-type="float" office:value="1.171216" calcext:value-type="float">
            <text:p>1,171216</text:p>
          </table:table-cell>
          <table:table-cell office:value-type="float" office:value="0.1795462" calcext:value-type="float">
            <text:p>0,1795462</text:p>
          </table:table-cell>
          <table:table-cell office:value-type="float" office:value="0.006029673" calcext:value-type="float">
            <text:p>0,006029673</text:p>
          </table:table-cell>
          <table:table-cell office:value-type="float" office:value="0.176856" calcext:value-type="float">
            <text:p>0,176856</text:p>
          </table:table-cell>
          <table:table-cell office:value-type="float" office:value="0.00693097" calcext:value-type="float">
            <text:p>0,00693097</text:p>
          </table:table-cell>
          <table:table-cell office:value-type="float" office:value="0.8018525" calcext:value-type="float">
            <text:p>0,8018525</text:p>
          </table:table-cell>
          <table:table-cell office:value-type="float" office:value="35.47817" calcext:value-type="float">
            <text:p>35,47817</text:p>
          </table:table-cell>
          <table:table-cell office:value-type="float" office:value="3.168909" calcext:value-type="float">
            <text:p>3,168909</text:p>
          </table:table-cell>
          <table:table-cell office:value-type="float" office:value="32.30927" calcext:value-type="float">
            <text:p>32,30927</text:p>
          </table:table-cell>
          <table:table-cell office:value-type="float" office:value="2.334847" calcext:value-type="float">
            <text:p>2,334847</text:p>
          </table:table-cell>
          <table:table-cell office:value-type="float" office:value="8.481279" calcext:value-type="float">
            <text:p>8,481279</text:p>
          </table:table-cell>
          <table:table-cell office:value-type="float" office:value="5.218034" calcext:value-type="float">
            <text:p>5,218034</text:p>
          </table:table-cell>
          <table:table-cell office:value-type="float" office:value="0.00004651165" calcext:value-type="float">
            <text:p>0,00004651165</text:p>
          </table:table-cell>
          <table:table-cell office:value-type="float" office:value="5.218081" calcext:value-type="float">
            <text:p>5,218081</text:p>
          </table:table-cell>
          <table:table-cell office:value-type="float" office:value="0.2841527" calcext:value-type="float">
            <text:p>0,2841527</text:p>
          </table:table-cell>
          <table:table-cell/>
          <table:table-cell table:formula="of:=([.L39]/[.D39])*100" office:value-type="float" office:value="79.7504724470159" calcext:value-type="float">
            <text:p>79,7504724470159</text:p>
          </table:table-cell>
          <table:table-cell table:formula="of:=([.O39]/[.D39])*100" office:value-type="float" office:value="5.24844295355419" calcext:value-type="float">
            <text:p>5,24844295355419</text:p>
          </table:table-cell>
          <table:table-cell table:formula="of:=([.S39]/[.D39])*100" office:value-type="float" office:value="11.7295910419505" calcext:value-type="float">
            <text:p>11,7295910419505</text:p>
          </table:table-cell>
          <table:table-cell table:formula="of:=([.F39]/[.D39])*100" office:value-type="float" office:value="2.63274654068979" calcext:value-type="float">
            <text:p>2,63274654068979</text:p>
          </table:table-cell>
          <table:table-cell table:formula="of:=([.T39]/[.D39])*100" office:value-type="float" office:value="0.638739598803861" calcext:value-type="float">
            <text:p>0,63873959880386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4.48" calcext:value-type="float">
            <text:p>1954,48</text:p>
          </table:table-cell>
          <table:table-cell office:value-type="float" office:value="1950.137" calcext:value-type="float">
            <text:p>1950,137</text:p>
          </table:table-cell>
          <table:table-cell office:value-type="float" office:value="45.63172" calcext:value-type="float">
            <text:p>45,63172</text:p>
          </table:table-cell>
          <table:table-cell office:value-type="float" office:value="97.66008" calcext:value-type="float">
            <text:p>97,66008</text:p>
          </table:table-cell>
          <table:table-cell office:value-type="float" office:value="1.189403" calcext:value-type="float">
            <text:p>1,189403</text:p>
          </table:table-cell>
          <table:table-cell office:value-type="float" office:value="0.1885772" calcext:value-type="float">
            <text:p>0,1885772</text:p>
          </table:table-cell>
          <table:table-cell office:value-type="float" office:value="0.006003768" calcext:value-type="float">
            <text:p>0,006003768</text:p>
          </table:table-cell>
          <table:table-cell office:value-type="float" office:value="0.1859157" calcext:value-type="float">
            <text:p>0,1859157</text:p>
          </table:table-cell>
          <table:table-cell office:value-type="float" office:value="0.00696608" calcext:value-type="float">
            <text:p>0,00696608</text:p>
          </table:table-cell>
          <table:table-cell office:value-type="float" office:value="0.8019402" calcext:value-type="float">
            <text:p>0,8019402</text:p>
          </table:table-cell>
          <table:table-cell office:value-type="float" office:value="36.42131" calcext:value-type="float">
            <text:p>36,42131</text:p>
          </table:table-cell>
          <table:table-cell office:value-type="float" office:value="3.198414" calcext:value-type="float">
            <text:p>3,198414</text:p>
          </table:table-cell>
          <table:table-cell office:value-type="float" office:value="33.22289" calcext:value-type="float">
            <text:p>33,22289</text:p>
          </table:table-cell>
          <table:table-cell office:value-type="float" office:value="2.364666" calcext:value-type="float">
            <text:p>2,364666</text:p>
          </table:table-cell>
          <table:table-cell office:value-type="float" office:value="8.215373" calcext:value-type="float">
            <text:p>8,215373</text:p>
          </table:table-cell>
          <table:table-cell office:value-type="float" office:value="5.363215" calcext:value-type="float">
            <text:p>5,363215</text:p>
          </table:table-cell>
          <table:table-cell office:value-type="float" office:value="0.00004648469" calcext:value-type="float">
            <text:p>0,00004648469</text:p>
          </table:table-cell>
          <table:table-cell office:value-type="float" office:value="5.363261" calcext:value-type="float">
            <text:p>5,363261</text:p>
          </table:table-cell>
          <table:table-cell office:value-type="float" office:value="0.2930856" calcext:value-type="float">
            <text:p>0,2930856</text:p>
          </table:table-cell>
          <table:table-cell/>
          <table:table-cell table:formula="of:=([.L40]/[.D40])*100" office:value-type="float" office:value="79.815772887807" calcext:value-type="float">
            <text:p>79,815772887807</text:p>
          </table:table-cell>
          <table:table-cell table:formula="of:=([.O40]/[.D40])*100" office:value-type="float" office:value="5.18206633455851" calcext:value-type="float">
            <text:p>5,18206633455851</text:p>
          </table:table-cell>
          <table:table-cell table:formula="of:=([.S40]/[.D40])*100" office:value-type="float" office:value="11.7533614774985" calcext:value-type="float">
            <text:p>11,7533614774985</text:p>
          </table:table-cell>
          <table:table-cell table:formula="of:=([.F40]/[.D40])*100" office:value-type="float" office:value="2.60652677567271" calcext:value-type="float">
            <text:p>2,60652677567271</text:p>
          </table:table-cell>
          <table:table-cell table:formula="of:=([.T40]/[.D40])*100" office:value-type="float" office:value="0.64228479662831" calcext:value-type="float">
            <text:p>0,642284796628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4.586" calcext:value-type="float">
            <text:p>2004,586</text:p>
          </table:table-cell>
          <table:table-cell office:value-type="float" office:value="2000.147" calcext:value-type="float">
            <text:p>2000,147</text:p>
          </table:table-cell>
          <table:table-cell office:value-type="float" office:value="46.78339" calcext:value-type="float">
            <text:p>46,78339</text:p>
          </table:table-cell>
          <table:table-cell office:value-type="float" office:value="97.661" calcext:value-type="float">
            <text:p>97,661</text:p>
          </table:table-cell>
          <table:table-cell office:value-type="float" office:value="1.208562" calcext:value-type="float">
            <text:p>1,208562</text:p>
          </table:table-cell>
          <table:table-cell office:value-type="float" office:value="0.1978655" calcext:value-type="float">
            <text:p>0,1978655</text:p>
          </table:table-cell>
          <table:table-cell office:value-type="float" office:value="0.006259497" calcext:value-type="float">
            <text:p>0,006259497</text:p>
          </table:table-cell>
          <table:table-cell office:value-type="float" office:value="0.1952269" calcext:value-type="float">
            <text:p>0,1952269</text:p>
          </table:table-cell>
          <table:table-cell office:value-type="float" office:value="0.007179359" calcext:value-type="float">
            <text:p>0,007179359</text:p>
          </table:table-cell>
          <table:table-cell office:value-type="float" office:value="0.8020302" calcext:value-type="float">
            <text:p>0,8020302</text:p>
          </table:table-cell>
          <table:table-cell office:value-type="float" office:value="37.36854" calcext:value-type="float">
            <text:p>37,36854</text:p>
          </table:table-cell>
          <table:table-cell office:value-type="float" office:value="3.227582" calcext:value-type="float">
            <text:p>3,227582</text:p>
          </table:table-cell>
          <table:table-cell office:value-type="float" office:value="34.14095" calcext:value-type="float">
            <text:p>34,14095</text:p>
          </table:table-cell>
          <table:table-cell office:value-type="float" office:value="2.39534" calcext:value-type="float">
            <text:p>2,39534</text:p>
          </table:table-cell>
          <table:table-cell office:value-type="float" office:value="7.992791" calcext:value-type="float">
            <text:p>7,992791</text:p>
          </table:table-cell>
          <table:table-cell office:value-type="float" office:value="5.508622" calcext:value-type="float">
            <text:p>5,508622</text:p>
          </table:table-cell>
          <table:table-cell office:value-type="float" office:value="0.000046459" calcext:value-type="float">
            <text:p>0,000046459</text:p>
          </table:table-cell>
          <table:table-cell office:value-type="float" office:value="5.508669" calcext:value-type="float">
            <text:p>5,508669</text:p>
          </table:table-cell>
          <table:table-cell office:value-type="float" office:value="0.3022871" calcext:value-type="float">
            <text:p>0,3022871</text:p>
          </table:table-cell>
          <table:table-cell/>
          <table:table-cell table:formula="of:=([.L41]/[.D41])*100" office:value-type="float" office:value="79.8756567234653" calcext:value-type="float">
            <text:p>79,8756567234653</text:p>
          </table:table-cell>
          <table:table-cell table:formula="of:=([.O41]/[.D41])*100" office:value-type="float" office:value="5.12006504872777" calcext:value-type="float">
            <text:p>5,12006504872777</text:p>
          </table:table-cell>
          <table:table-cell table:formula="of:=([.S41]/[.D41])*100" office:value-type="float" office:value="11.7748393179716" calcext:value-type="float">
            <text:p>11,7748393179716</text:p>
          </table:table-cell>
          <table:table-cell table:formula="of:=([.F41]/[.D41])*100" office:value-type="float" office:value="2.58331429167489" calcext:value-type="float">
            <text:p>2,58331429167489</text:p>
          </table:table-cell>
          <table:table-cell table:formula="of:=([.T41]/[.D41])*100" office:value-type="float" office:value="0.64614193199766" calcext:value-type="float">
            <text:p>0,6461419319976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54.696" calcext:value-type="float">
            <text:p>2054,696</text:p>
          </table:table-cell>
          <table:table-cell office:value-type="float" office:value="2050.159" calcext:value-type="float">
            <text:p>2050,159</text:p>
          </table:table-cell>
          <table:table-cell office:value-type="float" office:value="47.93966" calcext:value-type="float">
            <text:p>47,93966</text:p>
          </table:table-cell>
          <table:table-cell office:value-type="float" office:value="97.66166" calcext:value-type="float">
            <text:p>97,66166</text:p>
          </table:table-cell>
          <table:table-cell office:value-type="float" office:value="1.228273" calcext:value-type="float">
            <text:p>1,228273</text:p>
          </table:table-cell>
          <table:table-cell office:value-type="float" office:value="0.2073808" calcext:value-type="float">
            <text:p>0,2073808</text:p>
          </table:table-cell>
          <table:table-cell office:value-type="float" office:value="0.00645594" calcext:value-type="float">
            <text:p>0,00645594</text:p>
          </table:table-cell>
          <table:table-cell office:value-type="float" office:value="0.2047851" calcext:value-type="float">
            <text:p>0,2047851</text:p>
          </table:table-cell>
          <table:table-cell office:value-type="float" office:value="0.007527976" calcext:value-type="float">
            <text:p>0,007527976</text:p>
          </table:table-cell>
          <table:table-cell office:value-type="float" office:value="0.8021225" calcext:value-type="float">
            <text:p>0,8021225</text:p>
          </table:table-cell>
          <table:table-cell office:value-type="float" office:value="38.31849" calcext:value-type="float">
            <text:p>38,31849</text:p>
          </table:table-cell>
          <table:table-cell office:value-type="float" office:value="3.256615" calcext:value-type="float">
            <text:p>3,256615</text:p>
          </table:table-cell>
          <table:table-cell office:value-type="float" office:value="35.06188" calcext:value-type="float">
            <text:p>35,06188</text:p>
          </table:table-cell>
          <table:table-cell office:value-type="float" office:value="2.426716" calcext:value-type="float">
            <text:p>2,426716</text:p>
          </table:table-cell>
          <table:table-cell office:value-type="float" office:value="7.831628" calcext:value-type="float">
            <text:p>7,831628</text:p>
          </table:table-cell>
          <table:table-cell office:value-type="float" office:value="5.654258" calcext:value-type="float">
            <text:p>5,654258</text:p>
          </table:table-cell>
          <table:table-cell office:value-type="float" office:value="0.00004643795" calcext:value-type="float">
            <text:p>0,00004643795</text:p>
          </table:table-cell>
          <table:table-cell office:value-type="float" office:value="5.654305" calcext:value-type="float">
            <text:p>5,654305</text:p>
          </table:table-cell>
          <table:table-cell office:value-type="float" office:value="0.3118785" calcext:value-type="float">
            <text:p>0,3118785</text:p>
          </table:table-cell>
          <table:table-cell/>
          <table:table-cell table:formula="of:=([.L42]/[.D42])*100" office:value-type="float" office:value="79.9306670093196" calcext:value-type="float">
            <text:p>79,9306670093196</text:p>
          </table:table-cell>
          <table:table-cell table:formula="of:=([.O42]/[.D42])*100" office:value-type="float" office:value="5.06202171646607" calcext:value-type="float">
            <text:p>5,06202171646607</text:p>
          </table:table-cell>
          <table:table-cell table:formula="of:=([.S42]/[.D42])*100" office:value-type="float" office:value="11.7946289147649" calcext:value-type="float">
            <text:p>11,7946289147649</text:p>
          </table:table-cell>
          <table:table-cell table:formula="of:=([.F42]/[.D42])*100" office:value-type="float" office:value="2.56212288531041" calcext:value-type="float">
            <text:p>2,56212288531041</text:p>
          </table:table-cell>
          <table:table-cell table:formula="of:=([.T42]/[.D42])*100" office:value-type="float" office:value="0.650564689027832" calcext:value-type="float">
            <text:p>0,6505646890278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4.808" calcext:value-type="float">
            <text:p>2104,808</text:p>
          </table:table-cell>
          <table:table-cell office:value-type="float" office:value="2100.17" calcext:value-type="float">
            <text:p>2100,17</text:p>
          </table:table-cell>
          <table:table-cell office:value-type="float" office:value="49.10165" calcext:value-type="float">
            <text:p>49,10165</text:p>
          </table:table-cell>
          <table:table-cell office:value-type="float" office:value="97.66202" calcext:value-type="float">
            <text:p>97,66202</text:p>
          </table:table-cell>
          <table:table-cell office:value-type="float" office:value="1.248147" calcext:value-type="float">
            <text:p>1,248147</text:p>
          </table:table-cell>
          <table:table-cell office:value-type="float" office:value="0.2171242" calcext:value-type="float">
            <text:p>0,2171242</text:p>
          </table:table-cell>
          <table:table-cell office:value-type="float" office:value="0.006720258" calcext:value-type="float">
            <text:p>0,006720258</text:p>
          </table:table-cell>
          <table:table-cell office:value-type="float" office:value="0.214509" calcext:value-type="float">
            <text:p>0,214509</text:p>
          </table:table-cell>
          <table:table-cell office:value-type="float" office:value="0.007575846" calcext:value-type="float">
            <text:p>0,007575846</text:p>
          </table:table-cell>
          <table:table-cell office:value-type="float" office:value="0.8022169" calcext:value-type="float">
            <text:p>0,8022169</text:p>
          </table:table-cell>
          <table:table-cell office:value-type="float" office:value="39.27299" calcext:value-type="float">
            <text:p>39,27299</text:p>
          </table:table-cell>
          <table:table-cell office:value-type="float" office:value="3.285866" calcext:value-type="float">
            <text:p>3,285866</text:p>
          </table:table-cell>
          <table:table-cell office:value-type="float" office:value="35.98712" calcext:value-type="float">
            <text:p>35,98712</text:p>
          </table:table-cell>
          <table:table-cell office:value-type="float" office:value="2.458828" calcext:value-type="float">
            <text:p>2,458828</text:p>
          </table:table-cell>
          <table:table-cell office:value-type="float" office:value="7.678129" calcext:value-type="float">
            <text:p>7,678129</text:p>
          </table:table-cell>
          <table:table-cell office:value-type="float" office:value="5.800034" calcext:value-type="float">
            <text:p>5,800034</text:p>
          </table:table-cell>
          <table:table-cell office:value-type="float" office:value="0.0000464252" calcext:value-type="float">
            <text:p>0,0000464252</text:p>
          </table:table-cell>
          <table:table-cell office:value-type="float" office:value="5.800081" calcext:value-type="float">
            <text:p>5,800081</text:p>
          </table:table-cell>
          <table:table-cell office:value-type="float" office:value="0.3216025" calcext:value-type="float">
            <text:p>0,3216025</text:p>
          </table:table-cell>
          <table:table-cell/>
          <table:table-cell table:formula="of:=([.L43]/[.D43])*100" office:value-type="float" office:value="79.9830351933184" calcext:value-type="float">
            <text:p>79,9830351933184</text:p>
          </table:table-cell>
          <table:table-cell table:formula="of:=([.O43]/[.D43])*100" office:value-type="float" office:value="5.00762805323243" calcext:value-type="float">
            <text:p>5,00762805323243</text:p>
          </table:table-cell>
          <table:table-cell table:formula="of:=([.S43]/[.D43])*100" office:value-type="float" office:value="11.8123953064714" calcext:value-type="float">
            <text:p>11,8123953064714</text:p>
          </table:table-cell>
          <table:table-cell table:formula="of:=([.F43]/[.D43])*100" office:value-type="float" office:value="2.54196549403126" calcext:value-type="float">
            <text:p>2,54196549403126</text:p>
          </table:table-cell>
          <table:table-cell table:formula="of:=([.T43]/[.D43])*100" office:value-type="float" office:value="0.654972898059434" calcext:value-type="float">
            <text:p>0,65497289805943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54.924" calcext:value-type="float">
            <text:p>2154,924</text:p>
          </table:table-cell>
          <table:table-cell office:value-type="float" office:value="2150.183" calcext:value-type="float">
            <text:p>2150,183</text:p>
          </table:table-cell>
          <table:table-cell office:value-type="float" office:value="50.26967" calcext:value-type="float">
            <text:p>50,26967</text:p>
          </table:table-cell>
          <table:table-cell office:value-type="float" office:value="97.66207" calcext:value-type="float">
            <text:p>97,66207</text:p>
          </table:table-cell>
          <table:table-cell office:value-type="float" office:value="1.268697" calcext:value-type="float">
            <text:p>1,268697</text:p>
          </table:table-cell>
          <table:table-cell office:value-type="float" office:value="0.2271034" calcext:value-type="float">
            <text:p>0,2271034</text:p>
          </table:table-cell>
          <table:table-cell office:value-type="float" office:value="0.006818119" calcext:value-type="float">
            <text:p>0,006818119</text:p>
          </table:table-cell>
          <table:table-cell office:value-type="float" office:value="0.2245007" calcext:value-type="float">
            <text:p>0,2245007</text:p>
          </table:table-cell>
          <table:table-cell office:value-type="float" office:value="0.007960608" calcext:value-type="float">
            <text:p>0,007960608</text:p>
          </table:table-cell>
          <table:table-cell office:value-type="float" office:value="0.8023137" calcext:value-type="float">
            <text:p>0,8023137</text:p>
          </table:table-cell>
          <table:table-cell office:value-type="float" office:value="40.23121" calcext:value-type="float">
            <text:p>40,23121</text:p>
          </table:table-cell>
          <table:table-cell office:value-type="float" office:value="3.316024" calcext:value-type="float">
            <text:p>3,316024</text:p>
          </table:table-cell>
          <table:table-cell office:value-type="float" office:value="36.91519" calcext:value-type="float">
            <text:p>36,91519</text:p>
          </table:table-cell>
          <table:table-cell office:value-type="float" office:value="2.491987" calcext:value-type="float">
            <text:p>2,491987</text:p>
          </table:table-cell>
          <table:table-cell office:value-type="float" office:value="7.493235" calcext:value-type="float">
            <text:p>7,493235</text:p>
          </table:table-cell>
          <table:table-cell office:value-type="float" office:value="5.946105" calcext:value-type="float">
            <text:p>5,946105</text:p>
          </table:table-cell>
          <table:table-cell office:value-type="float" office:value="0.00004641792" calcext:value-type="float">
            <text:p>0,00004641792</text:p>
          </table:table-cell>
          <table:table-cell office:value-type="float" office:value="5.946152" calcext:value-type="float">
            <text:p>5,946152</text:p>
          </table:table-cell>
          <table:table-cell office:value-type="float" office:value="0.3316201" calcext:value-type="float">
            <text:p>0,3316201</text:p>
          </table:table-cell>
          <table:table-cell/>
          <table:table-cell table:formula="of:=([.L44]/[.D44])*100" office:value-type="float" office:value="80.0307819804665" calcext:value-type="float">
            <text:p>80,0307819804665</text:p>
          </table:table-cell>
          <table:table-cell table:formula="of:=([.O44]/[.D44])*100" office:value-type="float" office:value="4.95723763454186" calcext:value-type="float">
            <text:p>4,95723763454186</text:p>
          </table:table-cell>
          <table:table-cell table:formula="of:=([.S44]/[.D44])*100" office:value-type="float" office:value="11.8285081242825" calcext:value-type="float">
            <text:p>11,8285081242825</text:p>
          </table:table-cell>
          <table:table-cell table:formula="of:=([.F44]/[.D44])*100" office:value-type="float" office:value="2.52378223290505" calcext:value-type="float">
            <text:p>2,52378223290505</text:p>
          </table:table-cell>
          <table:table-cell table:formula="of:=([.T44]/[.D44])*100" office:value-type="float" office:value="0.659682269646887" calcext:value-type="float">
            <text:p>0,6596822696468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5.042" calcext:value-type="float">
            <text:p>2205,042</text:p>
          </table:table-cell>
          <table:table-cell office:value-type="float" office:value="2200.196" calcext:value-type="float">
            <text:p>2200,196</text:p>
          </table:table-cell>
          <table:table-cell office:value-type="float" office:value="51.4423" calcext:value-type="float">
            <text:p>51,4423</text:p>
          </table:table-cell>
          <table:table-cell office:value-type="float" office:value="97.66192" calcext:value-type="float">
            <text:p>97,66192</text:p>
          </table:table-cell>
          <table:table-cell office:value-type="float" office:value="1.28862" calcext:value-type="float">
            <text:p>1,28862</text:p>
          </table:table-cell>
          <table:table-cell office:value-type="float" office:value="0.2372967" calcext:value-type="float">
            <text:p>0,2372967</text:p>
          </table:table-cell>
          <table:table-cell office:value-type="float" office:value="0.006554353" calcext:value-type="float">
            <text:p>0,006554353</text:p>
          </table:table-cell>
          <table:table-cell office:value-type="float" office:value="0.2346565" calcext:value-type="float">
            <text:p>0,2346565</text:p>
          </table:table-cell>
          <table:table-cell office:value-type="float" office:value="0.00769967" calcext:value-type="float">
            <text:p>0,00769967</text:p>
          </table:table-cell>
          <table:table-cell office:value-type="float" office:value="0.8024126" calcext:value-type="float">
            <text:p>0,8024126</text:p>
          </table:table-cell>
          <table:table-cell office:value-type="float" office:value="41.19303" calcext:value-type="float">
            <text:p>41,19303</text:p>
          </table:table-cell>
          <table:table-cell office:value-type="float" office:value="3.346924" calcext:value-type="float">
            <text:p>3,346924</text:p>
          </table:table-cell>
          <table:table-cell office:value-type="float" office:value="37.8461" calcext:value-type="float">
            <text:p>37,8461</text:p>
          </table:table-cell>
          <table:table-cell office:value-type="float" office:value="2.526026" calcext:value-type="float">
            <text:p>2,526026</text:p>
          </table:table-cell>
          <table:table-cell office:value-type="float" office:value="7.315907" calcext:value-type="float">
            <text:p>7,315907</text:p>
          </table:table-cell>
          <table:table-cell office:value-type="float" office:value="6.092662" calcext:value-type="float">
            <text:p>6,092662</text:p>
          </table:table-cell>
          <table:table-cell office:value-type="float" office:value="0.00004640906" calcext:value-type="float">
            <text:p>0,00004640906</text:p>
          </table:table-cell>
          <table:table-cell office:value-type="float" office:value="6.092708" calcext:value-type="float">
            <text:p>6,092708</text:p>
          </table:table-cell>
          <table:table-cell office:value-type="float" office:value="0.3419217" calcext:value-type="float">
            <text:p>0,3419217</text:p>
          </table:table-cell>
          <table:table-cell/>
          <table:table-cell table:formula="of:=([.L45]/[.D45])*100" office:value-type="float" office:value="80.0761824412983" calcext:value-type="float">
            <text:p>80,0761824412983</text:p>
          </table:table-cell>
          <table:table-cell table:formula="of:=([.O45]/[.D45])*100" office:value-type="float" office:value="4.91040641650937" calcext:value-type="float">
            <text:p>4,91040641650937</text:p>
          </table:table-cell>
          <table:table-cell table:formula="of:=([.S45]/[.D45])*100" office:value-type="float" office:value="11.843770593461" calcext:value-type="float">
            <text:p>11,843770593461</text:p>
          </table:table-cell>
          <table:table-cell table:formula="of:=([.F45]/[.D45])*100" office:value-type="float" office:value="2.50498130915608" calcext:value-type="float">
            <text:p>2,50498130915608</text:p>
          </table:table-cell>
          <table:table-cell table:formula="of:=([.T45]/[.D45])*100" office:value-type="float" office:value="0.664670319950702" calcext:value-type="float">
            <text:p>0,66467031995070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255.164" calcext:value-type="float">
            <text:p>2255,164</text:p>
          </table:table-cell>
          <table:table-cell office:value-type="float" office:value="2250.21" calcext:value-type="float">
            <text:p>2250,21</text:p>
          </table:table-cell>
          <table:table-cell office:value-type="float" office:value="52.62232" calcext:value-type="float">
            <text:p>52,62232</text:p>
          </table:table-cell>
          <table:table-cell office:value-type="float" office:value="97.66145" calcext:value-type="float">
            <text:p>97,66145</text:p>
          </table:table-cell>
          <table:table-cell office:value-type="float" office:value="1.310059" calcext:value-type="float">
            <text:p>1,310059</text:p>
          </table:table-cell>
          <table:table-cell office:value-type="float" office:value="0.2477479" calcext:value-type="float">
            <text:p>0,2477479</text:p>
          </table:table-cell>
          <table:table-cell office:value-type="float" office:value="0.00662832" calcext:value-type="float">
            <text:p>0,00662832</text:p>
          </table:table-cell>
          <table:table-cell office:value-type="float" office:value="0.2450877" calcext:value-type="float">
            <text:p>0,2450877</text:p>
          </table:table-cell>
          <table:table-cell office:value-type="float" office:value="0.008080438" calcext:value-type="float">
            <text:p>0,008080438</text:p>
          </table:table-cell>
          <table:table-cell office:value-type="float" office:value="0.8025139" calcext:value-type="float">
            <text:p>0,8025139</text:p>
          </table:table-cell>
          <table:table-cell office:value-type="float" office:value="42.15861" calcext:value-type="float">
            <text:p>42,15861</text:p>
          </table:table-cell>
          <table:table-cell office:value-type="float" office:value="3.378033" calcext:value-type="float">
            <text:p>3,378033</text:p>
          </table:table-cell>
          <table:table-cell office:value-type="float" office:value="38.78057" calcext:value-type="float">
            <text:p>38,78057</text:p>
          </table:table-cell>
          <table:table-cell office:value-type="float" office:value="2.561679" calcext:value-type="float">
            <text:p>2,561679</text:p>
          </table:table-cell>
          <table:table-cell office:value-type="float" office:value="7.12301" calcext:value-type="float">
            <text:p>7,12301</text:p>
          </table:table-cell>
          <table:table-cell office:value-type="float" office:value="6.23956" calcext:value-type="float">
            <text:p>6,23956</text:p>
          </table:table-cell>
          <table:table-cell office:value-type="float" office:value="0.00004639477" calcext:value-type="float">
            <text:p>0,00004639477</text:p>
          </table:table-cell>
          <table:table-cell office:value-type="float" office:value="6.239606" calcext:value-type="float">
            <text:p>6,239606</text:p>
          </table:table-cell>
          <table:table-cell office:value-type="float" office:value="0.3523743" calcext:value-type="float">
            <text:p>0,3523743</text:p>
          </table:table-cell>
          <table:table-cell/>
          <table:table-cell table:formula="of:=([.L46]/[.D46])*100" office:value-type="float" office:value="80.115452910476" calcext:value-type="float">
            <text:p>80,115452910476</text:p>
          </table:table-cell>
          <table:table-cell table:formula="of:=([.O46]/[.D46])*100" office:value-type="float" office:value="4.86804648673795" calcext:value-type="float">
            <text:p>4,86804648673795</text:p>
          </table:table-cell>
          <table:table-cell table:formula="of:=([.S46]/[.D46])*100" office:value-type="float" office:value="11.8573373427853" calcext:value-type="float">
            <text:p>11,8573373427853</text:p>
          </table:table-cell>
          <table:table-cell table:formula="of:=([.F46]/[.D46])*100" office:value-type="float" office:value="2.48955006164685" calcext:value-type="float">
            <text:p>2,48955006164685</text:p>
          </table:table-cell>
          <table:table-cell table:formula="of:=([.T46]/[.D46])*100" office:value-type="float" office:value="0.669628971128601" calcext:value-type="float">
            <text:p>0,66962897112860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5.288" calcext:value-type="float">
            <text:p>2305,288</text:p>
          </table:table-cell>
          <table:table-cell office:value-type="float" office:value="2300.224" calcext:value-type="float">
            <text:p>2300,224</text:p>
          </table:table-cell>
          <table:table-cell office:value-type="float" office:value="53.80854" calcext:value-type="float">
            <text:p>53,80854</text:p>
          </table:table-cell>
          <table:table-cell office:value-type="float" office:value="97.66073" calcext:value-type="float">
            <text:p>97,66073</text:p>
          </table:table-cell>
          <table:table-cell office:value-type="float" office:value="1.33242" calcext:value-type="float">
            <text:p>1,33242</text:p>
          </table:table-cell>
          <table:table-cell office:value-type="float" office:value="0.2584677" calcext:value-type="float">
            <text:p>0,2584677</text:p>
          </table:table-cell>
          <table:table-cell office:value-type="float" office:value="0.007079729" calcext:value-type="float">
            <text:p>0,007079729</text:p>
          </table:table-cell>
          <table:table-cell office:value-type="float" office:value="0.2557565" calcext:value-type="float">
            <text:p>0,2557565</text:p>
          </table:table-cell>
          <table:table-cell office:value-type="float" office:value="0.008498155" calcext:value-type="float">
            <text:p>0,008498155</text:p>
          </table:table-cell>
          <table:table-cell office:value-type="float" office:value="0.8026174" calcext:value-type="float">
            <text:p>0,8026174</text:p>
          </table:table-cell>
          <table:table-cell office:value-type="float" office:value="43.12798" calcext:value-type="float">
            <text:p>43,12798</text:p>
          </table:table-cell>
          <table:table-cell office:value-type="float" office:value="3.408898" calcext:value-type="float">
            <text:p>3,408898</text:p>
          </table:table-cell>
          <table:table-cell office:value-type="float" office:value="39.71908" calcext:value-type="float">
            <text:p>39,71908</text:p>
          </table:table-cell>
          <table:table-cell office:value-type="float" office:value="2.59847" calcext:value-type="float">
            <text:p>2,59847</text:p>
          </table:table-cell>
          <table:table-cell office:value-type="float" office:value="6.878308" calcext:value-type="float">
            <text:p>6,878308</text:p>
          </table:table-cell>
          <table:table-cell office:value-type="float" office:value="6.386546" calcext:value-type="float">
            <text:p>6,386546</text:p>
          </table:table-cell>
          <table:table-cell office:value-type="float" office:value="0.00004638219" calcext:value-type="float">
            <text:p>0,00004638219</text:p>
          </table:table-cell>
          <table:table-cell office:value-type="float" office:value="6.386592" calcext:value-type="float">
            <text:p>6,386592</text:p>
          </table:table-cell>
          <table:table-cell office:value-type="float" office:value="0.3630825" calcext:value-type="float">
            <text:p>0,3630825</text:p>
          </table:table-cell>
          <table:table-cell/>
          <table:table-cell table:formula="of:=([.L47]/[.D47])*100" office:value-type="float" office:value="80.150808774964" calcext:value-type="float">
            <text:p>80,150808774964</text:p>
          </table:table-cell>
          <table:table-cell table:formula="of:=([.O47]/[.D47])*100" office:value-type="float" office:value="4.82910333564152" calcext:value-type="float">
            <text:p>4,82910333564152</text:p>
          </table:table-cell>
          <table:table-cell table:formula="of:=([.S47]/[.D47])*100" office:value-type="float" office:value="11.8691047926593" calcext:value-type="float">
            <text:p>11,8691047926593</text:p>
          </table:table-cell>
          <table:table-cell table:formula="of:=([.F47]/[.D47])*100" office:value-type="float" office:value="2.47622403432615" calcext:value-type="float">
            <text:p>2,47622403432615</text:p>
          </table:table-cell>
          <table:table-cell table:formula="of:=([.T47]/[.D47])*100" office:value-type="float" office:value="0.674767425393813" calcext:value-type="float">
            <text:p>0,67476742539381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55.416" calcext:value-type="float">
            <text:p>2355,416</text:p>
          </table:table-cell>
          <table:table-cell office:value-type="float" office:value="2350.239" calcext:value-type="float">
            <text:p>2350,239</text:p>
          </table:table-cell>
          <table:table-cell office:value-type="float" office:value="54.99919" calcext:value-type="float">
            <text:p>54,99919</text:p>
          </table:table-cell>
          <table:table-cell office:value-type="float" office:value="97.65985" calcext:value-type="float">
            <text:p>97,65985</text:p>
          </table:table-cell>
          <table:table-cell office:value-type="float" office:value="1.354941" calcext:value-type="float">
            <text:p>1,354941</text:p>
          </table:table-cell>
          <table:table-cell office:value-type="float" office:value="0.2694078" calcext:value-type="float">
            <text:p>0,2694078</text:p>
          </table:table-cell>
          <table:table-cell office:value-type="float" office:value="0.007367766" calcext:value-type="float">
            <text:p>0,007367766</text:p>
          </table:table-cell>
          <table:table-cell office:value-type="float" office:value="0.2666455" calcext:value-type="float">
            <text:p>0,2666455</text:p>
          </table:table-cell>
          <table:table-cell office:value-type="float" office:value="0.00879641" calcext:value-type="float">
            <text:p>0,00879641</text:p>
          </table:table-cell>
          <table:table-cell office:value-type="float" office:value="0.8027232" calcext:value-type="float">
            <text:p>0,8027232</text:p>
          </table:table-cell>
          <table:table-cell office:value-type="float" office:value="44.10109" calcext:value-type="float">
            <text:p>44,10109</text:p>
          </table:table-cell>
          <table:table-cell office:value-type="float" office:value="3.43889" calcext:value-type="float">
            <text:p>3,43889</text:p>
          </table:table-cell>
          <table:table-cell office:value-type="float" office:value="40.6622" calcext:value-type="float">
            <text:p>40,6622</text:p>
          </table:table-cell>
          <table:table-cell office:value-type="float" office:value="2.635863" calcext:value-type="float">
            <text:p>2,635863</text:p>
          </table:table-cell>
          <table:table-cell office:value-type="float" office:value="6.728102" calcext:value-type="float">
            <text:p>6,728102</text:p>
          </table:table-cell>
          <table:table-cell office:value-type="float" office:value="6.533138" calcext:value-type="float">
            <text:p>6,533138</text:p>
          </table:table-cell>
          <table:table-cell office:value-type="float" office:value="0.00004637523" calcext:value-type="float">
            <text:p>0,00004637523</text:p>
          </table:table-cell>
          <table:table-cell office:value-type="float" office:value="6.533184" calcext:value-type="float">
            <text:p>6,533184</text:p>
          </table:table-cell>
          <table:table-cell office:value-type="float" office:value="0.3741179" calcext:value-type="float">
            <text:p>0,3741179</text:p>
          </table:table-cell>
          <table:table-cell/>
          <table:table-cell table:formula="of:=([.L48]/[.D48])*100" office:value-type="float" office:value="80.1849809060824" calcext:value-type="float">
            <text:p>80,1849809060824</text:p>
          </table:table-cell>
          <table:table-cell table:formula="of:=([.O48]/[.D48])*100" office:value-type="float" office:value="4.79254876299087" calcext:value-type="float">
            <text:p>4,79254876299087</text:p>
          </table:table-cell>
          <table:table-cell table:formula="of:=([.S48]/[.D48])*100" office:value-type="float" office:value="11.8786913043628" calcext:value-type="float">
            <text:p>11,8786913043628</text:p>
          </table:table-cell>
          <table:table-cell table:formula="of:=([.F48]/[.D48])*100" office:value-type="float" office:value="2.46356537250821" calcext:value-type="float">
            <text:p>2,46356537250821</text:p>
          </table:table-cell>
          <table:table-cell table:formula="of:=([.T48]/[.D48])*100" office:value-type="float" office:value="0.680224381486346" calcext:value-type="float">
            <text:p>0,68022438148634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5.547" calcext:value-type="float">
            <text:p>2405,547</text:p>
          </table:table-cell>
          <table:table-cell office:value-type="float" office:value="2400.254" calcext:value-type="float">
            <text:p>2400,254</text:p>
          </table:table-cell>
          <table:table-cell office:value-type="float" office:value="56.19543" calcext:value-type="float">
            <text:p>56,19543</text:p>
          </table:table-cell>
          <table:table-cell office:value-type="float" office:value="97.65877" calcext:value-type="float">
            <text:p>97,65877</text:p>
          </table:table-cell>
          <table:table-cell office:value-type="float" office:value="1.378211" calcext:value-type="float">
            <text:p>1,378211</text:p>
          </table:table-cell>
          <table:table-cell office:value-type="float" office:value="0.2806141" calcext:value-type="float">
            <text:p>0,2806141</text:p>
          </table:table-cell>
          <table:table-cell office:value-type="float" office:value="0.008051893" calcext:value-type="float">
            <text:p>0,008051893</text:p>
          </table:table-cell>
          <table:table-cell office:value-type="float" office:value="0.2777555" calcext:value-type="float">
            <text:p>0,2777555</text:p>
          </table:table-cell>
          <table:table-cell office:value-type="float" office:value="0.008958235" calcext:value-type="float">
            <text:p>0,008958235</text:p>
          </table:table-cell>
          <table:table-cell office:value-type="float" office:value="0.8028315" calcext:value-type="float">
            <text:p>0,8028315</text:p>
          </table:table-cell>
          <table:table-cell office:value-type="float" office:value="45.0789" calcext:value-type="float">
            <text:p>45,0789</text:p>
          </table:table-cell>
          <table:table-cell office:value-type="float" office:value="3.467843" calcext:value-type="float">
            <text:p>3,467843</text:p>
          </table:table-cell>
          <table:table-cell office:value-type="float" office:value="41.61105" calcext:value-type="float">
            <text:p>41,61105</text:p>
          </table:table-cell>
          <table:table-cell office:value-type="float" office:value="2.673529" calcext:value-type="float">
            <text:p>2,673529</text:p>
          </table:table-cell>
          <table:table-cell office:value-type="float" office:value="6.577839" calcext:value-type="float">
            <text:p>6,577839</text:p>
          </table:table-cell>
          <table:table-cell office:value-type="float" office:value="6.6794" calcext:value-type="float">
            <text:p>6,6794</text:p>
          </table:table-cell>
          <table:table-cell office:value-type="float" office:value="0.00004637139" calcext:value-type="float">
            <text:p>0,00004637139</text:p>
          </table:table-cell>
          <table:table-cell office:value-type="float" office:value="6.679446" calcext:value-type="float">
            <text:p>6,679446</text:p>
          </table:table-cell>
          <table:table-cell office:value-type="float" office:value="0.3853497" calcext:value-type="float">
            <text:p>0,3853497</text:p>
          </table:table-cell>
          <table:table-cell/>
          <table:table-cell table:formula="of:=([.L49]/[.D49])*100" office:value-type="float" office:value="80.2180889086532" calcext:value-type="float">
            <text:p>80,2180889086532</text:p>
          </table:table-cell>
          <table:table-cell table:formula="of:=([.O49]/[.D49])*100" office:value-type="float" office:value="4.75755590801601" calcext:value-type="float">
            <text:p>4,75755590801601</text:p>
          </table:table-cell>
          <table:table-cell table:formula="of:=([.S49]/[.D49])*100" office:value-type="float" office:value="11.8861017701973" calcext:value-type="float">
            <text:p>11,8861017701973</text:p>
          </table:table-cell>
          <table:table-cell table:formula="of:=([.F49]/[.D49])*100" office:value-type="float" office:value="2.45253217210012" calcext:value-type="float">
            <text:p>2,45253217210012</text:p>
          </table:table-cell>
          <table:table-cell table:formula="of:=([.T49]/[.D49])*100" office:value-type="float" office:value="0.685731384206865" calcext:value-type="float">
            <text:p>0,68573138420686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55.681" calcext:value-type="float">
            <text:p>2455,681</text:p>
          </table:table-cell>
          <table:table-cell office:value-type="float" office:value="2450.27" calcext:value-type="float">
            <text:p>2450,27</text:p>
          </table:table-cell>
          <table:table-cell office:value-type="float" office:value="57.41151" calcext:value-type="float">
            <text:p>57,41151</text:p>
          </table:table-cell>
          <table:table-cell office:value-type="float" office:value="97.65693" calcext:value-type="float">
            <text:p>97,65693</text:p>
          </table:table-cell>
          <table:table-cell office:value-type="float" office:value="1.401547" calcext:value-type="float">
            <text:p>1,401547</text:p>
          </table:table-cell>
          <table:table-cell office:value-type="float" office:value="0.2920517" calcext:value-type="float">
            <text:p>0,2920517</text:p>
          </table:table-cell>
          <table:table-cell office:value-type="float" office:value="0.00877821" calcext:value-type="float">
            <text:p>0,00877821</text:p>
          </table:table-cell>
          <table:table-cell office:value-type="float" office:value="0.2890571" calcext:value-type="float">
            <text:p>0,2890571</text:p>
          </table:table-cell>
          <table:table-cell office:value-type="float" office:value="0.008717588" calcext:value-type="float">
            <text:p>0,008717588</text:p>
          </table:table-cell>
          <table:table-cell office:value-type="float" office:value="0.8029418" calcext:value-type="float">
            <text:p>0,8029418</text:p>
          </table:table-cell>
          <table:table-cell office:value-type="float" office:value="46.07444" calcext:value-type="float">
            <text:p>46,07444</text:p>
          </table:table-cell>
          <table:table-cell office:value-type="float" office:value="3.49984" calcext:value-type="float">
            <text:p>3,49984</text:p>
          </table:table-cell>
          <table:table-cell office:value-type="float" office:value="42.5746" calcext:value-type="float">
            <text:p>42,5746</text:p>
          </table:table-cell>
          <table:table-cell office:value-type="float" office:value="2.711856" calcext:value-type="float">
            <text:p>2,711856</text:p>
          </table:table-cell>
          <table:table-cell office:value-type="float" office:value="6.555424" calcext:value-type="float">
            <text:p>6,555424</text:p>
          </table:table-cell>
          <table:table-cell office:value-type="float" office:value="6.826658" calcext:value-type="float">
            <text:p>6,826658</text:p>
          </table:table-cell>
          <table:table-cell office:value-type="float" office:value="0.00004638127" calcext:value-type="float">
            <text:p>0,00004638127</text:p>
          </table:table-cell>
          <table:table-cell office:value-type="float" office:value="6.826704" calcext:value-type="float">
            <text:p>6,826704</text:p>
          </table:table-cell>
          <table:table-cell office:value-type="float" office:value="0.396964" calcext:value-type="float">
            <text:p>0,396964</text:p>
          </table:table-cell>
          <table:table-cell/>
          <table:table-cell table:formula="of:=([.L50]/[.D50])*100" office:value-type="float" office:value="80.252966696051" calcext:value-type="float">
            <text:p>80,252966696051</text:p>
          </table:table-cell>
          <table:table-cell table:formula="of:=([.O50]/[.D50])*100" office:value-type="float" office:value="4.72354062800299" calcext:value-type="float">
            <text:p>4,72354062800299</text:p>
          </table:table-cell>
          <table:table-cell table:formula="of:=([.S50]/[.D50])*100" office:value-type="float" office:value="11.8908281632028" calcext:value-type="float">
            <text:p>11,8908281632028</text:p>
          </table:table-cell>
          <table:table-cell table:formula="of:=([.F50]/[.D50])*100" office:value-type="float" office:value="2.44122999029289" calcext:value-type="float">
            <text:p>2,44122999029289</text:p>
          </table:table-cell>
          <table:table-cell table:formula="of:=([.T50]/[.D50])*100" office:value-type="float" office:value="0.691436264261295" calcext:value-type="float">
            <text:p>0,6914362642612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5.818" calcext:value-type="float">
            <text:p>2505,818</text:p>
          </table:table-cell>
          <table:table-cell office:value-type="float" office:value="2500.287" calcext:value-type="float">
            <text:p>2500,287</text:p>
          </table:table-cell>
          <table:table-cell office:value-type="float" office:value="58.61597" calcext:value-type="float">
            <text:p>58,61597</text:p>
          </table:table-cell>
          <table:table-cell office:value-type="float" office:value="97.65563" calcext:value-type="float">
            <text:p>97,65563</text:p>
          </table:table-cell>
          <table:table-cell office:value-type="float" office:value="1.424706" calcext:value-type="float">
            <text:p>1,424706</text:p>
          </table:table-cell>
          <table:table-cell office:value-type="float" office:value="0.3036651" calcext:value-type="float">
            <text:p>0,3036651</text:p>
          </table:table-cell>
          <table:table-cell office:value-type="float" office:value="0.009031564" calcext:value-type="float">
            <text:p>0,009031564</text:p>
          </table:table-cell>
          <table:table-cell office:value-type="float" office:value="0.3005877" calcext:value-type="float">
            <text:p>0,3005877</text:p>
          </table:table-cell>
          <table:table-cell office:value-type="float" office:value="0.008366884" calcext:value-type="float">
            <text:p>0,008366884</text:p>
          </table:table-cell>
          <table:table-cell office:value-type="float" office:value="0.8030545" calcext:value-type="float">
            <text:p>0,8030545</text:p>
          </table:table-cell>
          <table:table-cell office:value-type="float" office:value="47.05825" calcext:value-type="float">
            <text:p>47,05825</text:p>
          </table:table-cell>
          <table:table-cell office:value-type="float" office:value="3.528329" calcext:value-type="float">
            <text:p>3,528329</text:p>
          </table:table-cell>
          <table:table-cell office:value-type="float" office:value="43.52992" calcext:value-type="float">
            <text:p>43,52992</text:p>
          </table:table-cell>
          <table:table-cell office:value-type="float" office:value="2.751135" calcext:value-type="float">
            <text:p>2,751135</text:p>
          </table:table-cell>
          <table:table-cell office:value-type="float" office:value="6.472648" calcext:value-type="float">
            <text:p>6,472648</text:p>
          </table:table-cell>
          <table:table-cell office:value-type="float" office:value="6.97308" calcext:value-type="float">
            <text:p>6,97308</text:p>
          </table:table-cell>
          <table:table-cell office:value-type="float" office:value="0.00004640011" calcext:value-type="float">
            <text:p>0,00004640011</text:p>
          </table:table-cell>
          <table:table-cell office:value-type="float" office:value="6.973126" calcext:value-type="float">
            <text:p>6,973126</text:p>
          </table:table-cell>
          <table:table-cell office:value-type="float" office:value="0.4087554" calcext:value-type="float">
            <text:p>0,4087554</text:p>
          </table:table-cell>
          <table:table-cell/>
          <table:table-cell table:formula="of:=([.L51]/[.D51])*100" office:value-type="float" office:value="80.2823019050952" calcext:value-type="float">
            <text:p>80,2823019050952</text:p>
          </table:table-cell>
          <table:table-cell table:formula="of:=([.O51]/[.D51])*100" office:value-type="float" office:value="4.69349052826389" calcext:value-type="float">
            <text:p>4,69349052826389</text:p>
          </table:table-cell>
          <table:table-cell table:formula="of:=([.S51]/[.D51])*100" office:value-type="float" office:value="11.8962903795672" calcext:value-type="float">
            <text:p>11,8962903795672</text:p>
          </table:table-cell>
          <table:table-cell table:formula="of:=([.F51]/[.D51])*100" office:value-type="float" office:value="2.43057651353377" calcext:value-type="float">
            <text:p>2,43057651353377</text:p>
          </table:table-cell>
          <table:table-cell table:formula="of:=([.T51]/[.D51])*100" office:value-type="float" office:value="0.697344767987291" calcext:value-type="float">
            <text:p>0,69734476798729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55.958" calcext:value-type="float">
            <text:p>2555,958</text:p>
          </table:table-cell>
          <table:table-cell office:value-type="float" office:value="2550.305" calcext:value-type="float">
            <text:p>2550,305</text:p>
          </table:table-cell>
          <table:table-cell office:value-type="float" office:value="59.82304" calcext:value-type="float">
            <text:p>59,82304</text:p>
          </table:table-cell>
          <table:table-cell office:value-type="float" office:value="97.65428" calcext:value-type="float">
            <text:p>97,65428</text:p>
          </table:table-cell>
          <table:table-cell office:value-type="float" office:value="1.449158" calcext:value-type="float">
            <text:p>1,449158</text:p>
          </table:table-cell>
          <table:table-cell office:value-type="float" office:value="0.3155021" calcext:value-type="float">
            <text:p>0,3155021</text:p>
          </table:table-cell>
          <table:table-cell office:value-type="float" office:value="0.009204293" calcext:value-type="float">
            <text:p>0,009204293</text:p>
          </table:table-cell>
          <table:table-cell office:value-type="float" office:value="0.3124374" calcext:value-type="float">
            <text:p>0,3124374</text:p>
          </table:table-cell>
          <table:table-cell office:value-type="float" office:value="0.008844478" calcext:value-type="float">
            <text:p>0,008844478</text:p>
          </table:table-cell>
          <table:table-cell office:value-type="float" office:value="0.8031696" calcext:value-type="float">
            <text:p>0,8031696</text:p>
          </table:table-cell>
          <table:table-cell office:value-type="float" office:value="48.04215" calcext:value-type="float">
            <text:p>48,04215</text:p>
          </table:table-cell>
          <table:table-cell office:value-type="float" office:value="3.556408" calcext:value-type="float">
            <text:p>3,556408</text:p>
          </table:table-cell>
          <table:table-cell office:value-type="float" office:value="44.48574" calcext:value-type="float">
            <text:p>44,48574</text:p>
          </table:table-cell>
          <table:table-cell office:value-type="float" office:value="2.79158" calcext:value-type="float">
            <text:p>2,79158</text:p>
          </table:table-cell>
          <table:table-cell office:value-type="float" office:value="6.323946" calcext:value-type="float">
            <text:p>6,323946</text:p>
          </table:table-cell>
          <table:table-cell office:value-type="float" office:value="7.119275" calcext:value-type="float">
            <text:p>7,119275</text:p>
          </table:table-cell>
          <table:table-cell office:value-type="float" office:value="0.0001242277" calcext:value-type="float">
            <text:p>0,0001242277</text:p>
          </table:table-cell>
          <table:table-cell office:value-type="float" office:value="7.1194" calcext:value-type="float">
            <text:p>7,1194</text:p>
          </table:table-cell>
          <table:table-cell office:value-type="float" office:value="0.4207572" calcext:value-type="float">
            <text:p>0,4207572</text:p>
          </table:table-cell>
          <table:table-cell/>
          <table:table-cell table:formula="of:=([.L52]/[.D52])*100" office:value-type="float" office:value="80.3071024140532" calcext:value-type="float">
            <text:p>80,3071024140532</text:p>
          </table:table-cell>
          <table:table-cell table:formula="of:=([.O52]/[.D52])*100" office:value-type="float" office:value="4.66639609087067" calcext:value-type="float">
            <text:p>4,66639609087067</text:p>
          </table:table-cell>
          <table:table-cell table:formula="of:=([.S52]/[.D52])*100" office:value-type="float" office:value="11.9007659925005" calcext:value-type="float">
            <text:p>11,9007659925005</text:p>
          </table:table-cell>
          <table:table-cell table:formula="of:=([.F52]/[.D52])*100" office:value-type="float" office:value="2.42240782146812" calcext:value-type="float">
            <text:p>2,42240782146812</text:p>
          </table:table-cell>
          <table:table-cell table:formula="of:=([.T52]/[.D52])*100" office:value-type="float" office:value="0.703336373410646" calcext:value-type="float">
            <text:p>0,70333637341064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6.101" calcext:value-type="float">
            <text:p>2606,101</text:p>
          </table:table-cell>
          <table:table-cell office:value-type="float" office:value="2600.323" calcext:value-type="float">
            <text:p>2600,323</text:p>
          </table:table-cell>
          <table:table-cell office:value-type="float" office:value="61.03838" calcext:value-type="float">
            <text:p>61,03838</text:p>
          </table:table-cell>
          <table:table-cell office:value-type="float" office:value="97.65266" calcext:value-type="float">
            <text:p>97,65266</text:p>
          </table:table-cell>
          <table:table-cell office:value-type="float" office:value="1.473356" calcext:value-type="float">
            <text:p>1,473356</text:p>
          </table:table-cell>
          <table:table-cell office:value-type="float" office:value="0.3275703" calcext:value-type="float">
            <text:p>0,3275703</text:p>
          </table:table-cell>
          <table:table-cell office:value-type="float" office:value="0.00944577" calcext:value-type="float">
            <text:p>0,00944577</text:p>
          </table:table-cell>
          <table:table-cell office:value-type="float" office:value="0.3244596" calcext:value-type="float">
            <text:p>0,3244596</text:p>
          </table:table-cell>
          <table:table-cell office:value-type="float" office:value="0.008592856" calcext:value-type="float">
            <text:p>0,008592856</text:p>
          </table:table-cell>
          <table:table-cell office:value-type="float" office:value="0.8032868" calcext:value-type="float">
            <text:p>0,8032868</text:p>
          </table:table-cell>
          <table:table-cell office:value-type="float" office:value="49.03154" calcext:value-type="float">
            <text:p>49,03154</text:p>
          </table:table-cell>
          <table:table-cell office:value-type="float" office:value="3.585672" calcext:value-type="float">
            <text:p>3,585672</text:p>
          </table:table-cell>
          <table:table-cell office:value-type="float" office:value="45.44587" calcext:value-type="float">
            <text:p>45,44587</text:p>
          </table:table-cell>
          <table:table-cell office:value-type="float" office:value="2.835067" calcext:value-type="float">
            <text:p>2,835067</text:p>
          </table:table-cell>
          <table:table-cell office:value-type="float" office:value="6.194813" calcext:value-type="float">
            <text:p>6,194813</text:p>
          </table:table-cell>
          <table:table-cell office:value-type="float" office:value="7.265377" calcext:value-type="float">
            <text:p>7,265377</text:p>
          </table:table-cell>
          <table:table-cell office:value-type="float" office:value="0.0000464386" calcext:value-type="float">
            <text:p>0,0000464386</text:p>
          </table:table-cell>
          <table:table-cell office:value-type="float" office:value="7.265423" calcext:value-type="float">
            <text:p>7,265423</text:p>
          </table:table-cell>
          <table:table-cell office:value-type="float" office:value="0.4329917" calcext:value-type="float">
            <text:p>0,4329917</text:p>
          </table:table-cell>
          <table:table-cell/>
          <table:table-cell table:formula="of:=([.L53]/[.D53])*100" office:value-type="float" office:value="80.3290323235971" calcext:value-type="float">
            <text:p>80,3290323235971</text:p>
          </table:table-cell>
          <table:table-cell table:formula="of:=([.O53]/[.D53])*100" office:value-type="float" office:value="4.64472844790442" calcext:value-type="float">
            <text:p>4,64472844790442</text:p>
          </table:table-cell>
          <table:table-cell table:formula="of:=([.S53]/[.D53])*100" office:value-type="float" office:value="11.9030403493671" calcext:value-type="float">
            <text:p>11,9030403493671</text:p>
          </table:table-cell>
          <table:table-cell table:formula="of:=([.F53]/[.D53])*100" office:value-type="float" office:value="2.41381897750235" calcext:value-type="float">
            <text:p>2,41381897750235</text:p>
          </table:table-cell>
          <table:table-cell table:formula="of:=([.T53]/[.D53])*100" office:value-type="float" office:value="0.70937613350813" calcext:value-type="float">
            <text:p>0,7093761335081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656.247" calcext:value-type="float">
            <text:p>2656,247</text:p>
          </table:table-cell>
          <table:table-cell office:value-type="float" office:value="2650.342" calcext:value-type="float">
            <text:p>2650,342</text:p>
          </table:table-cell>
          <table:table-cell office:value-type="float" office:value="62.25818" calcext:value-type="float">
            <text:p>62,25818</text:p>
          </table:table-cell>
          <table:table-cell office:value-type="float" office:value="97.65094" calcext:value-type="float">
            <text:p>97,65094</text:p>
          </table:table-cell>
          <table:table-cell office:value-type="float" office:value="1.498255" calcext:value-type="float">
            <text:p>1,498255</text:p>
          </table:table-cell>
          <table:table-cell office:value-type="float" office:value="0.3398137" calcext:value-type="float">
            <text:p>0,3398137</text:p>
          </table:table-cell>
          <table:table-cell office:value-type="float" office:value="0.008896876" calcext:value-type="float">
            <text:p>0,008896876</text:p>
          </table:table-cell>
          <table:table-cell office:value-type="float" office:value="0.3367763" calcext:value-type="float">
            <text:p>0,3367763</text:p>
          </table:table-cell>
          <table:table-cell office:value-type="float" office:value="0.009361375" calcext:value-type="float">
            <text:p>0,009361375</text:p>
          </table:table-cell>
          <table:table-cell office:value-type="float" office:value="0.8034063" calcext:value-type="float">
            <text:p>0,8034063</text:p>
          </table:table-cell>
          <table:table-cell office:value-type="float" office:value="50.02537" calcext:value-type="float">
            <text:p>50,02537</text:p>
          </table:table-cell>
          <table:table-cell office:value-type="float" office:value="3.615511" calcext:value-type="float">
            <text:p>3,615511</text:p>
          </table:table-cell>
          <table:table-cell office:value-type="float" office:value="46.40986" calcext:value-type="float">
            <text:p>46,40986</text:p>
          </table:table-cell>
          <table:table-cell office:value-type="float" office:value="2.877354" calcext:value-type="float">
            <text:p>2,877354</text:p>
          </table:table-cell>
          <table:table-cell office:value-type="float" office:value="6.028892" calcext:value-type="float">
            <text:p>6,028892</text:p>
          </table:table-cell>
          <table:table-cell office:value-type="float" office:value="7.411764" calcext:value-type="float">
            <text:p>7,411764</text:p>
          </table:table-cell>
          <table:table-cell office:value-type="float" office:value="0.0000464394" calcext:value-type="float">
            <text:p>0,0000464394</text:p>
          </table:table-cell>
          <table:table-cell office:value-type="float" office:value="7.41181" calcext:value-type="float">
            <text:p>7,41181</text:p>
          </table:table-cell>
          <table:table-cell office:value-type="float" office:value="0.4453904" calcext:value-type="float">
            <text:p>0,4453904</text:p>
          </table:table-cell>
          <table:table-cell/>
          <table:table-cell table:formula="of:=([.L54]/[.D54])*100" office:value-type="float" office:value="80.3514815241949" calcext:value-type="float">
            <text:p>80,3514815241949</text:p>
          </table:table-cell>
          <table:table-cell table:formula="of:=([.O54]/[.D54])*100" office:value-type="float" office:value="4.62164811113977" calcext:value-type="float">
            <text:p>4,62164811113977</text:p>
          </table:table-cell>
          <table:table-cell table:formula="of:=([.S54]/[.D54])*100" office:value-type="float" office:value="11.9049577099748" calcext:value-type="float">
            <text:p>11,9049577099748</text:p>
          </table:table-cell>
          <table:table-cell table:formula="of:=([.F54]/[.D54])*100" office:value-type="float" office:value="2.40651911122362" calcext:value-type="float">
            <text:p>2,40651911122362</text:p>
          </table:table-cell>
          <table:table-cell table:formula="of:=([.T54]/[.D54])*100" office:value-type="float" office:value="0.715392579738116" calcext:value-type="float">
            <text:p>0,7153925797381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06.397" calcext:value-type="float">
            <text:p>2706,397</text:p>
          </table:table-cell>
          <table:table-cell office:value-type="float" office:value="2700.362" calcext:value-type="float">
            <text:p>2700,362</text:p>
          </table:table-cell>
          <table:table-cell office:value-type="float" office:value="63.48328" calcext:value-type="float">
            <text:p>63,48328</text:p>
          </table:table-cell>
          <table:table-cell office:value-type="float" office:value="97.64908" calcext:value-type="float">
            <text:p>97,64908</text:p>
          </table:table-cell>
          <table:table-cell office:value-type="float" office:value="1.522437" calcext:value-type="float">
            <text:p>1,522437</text:p>
          </table:table-cell>
          <table:table-cell office:value-type="float" office:value="0.3522326" calcext:value-type="float">
            <text:p>0,3522326</text:p>
          </table:table-cell>
          <table:table-cell office:value-type="float" office:value="0.007620549" calcext:value-type="float">
            <text:p>0,007620549</text:p>
          </table:table-cell>
          <table:table-cell office:value-type="float" office:value="0.3493047" calcext:value-type="float">
            <text:p>0,3493047</text:p>
          </table:table-cell>
          <table:table-cell office:value-type="float" office:value="0.009750678" calcext:value-type="float">
            <text:p>0,009750678</text:p>
          </table:table-cell>
          <table:table-cell office:value-type="float" office:value="0.803528" calcext:value-type="float">
            <text:p>0,803528</text:p>
          </table:table-cell>
          <table:table-cell office:value-type="float" office:value="51.0237" calcext:value-type="float">
            <text:p>51,0237</text:p>
          </table:table-cell>
          <table:table-cell office:value-type="float" office:value="3.645843" calcext:value-type="float">
            <text:p>3,645843</text:p>
          </table:table-cell>
          <table:table-cell office:value-type="float" office:value="47.37786" calcext:value-type="float">
            <text:p>47,37786</text:p>
          </table:table-cell>
          <table:table-cell office:value-type="float" office:value="2.920433" calcext:value-type="float">
            <text:p>2,920433</text:p>
          </table:table-cell>
          <table:table-cell office:value-type="float" office:value="5.937532" calcext:value-type="float">
            <text:p>5,937532</text:p>
          </table:table-cell>
          <table:table-cell office:value-type="float" office:value="7.558548" calcext:value-type="float">
            <text:p>7,558548</text:p>
          </table:table-cell>
          <table:table-cell office:value-type="float" office:value="0.00004644292" calcext:value-type="float">
            <text:p>0,00004644292</text:p>
          </table:table-cell>
          <table:table-cell office:value-type="float" office:value="7.558595" calcext:value-type="float">
            <text:p>7,558595</text:p>
          </table:table-cell>
          <table:table-cell office:value-type="float" office:value="0.4581134" calcext:value-type="float">
            <text:p>0,4581134</text:p>
          </table:table-cell>
          <table:table-cell/>
          <table:table-cell table:formula="of:=([.L55]/[.D55])*100" office:value-type="float" office:value="80.3734463625698" calcext:value-type="float">
            <text:p>80,3734463625698</text:p>
          </table:table-cell>
          <table:table-cell table:formula="of:=([.O55]/[.D55])*100" office:value-type="float" office:value="4.60031838304511" calcext:value-type="float">
            <text:p>4,60031838304511</text:p>
          </table:table-cell>
          <table:table-cell table:formula="of:=([.S55]/[.D55])*100" office:value-type="float" office:value="11.9064342611157" calcext:value-type="float">
            <text:p>11,9064342611157</text:p>
          </table:table-cell>
          <table:table-cell table:formula="of:=([.F55]/[.D55])*100" office:value-type="float" office:value="2.39817003784304" calcext:value-type="float">
            <text:p>2,39817003784304</text:p>
          </table:table-cell>
          <table:table-cell table:formula="of:=([.T55]/[.D55])*100" office:value-type="float" office:value="0.721628435077709" calcext:value-type="float">
            <text:p>0,72162843507770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56.55" calcext:value-type="float">
            <text:p>2756,55</text:p>
          </table:table-cell>
          <table:table-cell office:value-type="float" office:value="2750.382" calcext:value-type="float">
            <text:p>2750,382</text:p>
          </table:table-cell>
          <table:table-cell office:value-type="float" office:value="64.71601" calcext:value-type="float">
            <text:p>64,71601</text:p>
          </table:table-cell>
          <table:table-cell office:value-type="float" office:value="97.64702" calcext:value-type="float">
            <text:p>97,64702</text:p>
          </table:table-cell>
          <table:table-cell office:value-type="float" office:value="1.547054" calcext:value-type="float">
            <text:p>1,547054</text:p>
          </table:table-cell>
          <table:table-cell office:value-type="float" office:value="0.3649095" calcext:value-type="float">
            <text:p>0,3649095</text:p>
          </table:table-cell>
          <table:table-cell office:value-type="float" office:value="0.006504394" calcext:value-type="float">
            <text:p>0,006504394</text:p>
          </table:table-cell>
          <table:table-cell office:value-type="float" office:value="0.3620386" calcext:value-type="float">
            <text:p>0,3620386</text:p>
          </table:table-cell>
          <table:table-cell office:value-type="float" office:value="0.009948698" calcext:value-type="float">
            <text:p>0,009948698</text:p>
          </table:table-cell>
          <table:table-cell office:value-type="float" office:value="0.803652" calcext:value-type="float">
            <text:p>0,803652</text:p>
          </table:table-cell>
          <table:table-cell office:value-type="float" office:value="52.02725" calcext:value-type="float">
            <text:p>52,02725</text:p>
          </table:table-cell>
          <table:table-cell office:value-type="float" office:value="3.676582" calcext:value-type="float">
            <text:p>3,676582</text:p>
          </table:table-cell>
          <table:table-cell office:value-type="float" office:value="48.35066" calcext:value-type="float">
            <text:p>48,35066</text:p>
          </table:table-cell>
          <table:table-cell office:value-type="float" office:value="2.964706" calcext:value-type="float">
            <text:p>2,964706</text:p>
          </table:table-cell>
          <table:table-cell office:value-type="float" office:value="5.881345" calcext:value-type="float">
            <text:p>5,881345</text:p>
          </table:table-cell>
          <table:table-cell office:value-type="float" office:value="7.705782" calcext:value-type="float">
            <text:p>7,705782</text:p>
          </table:table-cell>
          <table:table-cell office:value-type="float" office:value="0.00005981112" calcext:value-type="float">
            <text:p>0,00005981112</text:p>
          </table:table-cell>
          <table:table-cell office:value-type="float" office:value="7.705842" calcext:value-type="float">
            <text:p>7,705842</text:p>
          </table:table-cell>
          <table:table-cell office:value-type="float" office:value="0.4711655" calcext:value-type="float">
            <text:p>0,4711655</text:p>
          </table:table-cell>
          <table:table-cell/>
          <table:table-cell table:formula="of:=([.L56]/[.D56])*100" office:value-type="float" office:value="80.3931670076694" calcext:value-type="float">
            <text:p>80,3931670076694</text:p>
          </table:table-cell>
          <table:table-cell table:formula="of:=([.O56]/[.D56])*100" office:value-type="float" office:value="4.58110133798422" calcext:value-type="float">
            <text:p>4,58110133798422</text:p>
          </table:table-cell>
          <table:table-cell table:formula="of:=([.S56]/[.D56])*100" office:value-type="float" office:value="11.9071648576604" calcext:value-type="float">
            <text:p>11,9071648576604</text:p>
          </table:table-cell>
          <table:table-cell table:formula="of:=([.F56]/[.D56])*100" office:value-type="float" office:value="2.39052747534961" calcext:value-type="float">
            <text:p>2,39052747534961</text:p>
          </table:table-cell>
          <table:table-cell table:formula="of:=([.T56]/[.D56])*100" office:value-type="float" office:value="0.728050910431592" calcext:value-type="float">
            <text:p>0,7280509104315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06.706" calcext:value-type="float">
            <text:p>2806,706</text:p>
          </table:table-cell>
          <table:table-cell office:value-type="float" office:value="2800.403" calcext:value-type="float">
            <text:p>2800,403</text:p>
          </table:table-cell>
          <table:table-cell office:value-type="float" office:value="65.96754" calcext:value-type="float">
            <text:p>65,96754</text:p>
          </table:table-cell>
          <table:table-cell office:value-type="float" office:value="97.64436" calcext:value-type="float">
            <text:p>97,64436</text:p>
          </table:table-cell>
          <table:table-cell office:value-type="float" office:value="1.575702" calcext:value-type="float">
            <text:p>1,575702</text:p>
          </table:table-cell>
          <table:table-cell office:value-type="float" office:value="0.3781416" calcext:value-type="float">
            <text:p>0,3781416</text:p>
          </table:table-cell>
          <table:table-cell office:value-type="float" office:value="0.009726086" calcext:value-type="float">
            <text:p>0,009726086</text:p>
          </table:table-cell>
          <table:table-cell office:value-type="float" office:value="0.3749126" calcext:value-type="float">
            <text:p>0,3749126</text:p>
          </table:table-cell>
          <table:table-cell office:value-type="float" office:value="0.009143744" calcext:value-type="float">
            <text:p>0,009143744</text:p>
          </table:table-cell>
          <table:table-cell office:value-type="float" office:value="0.8037781" calcext:value-type="float">
            <text:p>0,8037781</text:p>
          </table:table-cell>
          <table:table-cell office:value-type="float" office:value="53.04349" calcext:value-type="float">
            <text:p>53,04349</text:p>
          </table:table-cell>
          <table:table-cell office:value-type="float" office:value="3.709383" calcext:value-type="float">
            <text:p>3,709383</text:p>
          </table:table-cell>
          <table:table-cell office:value-type="float" office:value="49.33411" calcext:value-type="float">
            <text:p>49,33411</text:p>
          </table:table-cell>
          <table:table-cell office:value-type="float" office:value="3.009865" calcext:value-type="float">
            <text:p>3,009865</text:p>
          </table:table-cell>
          <table:table-cell office:value-type="float" office:value="5.85351" calcext:value-type="float">
            <text:p>5,85351</text:p>
          </table:table-cell>
          <table:table-cell office:value-type="float" office:value="7.853962" calcext:value-type="float">
            <text:p>7,853962</text:p>
          </table:table-cell>
          <table:table-cell office:value-type="float" office:value="0.00004645942" calcext:value-type="float">
            <text:p>0,00004645942</text:p>
          </table:table-cell>
          <table:table-cell office:value-type="float" office:value="7.854009" calcext:value-type="float">
            <text:p>7,854009</text:p>
          </table:table-cell>
          <table:table-cell office:value-type="float" office:value="0.4844731" calcext:value-type="float">
            <text:p>0,4844731</text:p>
          </table:table-cell>
          <table:table-cell/>
          <table:table-cell table:formula="of:=([.L57]/[.D57])*100" office:value-type="float" office:value="80.4084705902327" calcext:value-type="float">
            <text:p>80,4084705902327</text:p>
          </table:table-cell>
          <table:table-cell table:formula="of:=([.O57]/[.D57])*100" office:value-type="float" office:value="4.56264550716913" calcext:value-type="float">
            <text:p>4,56264550716913</text:p>
          </table:table-cell>
          <table:table-cell table:formula="of:=([.S57]/[.D57])*100" office:value-type="float" office:value="11.9058691592865" calcext:value-type="float">
            <text:p>11,9058691592865</text:p>
          </table:table-cell>
          <table:table-cell table:formula="of:=([.F57]/[.D57])*100" office:value-type="float" office:value="2.38860203063507" calcext:value-type="float">
            <text:p>2,38860203063507</text:p>
          </table:table-cell>
          <table:table-cell table:formula="of:=([.T57]/[.D57])*100" office:value-type="float" office:value="0.734411348369213" calcext:value-type="float">
            <text:p>0,73441134836921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856.865" calcext:value-type="float">
            <text:p>2856,865</text:p>
          </table:table-cell>
          <table:table-cell office:value-type="float" office:value="2850.425" calcext:value-type="float">
            <text:p>2850,425</text:p>
          </table:table-cell>
          <table:table-cell office:value-type="float" office:value="67.21154" calcext:value-type="float">
            <text:p>67,21154</text:p>
          </table:table-cell>
          <table:table-cell office:value-type="float" office:value="97.64205" calcext:value-type="float">
            <text:p>97,64205</text:p>
          </table:table-cell>
          <table:table-cell office:value-type="float" office:value="1.60315" calcext:value-type="float">
            <text:p>1,60315</text:p>
          </table:table-cell>
          <table:table-cell office:value-type="float" office:value="0.3914405" calcext:value-type="float">
            <text:p>0,3914405</text:p>
          </table:table-cell>
          <table:table-cell office:value-type="float" office:value="0.01079643" calcext:value-type="float">
            <text:p>0,01079643</text:p>
          </table:table-cell>
          <table:table-cell office:value-type="float" office:value="0.3880986" calcext:value-type="float">
            <text:p>0,3880986</text:p>
          </table:table-cell>
          <table:table-cell office:value-type="float" office:value="0.008907529" calcext:value-type="float">
            <text:p>0,008907529</text:p>
          </table:table-cell>
          <table:table-cell office:value-type="float" office:value="0.8039067" calcext:value-type="float">
            <text:p>0,8039067</text:p>
          </table:table-cell>
          <table:table-cell office:value-type="float" office:value="54.0524" calcext:value-type="float">
            <text:p>54,0524</text:p>
          </table:table-cell>
          <table:table-cell office:value-type="float" office:value="3.74043" calcext:value-type="float">
            <text:p>3,74043</text:p>
          </table:table-cell>
          <table:table-cell office:value-type="float" office:value="50.31197" calcext:value-type="float">
            <text:p>50,31197</text:p>
          </table:table-cell>
          <table:table-cell office:value-type="float" office:value="3.056224" calcext:value-type="float">
            <text:p>3,056224</text:p>
          </table:table-cell>
          <table:table-cell office:value-type="float" office:value="5.764213" calcext:value-type="float">
            <text:p>5,764213</text:p>
          </table:table-cell>
          <table:table-cell office:value-type="float" office:value="8.001702" calcext:value-type="float">
            <text:p>8,001702</text:p>
          </table:table-cell>
          <table:table-cell office:value-type="float" office:value="0.00004647226" calcext:value-type="float">
            <text:p>0,00004647226</text:p>
          </table:table-cell>
          <table:table-cell office:value-type="float" office:value="8.001748" calcext:value-type="float">
            <text:p>8,001748</text:p>
          </table:table-cell>
          <table:table-cell office:value-type="float" office:value="0.4980226" calcext:value-type="float">
            <text:p>0,4980226</text:p>
          </table:table-cell>
          <table:table-cell/>
          <table:table-cell table:formula="of:=([.L58]/[.D58])*100" office:value-type="float" office:value="80.4213086026596" calcext:value-type="float">
            <text:p>80,4213086026596</text:p>
          </table:table-cell>
          <table:table-cell table:formula="of:=([.O58]/[.D58])*100" office:value-type="float" office:value="4.5471715125111" calcext:value-type="float">
            <text:p>4,5471715125111</text:p>
          </table:table-cell>
          <table:table-cell table:formula="of:=([.S58]/[.D58])*100" office:value-type="float" office:value="11.9053186402216" calcext:value-type="float">
            <text:p>11,9053186402216</text:p>
          </table:table-cell>
          <table:table-cell table:formula="of:=([.F58]/[.D58])*100" office:value-type="float" office:value="2.38523027444394" calcext:value-type="float">
            <text:p>2,38523027444394</text:p>
          </table:table-cell>
          <table:table-cell table:formula="of:=([.T58]/[.D58])*100" office:value-type="float" office:value="0.740977814226545" calcext:value-type="float">
            <text:p>0,74097781422654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07.028" calcext:value-type="float">
            <text:p>2907,028</text:p>
          </table:table-cell>
          <table:table-cell office:value-type="float" office:value="2900.448" calcext:value-type="float">
            <text:p>2900,448</text:p>
          </table:table-cell>
          <table:table-cell office:value-type="float" office:value="68.45813" calcext:value-type="float">
            <text:p>68,45813</text:p>
          </table:table-cell>
          <table:table-cell office:value-type="float" office:value="97.63974" calcext:value-type="float">
            <text:p>97,63974</text:p>
          </table:table-cell>
          <table:table-cell office:value-type="float" office:value="1.628568" calcext:value-type="float">
            <text:p>1,628568</text:p>
          </table:table-cell>
          <table:table-cell office:value-type="float" office:value="0.4047699" calcext:value-type="float">
            <text:p>0,4047699</text:p>
          </table:table-cell>
          <table:table-cell office:value-type="float" office:value="0.009542296" calcext:value-type="float">
            <text:p>0,009542296</text:p>
          </table:table-cell>
          <table:table-cell office:value-type="float" office:value="0.4015121" calcext:value-type="float">
            <text:p>0,4015121</text:p>
          </table:table-cell>
          <table:table-cell office:value-type="float" office:value="0.008705625" calcext:value-type="float">
            <text:p>0,008705625</text:p>
          </table:table-cell>
          <table:table-cell office:value-type="float" office:value="0.8040374" calcext:value-type="float">
            <text:p>0,8040374</text:p>
          </table:table-cell>
          <table:table-cell office:value-type="float" office:value="55.06468" calcext:value-type="float">
            <text:p>55,06468</text:p>
          </table:table-cell>
          <table:table-cell office:value-type="float" office:value="3.77169" calcext:value-type="float">
            <text:p>3,77169</text:p>
          </table:table-cell>
          <table:table-cell office:value-type="float" office:value="51.29299" calcext:value-type="float">
            <text:p>51,29299</text:p>
          </table:table-cell>
          <table:table-cell office:value-type="float" office:value="3.10341" calcext:value-type="float">
            <text:p>3,10341</text:p>
          </table:table-cell>
          <table:table-cell office:value-type="float" office:value="5.675325" calcext:value-type="float">
            <text:p>5,675325</text:p>
          </table:table-cell>
          <table:table-cell office:value-type="float" office:value="8.149612" calcext:value-type="float">
            <text:p>8,149612</text:p>
          </table:table-cell>
          <table:table-cell office:value-type="float" office:value="0.00007792319" calcext:value-type="float">
            <text:p>0,00007792319</text:p>
          </table:table-cell>
          <table:table-cell office:value-type="float" office:value="8.14969" calcext:value-type="float">
            <text:p>8,14969</text:p>
          </table:table-cell>
          <table:table-cell office:value-type="float" office:value="0.5117851" calcext:value-type="float">
            <text:p>0,5117851</text:p>
          </table:table-cell>
          <table:table-cell/>
          <table:table-cell table:formula="of:=([.L59]/[.D59])*100" office:value-type="float" office:value="80.4355596625266" calcext:value-type="float">
            <text:p>80,4355596625266</text:p>
          </table:table-cell>
          <table:table-cell table:formula="of:=([.O59]/[.D59])*100" office:value-type="float" office:value="4.53329648355864" calcext:value-type="float">
            <text:p>4,53329648355864</text:p>
          </table:table-cell>
          <table:table-cell table:formula="of:=([.S59]/[.D59])*100" office:value-type="float" office:value="11.9046342633081" calcext:value-type="float">
            <text:p>11,9046342633081</text:p>
          </table:table-cell>
          <table:table-cell table:formula="of:=([.F59]/[.D59])*100" office:value-type="float" office:value="2.37892562943218" calcext:value-type="float">
            <text:p>2,37892562943218</text:p>
          </table:table-cell>
          <table:table-cell table:formula="of:=([.T59]/[.D59])*100" office:value-type="float" office:value="0.747588489489853" calcext:value-type="float">
            <text:p>0,74758848948985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57.193" calcext:value-type="float">
            <text:p>2957,193</text:p>
          </table:table-cell>
          <table:table-cell office:value-type="float" office:value="2950.471" calcext:value-type="float">
            <text:p>2950,471</text:p>
          </table:table-cell>
          <table:table-cell office:value-type="float" office:value="69.71635" calcext:value-type="float">
            <text:p>69,71635</text:p>
          </table:table-cell>
          <table:table-cell office:value-type="float" office:value="97.63711" calcext:value-type="float">
            <text:p>97,63711</text:p>
          </table:table-cell>
          <table:table-cell office:value-type="float" office:value="1.657564" calcext:value-type="float">
            <text:p>1,657564</text:p>
          </table:table-cell>
          <table:table-cell office:value-type="float" office:value="0.4184928" calcext:value-type="float">
            <text:p>0,4184928</text:p>
          </table:table-cell>
          <table:table-cell office:value-type="float" office:value="0.01021282" calcext:value-type="float">
            <text:p>0,01021282</text:p>
          </table:table-cell>
          <table:table-cell office:value-type="float" office:value="0.415249" calcext:value-type="float">
            <text:p>0,415249</text:p>
          </table:table-cell>
          <table:table-cell office:value-type="float" office:value="0.009439153" calcext:value-type="float">
            <text:p>0,009439153</text:p>
          </table:table-cell>
          <table:table-cell office:value-type="float" office:value="0.8041705" calcext:value-type="float">
            <text:p>0,8041705</text:p>
          </table:table-cell>
          <table:table-cell office:value-type="float" office:value="56.08129" calcext:value-type="float">
            <text:p>56,08129</text:p>
          </table:table-cell>
          <table:table-cell office:value-type="float" office:value="3.803326" calcext:value-type="float">
            <text:p>3,803326</text:p>
          </table:table-cell>
          <table:table-cell office:value-type="float" office:value="52.27796" calcext:value-type="float">
            <text:p>52,27796</text:p>
          </table:table-cell>
          <table:table-cell office:value-type="float" office:value="3.153789" calcext:value-type="float">
            <text:p>3,153789</text:p>
          </table:table-cell>
          <table:table-cell office:value-type="float" office:value="5.595998" calcext:value-type="float">
            <text:p>5,595998</text:p>
          </table:table-cell>
          <table:table-cell office:value-type="float" office:value="8.297771" calcext:value-type="float">
            <text:p>8,297771</text:p>
          </table:table-cell>
          <table:table-cell office:value-type="float" office:value="0.00004650965" calcext:value-type="float">
            <text:p>0,00004650965</text:p>
          </table:table-cell>
          <table:table-cell office:value-type="float" office:value="8.297817" calcext:value-type="float">
            <text:p>8,297817</text:p>
          </table:table-cell>
          <table:table-cell office:value-type="float" office:value="0.5258937" calcext:value-type="float">
            <text:p>0,5258937</text:p>
          </table:table-cell>
          <table:table-cell/>
          <table:table-cell table:formula="of:=([.L60]/[.D60])*100" office:value-type="float" office:value="80.44209141758" calcext:value-type="float">
            <text:p>80,44209141758</text:p>
          </table:table-cell>
          <table:table-cell table:formula="of:=([.O60]/[.D60])*100" office:value-type="float" office:value="4.5237437129167" calcext:value-type="float">
            <text:p>4,5237437129167</text:p>
          </table:table-cell>
          <table:table-cell table:formula="of:=([.S60]/[.D60])*100" office:value-type="float" office:value="11.9022539189157" calcext:value-type="float">
            <text:p>11,9022539189157</text:p>
          </table:table-cell>
          <table:table-cell table:formula="of:=([.F60]/[.D60])*100" office:value-type="float" office:value="2.37758287690047" calcext:value-type="float">
            <text:p>2,37758287690047</text:p>
          </table:table-cell>
          <table:table-cell table:formula="of:=([.T60]/[.D60])*100" office:value-type="float" office:value="0.754333380907061" calcext:value-type="float">
            <text:p>0,7543333809070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7.362" calcext:value-type="float">
            <text:p>3007,362</text:p>
          </table:table-cell>
          <table:table-cell office:value-type="float" office:value="3000.495" calcext:value-type="float">
            <text:p>3000,495</text:p>
          </table:table-cell>
          <table:table-cell office:value-type="float" office:value="70.97679" calcext:value-type="float">
            <text:p>70,97679</text:p>
          </table:table-cell>
          <table:table-cell office:value-type="float" office:value="97.6345" calcext:value-type="float">
            <text:p>97,6345</text:p>
          </table:table-cell>
          <table:table-cell office:value-type="float" office:value="1.686935" calcext:value-type="float">
            <text:p>1,686935</text:p>
          </table:table-cell>
          <table:table-cell office:value-type="float" office:value="0.4325369" calcext:value-type="float">
            <text:p>0,4325369</text:p>
          </table:table-cell>
          <table:table-cell office:value-type="float" office:value="0.01160205" calcext:value-type="float">
            <text:p>0,01160205</text:p>
          </table:table-cell>
          <table:table-cell office:value-type="float" office:value="0.429142" calcext:value-type="float">
            <text:p>0,429142</text:p>
          </table:table-cell>
          <table:table-cell office:value-type="float" office:value="0.009347661" calcext:value-type="float">
            <text:p>0,009347661</text:p>
          </table:table-cell>
          <table:table-cell office:value-type="float" office:value="0.8043058" calcext:value-type="float">
            <text:p>0,8043058</text:p>
          </table:table-cell>
          <table:table-cell office:value-type="float" office:value="57.10065" calcext:value-type="float">
            <text:p>57,10065</text:p>
          </table:table-cell>
          <table:table-cell office:value-type="float" office:value="3.834951" calcext:value-type="float">
            <text:p>3,834951</text:p>
          </table:table-cell>
          <table:table-cell office:value-type="float" office:value="53.2657" calcext:value-type="float">
            <text:p>53,2657</text:p>
          </table:table-cell>
          <table:table-cell office:value-type="float" office:value="3.203068" calcext:value-type="float">
            <text:p>3,203068</text:p>
          </table:table-cell>
          <table:table-cell office:value-type="float" office:value="5.496038" calcext:value-type="float">
            <text:p>5,496038</text:p>
          </table:table-cell>
          <table:table-cell office:value-type="float" office:value="8.445909" calcext:value-type="float">
            <text:p>8,445909</text:p>
          </table:table-cell>
          <table:table-cell office:value-type="float" office:value="0.00004650943" calcext:value-type="float">
            <text:p>0,00004650943</text:p>
          </table:table-cell>
          <table:table-cell office:value-type="float" office:value="8.445956" calcext:value-type="float">
            <text:p>8,445956</text:p>
          </table:table-cell>
          <table:table-cell office:value-type="float" office:value="0.5401844" calcext:value-type="float">
            <text:p>0,5401844</text:p>
          </table:table-cell>
          <table:table-cell/>
          <table:table-cell table:formula="of:=([.L61]/[.D61])*100" office:value-type="float" office:value="80.4497498407578" calcext:value-type="float">
            <text:p>80,4497498407578</text:p>
          </table:table-cell>
          <table:table-cell table:formula="of:=([.O61]/[.D61])*100" office:value-type="float" office:value="4.51283863358712" calcext:value-type="float">
            <text:p>4,51283863358712</text:p>
          </table:table-cell>
          <table:table-cell table:formula="of:=([.S61]/[.D61])*100" office:value-type="float" office:value="11.8996026729301" calcext:value-type="float">
            <text:p>11,8996026729301</text:p>
          </table:table-cell>
          <table:table-cell table:formula="of:=([.F61]/[.D61])*100" office:value-type="float" office:value="2.37674174895765" calcext:value-type="float">
            <text:p>2,37674174895765</text:p>
          </table:table-cell>
          <table:table-cell table:formula="of:=([.T61]/[.D61])*100" office:value-type="float" office:value="0.761071894065652" calcext:value-type="float">
            <text:p>0,76107189406565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057.534" calcext:value-type="float">
            <text:p>3057,534</text:p>
          </table:table-cell>
          <table:table-cell office:value-type="float" office:value="3050.52" calcext:value-type="float">
            <text:p>3050,52</text:p>
          </table:table-cell>
          <table:table-cell office:value-type="float" office:value="72.24577" calcext:value-type="float">
            <text:p>72,24577</text:p>
          </table:table-cell>
          <table:table-cell office:value-type="float" office:value="97.63169" calcext:value-type="float">
            <text:p>97,63169</text:p>
          </table:table-cell>
          <table:table-cell office:value-type="float" office:value="1.718867" calcext:value-type="float">
            <text:p>1,718867</text:p>
          </table:table-cell>
          <table:table-cell office:value-type="float" office:value="0.4468644" calcext:value-type="float">
            <text:p>0,4468644</text:p>
          </table:table-cell>
          <table:table-cell office:value-type="float" office:value="0.01340423" calcext:value-type="float">
            <text:p>0,01340423</text:p>
          </table:table-cell>
          <table:table-cell office:value-type="float" office:value="0.4433749" calcext:value-type="float">
            <text:p>0,4433749</text:p>
          </table:table-cell>
          <table:table-cell office:value-type="float" office:value="0.01077944" calcext:value-type="float">
            <text:p>0,01077944</text:p>
          </table:table-cell>
          <table:table-cell office:value-type="float" office:value="0.8044434" calcext:value-type="float">
            <text:p>0,8044434</text:p>
          </table:table-cell>
          <table:table-cell office:value-type="float" office:value="58.12434" calcext:value-type="float">
            <text:p>58,12434</text:p>
          </table:table-cell>
          <table:table-cell office:value-type="float" office:value="3.866854" calcext:value-type="float">
            <text:p>3,866854</text:p>
          </table:table-cell>
          <table:table-cell office:value-type="float" office:value="54.25749" calcext:value-type="float">
            <text:p>54,25749</text:p>
          </table:table-cell>
          <table:table-cell office:value-type="float" office:value="3.253419" calcext:value-type="float">
            <text:p>3,253419</text:p>
          </table:table-cell>
          <table:table-cell office:value-type="float" office:value="5.378618" calcext:value-type="float">
            <text:p>5,378618</text:p>
          </table:table-cell>
          <table:table-cell office:value-type="float" office:value="8.594366" calcext:value-type="float">
            <text:p>8,594366</text:p>
          </table:table-cell>
          <table:table-cell office:value-type="float" office:value="0.00004650764" calcext:value-type="float">
            <text:p>0,00004650764</text:p>
          </table:table-cell>
          <table:table-cell office:value-type="float" office:value="8.594412" calcext:value-type="float">
            <text:p>8,594412</text:p>
          </table:table-cell>
          <table:table-cell office:value-type="float" office:value="0.5547319" calcext:value-type="float">
            <text:p>0,5547319</text:p>
          </table:table-cell>
          <table:table-cell/>
          <table:table-cell table:formula="of:=([.L62]/[.D62])*100" office:value-type="float" office:value="80.4536237900157" calcext:value-type="float">
            <text:p>80,4536237900157</text:p>
          </table:table-cell>
          <table:table-cell table:formula="of:=([.O62]/[.D62])*100" office:value-type="float" office:value="4.50326572752979" calcext:value-type="float">
            <text:p>4,50326572752979</text:p>
          </table:table-cell>
          <table:table-cell table:formula="of:=([.S62]/[.D62])*100" office:value-type="float" office:value="11.8960764069647" calcext:value-type="float">
            <text:p>11,8960764069647</text:p>
          </table:table-cell>
          <table:table-cell table:formula="of:=([.F62]/[.D62])*100" office:value-type="float" office:value="2.37919396526606" calcext:value-type="float">
            <text:p>2,37919396526606</text:p>
          </table:table-cell>
          <table:table-cell table:formula="of:=([.T62]/[.D62])*100" office:value-type="float" office:value="0.767839971807346" calcext:value-type="float">
            <text:p>0,76783997180734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07.71" calcext:value-type="float">
            <text:p>3107,71</text:p>
          </table:table-cell>
          <table:table-cell office:value-type="float" office:value="3100.546" calcext:value-type="float">
            <text:p>3100,546</text:p>
          </table:table-cell>
          <table:table-cell office:value-type="float" office:value="73.52058" calcext:value-type="float">
            <text:p>73,52058</text:p>
          </table:table-cell>
          <table:table-cell office:value-type="float" office:value="97.62879" calcext:value-type="float">
            <text:p>97,62879</text:p>
          </table:table-cell>
          <table:table-cell office:value-type="float" office:value="1.750798" calcext:value-type="float">
            <text:p>1,750798</text:p>
          </table:table-cell>
          <table:table-cell office:value-type="float" office:value="0.4613129" calcext:value-type="float">
            <text:p>0,4613129</text:p>
          </table:table-cell>
          <table:table-cell office:value-type="float" office:value="0.01410733" calcext:value-type="float">
            <text:p>0,01410733</text:p>
          </table:table-cell>
          <table:table-cell office:value-type="float" office:value="0.4579211" calcext:value-type="float">
            <text:p>0,4579211</text:p>
          </table:table-cell>
          <table:table-cell office:value-type="float" office:value="0.01287272" calcext:value-type="float">
            <text:p>0,01287272</text:p>
          </table:table-cell>
          <table:table-cell office:value-type="float" office:value="0.8045833" calcext:value-type="float">
            <text:p>0,8045833</text:p>
          </table:table-cell>
          <table:table-cell office:value-type="float" office:value="59.15221" calcext:value-type="float">
            <text:p>59,15221</text:p>
          </table:table-cell>
          <table:table-cell office:value-type="float" office:value="3.899445" calcext:value-type="float">
            <text:p>3,899445</text:p>
          </table:table-cell>
          <table:table-cell office:value-type="float" office:value="55.25277" calcext:value-type="float">
            <text:p>55,25277</text:p>
          </table:table-cell>
          <table:table-cell office:value-type="float" office:value="3.304836" calcext:value-type="float">
            <text:p>3,304836</text:p>
          </table:table-cell>
          <table:table-cell office:value-type="float" office:value="5.294364" calcext:value-type="float">
            <text:p>5,294364</text:p>
          </table:table-cell>
          <table:table-cell office:value-type="float" office:value="8.743099" calcext:value-type="float">
            <text:p>8,743099</text:p>
          </table:table-cell>
          <table:table-cell office:value-type="float" office:value="0.00004650486" calcext:value-type="float">
            <text:p>0,00004650486</text:p>
          </table:table-cell>
          <table:table-cell office:value-type="float" office:value="8.743146" calcext:value-type="float">
            <text:p>8,743146</text:p>
          </table:table-cell>
          <table:table-cell office:value-type="float" office:value="0.5695944" calcext:value-type="float">
            <text:p>0,5695944</text:p>
          </table:table-cell>
          <table:table-cell/>
          <table:table-cell table:formula="of:=([.L63]/[.D63])*100" office:value-type="float" office:value="80.4566694114764" calcext:value-type="float">
            <text:p>80,4566694114764</text:p>
          </table:table-cell>
          <table:table-cell table:formula="of:=([.O63]/[.D63])*100" office:value-type="float" office:value="4.49511687747839" calcext:value-type="float">
            <text:p>4,49511687747839</text:p>
          </table:table-cell>
          <table:table-cell table:formula="of:=([.S63]/[.D63])*100" office:value-type="float" office:value="11.8921069447493" calcext:value-type="float">
            <text:p>11,8921069447493</text:p>
          </table:table-cell>
          <table:table-cell table:formula="of:=([.F63]/[.D63])*100" office:value-type="float" office:value="2.38137131127094" calcext:value-type="float">
            <text:p>2,38137131127094</text:p>
          </table:table-cell>
          <table:table-cell table:formula="of:=([.T63]/[.D63])*100" office:value-type="float" office:value="0.774741439743811" calcext:value-type="float">
            <text:p>0,77474143974381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157.888" calcext:value-type="float">
            <text:p>3157,888</text:p>
          </table:table-cell>
          <table:table-cell office:value-type="float" office:value="3150.573" calcext:value-type="float">
            <text:p>3150,573</text:p>
          </table:table-cell>
          <table:table-cell office:value-type="float" office:value="74.80018" calcext:value-type="float">
            <text:p>74,80018</text:p>
          </table:table-cell>
          <table:table-cell office:value-type="float" office:value="97.62582" calcext:value-type="float">
            <text:p>97,62582</text:p>
          </table:table-cell>
          <table:table-cell office:value-type="float" office:value="1.781974" calcext:value-type="float">
            <text:p>1,781974</text:p>
          </table:table-cell>
          <table:table-cell office:value-type="float" office:value="0.475983" calcext:value-type="float">
            <text:p>0,475983</text:p>
          </table:table-cell>
          <table:table-cell office:value-type="float" office:value="0.01466399" calcext:value-type="float">
            <text:p>0,01466399</text:p>
          </table:table-cell>
          <table:table-cell office:value-type="float" office:value="0.472618" calcext:value-type="float">
            <text:p>0,472618</text:p>
          </table:table-cell>
          <table:table-cell office:value-type="float" office:value="0.01398307" calcext:value-type="float">
            <text:p>0,01398307</text:p>
          </table:table-cell>
          <table:table-cell office:value-type="float" office:value="0.8047254" calcext:value-type="float">
            <text:p>0,8047254</text:p>
          </table:table-cell>
          <table:table-cell office:value-type="float" office:value="60.18432" calcext:value-type="float">
            <text:p>60,18432</text:p>
          </table:table-cell>
          <table:table-cell office:value-type="float" office:value="3.932694" calcext:value-type="float">
            <text:p>3,932694</text:p>
          </table:table-cell>
          <table:table-cell office:value-type="float" office:value="56.25163" calcext:value-type="float">
            <text:p>56,25163</text:p>
          </table:table-cell>
          <table:table-cell office:value-type="float" office:value="3.357043" calcext:value-type="float">
            <text:p>3,357043</text:p>
          </table:table-cell>
          <table:table-cell office:value-type="float" office:value="5.217234" calcext:value-type="float">
            <text:p>5,217234</text:p>
          </table:table-cell>
          <table:table-cell office:value-type="float" office:value="8.892124" calcext:value-type="float">
            <text:p>8,892124</text:p>
          </table:table-cell>
          <table:table-cell office:value-type="float" office:value="0.00004650275" calcext:value-type="float">
            <text:p>0,00004650275</text:p>
          </table:table-cell>
          <table:table-cell office:value-type="float" office:value="8.892171" calcext:value-type="float">
            <text:p>8,892171</text:p>
          </table:table-cell>
          <table:table-cell office:value-type="float" office:value="0.5846754" calcext:value-type="float">
            <text:p>0,5846754</text:p>
          </table:table-cell>
          <table:table-cell/>
          <table:table-cell table:formula="of:=([.L64]/[.D64])*100" office:value-type="float" office:value="80.4601272349879" calcext:value-type="float">
            <text:p>80,4601272349879</text:p>
          </table:table-cell>
          <table:table-cell table:formula="of:=([.O64]/[.D64])*100" office:value-type="float" office:value="4.48801460103438" calcext:value-type="float">
            <text:p>4,48801460103438</text:p>
          </table:table-cell>
          <table:table-cell table:formula="of:=([.S64]/[.D64])*100" office:value-type="float" office:value="11.8879005371377" calcext:value-type="float">
            <text:p>11,8879005371377</text:p>
          </table:table-cell>
          <table:table-cell table:formula="of:=([.F64]/[.D64])*100" office:value-type="float" office:value="2.38231244898074" calcext:value-type="float">
            <text:p>2,38231244898074</text:p>
          </table:table-cell>
          <table:table-cell table:formula="of:=([.T64]/[.D64])*100" office:value-type="float" office:value="0.781649723302805" calcext:value-type="float">
            <text:p>0,78164972330280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08.07" calcext:value-type="float">
            <text:p>3208,07</text:p>
          </table:table-cell>
          <table:table-cell office:value-type="float" office:value="3200.601" calcext:value-type="float">
            <text:p>3200,601</text:p>
          </table:table-cell>
          <table:table-cell office:value-type="float" office:value="76.0854" calcext:value-type="float">
            <text:p>76,0854</text:p>
          </table:table-cell>
          <table:table-cell office:value-type="float" office:value="97.62278" calcext:value-type="float">
            <text:p>97,62278</text:p>
          </table:table-cell>
          <table:table-cell office:value-type="float" office:value="1.812694" calcext:value-type="float">
            <text:p>1,812694</text:p>
          </table:table-cell>
          <table:table-cell office:value-type="float" office:value="0.4908415" calcext:value-type="float">
            <text:p>0,4908415</text:p>
          </table:table-cell>
          <table:table-cell office:value-type="float" office:value="0.01471656" calcext:value-type="float">
            <text:p>0,01471656</text:p>
          </table:table-cell>
          <table:table-cell office:value-type="float" office:value="0.4875134" calcext:value-type="float">
            <text:p>0,4875134</text:p>
          </table:table-cell>
          <table:table-cell office:value-type="float" office:value="0.01475227" calcext:value-type="float">
            <text:p>0,01475227</text:p>
          </table:table-cell>
          <table:table-cell office:value-type="float" office:value="0.8048697" calcext:value-type="float">
            <text:p>0,8048697</text:p>
          </table:table-cell>
          <table:table-cell office:value-type="float" office:value="61.22123" calcext:value-type="float">
            <text:p>61,22123</text:p>
          </table:table-cell>
          <table:table-cell office:value-type="float" office:value="3.966507" calcext:value-type="float">
            <text:p>3,966507</text:p>
          </table:table-cell>
          <table:table-cell office:value-type="float" office:value="57.25473" calcext:value-type="float">
            <text:p>57,25473</text:p>
          </table:table-cell>
          <table:table-cell office:value-type="float" office:value="3.410118" calcext:value-type="float">
            <text:p>3,410118</text:p>
          </table:table-cell>
          <table:table-cell office:value-type="float" office:value="5.168372" calcext:value-type="float">
            <text:p>5,168372</text:p>
          </table:table-cell>
          <table:table-cell office:value-type="float" office:value="9.041284" calcext:value-type="float">
            <text:p>9,041284</text:p>
          </table:table-cell>
          <table:table-cell office:value-type="float" office:value="0.00004650084" calcext:value-type="float">
            <text:p>0,00004650084</text:p>
          </table:table-cell>
          <table:table-cell office:value-type="float" office:value="9.041331" calcext:value-type="float">
            <text:p>9,041331</text:p>
          </table:table-cell>
          <table:table-cell office:value-type="float" office:value="0.6000267" calcext:value-type="float">
            <text:p>0,6000267</text:p>
          </table:table-cell>
          <table:table-cell/>
          <table:table-cell table:formula="of:=([.L65]/[.D65])*100" office:value-type="float" office:value="80.4638340601482" calcext:value-type="float">
            <text:p>80,4638340601482</text:p>
          </table:table-cell>
          <table:table-cell table:formula="of:=([.O65]/[.D65])*100" office:value-type="float" office:value="4.48196105954625" calcext:value-type="float">
            <text:p>4,48196105954625</text:p>
          </table:table-cell>
          <table:table-cell table:formula="of:=([.S65]/[.D65])*100" office:value-type="float" office:value="11.8831352664243" calcext:value-type="float">
            <text:p>11,8831352664243</text:p>
          </table:table-cell>
          <table:table-cell table:formula="of:=([.F65]/[.D65])*100" office:value-type="float" office:value="2.38244656662119" calcext:value-type="float">
            <text:p>2,38244656662119</text:p>
          </table:table-cell>
          <table:table-cell table:formula="of:=([.T65]/[.D65])*100" office:value-type="float" office:value="0.788622652966272" calcext:value-type="float">
            <text:p>0,78862265296627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58.256" calcext:value-type="float">
            <text:p>3258,256</text:p>
          </table:table-cell>
          <table:table-cell office:value-type="float" office:value="3250.629" calcext:value-type="float">
            <text:p>3250,629</text:p>
          </table:table-cell>
          <table:table-cell office:value-type="float" office:value="77.37498" calcext:value-type="float">
            <text:p>77,37498</text:p>
          </table:table-cell>
          <table:table-cell office:value-type="float" office:value="97.61969" calcext:value-type="float">
            <text:p>97,61969</text:p>
          </table:table-cell>
          <table:table-cell office:value-type="float" office:value="1.842327" calcext:value-type="float">
            <text:p>1,842327</text:p>
          </table:table-cell>
          <table:table-cell office:value-type="float" office:value="0.5058741" calcext:value-type="float">
            <text:p>0,5058741</text:p>
          </table:table-cell>
          <table:table-cell office:value-type="float" office:value="0.01408852" calcext:value-type="float">
            <text:p>0,01408852</text:p>
          </table:table-cell>
          <table:table-cell office:value-type="float" office:value="0.5025779" calcext:value-type="float">
            <text:p>0,5025779</text:p>
          </table:table-cell>
          <table:table-cell office:value-type="float" office:value="0.01477009" calcext:value-type="float">
            <text:p>0,01477009</text:p>
          </table:table-cell>
          <table:table-cell office:value-type="float" office:value="0.8050163" calcext:value-type="float">
            <text:p>0,8050163</text:p>
          </table:table-cell>
          <table:table-cell office:value-type="float" office:value="62.26226" calcext:value-type="float">
            <text:p>62,26226</text:p>
          </table:table-cell>
          <table:table-cell office:value-type="float" office:value="4.000932" calcext:value-type="float">
            <text:p>4,000932</text:p>
          </table:table-cell>
          <table:table-cell office:value-type="float" office:value="58.26133" calcext:value-type="float">
            <text:p>58,26133</text:p>
          </table:table-cell>
          <table:table-cell office:value-type="float" office:value="3.464095" calcext:value-type="float">
            <text:p>3,464095</text:p>
          </table:table-cell>
          <table:table-cell office:value-type="float" office:value="5.107139" calcext:value-type="float">
            <text:p>5,107139</text:p>
          </table:table-cell>
          <table:table-cell office:value-type="float" office:value="9.190639" calcext:value-type="float">
            <text:p>9,190639</text:p>
          </table:table-cell>
          <table:table-cell office:value-type="float" office:value="0.00004649899" calcext:value-type="float">
            <text:p>0,00004649899</text:p>
          </table:table-cell>
          <table:table-cell office:value-type="float" office:value="9.190685" calcext:value-type="float">
            <text:p>9,190685</text:p>
          </table:table-cell>
          <table:table-cell office:value-type="float" office:value="0.6156088" calcext:value-type="float">
            <text:p>0,6156088</text:p>
          </table:table-cell>
          <table:table-cell/>
          <table:table-cell table:formula="of:=([.L66]/[.D66])*100" office:value-type="float" office:value="80.4682081985676" calcext:value-type="float">
            <text:p>80,4682081985676</text:p>
          </table:table-cell>
          <table:table-cell table:formula="of:=([.O66]/[.D66])*100" office:value-type="float" office:value="4.47702215884256" calcext:value-type="float">
            <text:p>4,47702215884256</text:p>
          </table:table-cell>
          <table:table-cell table:formula="of:=([.S66]/[.D66])*100" office:value-type="float" office:value="11.8781096938571" calcext:value-type="float">
            <text:p>11,8781096938571</text:p>
          </table:table-cell>
          <table:table-cell table:formula="of:=([.F66]/[.D66])*100" office:value-type="float" office:value="2.38103712595467" calcext:value-type="float">
            <text:p>2,38103712595467</text:p>
          </table:table-cell>
          <table:table-cell table:formula="of:=([.T66]/[.D66])*100" office:value-type="float" office:value="0.795617394666855" calcext:value-type="float">
            <text:p>0,79561739466685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308.444" calcext:value-type="float">
            <text:p>3308,444</text:p>
          </table:table-cell>
          <table:table-cell office:value-type="float" office:value="3300.658" calcext:value-type="float">
            <text:p>3300,658</text:p>
          </table:table-cell>
          <table:table-cell office:value-type="float" office:value="78.67344" calcext:value-type="float">
            <text:p>78,67344</text:p>
          </table:table-cell>
          <table:table-cell office:value-type="float" office:value="97.61643" calcext:value-type="float">
            <text:p>97,61643</text:p>
          </table:table-cell>
          <table:table-cell office:value-type="float" office:value="1.874173" calcext:value-type="float">
            <text:p>1,874173</text:p>
          </table:table-cell>
          <table:table-cell office:value-type="float" office:value="0.5212235" calcext:value-type="float">
            <text:p>0,5212235</text:p>
          </table:table-cell>
          <table:table-cell office:value-type="float" office:value="0.01452208" calcext:value-type="float">
            <text:p>0,01452208</text:p>
          </table:table-cell>
          <table:table-cell office:value-type="float" office:value="0.5179191" calcext:value-type="float">
            <text:p>0,5179191</text:p>
          </table:table-cell>
          <table:table-cell office:value-type="float" office:value="0.01534289" calcext:value-type="float">
            <text:p>0,01534289</text:p>
          </table:table-cell>
          <table:table-cell office:value-type="float" office:value="0.8051652" calcext:value-type="float">
            <text:p>0,8051652</text:p>
          </table:table-cell>
          <table:table-cell office:value-type="float" office:value="63.30844" calcext:value-type="float">
            <text:p>63,30844</text:p>
          </table:table-cell>
          <table:table-cell office:value-type="float" office:value="4.035799" calcext:value-type="float">
            <text:p>4,035799</text:p>
          </table:table-cell>
          <table:table-cell office:value-type="float" office:value="59.27264" calcext:value-type="float">
            <text:p>59,27264</text:p>
          </table:table-cell>
          <table:table-cell office:value-type="float" office:value="3.519124" calcext:value-type="float">
            <text:p>3,519124</text:p>
          </table:table-cell>
          <table:table-cell office:value-type="float" office:value="5.032189" calcext:value-type="float">
            <text:p>5,032189</text:p>
          </table:table-cell>
          <table:table-cell office:value-type="float" office:value="9.340248" calcext:value-type="float">
            <text:p>9,340248</text:p>
          </table:table-cell>
          <table:table-cell office:value-type="float" office:value="0.00004649714" calcext:value-type="float">
            <text:p>0,00004649714</text:p>
          </table:table-cell>
          <table:table-cell office:value-type="float" office:value="9.340294" calcext:value-type="float">
            <text:p>9,340294</text:p>
          </table:table-cell>
          <table:table-cell office:value-type="float" office:value="0.6314083" calcext:value-type="float">
            <text:p>0,6314083</text:p>
          </table:table-cell>
          <table:table-cell/>
          <table:table-cell table:formula="of:=([.L67]/[.D67])*100" office:value-type="float" office:value="80.4699019135302" calcext:value-type="float">
            <text:p>80,4699019135302</text:p>
          </table:table-cell>
          <table:table-cell table:formula="of:=([.O67]/[.D67])*100" office:value-type="float" office:value="4.47307757230394" calcext:value-type="float">
            <text:p>4,47307757230394</text:p>
          </table:table-cell>
          <table:table-cell table:formula="of:=([.S67]/[.D67])*100" office:value-type="float" office:value="11.8722328653736" calcext:value-type="float">
            <text:p>11,8722328653736</text:p>
          </table:table-cell>
          <table:table-cell table:formula="of:=([.F67]/[.D67])*100" office:value-type="float" office:value="2.38221819206075" calcext:value-type="float">
            <text:p>2,38221819206075</text:p>
          </table:table-cell>
          <table:table-cell table:formula="of:=([.T67]/[.D67])*100" office:value-type="float" office:value="0.802568566977623" calcext:value-type="float">
            <text:p>0,80256856697762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58.636" calcext:value-type="float">
            <text:p>3358,636</text:p>
          </table:table-cell>
          <table:table-cell office:value-type="float" office:value="3350.689" calcext:value-type="float">
            <text:p>3350,689</text:p>
          </table:table-cell>
          <table:table-cell office:value-type="float" office:value="79.97768" calcext:value-type="float">
            <text:p>79,97768</text:p>
          </table:table-cell>
          <table:table-cell office:value-type="float" office:value="97.6131" calcext:value-type="float">
            <text:p>97,6131</text:p>
          </table:table-cell>
          <table:table-cell office:value-type="float" office:value="1.906914" calcext:value-type="float">
            <text:p>1,906914</text:p>
          </table:table-cell>
          <table:table-cell office:value-type="float" office:value="0.5368344" calcext:value-type="float">
            <text:p>0,5368344</text:p>
          </table:table-cell>
          <table:table-cell office:value-type="float" office:value="0.01527512" calcext:value-type="float">
            <text:p>0,01527512</text:p>
          </table:table-cell>
          <table:table-cell office:value-type="float" office:value="0.5335011" calcext:value-type="float">
            <text:p>0,5335011</text:p>
          </table:table-cell>
          <table:table-cell office:value-type="float" office:value="0.01598667" calcext:value-type="float">
            <text:p>0,01598667</text:p>
          </table:table-cell>
          <table:table-cell office:value-type="float" office:value="0.8053164" calcext:value-type="float">
            <text:p>0,8053164</text:p>
          </table:table-cell>
          <table:table-cell office:value-type="float" office:value="64.35807" calcext:value-type="float">
            <text:p>64,35807</text:p>
          </table:table-cell>
          <table:table-cell office:value-type="float" office:value="4.070947" calcext:value-type="float">
            <text:p>4,070947</text:p>
          </table:table-cell>
          <table:table-cell office:value-type="float" office:value="60.28712" calcext:value-type="float">
            <text:p>60,28712</text:p>
          </table:table-cell>
          <table:table-cell office:value-type="float" office:value="3.575133" calcext:value-type="float">
            <text:p>3,575133</text:p>
          </table:table-cell>
          <table:table-cell office:value-type="float" office:value="4.955383" calcext:value-type="float">
            <text:p>4,955383</text:p>
          </table:table-cell>
          <table:table-cell office:value-type="float" office:value="9.490025" calcext:value-type="float">
            <text:p>9,490025</text:p>
          </table:table-cell>
          <table:table-cell office:value-type="float" office:value="0.00005999343" calcext:value-type="float">
            <text:p>0,00005999343</text:p>
          </table:table-cell>
          <table:table-cell office:value-type="float" office:value="9.490085" calcext:value-type="float">
            <text:p>9,490085</text:p>
          </table:table-cell>
          <table:table-cell office:value-type="float" office:value="0.6474788" calcext:value-type="float">
            <text:p>0,6474788</text:p>
          </table:table-cell>
          <table:table-cell/>
          <table:table-cell table:formula="of:=([.L68]/[.D68])*100" office:value-type="float" office:value="80.4700386407808" calcext:value-type="float">
            <text:p>80,4700386407808</text:p>
          </table:table-cell>
          <table:table-cell table:formula="of:=([.O68]/[.D68])*100" office:value-type="float" office:value="4.47016342559574" calcext:value-type="float">
            <text:p>4,47016342559574</text:p>
          </table:table-cell>
          <table:table-cell table:formula="of:=([.S68]/[.D68])*100" office:value-type="float" office:value="11.8659168407986" calcext:value-type="float">
            <text:p>11,8659168407986</text:p>
          </table:table-cell>
          <table:table-cell table:formula="of:=([.F68]/[.D68])*100" office:value-type="float" office:value="2.3843077218544" calcext:value-type="float">
            <text:p>2,3843077218544</text:p>
          </table:table-cell>
          <table:table-cell table:formula="of:=([.T68]/[.D68])*100" office:value-type="float" office:value="0.809574371249579" calcext:value-type="float">
            <text:p>0,80957437124957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08.831" calcext:value-type="float">
            <text:p>3408,831</text:p>
          </table:table-cell>
          <table:table-cell office:value-type="float" office:value="3400.72" calcext:value-type="float">
            <text:p>3400,72</text:p>
          </table:table-cell>
          <table:table-cell office:value-type="float" office:value="81.28811" calcext:value-type="float">
            <text:p>81,28811</text:p>
          </table:table-cell>
          <table:table-cell office:value-type="float" office:value="97.60968" calcext:value-type="float">
            <text:p>97,60968</text:p>
          </table:table-cell>
          <table:table-cell office:value-type="float" office:value="1.939341" calcext:value-type="float">
            <text:p>1,939341</text:p>
          </table:table-cell>
          <table:table-cell office:value-type="float" office:value="0.552615" calcext:value-type="float">
            <text:p>0,552615</text:p>
          </table:table-cell>
          <table:table-cell office:value-type="float" office:value="0.01515993" calcext:value-type="float">
            <text:p>0,01515993</text:p>
          </table:table-cell>
          <table:table-cell office:value-type="float" office:value="0.5493365" calcext:value-type="float">
            <text:p>0,5493365</text:p>
          </table:table-cell>
          <table:table-cell office:value-type="float" office:value="0.01675944" calcext:value-type="float">
            <text:p>0,01675944</text:p>
          </table:table-cell>
          <table:table-cell office:value-type="float" office:value="0.8054697" calcext:value-type="float">
            <text:p>0,8054697</text:p>
          </table:table-cell>
          <table:table-cell office:value-type="float" office:value="65.41281" calcext:value-type="float">
            <text:p>65,41281</text:p>
          </table:table-cell>
          <table:table-cell office:value-type="float" office:value="4.106428" calcext:value-type="float">
            <text:p>4,106428</text:p>
          </table:table-cell>
          <table:table-cell office:value-type="float" office:value="61.30638" calcext:value-type="float">
            <text:p>61,30638</text:p>
          </table:table-cell>
          <table:table-cell office:value-type="float" office:value="3.63194" calcext:value-type="float">
            <text:p>3,63194</text:p>
          </table:table-cell>
          <table:table-cell office:value-type="float" office:value="4.884972" calcext:value-type="float">
            <text:p>4,884972</text:p>
          </table:table-cell>
          <table:table-cell office:value-type="float" office:value="9.640176" calcext:value-type="float">
            <text:p>9,640176</text:p>
          </table:table-cell>
          <table:table-cell office:value-type="float" office:value="0.00004649325" calcext:value-type="float">
            <text:p>0,00004649325</text:p>
          </table:table-cell>
          <table:table-cell office:value-type="float" office:value="9.640223" calcext:value-type="float">
            <text:p>9,640223</text:p>
          </table:table-cell>
          <table:table-cell office:value-type="float" office:value="0.6637966" calcext:value-type="float">
            <text:p>0,6637966</text:p>
          </table:table-cell>
          <table:table-cell/>
          <table:table-cell table:formula="of:=([.L69]/[.D69])*100" office:value-type="float" office:value="80.4703295475808" calcext:value-type="float">
            <text:p>80,4703295475808</text:p>
          </table:table-cell>
          <table:table-cell table:formula="of:=([.O69]/[.D69])*100" office:value-type="float" office:value="4.46798430914435" calcext:value-type="float">
            <text:p>4,46798430914435</text:p>
          </table:table-cell>
          <table:table-cell table:formula="of:=([.S69]/[.D69])*100" office:value-type="float" office:value="11.8593272743086" calcext:value-type="float">
            <text:p>11,8593272743086</text:p>
          </table:table-cell>
          <table:table-cell table:formula="of:=([.F69]/[.D69])*100" office:value-type="float" office:value="2.38576219818618" calcext:value-type="float">
            <text:p>2,38576219818618</text:p>
          </table:table-cell>
          <table:table-cell table:formula="of:=([.T69]/[.D69])*100" office:value-type="float" office:value="0.816597408895348" calcext:value-type="float">
            <text:p>0,816597408895348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459.03" calcext:value-type="float">
            <text:p>3459,03</text:p>
          </table:table-cell>
          <table:table-cell office:value-type="float" office:value="3450.752" calcext:value-type="float">
            <text:p>3450,752</text:p>
          </table:table-cell>
          <table:table-cell office:value-type="float" office:value="82.60576" calcext:value-type="float">
            <text:p>82,60576</text:p>
          </table:table-cell>
          <table:table-cell office:value-type="float" office:value="97.60615" calcext:value-type="float">
            <text:p>97,60615</text:p>
          </table:table-cell>
          <table:table-cell office:value-type="float" office:value="1.972619" calcext:value-type="float">
            <text:p>1,972619</text:p>
          </table:table-cell>
          <table:table-cell office:value-type="float" office:value="0.5686116" calcext:value-type="float">
            <text:p>0,5686116</text:p>
          </table:table-cell>
          <table:table-cell office:value-type="float" office:value="0.01493836" calcext:value-type="float">
            <text:p>0,01493836</text:p>
          </table:table-cell>
          <table:table-cell office:value-type="float" office:value="0.5654504" calcext:value-type="float">
            <text:p>0,5654504</text:p>
          </table:table-cell>
          <table:table-cell office:value-type="float" office:value="0.0179926" calcext:value-type="float">
            <text:p>0,0179926</text:p>
          </table:table-cell>
          <table:table-cell office:value-type="float" office:value="0.8056254" calcext:value-type="float">
            <text:p>0,8056254</text:p>
          </table:table-cell>
          <table:table-cell office:value-type="float" office:value="66.47216" calcext:value-type="float">
            <text:p>66,47216</text:p>
          </table:table-cell>
          <table:table-cell office:value-type="float" office:value="4.142097" calcext:value-type="float">
            <text:p>4,142097</text:p>
          </table:table-cell>
          <table:table-cell office:value-type="float" office:value="62.33006" calcext:value-type="float">
            <text:p>62,33006</text:p>
          </table:table-cell>
          <table:table-cell office:value-type="float" office:value="3.689927" calcext:value-type="float">
            <text:p>3,689927</text:p>
          </table:table-cell>
          <table:table-cell office:value-type="float" office:value="4.836078" calcext:value-type="float">
            <text:p>4,836078</text:p>
          </table:table-cell>
          <table:table-cell office:value-type="float" office:value="9.790592" calcext:value-type="float">
            <text:p>9,790592</text:p>
          </table:table-cell>
          <table:table-cell office:value-type="float" office:value="0.00004649069" calcext:value-type="float">
            <text:p>0,00004649069</text:p>
          </table:table-cell>
          <table:table-cell office:value-type="float" office:value="9.790638" calcext:value-type="float">
            <text:p>9,790638</text:p>
          </table:table-cell>
          <table:table-cell office:value-type="float" office:value="0.6804142" calcext:value-type="float">
            <text:p>0,6804142</text:p>
          </table:table-cell>
          <table:table-cell/>
          <table:table-cell table:formula="of:=([.L70]/[.D70])*100" office:value-type="float" office:value="80.4691585671508" calcext:value-type="float">
            <text:p>80,4691585671508</text:p>
          </table:table-cell>
          <table:table-cell table:formula="of:=([.O70]/[.D70])*100" office:value-type="float" office:value="4.46691247680549" calcext:value-type="float">
            <text:p>4,46691247680549</text:p>
          </table:table-cell>
          <table:table-cell table:formula="of:=([.S70]/[.D70])*100" office:value-type="float" office:value="11.852246138768" calcext:value-type="float">
            <text:p>11,852246138768</text:p>
          </table:table-cell>
          <table:table-cell table:formula="of:=([.F70]/[.D70])*100" office:value-type="float" office:value="2.38799207222354" calcext:value-type="float">
            <text:p>2,38799207222354</text:p>
          </table:table-cell>
          <table:table-cell table:formula="of:=([.T70]/[.D70])*100" office:value-type="float" office:value="0.823688566027357" calcext:value-type="float">
            <text:p>0,82368856602735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09.232" calcext:value-type="float">
            <text:p>3509,232</text:p>
          </table:table-cell>
          <table:table-cell office:value-type="float" office:value="3500.785" calcext:value-type="float">
            <text:p>3500,785</text:p>
          </table:table-cell>
          <table:table-cell office:value-type="float" office:value="83.93116" calcext:value-type="float">
            <text:p>83,93116</text:p>
          </table:table-cell>
          <table:table-cell office:value-type="float" office:value="97.6025" calcext:value-type="float">
            <text:p>97,6025</text:p>
          </table:table-cell>
          <table:table-cell office:value-type="float" office:value="2.007592" calcext:value-type="float">
            <text:p>2,007592</text:p>
          </table:table-cell>
          <table:table-cell office:value-type="float" office:value="0.584943" calcext:value-type="float">
            <text:p>0,584943</text:p>
          </table:table-cell>
          <table:table-cell office:value-type="float" office:value="0.01587099" calcext:value-type="float">
            <text:p>0,01587099</text:p>
          </table:table-cell>
          <table:table-cell office:value-type="float" office:value="0.5818046" calcext:value-type="float">
            <text:p>0,5818046</text:p>
          </table:table-cell>
          <table:table-cell office:value-type="float" office:value="0.01919027" calcext:value-type="float">
            <text:p>0,01919027</text:p>
          </table:table-cell>
          <table:table-cell office:value-type="float" office:value="0.8057833" calcext:value-type="float">
            <text:p>0,8057833</text:p>
          </table:table-cell>
          <table:table-cell office:value-type="float" office:value="67.53592" calcext:value-type="float">
            <text:p>67,53592</text:p>
          </table:table-cell>
          <table:table-cell office:value-type="float" office:value="4.178032" calcext:value-type="float">
            <text:p>4,178032</text:p>
          </table:table-cell>
          <table:table-cell office:value-type="float" office:value="63.35789" calcext:value-type="float">
            <text:p>63,35789</text:p>
          </table:table-cell>
          <table:table-cell office:value-type="float" office:value="3.749014" calcext:value-type="float">
            <text:p>3,749014</text:p>
          </table:table-cell>
          <table:table-cell office:value-type="float" office:value="4.773309" calcext:value-type="float">
            <text:p>4,773309</text:p>
          </table:table-cell>
          <table:table-cell office:value-type="float" office:value="9.941253" calcext:value-type="float">
            <text:p>9,941253</text:p>
          </table:table-cell>
          <table:table-cell office:value-type="float" office:value="0.00007771677" calcext:value-type="float">
            <text:p>0,00007771677</text:p>
          </table:table-cell>
          <table:table-cell office:value-type="float" office:value="9.94133" calcext:value-type="float">
            <text:p>9,94133</text:p>
          </table:table-cell>
          <table:table-cell office:value-type="float" office:value="0.6972964" calcext:value-type="float">
            <text:p>0,6972964</text:p>
          </table:table-cell>
          <table:table-cell/>
          <table:table-cell table:formula="of:=([.L71]/[.D71])*100" office:value-type="float" office:value="80.4658484405553" calcext:value-type="float">
            <text:p>80,4658484405553</text:p>
          </table:table-cell>
          <table:table-cell table:formula="of:=([.O71]/[.D71])*100" office:value-type="float" office:value="4.46677253120295" calcext:value-type="float">
            <text:p>4,46677253120295</text:p>
          </table:table-cell>
          <table:table-cell table:formula="of:=([.S71]/[.D71])*100" office:value-type="float" office:value="11.8446236177363" calcext:value-type="float">
            <text:p>11,8446236177363</text:p>
          </table:table-cell>
          <table:table-cell table:formula="of:=([.F71]/[.D71])*100" office:value-type="float" office:value="2.39195073677047" calcext:value-type="float">
            <text:p>2,39195073677047</text:p>
          </table:table-cell>
          <table:table-cell table:formula="of:=([.T71]/[.D71])*100" office:value-type="float" office:value="0.830795618695131" calcext:value-type="float">
            <text:p>0,83079561869513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559.438" calcext:value-type="float">
            <text:p>3559,438</text:p>
          </table:table-cell>
          <table:table-cell office:value-type="float" office:value="3550.819" calcext:value-type="float">
            <text:p>3550,819</text:p>
          </table:table-cell>
          <table:table-cell office:value-type="float" office:value="85.26263" calcext:value-type="float">
            <text:p>85,26263</text:p>
          </table:table-cell>
          <table:table-cell office:value-type="float" office:value="97.59879" calcext:value-type="float">
            <text:p>97,59879</text:p>
          </table:table-cell>
          <table:table-cell office:value-type="float" office:value="2.042338" calcext:value-type="float">
            <text:p>2,042338</text:p>
          </table:table-cell>
          <table:table-cell office:value-type="float" office:value="0.601483" calcext:value-type="float">
            <text:p>0,601483</text:p>
          </table:table-cell>
          <table:table-cell office:value-type="float" office:value="0.01638216" calcext:value-type="float">
            <text:p>0,01638216</text:p>
          </table:table-cell>
          <table:table-cell office:value-type="float" office:value="0.5983732" calcext:value-type="float">
            <text:p>0,5983732</text:p>
          </table:table-cell>
          <table:table-cell office:value-type="float" office:value="0.02015628" calcext:value-type="float">
            <text:p>0,02015628</text:p>
          </table:table-cell>
          <table:table-cell office:value-type="float" office:value="0.8059436" calcext:value-type="float">
            <text:p>0,8059436</text:p>
          </table:table-cell>
          <table:table-cell office:value-type="float" office:value="68.60439" calcext:value-type="float">
            <text:p>68,60439</text:p>
          </table:table-cell>
          <table:table-cell office:value-type="float" office:value="4.214232" calcext:value-type="float">
            <text:p>4,214232</text:p>
          </table:table-cell>
          <table:table-cell office:value-type="float" office:value="64.39016" calcext:value-type="float">
            <text:p>64,39016</text:p>
          </table:table-cell>
          <table:table-cell office:value-type="float" office:value="3.809247" calcext:value-type="float">
            <text:p>3,809247</text:p>
          </table:table-cell>
          <table:table-cell office:value-type="float" office:value="4.708873" calcext:value-type="float">
            <text:p>4,708873</text:p>
          </table:table-cell>
          <table:table-cell office:value-type="float" office:value="10.09219" calcext:value-type="float">
            <text:p>10,09219</text:p>
          </table:table-cell>
          <table:table-cell office:value-type="float" office:value="0.00004648359" calcext:value-type="float">
            <text:p>0,00004648359</text:p>
          </table:table-cell>
          <table:table-cell office:value-type="float" office:value="10.09224" calcext:value-type="float">
            <text:p>10,09224</text:p>
          </table:table-cell>
          <table:table-cell office:value-type="float" office:value="0.7144122" calcext:value-type="float">
            <text:p>0,7144122</text:p>
          </table:table-cell>
          <table:table-cell/>
          <table:table-cell table:formula="of:=([.L72]/[.D72])*100" office:value-type="float" office:value="80.4624370606443" calcext:value-type="float">
            <text:p>80,4624370606443</text:p>
          </table:table-cell>
          <table:table-cell table:formula="of:=([.O72]/[.D72])*100" office:value-type="float" office:value="4.46766303127173" calcext:value-type="float">
            <text:p>4,46766303127173</text:p>
          </table:table-cell>
          <table:table-cell table:formula="of:=([.S72]/[.D72])*100" office:value-type="float" office:value="11.8366510627223" calcext:value-type="float">
            <text:p>11,8366510627223</text:p>
          </table:table-cell>
          <table:table-cell table:formula="of:=([.F72]/[.D72])*100" office:value-type="float" office:value="2.39534952182451" calcext:value-type="float">
            <text:p>2,39534952182451</text:p>
          </table:table-cell>
          <table:table-cell table:formula="of:=([.T72]/[.D72])*100" office:value-type="float" office:value="0.83789603956622" calcext:value-type="float">
            <text:p>0,8378960395662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09.647" calcext:value-type="float">
            <text:p>3609,647</text:p>
          </table:table-cell>
          <table:table-cell office:value-type="float" office:value="3600.854" calcext:value-type="float">
            <text:p>3600,854</text:p>
          </table:table-cell>
          <table:table-cell office:value-type="float" office:value="86.60247" calcext:value-type="float">
            <text:p>86,60247</text:p>
          </table:table-cell>
          <table:table-cell office:value-type="float" office:value="97.59495" calcext:value-type="float">
            <text:p>97,59495</text:p>
          </table:table-cell>
          <table:table-cell office:value-type="float" office:value="2.078119" calcext:value-type="float">
            <text:p>2,078119</text:p>
          </table:table-cell>
          <table:table-cell office:value-type="float" office:value="0.6183535" calcext:value-type="float">
            <text:p>0,6183535</text:p>
          </table:table-cell>
          <table:table-cell office:value-type="float" office:value="0.01815377" calcext:value-type="float">
            <text:p>0,01815377</text:p>
          </table:table-cell>
          <table:table-cell office:value-type="float" office:value="0.6151042" calcext:value-type="float">
            <text:p>0,6151042</text:p>
          </table:table-cell>
          <table:table-cell office:value-type="float" office:value="0.02040141" calcext:value-type="float">
            <text:p>0,02040141</text:p>
          </table:table-cell>
          <table:table-cell office:value-type="float" office:value="0.8061061" calcext:value-type="float">
            <text:p>0,8061061</text:p>
          </table:table-cell>
          <table:table-cell office:value-type="float" office:value="69.6777" calcext:value-type="float">
            <text:p>69,6777</text:p>
          </table:table-cell>
          <table:table-cell office:value-type="float" office:value="4.250875" calcext:value-type="float">
            <text:p>4,250875</text:p>
          </table:table-cell>
          <table:table-cell office:value-type="float" office:value="65.42682" calcext:value-type="float">
            <text:p>65,42682</text:p>
          </table:table-cell>
          <table:table-cell office:value-type="float" office:value="3.871433" calcext:value-type="float">
            <text:p>3,871433</text:p>
          </table:table-cell>
          <table:table-cell office:value-type="float" office:value="4.639505" calcext:value-type="float">
            <text:p>4,639505</text:p>
          </table:table-cell>
          <table:table-cell office:value-type="float" office:value="10.24341" calcext:value-type="float">
            <text:p>10,24341</text:p>
          </table:table-cell>
          <table:table-cell office:value-type="float" office:value="0.00004646651" calcext:value-type="float">
            <text:p>0,00004646651</text:p>
          </table:table-cell>
          <table:table-cell office:value-type="float" office:value="10.24346" calcext:value-type="float">
            <text:p>10,24346</text:p>
          </table:table-cell>
          <table:table-cell office:value-type="float" office:value="0.7317696" calcext:value-type="float">
            <text:p>0,7317696</text:p>
          </table:table-cell>
          <table:table-cell/>
          <table:table-cell table:formula="of:=([.L73]/[.D73])*100" office:value-type="float" office:value="80.4569430871891" calcext:value-type="float">
            <text:p>80,4569430871891</text:p>
          </table:table-cell>
          <table:table-cell table:formula="of:=([.O73]/[.D73])*100" office:value-type="float" office:value="4.47034940227456" calcext:value-type="float">
            <text:p>4,47034940227456</text:p>
          </table:table-cell>
          <table:table-cell table:formula="of:=([.S73]/[.D73])*100" office:value-type="float" office:value="11.8281383891245" calcext:value-type="float">
            <text:p>11,8281383891245</text:p>
          </table:table-cell>
          <table:table-cell table:formula="of:=([.F73]/[.D73])*100" office:value-type="float" office:value="2.39960707818149" calcext:value-type="float">
            <text:p>2,39960707818149</text:p>
          </table:table-cell>
          <table:table-cell table:formula="of:=([.T73]/[.D73])*100" office:value-type="float" office:value="0.844975437767537" calcext:value-type="float">
            <text:p>0,84497543776753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659.859" calcext:value-type="float">
            <text:p>3659,859</text:p>
          </table:table-cell>
          <table:table-cell office:value-type="float" office:value="3650.89" calcext:value-type="float">
            <text:p>3650,89</text:p>
          </table:table-cell>
          <table:table-cell office:value-type="float" office:value="87.94965" calcext:value-type="float">
            <text:p>87,94965</text:p>
          </table:table-cell>
          <table:table-cell office:value-type="float" office:value="97.59101" calcext:value-type="float">
            <text:p>97,59101</text:p>
          </table:table-cell>
          <table:table-cell office:value-type="float" office:value="2.116067" calcext:value-type="float">
            <text:p>2,116067</text:p>
          </table:table-cell>
          <table:table-cell office:value-type="float" office:value="0.6354669" calcext:value-type="float">
            <text:p>0,6354669</text:p>
          </table:table-cell>
          <table:table-cell office:value-type="float" office:value="0.01982119" calcext:value-type="float">
            <text:p>0,01982119</text:p>
          </table:table-cell>
          <table:table-cell office:value-type="float" office:value="0.6322288" calcext:value-type="float">
            <text:p>0,6322288</text:p>
          </table:table-cell>
          <table:table-cell office:value-type="float" office:value="0.02227895" calcext:value-type="float">
            <text:p>0,02227895</text:p>
          </table:table-cell>
          <table:table-cell office:value-type="float" office:value="0.8062709" calcext:value-type="float">
            <text:p>0,8062709</text:p>
          </table:table-cell>
          <table:table-cell office:value-type="float" office:value="70.75571" calcext:value-type="float">
            <text:p>70,75571</text:p>
          </table:table-cell>
          <table:table-cell office:value-type="float" office:value="4.287673" calcext:value-type="float">
            <text:p>4,287673</text:p>
          </table:table-cell>
          <table:table-cell office:value-type="float" office:value="66.46804" calcext:value-type="float">
            <text:p>66,46804</text:p>
          </table:table-cell>
          <table:table-cell office:value-type="float" office:value="3.933539" calcext:value-type="float">
            <text:p>3,933539</text:p>
          </table:table-cell>
          <table:table-cell office:value-type="float" office:value="4.583518" calcext:value-type="float">
            <text:p>4,583518</text:p>
          </table:table-cell>
          <table:table-cell office:value-type="float" office:value="10.39488" calcext:value-type="float">
            <text:p>10,39488</text:p>
          </table:table-cell>
          <table:table-cell office:value-type="float" office:value="0.00004645633" calcext:value-type="float">
            <text:p>0,00004645633</text:p>
          </table:table-cell>
          <table:table-cell office:value-type="float" office:value="10.39493" calcext:value-type="float">
            <text:p>10,39493</text:p>
          </table:table-cell>
          <table:table-cell office:value-type="float" office:value="0.7494054" calcext:value-type="float">
            <text:p>0,7494054</text:p>
          </table:table-cell>
          <table:table-cell/>
          <table:table-cell table:formula="of:=([.L74]/[.D74])*100" office:value-type="float" office:value="80.4502462488481" calcext:value-type="float">
            <text:p>80,4502462488481</text:p>
          </table:table-cell>
          <table:table-cell table:formula="of:=([.O74]/[.D74])*100" office:value-type="float" office:value="4.47248965743468" calcext:value-type="float">
            <text:p>4,47248965743468</text:p>
          </table:table-cell>
          <table:table-cell table:formula="of:=([.S74]/[.D74])*100" office:value-type="float" office:value="11.8191829074931" calcext:value-type="float">
            <text:p>11,8191829074931</text:p>
          </table:table-cell>
          <table:table-cell table:formula="of:=([.F74]/[.D74])*100" office:value-type="float" office:value="2.4059982046546" calcext:value-type="float">
            <text:p>2,4059982046546</text:p>
          </table:table-cell>
          <table:table-cell table:formula="of:=([.T74]/[.D74])*100" office:value-type="float" office:value="0.852084573389434" calcext:value-type="float">
            <text:p>0,85208457338943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710.075" calcext:value-type="float">
            <text:p>3710,075</text:p>
          </table:table-cell>
          <table:table-cell office:value-type="float" office:value="3700.927" calcext:value-type="float">
            <text:p>3700,927</text:p>
          </table:table-cell>
          <table:table-cell office:value-type="float" office:value="89.30061" calcext:value-type="float">
            <text:p>89,30061</text:p>
          </table:table-cell>
          <table:table-cell office:value-type="float" office:value="97.58707" calcext:value-type="float">
            <text:p>97,58707</text:p>
          </table:table-cell>
          <table:table-cell office:value-type="float" office:value="2.151814" calcext:value-type="float">
            <text:p>2,151814</text:p>
          </table:table-cell>
          <table:table-cell office:value-type="float" office:value="0.6527393" calcext:value-type="float">
            <text:p>0,6527393</text:p>
          </table:table-cell>
          <table:table-cell office:value-type="float" office:value="0.02063126" calcext:value-type="float">
            <text:p>0,02063126</text:p>
          </table:table-cell>
          <table:table-cell office:value-type="float" office:value="0.6494235" calcext:value-type="float">
            <text:p>0,6494235</text:p>
          </table:table-cell>
          <table:table-cell office:value-type="float" office:value="0.02258186" calcext:value-type="float">
            <text:p>0,02258186</text:p>
          </table:table-cell>
          <table:table-cell office:value-type="float" office:value="0.8064379" calcext:value-type="float">
            <text:p>0,8064379</text:p>
          </table:table-cell>
          <table:table-cell office:value-type="float" office:value="71.83847" calcext:value-type="float">
            <text:p>71,83847</text:p>
          </table:table-cell>
          <table:table-cell office:value-type="float" office:value="4.324852" calcext:value-type="float">
            <text:p>4,324852</text:p>
          </table:table-cell>
          <table:table-cell office:value-type="float" office:value="67.51362" calcext:value-type="float">
            <text:p>67,51362</text:p>
          </table:table-cell>
          <table:table-cell office:value-type="float" office:value="3.99634" calcext:value-type="float">
            <text:p>3,99634</text:p>
          </table:table-cell>
          <table:table-cell office:value-type="float" office:value="4.544998" calcext:value-type="float">
            <text:p>4,544998</text:p>
          </table:table-cell>
          <table:table-cell office:value-type="float" office:value="10.54665" calcext:value-type="float">
            <text:p>10,54665</text:p>
          </table:table-cell>
          <table:table-cell office:value-type="float" office:value="0.00004644544" calcext:value-type="float">
            <text:p>0,00004644544</text:p>
          </table:table-cell>
          <table:table-cell office:value-type="float" office:value="10.54669" calcext:value-type="float">
            <text:p>10,54669</text:p>
          </table:table-cell>
          <table:table-cell office:value-type="float" office:value="0.7672902" calcext:value-type="float">
            <text:p>0,7672902</text:p>
          </table:table-cell>
          <table:table-cell/>
          <table:table-cell table:formula="of:=([.L75]/[.D75])*100" office:value-type="float" office:value="80.4456654887352" calcext:value-type="float">
            <text:p>80,4456654887352</text:p>
          </table:table-cell>
          <table:table-cell table:formula="of:=([.O75]/[.D75])*100" office:value-type="float" office:value="4.47515420107433" calcext:value-type="float">
            <text:p>4,47515420107433</text:p>
          </table:table-cell>
          <table:table-cell table:formula="of:=([.S75]/[.D75])*100" office:value-type="float" office:value="11.8103224602833" calcext:value-type="float">
            <text:p>11,8103224602833</text:p>
          </table:table-cell>
          <table:table-cell table:formula="of:=([.F75]/[.D75])*100" office:value-type="float" office:value="2.40962967666178" calcext:value-type="float">
            <text:p>2,40962967666178</text:p>
          </table:table-cell>
          <table:table-cell table:formula="of:=([.T75]/[.D75])*100" office:value-type="float" office:value="0.859221678328961" calcext:value-type="float">
            <text:p>0,859221678328961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760.294" calcext:value-type="float">
            <text:p>3760,294</text:p>
          </table:table-cell>
          <table:table-cell office:value-type="float" office:value="3750.965" calcext:value-type="float">
            <text:p>3750,965</text:p>
          </table:table-cell>
          <table:table-cell office:value-type="float" office:value="90.65927" calcext:value-type="float">
            <text:p>90,65927</text:p>
          </table:table-cell>
          <table:table-cell office:value-type="float" office:value="97.58304" calcext:value-type="float">
            <text:p>97,58304</text:p>
          </table:table-cell>
          <table:table-cell office:value-type="float" office:value="2.188743" calcext:value-type="float">
            <text:p>2,188743</text:p>
          </table:table-cell>
          <table:table-cell office:value-type="float" office:value="0.6702474" calcext:value-type="float">
            <text:p>0,6702474</text:p>
          </table:table-cell>
          <table:table-cell office:value-type="float" office:value="0.02168118" calcext:value-type="float">
            <text:p>0,02168118</text:p>
          </table:table-cell>
          <table:table-cell office:value-type="float" office:value="0.6668849" calcext:value-type="float">
            <text:p>0,6668849</text:p>
          </table:table-cell>
          <table:table-cell office:value-type="float" office:value="0.02332246" calcext:value-type="float">
            <text:p>0,02332246</text:p>
          </table:table-cell>
          <table:table-cell office:value-type="float" office:value="0.8066072" calcext:value-type="float">
            <text:p>0,8066072</text:p>
          </table:table-cell>
          <table:table-cell office:value-type="float" office:value="72.92628" calcext:value-type="float">
            <text:p>72,92628</text:p>
          </table:table-cell>
          <table:table-cell office:value-type="float" office:value="4.362705" calcext:value-type="float">
            <text:p>4,362705</text:p>
          </table:table-cell>
          <table:table-cell office:value-type="float" office:value="68.56358" calcext:value-type="float">
            <text:p>68,56358</text:p>
          </table:table-cell>
          <table:table-cell office:value-type="float" office:value="4.060072" calcext:value-type="float">
            <text:p>4,060072</text:p>
          </table:table-cell>
          <table:table-cell office:value-type="float" office:value="4.499962" calcext:value-type="float">
            <text:p>4,499962</text:p>
          </table:table-cell>
          <table:table-cell office:value-type="float" office:value="10.69874" calcext:value-type="float">
            <text:p>10,69874</text:p>
          </table:table-cell>
          <table:table-cell office:value-type="float" office:value="0.00004643423" calcext:value-type="float">
            <text:p>0,00004643423</text:p>
          </table:table-cell>
          <table:table-cell office:value-type="float" office:value="10.69879" calcext:value-type="float">
            <text:p>10,69879</text:p>
          </table:table-cell>
          <table:table-cell office:value-type="float" office:value="0.7853879" calcext:value-type="float">
            <text:p>0,7853879</text:p>
          </table:table-cell>
          <table:table-cell/>
          <table:table-cell table:formula="of:=([.L76]/[.D76])*100" office:value-type="float" office:value="80.4399594216896" calcext:value-type="float">
            <text:p>80,4399594216896</text:p>
          </table:table-cell>
          <table:table-cell table:formula="of:=([.O76]/[.D76])*100" office:value-type="float" office:value="4.47838593891171" calcext:value-type="float">
            <text:p>4,47838593891171</text:p>
          </table:table-cell>
          <table:table-cell table:formula="of:=([.S76]/[.D76])*100" office:value-type="float" office:value="11.8010987734624" calcext:value-type="float">
            <text:p>11,8010987734624</text:p>
          </table:table-cell>
          <table:table-cell table:formula="of:=([.F76]/[.D76])*100" office:value-type="float" office:value="2.41425173619863" calcext:value-type="float">
            <text:p>2,41425173619863</text:p>
          </table:table-cell>
          <table:table-cell table:formula="of:=([.T76]/[.D76])*100" office:value-type="float" office:value="0.866307328528015" calcext:value-type="float">
            <text:p>0,86630732852801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810.517" calcext:value-type="float">
            <text:p>3810,517</text:p>
          </table:table-cell>
          <table:table-cell office:value-type="float" office:value="3801.003" calcext:value-type="float">
            <text:p>3801,003</text:p>
          </table:table-cell>
          <table:table-cell office:value-type="float" office:value="92.0251" calcext:value-type="float">
            <text:p>92,0251</text:p>
          </table:table-cell>
          <table:table-cell office:value-type="float" office:value="97.57893" calcext:value-type="float">
            <text:p>97,57893</text:p>
          </table:table-cell>
          <table:table-cell office:value-type="float" office:value="2.225917" calcext:value-type="float">
            <text:p>2,225917</text:p>
          </table:table-cell>
          <table:table-cell office:value-type="float" office:value="0.68807" calcext:value-type="float">
            <text:p>0,68807</text:p>
          </table:table-cell>
          <table:table-cell office:value-type="float" office:value="0.02324474" calcext:value-type="float">
            <text:p>0,02324474</text:p>
          </table:table-cell>
          <table:table-cell office:value-type="float" office:value="0.6845176" calcext:value-type="float">
            <text:p>0,6845176</text:p>
          </table:table-cell>
          <table:table-cell office:value-type="float" office:value="0.02330549" calcext:value-type="float">
            <text:p>0,02330549</text:p>
          </table:table-cell>
          <table:table-cell office:value-type="float" office:value="0.8067788" calcext:value-type="float">
            <text:p>0,8067788</text:p>
          </table:table-cell>
          <table:table-cell office:value-type="float" office:value="74.01938" calcext:value-type="float">
            <text:p>74,01938</text:p>
          </table:table-cell>
          <table:table-cell office:value-type="float" office:value="4.401305" calcext:value-type="float">
            <text:p>4,401305</text:p>
          </table:table-cell>
          <table:table-cell office:value-type="float" office:value="69.61808" calcext:value-type="float">
            <text:p>69,61808</text:p>
          </table:table-cell>
          <table:table-cell office:value-type="float" office:value="4.124831" calcext:value-type="float">
            <text:p>4,124831</text:p>
          </table:table-cell>
          <table:table-cell office:value-type="float" office:value="4.460174" calcext:value-type="float">
            <text:p>4,460174</text:p>
          </table:table-cell>
          <table:table-cell office:value-type="float" office:value="10.85115" calcext:value-type="float">
            <text:p>10,85115</text:p>
          </table:table-cell>
          <table:table-cell office:value-type="float" office:value="0.00004642241" calcext:value-type="float">
            <text:p>0,00004642241</text:p>
          </table:table-cell>
          <table:table-cell office:value-type="float" office:value="10.85119" calcext:value-type="float">
            <text:p>10,85119</text:p>
          </table:table-cell>
          <table:table-cell office:value-type="float" office:value="0.8037743" calcext:value-type="float">
            <text:p>0,8037743</text:p>
          </table:table-cell>
          <table:table-cell/>
          <table:table-cell table:formula="of:=([.L77]/[.D77])*100" office:value-type="float" office:value="80.4339033589749" calcext:value-type="float">
            <text:p>80,4339033589749</text:p>
          </table:table-cell>
          <table:table-cell table:formula="of:=([.O77]/[.D77])*100" office:value-type="float" office:value="4.48228907113385" calcext:value-type="float">
            <text:p>4,48228907113385</text:p>
          </table:table-cell>
          <table:table-cell table:formula="of:=([.S77]/[.D77])*100" office:value-type="float" office:value="11.7915546954038" calcext:value-type="float">
            <text:p>11,7915546954038</text:p>
          </table:table-cell>
          <table:table-cell table:formula="of:=([.F77]/[.D77])*100" office:value-type="float" office:value="2.41881508414552" calcext:value-type="float">
            <text:p>2,41881508414552</text:p>
          </table:table-cell>
          <table:table-cell table:formula="of:=([.T77]/[.D77])*100" office:value-type="float" office:value="0.873429423059578" calcext:value-type="float">
            <text:p>0,87342942305957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860.743" calcext:value-type="float">
            <text:p>3860,743</text:p>
          </table:table-cell>
          <table:table-cell office:value-type="float" office:value="3851.043" calcext:value-type="float">
            <text:p>3851,043</text:p>
          </table:table-cell>
          <table:table-cell office:value-type="float" office:value="93.39914" calcext:value-type="float">
            <text:p>93,39914</text:p>
          </table:table-cell>
          <table:table-cell office:value-type="float" office:value="97.57471" calcext:value-type="float">
            <text:p>97,57471</text:p>
          </table:table-cell>
          <table:table-cell office:value-type="float" office:value="2.264289" calcext:value-type="float">
            <text:p>2,264289</text:p>
          </table:table-cell>
          <table:table-cell office:value-type="float" office:value="0.7061497" calcext:value-type="float">
            <text:p>0,7061497</text:p>
          </table:table-cell>
          <table:table-cell office:value-type="float" office:value="0.02491096" calcext:value-type="float">
            <text:p>0,02491096</text:p>
          </table:table-cell>
          <table:table-cell office:value-type="float" office:value="0.7024472" calcext:value-type="float">
            <text:p>0,7024472</text:p>
          </table:table-cell>
          <table:table-cell office:value-type="float" office:value="0.02382831" calcext:value-type="float">
            <text:p>0,02382831</text:p>
          </table:table-cell>
          <table:table-cell office:value-type="float" office:value="0.8069526" calcext:value-type="float">
            <text:p>0,8069526</text:p>
          </table:table-cell>
          <table:table-cell office:value-type="float" office:value="75.11789" calcext:value-type="float">
            <text:p>75,11789</text:p>
          </table:table-cell>
          <table:table-cell office:value-type="float" office:value="4.440526" calcext:value-type="float">
            <text:p>4,440526</text:p>
          </table:table-cell>
          <table:table-cell office:value-type="float" office:value="70.67736" calcext:value-type="float">
            <text:p>70,67736</text:p>
          </table:table-cell>
          <table:table-cell office:value-type="float" office:value="4.190583" calcext:value-type="float">
            <text:p>4,190583</text:p>
          </table:table-cell>
          <table:table-cell office:value-type="float" office:value="4.407134" calcext:value-type="float">
            <text:p>4,407134</text:p>
          </table:table-cell>
          <table:table-cell office:value-type="float" office:value="11.00392" calcext:value-type="float">
            <text:p>11,00392</text:p>
          </table:table-cell>
          <table:table-cell office:value-type="float" office:value="0.00004641059" calcext:value-type="float">
            <text:p>0,00004641059</text:p>
          </table:table-cell>
          <table:table-cell office:value-type="float" office:value="11.00396" calcext:value-type="float">
            <text:p>11,00396</text:p>
          </table:table-cell>
          <table:table-cell office:value-type="float" office:value="0.8224193" calcext:value-type="float">
            <text:p>0,8224193</text:p>
          </table:table-cell>
          <table:table-cell/>
          <table:table-cell table:formula="of:=([.L78]/[.D78])*100" office:value-type="float" office:value="80.4267469700471" calcext:value-type="float">
            <text:p>80,4267469700471</text:p>
          </table:table-cell>
          <table:table-cell table:formula="of:=([.O78]/[.D78])*100" office:value-type="float" office:value="4.48674688011046" calcext:value-type="float">
            <text:p>4,48674688011046</text:p>
          </table:table-cell>
          <table:table-cell table:formula="of:=([.S78]/[.D78])*100" office:value-type="float" office:value="11.781650237893" calcext:value-type="float">
            <text:p>11,781650237893</text:p>
          </table:table-cell>
          <table:table-cell table:formula="of:=([.F78]/[.D78])*100" office:value-type="float" office:value="2.42431461360351" calcext:value-type="float">
            <text:p>2,42431461360351</text:p>
          </table:table-cell>
          <table:table-cell table:formula="of:=([.T78]/[.D78])*100" office:value-type="float" office:value="0.880542690221773" calcext:value-type="float">
            <text:p>0,88054269022177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910.972" calcext:value-type="float">
            <text:p>3910,972</text:p>
          </table:table-cell>
          <table:table-cell office:value-type="float" office:value="3901.084" calcext:value-type="float">
            <text:p>3901,084</text:p>
          </table:table-cell>
          <table:table-cell office:value-type="float" office:value="94.78295" calcext:value-type="float">
            <text:p>94,78295</text:p>
          </table:table-cell>
          <table:table-cell office:value-type="float" office:value="97.57034" calcext:value-type="float">
            <text:p>97,57034</text:p>
          </table:table-cell>
          <table:table-cell office:value-type="float" office:value="2.305516" calcext:value-type="float">
            <text:p>2,305516</text:p>
          </table:table-cell>
          <table:table-cell office:value-type="float" office:value="0.7245522" calcext:value-type="float">
            <text:p>0,7245522</text:p>
          </table:table-cell>
          <table:table-cell office:value-type="float" office:value="0.02737218" calcext:value-type="float">
            <text:p>0,02737218</text:p>
          </table:table-cell>
          <table:table-cell office:value-type="float" office:value="0.7207499" calcext:value-type="float">
            <text:p>0,7207499</text:p>
          </table:table-cell>
          <table:table-cell office:value-type="float" office:value="0.02571263" calcext:value-type="float">
            <text:p>0,02571263</text:p>
          </table:table-cell>
          <table:table-cell office:value-type="float" office:value="0.8071288" calcext:value-type="float">
            <text:p>0,8071288</text:p>
          </table:table-cell>
          <table:table-cell office:value-type="float" office:value="76.22165" calcext:value-type="float">
            <text:p>76,22165</text:p>
          </table:table-cell>
          <table:table-cell office:value-type="float" office:value="4.480324" calcext:value-type="float">
            <text:p>4,480324</text:p>
          </table:table-cell>
          <table:table-cell office:value-type="float" office:value="71.74132" calcext:value-type="float">
            <text:p>71,74132</text:p>
          </table:table-cell>
          <table:table-cell office:value-type="float" office:value="4.257418" calcext:value-type="float">
            <text:p>4,257418</text:p>
          </table:table-cell>
          <table:table-cell office:value-type="float" office:value="4.351827" calcext:value-type="float">
            <text:p>4,351827</text:p>
          </table:table-cell>
          <table:table-cell office:value-type="float" office:value="11.15701" calcext:value-type="float">
            <text:p>11,15701</text:p>
          </table:table-cell>
          <table:table-cell office:value-type="float" office:value="0.00004639724" calcext:value-type="float">
            <text:p>0,00004639724</text:p>
          </table:table-cell>
          <table:table-cell office:value-type="float" office:value="11.15705" calcext:value-type="float">
            <text:p>11,15705</text:p>
          </table:table-cell>
          <table:table-cell office:value-type="float" office:value="0.8413133" calcext:value-type="float">
            <text:p>0,8413133</text:p>
          </table:table-cell>
          <table:table-cell/>
          <table:table-cell table:formula="of:=([.L79]/[.D79])*100" office:value-type="float" office:value="80.4170475808149" calcext:value-type="float">
            <text:p>80,4170475808149</text:p>
          </table:table-cell>
          <table:table-cell table:formula="of:=([.O79]/[.D79])*100" office:value-type="float" office:value="4.4917551099644" calcext:value-type="float">
            <text:p>4,4917551099644</text:p>
          </table:table-cell>
          <table:table-cell table:formula="of:=([.S79]/[.D79])*100" office:value-type="float" office:value="11.7711571543194" calcext:value-type="float">
            <text:p>11,7711571543194</text:p>
          </table:table-cell>
          <table:table-cell table:formula="of:=([.F79]/[.D79])*100" office:value-type="float" office:value="2.43241637868414" calcext:value-type="float">
            <text:p>2,43241637868414</text:p>
          </table:table-cell>
          <table:table-cell table:formula="of:=([.T79]/[.D79])*100" office:value-type="float" office:value="0.887620927603541" calcext:value-type="float">
            <text:p>0,88762092760354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961.205" calcext:value-type="float">
            <text:p>3961,205</text:p>
          </table:table-cell>
          <table:table-cell office:value-type="float" office:value="3951.126" calcext:value-type="float">
            <text:p>3951,126</text:p>
          </table:table-cell>
          <table:table-cell office:value-type="float" office:value="96.17135" calcext:value-type="float">
            <text:p>96,17135</text:p>
          </table:table-cell>
          <table:table-cell office:value-type="float" office:value="97.56598" calcext:value-type="float">
            <text:p>97,56598</text:p>
          </table:table-cell>
          <table:table-cell office:value-type="float" office:value="2.344778" calcext:value-type="float">
            <text:p>2,344778</text:p>
          </table:table-cell>
          <table:table-cell office:value-type="float" office:value="0.743095" calcext:value-type="float">
            <text:p>0,743095</text:p>
          </table:table-cell>
          <table:table-cell office:value-type="float" office:value="0.02898154" calcext:value-type="float">
            <text:p>0,02898154</text:p>
          </table:table-cell>
          <table:table-cell office:value-type="float" office:value="0.7391429" calcext:value-type="float">
            <text:p>0,7391429</text:p>
          </table:table-cell>
          <table:table-cell office:value-type="float" office:value="0.02625087" calcext:value-type="float">
            <text:p>0,02625087</text:p>
          </table:table-cell>
          <table:table-cell office:value-type="float" office:value="0.8073072" calcext:value-type="float">
            <text:p>0,8073072</text:p>
          </table:table-cell>
          <table:table-cell office:value-type="float" office:value="77.33068" calcext:value-type="float">
            <text:p>77,33068</text:p>
          </table:table-cell>
          <table:table-cell office:value-type="float" office:value="4.520706" calcext:value-type="float">
            <text:p>4,520706</text:p>
          </table:table-cell>
          <table:table-cell office:value-type="float" office:value="72.80998" calcext:value-type="float">
            <text:p>72,80998</text:p>
          </table:table-cell>
          <table:table-cell office:value-type="float" office:value="4.325074" calcext:value-type="float">
            <text:p>4,325074</text:p>
          </table:table-cell>
          <table:table-cell office:value-type="float" office:value="4.297168" calcext:value-type="float">
            <text:p>4,297168</text:p>
          </table:table-cell>
          <table:table-cell office:value-type="float" office:value="11.31037" calcext:value-type="float">
            <text:p>11,31037</text:p>
          </table:table-cell>
          <table:table-cell office:value-type="float" office:value="0.00004638435" calcext:value-type="float">
            <text:p>0,00004638435</text:p>
          </table:table-cell>
          <table:table-cell office:value-type="float" office:value="11.31041" calcext:value-type="float">
            <text:p>11,31041</text:p>
          </table:table-cell>
          <table:table-cell office:value-type="float" office:value="0.8604032" calcext:value-type="float">
            <text:p>0,8604032</text:p>
          </table:table-cell>
          <table:table-cell/>
          <table:table-cell table:formula="of:=([.L80]/[.D80])*100" office:value-type="float" office:value="80.4092694965808" calcext:value-type="float">
            <text:p>80,4092694965808</text:p>
          </table:table-cell>
          <table:table-cell table:formula="of:=([.O80]/[.D80])*100" office:value-type="float" office:value="4.49725827910287" calcext:value-type="float">
            <text:p>4,49725827910287</text:p>
          </table:table-cell>
          <table:table-cell table:formula="of:=([.S80]/[.D80])*100" office:value-type="float" office:value="11.7606854848143" calcext:value-type="float">
            <text:p>11,7606854848143</text:p>
          </table:table-cell>
          <table:table-cell table:formula="of:=([.F80]/[.D80])*100" office:value-type="float" office:value="2.43812528367336" calcext:value-type="float">
            <text:p>2,43812528367336</text:p>
          </table:table-cell>
          <table:table-cell table:formula="of:=([.T80]/[.D80])*100" office:value-type="float" office:value="0.894656464737159" calcext:value-type="float">
            <text:p>0,8946564647371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11.442" calcext:value-type="float">
            <text:p>4011,442</text:p>
          </table:table-cell>
          <table:table-cell office:value-type="float" office:value="4001.17" calcext:value-type="float">
            <text:p>4001,17</text:p>
          </table:table-cell>
          <table:table-cell office:value-type="float" office:value="97.56635" calcext:value-type="float">
            <text:p>97,56635</text:p>
          </table:table-cell>
          <table:table-cell office:value-type="float" office:value="97.56155" calcext:value-type="float">
            <text:p>97,56155</text:p>
          </table:table-cell>
          <table:table-cell office:value-type="float" office:value="2.383787" calcext:value-type="float">
            <text:p>2,383787</text:p>
          </table:table-cell>
          <table:table-cell office:value-type="float" office:value="0.7617257" calcext:value-type="float">
            <text:p>0,7617257</text:p>
          </table:table-cell>
          <table:table-cell office:value-type="float" office:value="0.02935" calcext:value-type="float">
            <text:p>0,02935</text:p>
          </table:table-cell>
          <table:table-cell office:value-type="float" office:value="0.7578374" calcext:value-type="float">
            <text:p>0,7578374</text:p>
          </table:table-cell>
          <table:table-cell office:value-type="float" office:value="0.02738581" calcext:value-type="float">
            <text:p>0,02738581</text:p>
          </table:table-cell>
          <table:table-cell office:value-type="float" office:value="0.8074878" calcext:value-type="float">
            <text:p>0,8074878</text:p>
          </table:table-cell>
          <table:table-cell office:value-type="float" office:value="78.44511" calcext:value-type="float">
            <text:p>78,44511</text:p>
          </table:table-cell>
          <table:table-cell office:value-type="float" office:value="4.561728" calcext:value-type="float">
            <text:p>4,561728</text:p>
          </table:table-cell>
          <table:table-cell office:value-type="float" office:value="73.88338" calcext:value-type="float">
            <text:p>73,88338</text:p>
          </table:table-cell>
          <table:table-cell office:value-type="float" office:value="4.39366" calcext:value-type="float">
            <text:p>4,39366</text:p>
          </table:table-cell>
          <table:table-cell office:value-type="float" office:value="4.259707" calcext:value-type="float">
            <text:p>4,259707</text:p>
          </table:table-cell>
          <table:table-cell office:value-type="float" office:value="11.46397" calcext:value-type="float">
            <text:p>11,46397</text:p>
          </table:table-cell>
          <table:table-cell office:value-type="float" office:value="0.00004637051" calcext:value-type="float">
            <text:p>0,00004637051</text:p>
          </table:table-cell>
          <table:table-cell office:value-type="float" office:value="11.46401" calcext:value-type="float">
            <text:p>11,46401</text:p>
          </table:table-cell>
          <table:table-cell office:value-type="float" office:value="0.8797813" calcext:value-type="float">
            <text:p>0,8797813</text:p>
          </table:table-cell>
          <table:table-cell/>
          <table:table-cell table:formula="of:=([.L81]/[.D81])*100" office:value-type="float" office:value="80.4018086153679" calcext:value-type="float">
            <text:p>80,4018086153679</text:p>
          </table:table-cell>
          <table:table-cell table:formula="of:=([.O81]/[.D81])*100" office:value-type="float" office:value="4.50325342702684" calcext:value-type="float">
            <text:p>4,50325342702684</text:p>
          </table:table-cell>
          <table:table-cell table:formula="of:=([.S81]/[.D81])*100" office:value-type="float" office:value="11.7499629739147" calcext:value-type="float">
            <text:p>11,7499629739147</text:p>
          </table:table-cell>
          <table:table-cell table:formula="of:=([.F81]/[.D81])*100" office:value-type="float" office:value="2.44324708262634" calcext:value-type="float">
            <text:p>2,44324708262634</text:p>
          </table:table-cell>
          <table:table-cell table:formula="of:=([.T81]/[.D81])*100" office:value-type="float" office:value="0.901726158660235" calcext:value-type="float">
            <text:p>0,901726158660235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4061.682" calcext:value-type="float">
            <text:p>4061,682</text:p>
          </table:table-cell>
          <table:table-cell office:value-type="float" office:value="4051.214" calcext:value-type="float">
            <text:p>4051,214</text:p>
          </table:table-cell>
          <table:table-cell office:value-type="float" office:value="98.97116" calcext:value-type="float">
            <text:p>98,97116</text:p>
          </table:table-cell>
          <table:table-cell office:value-type="float" office:value="97.557" calcext:value-type="float">
            <text:p>97,557</text:p>
          </table:table-cell>
          <table:table-cell office:value-type="float" office:value="2.425494" calcext:value-type="float">
            <text:p>2,425494</text:p>
          </table:table-cell>
          <table:table-cell office:value-type="float" office:value="0.7807419" calcext:value-type="float">
            <text:p>0,7807419</text:p>
          </table:table-cell>
          <table:table-cell office:value-type="float" office:value="0.03101954" calcext:value-type="float">
            <text:p>0,03101954</text:p>
          </table:table-cell>
          <table:table-cell office:value-type="float" office:value="0.7768387" calcext:value-type="float">
            <text:p>0,7768387</text:p>
          </table:table-cell>
          <table:table-cell office:value-type="float" office:value="0.02922322" calcext:value-type="float">
            <text:p>0,02922322</text:p>
          </table:table-cell>
          <table:table-cell office:value-type="float" office:value="0.8076708" calcext:value-type="float">
            <text:p>0,8076708</text:p>
          </table:table-cell>
          <table:table-cell office:value-type="float" office:value="79.56493" calcext:value-type="float">
            <text:p>79,56493</text:p>
          </table:table-cell>
          <table:table-cell office:value-type="float" office:value="4.603315" calcext:value-type="float">
            <text:p>4,603315</text:p>
          </table:table-cell>
          <table:table-cell office:value-type="float" office:value="74.96162" calcext:value-type="float">
            <text:p>74,96162</text:p>
          </table:table-cell>
          <table:table-cell office:value-type="float" office:value="4.463423" calcext:value-type="float">
            <text:p>4,463423</text:p>
          </table:table-cell>
          <table:table-cell office:value-type="float" office:value="4.226764" calcext:value-type="float">
            <text:p>4,226764</text:p>
          </table:table-cell>
          <table:table-cell office:value-type="float" office:value="11.61781" calcext:value-type="float">
            <text:p>11,61781</text:p>
          </table:table-cell>
          <table:table-cell office:value-type="float" office:value="0.00004635675" calcext:value-type="float">
            <text:p>0,00004635675</text:p>
          </table:table-cell>
          <table:table-cell office:value-type="float" office:value="11.61786" calcext:value-type="float">
            <text:p>11,61786</text:p>
          </table:table-cell>
          <table:table-cell office:value-type="float" office:value="0.8994457" calcext:value-type="float">
            <text:p>0,8994457</text:p>
          </table:table-cell>
          <table:table-cell/>
          <table:table-cell table:formula="of:=([.L82]/[.D82])*100" office:value-type="float" office:value="80.3920354171862" calcext:value-type="float">
            <text:p>80,3920354171862</text:p>
          </table:table-cell>
          <table:table-cell table:formula="of:=([.O82]/[.D82])*100" office:value-type="float" office:value="4.5098218511332" calcext:value-type="float">
            <text:p>4,5098218511332</text:p>
          </table:table-cell>
          <table:table-cell table:formula="of:=([.S82]/[.D82])*100" office:value-type="float" office:value="11.7386317387813" calcext:value-type="float">
            <text:p>11,7386317387813</text:p>
          </table:table-cell>
          <table:table-cell table:formula="of:=([.F82]/[.D82])*100" office:value-type="float" office:value="2.45070786277538" calcext:value-type="float">
            <text:p>2,45070786277538</text:p>
          </table:table-cell>
          <table:table-cell table:formula="of:=([.T82]/[.D82])*100" office:value-type="float" office:value="0.908795754237901" calcext:value-type="float">
            <text:p>0,90879575423790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111.926" calcext:value-type="float">
            <text:p>4111,926</text:p>
          </table:table-cell>
          <table:table-cell office:value-type="float" office:value="4101.259" calcext:value-type="float">
            <text:p>4101,259</text:p>
          </table:table-cell>
          <table:table-cell office:value-type="float" office:value="100.3793" calcext:value-type="float">
            <text:p>100,3793</text:p>
          </table:table-cell>
          <table:table-cell office:value-type="float" office:value="97.55248" calcext:value-type="float">
            <text:p>97,55248</text:p>
          </table:table-cell>
          <table:table-cell office:value-type="float" office:value="2.464586" calcext:value-type="float">
            <text:p>2,464586</text:p>
          </table:table-cell>
          <table:table-cell office:value-type="float" office:value="0.7997123" calcext:value-type="float">
            <text:p>0,7997123</text:p>
          </table:table-cell>
          <table:table-cell office:value-type="float" office:value="0.0299974" calcext:value-type="float">
            <text:p>0,0299974</text:p>
          </table:table-cell>
          <table:table-cell office:value-type="float" office:value="0.7960679" calcext:value-type="float">
            <text:p>0,7960679</text:p>
          </table:table-cell>
          <table:table-cell office:value-type="float" office:value="0.03095257" calcext:value-type="float">
            <text:p>0,03095257</text:p>
          </table:table-cell>
          <table:table-cell office:value-type="float" office:value="0.8078557" calcext:value-type="float">
            <text:p>0,8078557</text:p>
          </table:table-cell>
          <table:table-cell office:value-type="float" office:value="80.68994" calcext:value-type="float">
            <text:p>80,68994</text:p>
          </table:table-cell>
          <table:table-cell office:value-type="float" office:value="4.645375" calcext:value-type="float">
            <text:p>4,645375</text:p>
          </table:table-cell>
          <table:table-cell office:value-type="float" office:value="76.04456" calcext:value-type="float">
            <text:p>76,04456</text:p>
          </table:table-cell>
          <table:table-cell office:value-type="float" office:value="4.533625" calcext:value-type="float">
            <text:p>4,533625</text:p>
          </table:table-cell>
          <table:table-cell office:value-type="float" office:value="4.211755" calcext:value-type="float">
            <text:p>4,211755</text:p>
          </table:table-cell>
          <table:table-cell office:value-type="float" office:value="11.77186" calcext:value-type="float">
            <text:p>11,77186</text:p>
          </table:table-cell>
          <table:table-cell office:value-type="float" office:value="0.00004634272" calcext:value-type="float">
            <text:p>0,00004634272</text:p>
          </table:table-cell>
          <table:table-cell office:value-type="float" office:value="11.7719" calcext:value-type="float">
            <text:p>11,7719</text:p>
          </table:table-cell>
          <table:table-cell office:value-type="float" office:value="0.9192771" calcext:value-type="float">
            <text:p>0,9192771</text:p>
          </table:table-cell>
          <table:table-cell/>
          <table:table-cell table:formula="of:=([.L83]/[.D83])*100" office:value-type="float" office:value="80.3850395450058" calcext:value-type="float">
            <text:p>80,3850395450058</text:p>
          </table:table-cell>
          <table:table-cell table:formula="of:=([.O83]/[.D83])*100" office:value-type="float" office:value="4.5164939384913" calcext:value-type="float">
            <text:p>4,5164939384913</text:p>
          </table:table-cell>
          <table:table-cell table:formula="of:=([.S83]/[.D83])*100" office:value-type="float" office:value="11.7274179038905" calcext:value-type="float">
            <text:p>11,7274179038905</text:p>
          </table:table-cell>
          <table:table-cell table:formula="of:=([.F83]/[.D83])*100" office:value-type="float" office:value="2.45527314894605" calcext:value-type="float">
            <text:p>2,45527314894605</text:p>
          </table:table-cell>
          <table:table-cell table:formula="of:=([.T83]/[.D83])*100" office:value-type="float" office:value="0.915803457485757" calcext:value-type="float">
            <text:p>0,915803457485757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4162.174" calcext:value-type="float">
            <text:p>4162,174</text:p>
          </table:table-cell>
          <table:table-cell office:value-type="float" office:value="4151.305" calcext:value-type="float">
            <text:p>4151,305</text:p>
          </table:table-cell>
          <table:table-cell office:value-type="float" office:value="101.795" calcext:value-type="float">
            <text:p>101,795</text:p>
          </table:table-cell>
          <table:table-cell office:value-type="float" office:value="97.54788" calcext:value-type="float">
            <text:p>97,54788</text:p>
          </table:table-cell>
          <table:table-cell office:value-type="float" office:value="2.503663" calcext:value-type="float">
            <text:p>2,503663</text:p>
          </table:table-cell>
          <table:table-cell office:value-type="float" office:value="0.8189964" calcext:value-type="float">
            <text:p>0,8189964</text:p>
          </table:table-cell>
          <table:table-cell office:value-type="float" office:value="0.0296555" calcext:value-type="float">
            <text:p>0,0296555</text:p>
          </table:table-cell>
          <table:table-cell office:value-type="float" office:value="0.8154072" calcext:value-type="float">
            <text:p>0,8154072</text:p>
          </table:table-cell>
          <table:table-cell office:value-type="float" office:value="0.0315604" calcext:value-type="float">
            <text:p>0,0315604</text:p>
          </table:table-cell>
          <table:table-cell office:value-type="float" office:value="0.8080431" calcext:value-type="float">
            <text:p>0,8080431</text:p>
          </table:table-cell>
          <table:table-cell office:value-type="float" office:value="81.82074" calcext:value-type="float">
            <text:p>81,82074</text:p>
          </table:table-cell>
          <table:table-cell office:value-type="float" office:value="4.687826" calcext:value-type="float">
            <text:p>4,687826</text:p>
          </table:table-cell>
          <table:table-cell office:value-type="float" office:value="77.13292" calcext:value-type="float">
            <text:p>77,13292</text:p>
          </table:table-cell>
          <table:table-cell office:value-type="float" office:value="4.604821" calcext:value-type="float">
            <text:p>4,604821</text:p>
          </table:table-cell>
          <table:table-cell office:value-type="float" office:value="4.211733" calcext:value-type="float">
            <text:p>4,211733</text:p>
          </table:table-cell>
          <table:table-cell office:value-type="float" office:value="11.92613" calcext:value-type="float">
            <text:p>11,92613</text:p>
          </table:table-cell>
          <table:table-cell office:value-type="float" office:value="0.00004632838" calcext:value-type="float">
            <text:p>0,00004632838</text:p>
          </table:table-cell>
          <table:table-cell office:value-type="float" office:value="11.92618" calcext:value-type="float">
            <text:p>11,92618</text:p>
          </table:table-cell>
          <table:table-cell office:value-type="float" office:value="0.939566" calcext:value-type="float">
            <text:p>0,939566</text:p>
          </table:table-cell>
          <table:table-cell/>
          <table:table-cell table:formula="of:=([.L84]/[.D84])*100" office:value-type="float" office:value="80.3779556952699" calcext:value-type="float">
            <text:p>80,3779556952699</text:p>
          </table:table-cell>
          <table:table-cell table:formula="of:=([.O84]/[.D84])*100" office:value-type="float" office:value="4.52362198536274" calcext:value-type="float">
            <text:p>4,52362198536274</text:p>
          </table:table-cell>
          <table:table-cell table:formula="of:=([.S84]/[.D84])*100" office:value-type="float" office:value="11.7158799548111" calcext:value-type="float">
            <text:p>11,7158799548111</text:p>
          </table:table-cell>
          <table:table-cell table:formula="of:=([.F84]/[.D84])*100" office:value-type="float" office:value="2.45951471093865" calcext:value-type="float">
            <text:p>2,45951471093865</text:p>
          </table:table-cell>
          <table:table-cell table:formula="of:=([.T84]/[.D84])*100" office:value-type="float" office:value="0.922998182621936" calcext:value-type="float">
            <text:p>0,92299818262193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12.425" calcext:value-type="float">
            <text:p>4212,425</text:p>
          </table:table-cell>
          <table:table-cell office:value-type="float" office:value="4201.353" calcext:value-type="float">
            <text:p>4201,353</text:p>
          </table:table-cell>
          <table:table-cell office:value-type="float" office:value="103.2175" calcext:value-type="float">
            <text:p>103,2175</text:p>
          </table:table-cell>
          <table:table-cell office:value-type="float" office:value="97.54323" calcext:value-type="float">
            <text:p>97,54323</text:p>
          </table:table-cell>
          <table:table-cell office:value-type="float" office:value="2.542201" calcext:value-type="float">
            <text:p>2,542201</text:p>
          </table:table-cell>
          <table:table-cell office:value-type="float" office:value="0.8385289" calcext:value-type="float">
            <text:p>0,8385289</text:p>
          </table:table-cell>
          <table:table-cell office:value-type="float" office:value="0.02948199" calcext:value-type="float">
            <text:p>0,02948199</text:p>
          </table:table-cell>
          <table:table-cell office:value-type="float" office:value="0.8348698" calcext:value-type="float">
            <text:p>0,8348698</text:p>
          </table:table-cell>
          <table:table-cell office:value-type="float" office:value="0.03108684" calcext:value-type="float">
            <text:p>0,03108684</text:p>
          </table:table-cell>
          <table:table-cell office:value-type="float" office:value="0.808233" calcext:value-type="float">
            <text:p>0,808233</text:p>
          </table:table-cell>
          <table:table-cell office:value-type="float" office:value="82.95712" calcext:value-type="float">
            <text:p>82,95712</text:p>
          </table:table-cell>
          <table:table-cell office:value-type="float" office:value="4.730608" calcext:value-type="float">
            <text:p>4,730608</text:p>
          </table:table-cell>
          <table:table-cell office:value-type="float" office:value="78.22652" calcext:value-type="float">
            <text:p>78,22652</text:p>
          </table:table-cell>
          <table:table-cell office:value-type="float" office:value="4.677291" calcext:value-type="float">
            <text:p>4,677291</text:p>
          </table:table-cell>
          <table:table-cell office:value-type="float" office:value="4.168085" calcext:value-type="float">
            <text:p>4,168085</text:p>
          </table:table-cell>
          <table:table-cell office:value-type="float" office:value="12.08065" calcext:value-type="float">
            <text:p>12,08065</text:p>
          </table:table-cell>
          <table:table-cell office:value-type="float" office:value="0.00004631363" calcext:value-type="float">
            <text:p>0,00004631363</text:p>
          </table:table-cell>
          <table:table-cell office:value-type="float" office:value="12.0807" calcext:value-type="float">
            <text:p>12,0807</text:p>
          </table:table-cell>
          <table:table-cell office:value-type="float" office:value="0.9601634" calcext:value-type="float">
            <text:p>0,9601634</text:p>
          </table:table-cell>
          <table:table-cell/>
          <table:table-cell table:formula="of:=([.L85]/[.D85])*100" office:value-type="float" office:value="80.3711773681789" calcext:value-type="float">
            <text:p>80,3711773681789</text:p>
          </table:table-cell>
          <table:table-cell table:formula="of:=([.O85]/[.D85])*100" office:value-type="float" office:value="4.53149029961005" calcext:value-type="float">
            <text:p>4,53149029961005</text:p>
          </table:table-cell>
          <table:table-cell table:formula="of:=([.S85]/[.D85])*100" office:value-type="float" office:value="11.7041199409015" calcext:value-type="float">
            <text:p>11,7041199409015</text:p>
          </table:table-cell>
          <table:table-cell table:formula="of:=([.F85]/[.D85])*100" office:value-type="float" office:value="2.46295540969312" calcext:value-type="float">
            <text:p>2,46295540969312</text:p>
          </table:table-cell>
          <table:table-cell table:formula="of:=([.T85]/[.D85])*100" office:value-type="float" office:value="0.930233148448664" calcext:value-type="float">
            <text:p>0,93023314844866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4262.679" calcext:value-type="float">
            <text:p>4262,679</text:p>
          </table:table-cell>
          <table:table-cell office:value-type="float" office:value="4251.402" calcext:value-type="float">
            <text:p>4251,402</text:p>
          </table:table-cell>
          <table:table-cell office:value-type="float" office:value="104.6501" calcext:value-type="float">
            <text:p>104,6501</text:p>
          </table:table-cell>
          <table:table-cell office:value-type="float" office:value="97.53846" calcext:value-type="float">
            <text:p>97,53846</text:p>
          </table:table-cell>
          <table:table-cell office:value-type="float" office:value="2.584481" calcext:value-type="float">
            <text:p>2,584481</text:p>
          </table:table-cell>
          <table:table-cell office:value-type="float" office:value="0.8585759" calcext:value-type="float">
            <text:p>0,8585759</text:p>
          </table:table-cell>
          <table:table-cell office:value-type="float" office:value="0.03194269" calcext:value-type="float">
            <text:p>0,03194269</text:p>
          </table:table-cell>
          <table:table-cell office:value-type="float" office:value="0.8546324" calcext:value-type="float">
            <text:p>0,8546324</text:p>
          </table:table-cell>
          <table:table-cell office:value-type="float" office:value="0.03090422" calcext:value-type="float">
            <text:p>0,03090422</text:p>
          </table:table-cell>
          <table:table-cell office:value-type="float" office:value="0.8084252" calcext:value-type="float">
            <text:p>0,8084252</text:p>
          </table:table-cell>
          <table:table-cell office:value-type="float" office:value="84.09859" calcext:value-type="float">
            <text:p>84,09859</text:p>
          </table:table-cell>
          <table:table-cell office:value-type="float" office:value="4.773731" calcext:value-type="float">
            <text:p>4,773731</text:p>
          </table:table-cell>
          <table:table-cell office:value-type="float" office:value="79.32486" calcext:value-type="float">
            <text:p>79,32486</text:p>
          </table:table-cell>
          <table:table-cell office:value-type="float" office:value="4.750835" calcext:value-type="float">
            <text:p>4,750835</text:p>
          </table:table-cell>
          <table:table-cell office:value-type="float" office:value="4.095847" calcext:value-type="float">
            <text:p>4,095847</text:p>
          </table:table-cell>
          <table:table-cell office:value-type="float" office:value="12.23535" calcext:value-type="float">
            <text:p>12,23535</text:p>
          </table:table-cell>
          <table:table-cell office:value-type="float" office:value="0.00004629909" calcext:value-type="float">
            <text:p>0,00004629909</text:p>
          </table:table-cell>
          <table:table-cell office:value-type="float" office:value="12.2354" calcext:value-type="float">
            <text:p>12,2354</text:p>
          </table:table-cell>
          <table:table-cell office:value-type="float" office:value="0.980837" calcext:value-type="float">
            <text:p>0,980837</text:p>
          </table:table-cell>
          <table:table-cell/>
          <table:table-cell table:formula="of:=([.L86]/[.D86])*100" office:value-type="float" office:value="80.3616910065065" calcext:value-type="float">
            <text:p>80,3616910065065</text:p>
          </table:table-cell>
          <table:table-cell table:formula="of:=([.O86]/[.D86])*100" office:value-type="float" office:value="4.53973288128726" calcext:value-type="float">
            <text:p>4,53973288128726</text:p>
          </table:table-cell>
          <table:table-cell table:formula="of:=([.S86]/[.D86])*100" office:value-type="float" office:value="11.6917231803887" calcext:value-type="float">
            <text:p>11,6917231803887</text:p>
          </table:table-cell>
          <table:table-cell table:formula="of:=([.F86]/[.D86])*100" office:value-type="float" office:value="2.46964025834662" calcext:value-type="float">
            <text:p>2,46964025834662</text:p>
          </table:table-cell>
          <table:table-cell table:formula="of:=([.T86]/[.D86])*100" office:value-type="float" office:value="0.937253762777102" calcext:value-type="float">
            <text:p>0,93725376277710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12.937" calcext:value-type="float">
            <text:p>4312,937</text:p>
          </table:table-cell>
          <table:table-cell office:value-type="float" office:value="4301.451" calcext:value-type="float">
            <text:p>4301,451</text:p>
          </table:table-cell>
          <table:table-cell office:value-type="float" office:value="106.0857" calcext:value-type="float">
            <text:p>106,0857</text:p>
          </table:table-cell>
          <table:table-cell office:value-type="float" office:value="97.53372" calcext:value-type="float">
            <text:p>97,53372</text:p>
          </table:table-cell>
          <table:table-cell office:value-type="float" office:value="2.623906" calcext:value-type="float">
            <text:p>2,623906</text:p>
          </table:table-cell>
          <table:table-cell office:value-type="float" office:value="0.8785502" calcext:value-type="float">
            <text:p>0,8785502</text:p>
          </table:table-cell>
          <table:table-cell office:value-type="float" office:value="0.03158983" calcext:value-type="float">
            <text:p>0,03158983</text:p>
          </table:table-cell>
          <table:table-cell office:value-type="float" office:value="0.8745933" calcext:value-type="float">
            <text:p>0,8745933</text:p>
          </table:table-cell>
          <table:table-cell office:value-type="float" office:value="0.03055257" calcext:value-type="float">
            <text:p>0,03055257</text:p>
          </table:table-cell>
          <table:table-cell office:value-type="float" office:value="0.8086196" calcext:value-type="float">
            <text:p>0,8086196</text:p>
          </table:table-cell>
          <table:table-cell office:value-type="float" office:value="85.24504" calcext:value-type="float">
            <text:p>85,24504</text:p>
          </table:table-cell>
          <table:table-cell office:value-type="float" office:value="4.817203" calcext:value-type="float">
            <text:p>4,817203</text:p>
          </table:table-cell>
          <table:table-cell office:value-type="float" office:value="80.42784" calcext:value-type="float">
            <text:p>80,42784</text:p>
          </table:table-cell>
          <table:table-cell office:value-type="float" office:value="4.824891" calcext:value-type="float">
            <text:p>4,824891</text:p>
          </table:table-cell>
          <table:table-cell office:value-type="float" office:value="4.001467" calcext:value-type="float">
            <text:p>4,001467</text:p>
          </table:table-cell>
          <table:table-cell office:value-type="float" office:value="12.3902" calcext:value-type="float">
            <text:p>12,3902</text:p>
          </table:table-cell>
          <table:table-cell office:value-type="float" office:value="0.00004628407" calcext:value-type="float">
            <text:p>0,00004628407</text:p>
          </table:table-cell>
          <table:table-cell office:value-type="float" office:value="12.39025" calcext:value-type="float">
            <text:p>12,39025</text:p>
          </table:table-cell>
          <table:table-cell office:value-type="float" office:value="1.001637" calcext:value-type="float">
            <text:p>1,001637</text:p>
          </table:table-cell>
          <table:table-cell/>
          <table:table-cell table:formula="of:=([.L87]/[.D87])*100" office:value-type="float" office:value="80.3548828918507" calcext:value-type="float">
            <text:p>80,3548828918507</text:p>
          </table:table-cell>
          <table:table-cell table:formula="of:=([.O87]/[.D87])*100" office:value-type="float" office:value="4.54810686077388" calcext:value-type="float">
            <text:p>4,54810686077388</text:p>
          </table:table-cell>
          <table:table-cell table:formula="of:=([.S87]/[.D87])*100" office:value-type="float" office:value="11.6794723511274" calcext:value-type="float">
            <text:p>11,6794723511274</text:p>
          </table:table-cell>
          <table:table-cell table:formula="of:=([.F87]/[.D87])*100" office:value-type="float" office:value="2.47338331179414" calcext:value-type="float">
            <text:p>2,47338331179414</text:p>
          </table:table-cell>
          <table:table-cell table:formula="of:=([.T87]/[.D87])*100" office:value-type="float" office:value="0.944177207672665" calcext:value-type="float">
            <text:p>0,94417720767266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4363.198" calcext:value-type="float">
            <text:p>4363,198</text:p>
          </table:table-cell>
          <table:table-cell office:value-type="float" office:value="4351.502" calcext:value-type="float">
            <text:p>4351,502</text:p>
          </table:table-cell>
          <table:table-cell office:value-type="float" office:value="107.526" calcext:value-type="float">
            <text:p>107,526</text:p>
          </table:table-cell>
          <table:table-cell office:value-type="float" office:value="97.52899" calcext:value-type="float">
            <text:p>97,52899</text:p>
          </table:table-cell>
          <table:table-cell office:value-type="float" office:value="2.660814" calcext:value-type="float">
            <text:p>2,660814</text:p>
          </table:table-cell>
          <table:table-cell office:value-type="float" office:value="0.8985656" calcext:value-type="float">
            <text:p>0,8985656</text:p>
          </table:table-cell>
          <table:table-cell office:value-type="float" office:value="0.02932674" calcext:value-type="float">
            <text:p>0,02932674</text:p>
          </table:table-cell>
          <table:table-cell office:value-type="float" office:value="0.8947146" calcext:value-type="float">
            <text:p>0,8947146</text:p>
          </table:table-cell>
          <table:table-cell office:value-type="float" office:value="0.02939046" calcext:value-type="float">
            <text:p>0,02939046</text:p>
          </table:table-cell>
          <table:table-cell office:value-type="float" office:value="0.8088163" calcext:value-type="float">
            <text:p>0,8088163</text:p>
          </table:table-cell>
          <table:table-cell office:value-type="float" office:value="86.39724" calcext:value-type="float">
            <text:p>86,39724</text:p>
          </table:table-cell>
          <table:table-cell office:value-type="float" office:value="4.86104" calcext:value-type="float">
            <text:p>4,86104</text:p>
          </table:table-cell>
          <table:table-cell office:value-type="float" office:value="81.5362" calcext:value-type="float">
            <text:p>81,5362</text:p>
          </table:table-cell>
          <table:table-cell office:value-type="float" office:value="4.899935" calcext:value-type="float">
            <text:p>4,899935</text:p>
          </table:table-cell>
          <table:table-cell office:value-type="float" office:value="3.932955" calcext:value-type="float">
            <text:p>3,932955</text:p>
          </table:table-cell>
          <table:table-cell office:value-type="float" office:value="12.54526" calcext:value-type="float">
            <text:p>12,54526</text:p>
          </table:table-cell>
          <table:table-cell office:value-type="float" office:value="0.00004626909" calcext:value-type="float">
            <text:p>0,00004626909</text:p>
          </table:table-cell>
          <table:table-cell office:value-type="float" office:value="12.54531" calcext:value-type="float">
            <text:p>12,54531</text:p>
          </table:table-cell>
          <table:table-cell office:value-type="float" office:value="1.022682" calcext:value-type="float">
            <text:p>1,022682</text:p>
          </table:table-cell>
          <table:table-cell/>
          <table:table-cell table:formula="of:=([.L88]/[.D88])*100" office:value-type="float" office:value="80.350092070755" calcext:value-type="float">
            <text:p>80,350092070755</text:p>
          </table:table-cell>
          <table:table-cell table:formula="of:=([.O88]/[.D88])*100" office:value-type="float" office:value="4.55697691721072" calcext:value-type="float">
            <text:p>4,55697691721072</text:p>
          </table:table-cell>
          <table:table-cell table:formula="of:=([.S88]/[.D88])*100" office:value-type="float" office:value="11.6672339713186" calcext:value-type="float">
            <text:p>11,6672339713186</text:p>
          </table:table-cell>
          <table:table-cell table:formula="of:=([.F88]/[.D88])*100" office:value-type="float" office:value="2.47457731153395" calcext:value-type="float">
            <text:p>2,47457731153395</text:p>
          </table:table-cell>
          <table:table-cell table:formula="of:=([.T88]/[.D88])*100" office:value-type="float" office:value="0.951102059036884" calcext:value-type="float">
            <text:p>0,95110205903688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13.464" calcext:value-type="float">
            <text:p>4413,464</text:p>
          </table:table-cell>
          <table:table-cell office:value-type="float" office:value="4401.555" calcext:value-type="float">
            <text:p>4401,555</text:p>
          </table:table-cell>
          <table:table-cell office:value-type="float" office:value="108.9748" calcext:value-type="float">
            <text:p>108,9748</text:p>
          </table:table-cell>
          <table:table-cell office:value-type="float" office:value="97.52417" calcext:value-type="float">
            <text:p>97,52417</text:p>
          </table:table-cell>
          <table:table-cell office:value-type="float" office:value="2.699673" calcext:value-type="float">
            <text:p>2,699673</text:p>
          </table:table-cell>
          <table:table-cell office:value-type="float" office:value="0.9188136" calcext:value-type="float">
            <text:p>0,9188136</text:p>
          </table:table-cell>
          <table:table-cell office:value-type="float" office:value="0.02672224" calcext:value-type="float">
            <text:p>0,02672224</text:p>
          </table:table-cell>
          <table:table-cell office:value-type="float" office:value="0.915225" calcext:value-type="float">
            <text:p>0,915225</text:p>
          </table:table-cell>
          <table:table-cell office:value-type="float" office:value="0.02989704" calcext:value-type="float">
            <text:p>0,02989704</text:p>
          </table:table-cell>
          <table:table-cell office:value-type="float" office:value="0.8090152" calcext:value-type="float">
            <text:p>0,8090152</text:p>
          </table:table-cell>
          <table:table-cell office:value-type="float" office:value="87.55473" calcext:value-type="float">
            <text:p>87,55473</text:p>
          </table:table-cell>
          <table:table-cell office:value-type="float" office:value="4.905239" calcext:value-type="float">
            <text:p>4,905239</text:p>
          </table:table-cell>
          <table:table-cell office:value-type="float" office:value="82.64949" calcext:value-type="float">
            <text:p>82,64949</text:p>
          </table:table-cell>
          <table:table-cell office:value-type="float" office:value="4.975947" calcext:value-type="float">
            <text:p>4,975947</text:p>
          </table:table-cell>
          <table:table-cell office:value-type="float" office:value="3.884494" calcext:value-type="float">
            <text:p>3,884494</text:p>
          </table:table-cell>
          <table:table-cell office:value-type="float" office:value="12.70042" calcext:value-type="float">
            <text:p>12,70042</text:p>
          </table:table-cell>
          <table:table-cell office:value-type="float" office:value="0.00004625403" calcext:value-type="float">
            <text:p>0,00004625403</text:p>
          </table:table-cell>
          <table:table-cell office:value-type="float" office:value="12.70047" calcext:value-type="float">
            <text:p>12,70047</text:p>
          </table:table-cell>
          <table:table-cell office:value-type="float" office:value="1.044024" calcext:value-type="float">
            <text:p>1,044024</text:p>
          </table:table-cell>
          <table:table-cell/>
          <table:table-cell table:formula="of:=([.L89]/[.D89])*100" office:value-type="float" office:value="80.3440153136321" calcext:value-type="float">
            <text:p>80,3440153136321</text:p>
          </table:table-cell>
          <table:table-cell table:formula="of:=([.O89]/[.D89])*100" office:value-type="float" office:value="4.56614464995577" calcext:value-type="float">
            <text:p>4,56614464995577</text:p>
          </table:table-cell>
          <table:table-cell table:formula="of:=([.S89]/[.D89])*100" office:value-type="float" office:value="11.6545017747222" calcext:value-type="float">
            <text:p>11,6545017747222</text:p>
          </table:table-cell>
          <table:table-cell table:formula="of:=([.F89]/[.D89])*100" office:value-type="float" office:value="2.47733696230688" calcext:value-type="float">
            <text:p>2,47733696230688</text:p>
          </table:table-cell>
          <table:table-cell table:formula="of:=([.T89]/[.D89])*100" office:value-type="float" office:value="0.95804167569016" calcext:value-type="float">
            <text:p>0,95804167569016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463.733" calcext:value-type="float">
            <text:p>4463,733</text:p>
          </table:table-cell>
          <table:table-cell office:value-type="float" office:value="4451.608" calcext:value-type="float">
            <text:p>4451,608</text:p>
          </table:table-cell>
          <table:table-cell office:value-type="float" office:value="110.4416" calcext:value-type="float">
            <text:p>110,4416</text:p>
          </table:table-cell>
          <table:table-cell office:value-type="float" office:value="97.51906" calcext:value-type="float">
            <text:p>97,51906</text:p>
          </table:table-cell>
          <table:table-cell office:value-type="float" office:value="2.748589" calcext:value-type="float">
            <text:p>2,748589</text:p>
          </table:table-cell>
          <table:table-cell office:value-type="float" office:value="0.9401019" calcext:value-type="float">
            <text:p>0,9401019</text:p>
          </table:table-cell>
          <table:table-cell office:value-type="float" office:value="0.03198275" calcext:value-type="float">
            <text:p>0,03198275</text:p>
          </table:table-cell>
          <table:table-cell office:value-type="float" office:value="0.936065" calcext:value-type="float">
            <text:p>0,936065</text:p>
          </table:table-cell>
          <table:table-cell office:value-type="float" office:value="0.03122254" calcext:value-type="float">
            <text:p>0,03122254</text:p>
          </table:table-cell>
          <table:table-cell office:value-type="float" office:value="0.8092166" calcext:value-type="float">
            <text:p>0,8092166</text:p>
          </table:table-cell>
          <table:table-cell office:value-type="float" office:value="88.71793" calcext:value-type="float">
            <text:p>88,71793</text:p>
          </table:table-cell>
          <table:table-cell office:value-type="float" office:value="4.949801" calcext:value-type="float">
            <text:p>4,949801</text:p>
          </table:table-cell>
          <table:table-cell office:value-type="float" office:value="83.76813" calcext:value-type="float">
            <text:p>83,76813</text:p>
          </table:table-cell>
          <table:table-cell office:value-type="float" office:value="5.053518" calcext:value-type="float">
            <text:p>5,053518</text:p>
          </table:table-cell>
          <table:table-cell office:value-type="float" office:value="3.826103" calcext:value-type="float">
            <text:p>3,826103</text:p>
          </table:table-cell>
          <table:table-cell office:value-type="float" office:value="12.85571" calcext:value-type="float">
            <text:p>12,85571</text:p>
          </table:table-cell>
          <table:table-cell office:value-type="float" office:value="0.00004623825" calcext:value-type="float">
            <text:p>0,00004623825</text:p>
          </table:table-cell>
          <table:table-cell office:value-type="float" office:value="12.85576" calcext:value-type="float">
            <text:p>12,85576</text:p>
          </table:table-cell>
          <table:table-cell office:value-type="float" office:value="1.065774" calcext:value-type="float">
            <text:p>1,065774</text:p>
          </table:table-cell>
          <table:table-cell/>
          <table:table-cell table:formula="of:=([.L90]/[.D90])*100" office:value-type="float" office:value="80.330174499464" calcext:value-type="float">
            <text:p>80,330174499464</text:p>
          </table:table-cell>
          <table:table-cell table:formula="of:=([.O90]/[.D90])*100" office:value-type="float" office:value="4.57573776547967" calcext:value-type="float">
            <text:p>4,57573776547967</text:p>
          </table:table-cell>
          <table:table-cell table:formula="of:=([.S90]/[.D90])*100" office:value-type="float" office:value="11.6403239359082" calcext:value-type="float">
            <text:p>11,6403239359082</text:p>
          </table:table-cell>
          <table:table-cell table:formula="of:=([.F90]/[.D90])*100" office:value-type="float" office:value="2.48872616840031" calcext:value-type="float">
            <text:p>2,48872616840031</text:p>
          </table:table-cell>
          <table:table-cell table:formula="of:=([.T90]/[.D90])*100" office:value-type="float" office:value="0.965011372526295" calcext:value-type="float">
            <text:p>0,96501137252629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514.005" calcext:value-type="float">
            <text:p>4514,005</text:p>
          </table:table-cell>
          <table:table-cell office:value-type="float" office:value="4501.662" calcext:value-type="float">
            <text:p>4501,662</text:p>
          </table:table-cell>
          <table:table-cell office:value-type="float" office:value="111.9181" calcext:value-type="float">
            <text:p>111,9181</text:p>
          </table:table-cell>
          <table:table-cell office:value-type="float" office:value="97.51385" calcext:value-type="float">
            <text:p>97,51385</text:p>
          </table:table-cell>
          <table:table-cell office:value-type="float" office:value="2.800232" calcext:value-type="float">
            <text:p>2,800232</text:p>
          </table:table-cell>
          <table:table-cell office:value-type="float" office:value="0.962122" calcext:value-type="float">
            <text:p>0,962122</text:p>
          </table:table-cell>
          <table:table-cell office:value-type="float" office:value="0.04040701" calcext:value-type="float">
            <text:p>0,04040701</text:p>
          </table:table-cell>
          <table:table-cell office:value-type="float" office:value="0.9570347" calcext:value-type="float">
            <text:p>0,9570347</text:p>
          </table:table-cell>
          <table:table-cell office:value-type="float" office:value="0.0312475" calcext:value-type="float">
            <text:p>0,0312475</text:p>
          </table:table-cell>
          <table:table-cell office:value-type="float" office:value="0.8094205" calcext:value-type="float">
            <text:p>0,8094205</text:p>
          </table:table-cell>
          <table:table-cell office:value-type="float" office:value="89.88668" calcext:value-type="float">
            <text:p>89,88668</text:p>
          </table:table-cell>
          <table:table-cell office:value-type="float" office:value="4.994737" calcext:value-type="float">
            <text:p>4,994737</text:p>
          </table:table-cell>
          <table:table-cell office:value-type="float" office:value="84.89194" calcext:value-type="float">
            <text:p>84,89194</text:p>
          </table:table-cell>
          <table:table-cell office:value-type="float" office:value="5.132176" calcext:value-type="float">
            <text:p>5,132176</text:p>
          </table:table-cell>
          <table:table-cell office:value-type="float" office:value="3.777201" calcext:value-type="float">
            <text:p>3,777201</text:p>
          </table:table-cell>
          <table:table-cell office:value-type="float" office:value="13.01107" calcext:value-type="float">
            <text:p>13,01107</text:p>
          </table:table-cell>
          <table:table-cell office:value-type="float" office:value="0.00004622233" calcext:value-type="float">
            <text:p>0,00004622233</text:p>
          </table:table-cell>
          <table:table-cell office:value-type="float" office:value="13.01111" calcext:value-type="float">
            <text:p>13,01111</text:p>
          </table:table-cell>
          <table:table-cell office:value-type="float" office:value="1.087867" calcext:value-type="float">
            <text:p>1,087867</text:p>
          </table:table-cell>
          <table:table-cell/>
          <table:table-cell table:formula="of:=([.L91]/[.D91])*100" office:value-type="float" office:value="80.3146944059987" calcext:value-type="float">
            <text:p>80,3146944059987</text:p>
          </table:table-cell>
          <table:table-cell table:formula="of:=([.O91]/[.D91])*100" office:value-type="float" office:value="4.5856532589456" calcext:value-type="float">
            <text:p>4,5856532589456</text:p>
          </table:table-cell>
          <table:table-cell table:formula="of:=([.S91]/[.D91])*100" office:value-type="float" office:value="11.6255636934508" calcext:value-type="float">
            <text:p>11,6255636934508</text:p>
          </table:table-cell>
          <table:table-cell table:formula="of:=([.F91]/[.D91])*100" office:value-type="float" office:value="2.50203675723587" calcext:value-type="float">
            <text:p>2,50203675723587</text:p>
          </table:table-cell>
          <table:table-cell table:formula="of:=([.T91]/[.D91])*100" office:value-type="float" office:value="0.972020611500731" calcext:value-type="float">
            <text:p>0,972020611500731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4564.282" calcext:value-type="float">
            <text:p>4564,282</text:p>
          </table:table-cell>
          <table:table-cell office:value-type="float" office:value="4551.718" calcext:value-type="float">
            <text:p>4551,718</text:p>
          </table:table-cell>
          <table:table-cell office:value-type="float" office:value="113.3895" calcext:value-type="float">
            <text:p>113,3895</text:p>
          </table:table-cell>
          <table:table-cell office:value-type="float" office:value="97.50886" calcext:value-type="float">
            <text:p>97,50886</text:p>
          </table:table-cell>
          <table:table-cell office:value-type="float" office:value="2.840636" calcext:value-type="float">
            <text:p>2,840636</text:p>
          </table:table-cell>
          <table:table-cell office:value-type="float" office:value="0.9833457" calcext:value-type="float">
            <text:p>0,9833457</text:p>
          </table:table-cell>
          <table:table-cell office:value-type="float" office:value="0.04044246" calcext:value-type="float">
            <text:p>0,04044246</text:p>
          </table:table-cell>
          <table:table-cell office:value-type="float" office:value="0.9780286" calcext:value-type="float">
            <text:p>0,9780286</text:p>
          </table:table-cell>
          <table:table-cell office:value-type="float" office:value="0.02919291" calcext:value-type="float">
            <text:p>0,02919291</text:p>
          </table:table-cell>
          <table:table-cell office:value-type="float" office:value="0.8096263" calcext:value-type="float">
            <text:p>0,8096263</text:p>
          </table:table-cell>
          <table:table-cell office:value-type="float" office:value="91.06156" calcext:value-type="float">
            <text:p>91,06156</text:p>
          </table:table-cell>
          <table:table-cell office:value-type="float" office:value="5.040286" calcext:value-type="float">
            <text:p>5,040286</text:p>
          </table:table-cell>
          <table:table-cell office:value-type="float" office:value="86.02128" calcext:value-type="float">
            <text:p>86,02128</text:p>
          </table:table-cell>
          <table:table-cell office:value-type="float" office:value="5.21086" calcext:value-type="float">
            <text:p>5,21086</text:p>
          </table:table-cell>
          <table:table-cell office:value-type="float" office:value="3.724441" calcext:value-type="float">
            <text:p>3,724441</text:p>
          </table:table-cell>
          <table:table-cell office:value-type="float" office:value="13.16644" calcext:value-type="float">
            <text:p>13,16644</text:p>
          </table:table-cell>
          <table:table-cell office:value-type="float" office:value="0.00004620688" calcext:value-type="float">
            <text:p>0,00004620688</text:p>
          </table:table-cell>
          <table:table-cell office:value-type="float" office:value="13.16648" calcext:value-type="float">
            <text:p>13,16648</text:p>
          </table:table-cell>
          <table:table-cell office:value-type="float" office:value="1.109932" calcext:value-type="float">
            <text:p>1,109932</text:p>
          </table:table-cell>
          <table:table-cell/>
          <table:table-cell table:formula="of:=([.L92]/[.D92])*100" office:value-type="float" office:value="80.3086352792807" calcext:value-type="float">
            <text:p>80,3086352792807</text:p>
          </table:table-cell>
          <table:table-cell table:formula="of:=([.O92]/[.D92])*100" office:value-type="float" office:value="4.59554015142496" calcext:value-type="float">
            <text:p>4,59554015142496</text:p>
          </table:table-cell>
          <table:table-cell table:formula="of:=([.S92]/[.D92])*100" office:value-type="float" office:value="11.611727717293" calcext:value-type="float">
            <text:p>11,611727717293</text:p>
          </table:table-cell>
          <table:table-cell table:formula="of:=([.F92]/[.D92])*100" office:value-type="float" office:value="2.50520198078305" calcext:value-type="float">
            <text:p>2,50520198078305</text:p>
          </table:table-cell>
          <table:table-cell table:formula="of:=([.T92]/[.D92])*100" office:value-type="float" office:value="0.978866649910265" calcext:value-type="float">
            <text:p>0,97886664991026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614.561" calcext:value-type="float">
            <text:p>4614,561</text:p>
          </table:table-cell>
          <table:table-cell office:value-type="float" office:value="4601.775" calcext:value-type="float">
            <text:p>4601,775</text:p>
          </table:table-cell>
          <table:table-cell office:value-type="float" office:value="114.8836" calcext:value-type="float">
            <text:p>114,8836</text:p>
          </table:table-cell>
          <table:table-cell office:value-type="float" office:value="97.50349" calcext:value-type="float">
            <text:p>97,50349</text:p>
          </table:table-cell>
          <table:table-cell office:value-type="float" office:value="2.895051" calcext:value-type="float">
            <text:p>2,895051</text:p>
          </table:table-cell>
          <table:table-cell office:value-type="float" office:value="1.005167" calcext:value-type="float">
            <text:p>1,005167</text:p>
          </table:table-cell>
          <table:table-cell office:value-type="float" office:value="0.04350086" calcext:value-type="float">
            <text:p>0,04350086</text:p>
          </table:table-cell>
          <table:table-cell office:value-type="float" office:value="1.000208" calcext:value-type="float">
            <text:p>1,000208</text:p>
          </table:table-cell>
          <table:table-cell office:value-type="float" office:value="0.03634076" calcext:value-type="float">
            <text:p>0,03634076</text:p>
          </table:table-cell>
          <table:table-cell office:value-type="float" office:value="0.8098346" calcext:value-type="float">
            <text:p>0,8098346</text:p>
          </table:table-cell>
          <table:table-cell office:value-type="float" office:value="92.24258" calcext:value-type="float">
            <text:p>92,24258</text:p>
          </table:table-cell>
          <table:table-cell office:value-type="float" office:value="5.08691" calcext:value-type="float">
            <text:p>5,08691</text:p>
          </table:table-cell>
          <table:table-cell office:value-type="float" office:value="87.15567" calcext:value-type="float">
            <text:p>87,15567</text:p>
          </table:table-cell>
          <table:table-cell office:value-type="float" office:value="5.291623" calcext:value-type="float">
            <text:p>5,291623</text:p>
          </table:table-cell>
          <table:table-cell office:value-type="float" office:value="3.669512" calcext:value-type="float">
            <text:p>3,669512</text:p>
          </table:table-cell>
          <table:table-cell office:value-type="float" office:value="13.32183" calcext:value-type="float">
            <text:p>13,32183</text:p>
          </table:table-cell>
          <table:table-cell office:value-type="float" office:value="0.00004619067" calcext:value-type="float">
            <text:p>0,00004619067</text:p>
          </table:table-cell>
          <table:table-cell office:value-type="float" office:value="13.32188" calcext:value-type="float">
            <text:p>13,32188</text:p>
          </table:table-cell>
          <table:table-cell office:value-type="float" office:value="1.132511" calcext:value-type="float">
            <text:p>1,132511</text:p>
          </table:table-cell>
          <table:table-cell/>
          <table:table-cell table:formula="of:=([.L93]/[.D93])*100" office:value-type="float" office:value="80.2922088096125" calcext:value-type="float">
            <text:p>80,2922088096125</text:p>
          </table:table-cell>
          <table:table-cell table:formula="of:=([.O93]/[.D93])*100" office:value-type="float" office:value="4.60607345173724" calcext:value-type="float">
            <text:p>4,60607345173724</text:p>
          </table:table-cell>
          <table:table-cell table:formula="of:=([.S93]/[.D93])*100" office:value-type="float" office:value="11.595980627348" calcext:value-type="float">
            <text:p>11,595980627348</text:p>
          </table:table-cell>
          <table:table-cell table:formula="of:=([.F93]/[.D93])*100" office:value-type="float" office:value="2.51998631658479" calcext:value-type="float">
            <text:p>2,51998631658479</text:p>
          </table:table-cell>
          <table:table-cell table:formula="of:=([.T93]/[.D93])*100" office:value-type="float" office:value="0.985789964799153" calcext:value-type="float">
            <text:p>0,98578996479915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4664.845" calcext:value-type="float">
            <text:p>4664,845</text:p>
          </table:table-cell>
          <table:table-cell office:value-type="float" office:value="4651.834" calcext:value-type="float">
            <text:p>4651,834</text:p>
          </table:table-cell>
          <table:table-cell office:value-type="float" office:value="116.3885" calcext:value-type="float">
            <text:p>116,3885</text:p>
          </table:table-cell>
          <table:table-cell office:value-type="float" office:value="97.49801" calcext:value-type="float">
            <text:p>97,49801</text:p>
          </table:table-cell>
          <table:table-cell office:value-type="float" office:value="2.951857" calcext:value-type="float">
            <text:p>2,951857</text:p>
          </table:table-cell>
          <table:table-cell office:value-type="float" office:value="1.027503" calcext:value-type="float">
            <text:p>1,027503</text:p>
          </table:table-cell>
          <table:table-cell office:value-type="float" office:value="0.04860603" calcext:value-type="float">
            <text:p>0,04860603</text:p>
          </table:table-cell>
          <table:table-cell office:value-type="float" office:value="1.022671" calcext:value-type="float">
            <text:p>1,022671</text:p>
          </table:table-cell>
          <table:table-cell office:value-type="float" office:value="0.04303152" calcext:value-type="float">
            <text:p>0,04303152</text:p>
          </table:table-cell>
          <table:table-cell office:value-type="float" office:value="0.8100453" calcext:value-type="float">
            <text:p>0,8100453</text:p>
          </table:table-cell>
          <table:table-cell office:value-type="float" office:value="93.43051" calcext:value-type="float">
            <text:p>93,43051</text:p>
          </table:table-cell>
          <table:table-cell office:value-type="float" office:value="5.134676" calcext:value-type="float">
            <text:p>5,134676</text:p>
          </table:table-cell>
          <table:table-cell office:value-type="float" office:value="88.29583" calcext:value-type="float">
            <text:p>88,29583</text:p>
          </table:table-cell>
          <table:table-cell office:value-type="float" office:value="5.373418" calcext:value-type="float">
            <text:p>5,373418</text:p>
          </table:table-cell>
          <table:table-cell office:value-type="float" office:value="3.628263" calcext:value-type="float">
            <text:p>3,628263</text:p>
          </table:table-cell>
          <table:table-cell office:value-type="float" office:value="13.4773" calcext:value-type="float">
            <text:p>13,4773</text:p>
          </table:table-cell>
          <table:table-cell office:value-type="float" office:value="0.0000461754" calcext:value-type="float">
            <text:p>0,0000461754</text:p>
          </table:table-cell>
          <table:table-cell office:value-type="float" office:value="13.47734" calcext:value-type="float">
            <text:p>13,47734</text:p>
          </table:table-cell>
          <table:table-cell office:value-type="float" office:value="1.155355" calcext:value-type="float">
            <text:p>1,155355</text:p>
          </table:table-cell>
          <table:table-cell/>
          <table:table-cell table:formula="of:=([.L94]/[.D94])*100" office:value-type="float" office:value="80.2746920872767" calcext:value-type="float">
            <text:p>80,2746920872767</text:p>
          </table:table-cell>
          <table:table-cell table:formula="of:=([.O94]/[.D94])*100" office:value-type="float" office:value="4.61679461458821" calcext:value-type="float">
            <text:p>4,61679461458821</text:p>
          </table:table-cell>
          <table:table-cell table:formula="of:=([.S94]/[.D94])*100" office:value-type="float" office:value="11.5796148244887" calcext:value-type="float">
            <text:p>11,5796148244887</text:p>
          </table:table-cell>
          <table:table-cell table:formula="of:=([.F94]/[.D94])*100" office:value-type="float" office:value="2.53621019258776" calcext:value-type="float">
            <text:p>2,53621019258776</text:p>
          </table:table-cell>
          <table:table-cell table:formula="of:=([.T94]/[.D94])*100" office:value-type="float" office:value="0.992671097230397" calcext:value-type="float">
            <text:p>0,99267109723039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715.133" calcext:value-type="float">
            <text:p>4715,133</text:p>
          </table:table-cell>
          <table:table-cell office:value-type="float" office:value="4701.893" calcext:value-type="float">
            <text:p>4701,893</text:p>
          </table:table-cell>
          <table:table-cell office:value-type="float" office:value="117.898" calcext:value-type="float">
            <text:p>117,898</text:p>
          </table:table-cell>
          <table:table-cell office:value-type="float" office:value="97.49254" calcext:value-type="float">
            <text:p>97,49254</text:p>
          </table:table-cell>
          <table:table-cell office:value-type="float" office:value="3.006576" calcext:value-type="float">
            <text:p>3,006576</text:p>
          </table:table-cell>
          <table:table-cell office:value-type="float" office:value="1.049862" calcext:value-type="float">
            <text:p>1,049862</text:p>
          </table:table-cell>
          <table:table-cell office:value-type="float" office:value="0.05177203" calcext:value-type="float">
            <text:p>0,05177203</text:p>
          </table:table-cell>
          <table:table-cell office:value-type="float" office:value="1.045385" calcext:value-type="float">
            <text:p>1,045385</text:p>
          </table:table-cell>
          <table:table-cell office:value-type="float" office:value="0.04929785" calcext:value-type="float">
            <text:p>0,04929785</text:p>
          </table:table-cell>
          <table:table-cell office:value-type="float" office:value="0.8102581" calcext:value-type="float">
            <text:p>0,8102581</text:p>
          </table:table-cell>
          <table:table-cell office:value-type="float" office:value="94.62428" calcext:value-type="float">
            <text:p>94,62428</text:p>
          </table:table-cell>
          <table:table-cell office:value-type="float" office:value="5.183391" calcext:value-type="float">
            <text:p>5,183391</text:p>
          </table:table-cell>
          <table:table-cell office:value-type="float" office:value="89.44089" calcext:value-type="float">
            <text:p>89,44089</text:p>
          </table:table-cell>
          <table:table-cell office:value-type="float" office:value="5.456058" calcext:value-type="float">
            <text:p>5,456058</text:p>
          </table:table-cell>
          <table:table-cell office:value-type="float" office:value="3.581778" calcext:value-type="float">
            <text:p>3,581778</text:p>
          </table:table-cell>
          <table:table-cell office:value-type="float" office:value="13.63265" calcext:value-type="float">
            <text:p>13,63265</text:p>
          </table:table-cell>
          <table:table-cell office:value-type="float" office:value="0.0000461587" calcext:value-type="float">
            <text:p>0,0000461587</text:p>
          </table:table-cell>
          <table:table-cell office:value-type="float" office:value="13.63269" calcext:value-type="float">
            <text:p>13,63269</text:p>
          </table:table-cell>
          <table:table-cell office:value-type="float" office:value="1.178423" calcext:value-type="float">
            <text:p>1,178423</text:p>
          </table:table-cell>
          <table:table-cell/>
          <table:table-cell table:formula="of:=([.L95]/[.D95])*100" office:value-type="float" office:value="80.2594446046583" calcext:value-type="float">
            <text:p>80,2594446046583</text:p>
          </table:table-cell>
          <table:table-cell table:formula="of:=([.O95]/[.D95])*100" office:value-type="float" office:value="4.62777824899489" calcext:value-type="float">
            <text:p>4,62777824899489</text:p>
          </table:table-cell>
          <table:table-cell table:formula="of:=([.S95]/[.D95])*100" office:value-type="float" office:value="11.5631223600061" calcext:value-type="float">
            <text:p>11,5631223600061</text:p>
          </table:table-cell>
          <table:table-cell table:formula="of:=([.F95]/[.D95])*100" office:value-type="float" office:value="2.55015012977319" calcext:value-type="float">
            <text:p>2,55015012977319</text:p>
          </table:table-cell>
          <table:table-cell table:formula="of:=([.T95]/[.D95])*100" office:value-type="float" office:value="0.999527557719385" calcext:value-type="float">
            <text:p>0,99952755771938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765.424" calcext:value-type="float">
            <text:p>4765,424</text:p>
          </table:table-cell>
          <table:table-cell office:value-type="float" office:value="4751.954" calcext:value-type="float">
            <text:p>4751,954</text:p>
          </table:table-cell>
          <table:table-cell office:value-type="float" office:value="119.4157" calcext:value-type="float">
            <text:p>119,4157</text:p>
          </table:table-cell>
          <table:table-cell office:value-type="float" office:value="97.48702" calcext:value-type="float">
            <text:p>97,48702</text:p>
          </table:table-cell>
          <table:table-cell office:value-type="float" office:value="3.062463" calcext:value-type="float">
            <text:p>3,062463</text:p>
          </table:table-cell>
          <table:table-cell office:value-type="float" office:value="1.072564" calcext:value-type="float">
            <text:p>1,072564</text:p>
          </table:table-cell>
          <table:table-cell office:value-type="float" office:value="0.05569226" calcext:value-type="float">
            <text:p>0,05569226</text:p>
          </table:table-cell>
          <table:table-cell office:value-type="float" office:value="1.068399" calcext:value-type="float">
            <text:p>1,068399</text:p>
          </table:table-cell>
          <table:table-cell office:value-type="float" office:value="0.05533374" calcext:value-type="float">
            <text:p>0,05533374</text:p>
          </table:table-cell>
          <table:table-cell office:value-type="float" office:value="0.8104732" calcext:value-type="float">
            <text:p>0,8104732</text:p>
          </table:table-cell>
          <table:table-cell office:value-type="float" office:value="95.82381" calcext:value-type="float">
            <text:p>95,82381</text:p>
          </table:table-cell>
          <table:table-cell office:value-type="float" office:value="5.233003" calcext:value-type="float">
            <text:p>5,233003</text:p>
          </table:table-cell>
          <table:table-cell office:value-type="float" office:value="90.5908" calcext:value-type="float">
            <text:p>90,5908</text:p>
          </table:table-cell>
          <table:table-cell office:value-type="float" office:value="5.539715" calcext:value-type="float">
            <text:p>5,539715</text:p>
          </table:table-cell>
          <table:table-cell office:value-type="float" office:value="3.543893" calcext:value-type="float">
            <text:p>3,543893</text:p>
          </table:table-cell>
          <table:table-cell office:value-type="float" office:value="13.78794" calcext:value-type="float">
            <text:p>13,78794</text:p>
          </table:table-cell>
          <table:table-cell office:value-type="float" office:value="0.00004614258" calcext:value-type="float">
            <text:p>0,00004614258</text:p>
          </table:table-cell>
          <table:table-cell office:value-type="float" office:value="13.78798" calcext:value-type="float">
            <text:p>13,78798</text:p>
          </table:table-cell>
          <table:table-cell office:value-type="float" office:value="1.201768" calcext:value-type="float">
            <text:p>1,201768</text:p>
          </table:table-cell>
          <table:table-cell/>
          <table:table-cell table:formula="of:=([.L96]/[.D96])*100" office:value-type="float" office:value="80.243895903135" calcext:value-type="float">
            <text:p>80,243895903135</text:p>
          </table:table-cell>
          <table:table-cell table:formula="of:=([.O96]/[.D96])*100" office:value-type="float" office:value="4.63901731514365" calcext:value-type="float">
            <text:p>4,63901731514365</text:p>
          </table:table-cell>
          <table:table-cell table:formula="of:=([.S96]/[.D96])*100" office:value-type="float" office:value="11.546203723631" calcext:value-type="float">
            <text:p>11,546203723631</text:p>
          </table:table-cell>
          <table:table-cell table:formula="of:=([.F96]/[.D96])*100" office:value-type="float" office:value="2.56453967108178" calcext:value-type="float">
            <text:p>2,56453967108178</text:p>
          </table:table-cell>
          <table:table-cell table:formula="of:=([.T96]/[.D96])*100" office:value-type="float" office:value="1.00637353379832" calcext:value-type="float">
            <text:p>1,0063735337983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815.719" calcext:value-type="float">
            <text:p>4815,719</text:p>
          </table:table-cell>
          <table:table-cell office:value-type="float" office:value="4802.016" calcext:value-type="float">
            <text:p>4802,016</text:p>
          </table:table-cell>
          <table:table-cell office:value-type="float" office:value="120.9307" calcext:value-type="float">
            <text:p>120,9307</text:p>
          </table:table-cell>
          <table:table-cell office:value-type="float" office:value="97.48167" calcext:value-type="float">
            <text:p>97,48167</text:p>
          </table:table-cell>
          <table:table-cell office:value-type="float" office:value="3.109809" calcext:value-type="float">
            <text:p>3,109809</text:p>
          </table:table-cell>
          <table:table-cell office:value-type="float" office:value="1.09511" calcext:value-type="float">
            <text:p>1,09511</text:p>
          </table:table-cell>
          <table:table-cell office:value-type="float" office:value="0.05693423" calcext:value-type="float">
            <text:p>0,05693423</text:p>
          </table:table-cell>
          <table:table-cell office:value-type="float" office:value="1.090866" calcext:value-type="float">
            <text:p>1,090866</text:p>
          </table:table-cell>
          <table:table-cell office:value-type="float" office:value="0.0562083" calcext:value-type="float">
            <text:p>0,0562083</text:p>
          </table:table-cell>
          <table:table-cell office:value-type="float" office:value="0.8106906" calcext:value-type="float">
            <text:p>0,8106906</text:p>
          </table:table-cell>
          <table:table-cell office:value-type="float" office:value="97.02908" calcext:value-type="float">
            <text:p>97,02908</text:p>
          </table:table-cell>
          <table:table-cell office:value-type="float" office:value="5.28344" calcext:value-type="float">
            <text:p>5,28344</text:p>
          </table:table-cell>
          <table:table-cell office:value-type="float" office:value="91.74564" calcext:value-type="float">
            <text:p>91,74564</text:p>
          </table:table-cell>
          <table:table-cell office:value-type="float" office:value="5.623516" calcext:value-type="float">
            <text:p>5,623516</text:p>
          </table:table-cell>
          <table:table-cell office:value-type="float" office:value="3.49592" calcext:value-type="float">
            <text:p>3,49592</text:p>
          </table:table-cell>
          <table:table-cell office:value-type="float" office:value="13.94315" calcext:value-type="float">
            <text:p>13,94315</text:p>
          </table:table-cell>
          <table:table-cell office:value-type="float" office:value="0.00004612585" calcext:value-type="float">
            <text:p>0,00004612585</text:p>
          </table:table-cell>
          <table:table-cell office:value-type="float" office:value="13.9432" calcext:value-type="float">
            <text:p>13,9432</text:p>
          </table:table-cell>
          <table:table-cell office:value-type="float" office:value="1.225144" calcext:value-type="float">
            <text:p>1,225144</text:p>
          </table:table-cell>
          <table:table-cell/>
          <table:table-cell table:formula="of:=([.L97]/[.D97])*100" office:value-type="float" office:value="80.2352752444168" calcext:value-type="float">
            <text:p>80,2352752444168</text:p>
          </table:table-cell>
          <table:table-cell table:formula="of:=([.O97]/[.D97])*100" office:value-type="float" office:value="4.65019717904552" calcext:value-type="float">
            <text:p>4,65019717904552</text:p>
          </table:table-cell>
          <table:table-cell table:formula="of:=([.S97]/[.D97])*100" office:value-type="float" office:value="11.5299092786199" calcext:value-type="float">
            <text:p>11,5299092786199</text:p>
          </table:table-cell>
          <table:table-cell table:formula="of:=([.F97]/[.D97])*100" office:value-type="float" office:value="2.57156288684346" calcext:value-type="float">
            <text:p>2,57156288684346</text:p>
          </table:table-cell>
          <table:table-cell table:formula="of:=([.T97]/[.D97])*100" office:value-type="float" office:value="1.01309593014842" calcext:value-type="float">
            <text:p>1,0130959301484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866.018" calcext:value-type="float">
            <text:p>4866,018</text:p>
          </table:table-cell>
          <table:table-cell office:value-type="float" office:value="4852.079" calcext:value-type="float">
            <text:p>4852,079</text:p>
          </table:table-cell>
          <table:table-cell office:value-type="float" office:value="122.4535" calcext:value-type="float">
            <text:p>122,4535</text:p>
          </table:table-cell>
          <table:table-cell office:value-type="float" office:value="97.47627" calcext:value-type="float">
            <text:p>97,47627</text:p>
          </table:table-cell>
          <table:table-cell office:value-type="float" office:value="3.157958" calcext:value-type="float">
            <text:p>3,157958</text:p>
          </table:table-cell>
          <table:table-cell office:value-type="float" office:value="1.11786" calcext:value-type="float">
            <text:p>1,11786</text:p>
          </table:table-cell>
          <table:table-cell office:value-type="float" office:value="0.0580057" calcext:value-type="float">
            <text:p>0,0580057</text:p>
          </table:table-cell>
          <table:table-cell office:value-type="float" office:value="1.11362" calcext:value-type="float">
            <text:p>1,11362</text:p>
          </table:table-cell>
          <table:table-cell office:value-type="float" office:value="0.057562" calcext:value-type="float">
            <text:p>0,057562</text:p>
          </table:table-cell>
          <table:table-cell office:value-type="float" office:value="0.81091" calcext:value-type="float">
            <text:p>0,81091</text:p>
          </table:table-cell>
          <table:table-cell office:value-type="float" office:value="98.24009" calcext:value-type="float">
            <text:p>98,24009</text:p>
          </table:table-cell>
          <table:table-cell office:value-type="float" office:value="5.334671" calcext:value-type="float">
            <text:p>5,334671</text:p>
          </table:table-cell>
          <table:table-cell office:value-type="float" office:value="92.90542" calcext:value-type="float">
            <text:p>92,90542</text:p>
          </table:table-cell>
          <table:table-cell office:value-type="float" office:value="5.708182" calcext:value-type="float">
            <text:p>5,708182</text:p>
          </table:table-cell>
          <table:table-cell office:value-type="float" office:value="3.493523" calcext:value-type="float">
            <text:p>3,493523</text:p>
          </table:table-cell>
          <table:table-cell office:value-type="float" office:value="14.09834" calcext:value-type="float">
            <text:p>14,09834</text:p>
          </table:table-cell>
          <table:table-cell office:value-type="float" office:value="0.00004610927" calcext:value-type="float">
            <text:p>0,00004610927</text:p>
          </table:table-cell>
          <table:table-cell office:value-type="float" office:value="14.09839" calcext:value-type="float">
            <text:p>14,09839</text:p>
          </table:table-cell>
          <table:table-cell office:value-type="float" office:value="1.24884" calcext:value-type="float">
            <text:p>1,24884</text:p>
          </table:table-cell>
          <table:table-cell/>
          <table:table-cell table:formula="of:=([.L98]/[.D98])*100" office:value-type="float" office:value="80.2264451404002" calcext:value-type="float">
            <text:p>80,2264451404002</text:p>
          </table:table-cell>
          <table:table-cell table:formula="of:=([.O98]/[.D98])*100" office:value-type="float" office:value="4.66150987926029" calcext:value-type="float">
            <text:p>4,66150987926029</text:p>
          </table:table-cell>
          <table:table-cell table:formula="of:=([.S98]/[.D98])*100" office:value-type="float" office:value="11.51326013548" calcext:value-type="float">
            <text:p>11,51326013548</text:p>
          </table:table-cell>
          <table:table-cell table:formula="of:=([.F98]/[.D98])*100" office:value-type="float" office:value="2.57890382880032" calcext:value-type="float">
            <text:p>2,57890382880032</text:p>
          </table:table-cell>
          <table:table-cell table:formula="of:=([.T98]/[.D98])*100" office:value-type="float" office:value="1.01984835059839" calcext:value-type="float">
            <text:p>1,0198483505983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916.32" calcext:value-type="float">
            <text:p>4916,32</text:p>
          </table:table-cell>
          <table:table-cell office:value-type="float" office:value="4902.144" calcext:value-type="float">
            <text:p>4902,144</text:p>
          </table:table-cell>
          <table:table-cell office:value-type="float" office:value="123.9859" calcext:value-type="float">
            <text:p>123,9859</text:p>
          </table:table-cell>
          <table:table-cell office:value-type="float" office:value="97.47078" calcext:value-type="float">
            <text:p>97,47078</text:p>
          </table:table-cell>
          <table:table-cell office:value-type="float" office:value="3.20845" calcext:value-type="float">
            <text:p>3,20845</text:p>
          </table:table-cell>
          <table:table-cell office:value-type="float" office:value="1.140949" calcext:value-type="float">
            <text:p>1,140949</text:p>
          </table:table-cell>
          <table:table-cell office:value-type="float" office:value="0.05987937" calcext:value-type="float">
            <text:p>0,05987937</text:p>
          </table:table-cell>
          <table:table-cell office:value-type="float" office:value="1.136723" calcext:value-type="float">
            <text:p>1,136723</text:p>
          </table:table-cell>
          <table:table-cell office:value-type="float" office:value="0.05976655" calcext:value-type="float">
            <text:p>0,05976655</text:p>
          </table:table-cell>
          <table:table-cell office:value-type="float" office:value="0.8111318" calcext:value-type="float">
            <text:p>0,8111318</text:p>
          </table:table-cell>
          <table:table-cell office:value-type="float" office:value="99.45712" calcext:value-type="float">
            <text:p>99,45712</text:p>
          </table:table-cell>
          <table:table-cell office:value-type="float" office:value="5.386694" calcext:value-type="float">
            <text:p>5,386694</text:p>
          </table:table-cell>
          <table:table-cell office:value-type="float" office:value="94.07042" calcext:value-type="float">
            <text:p>94,07042</text:p>
          </table:table-cell>
          <table:table-cell office:value-type="float" office:value="5.79398" calcext:value-type="float">
            <text:p>5,79398</text:p>
          </table:table-cell>
          <table:table-cell office:value-type="float" office:value="3.474292" calcext:value-type="float">
            <text:p>3,474292</text:p>
          </table:table-cell>
          <table:table-cell office:value-type="float" office:value="14.25356" calcext:value-type="float">
            <text:p>14,25356</text:p>
          </table:table-cell>
          <table:table-cell office:value-type="float" office:value="0.00004609301" calcext:value-type="float">
            <text:p>0,00004609301</text:p>
          </table:table-cell>
          <table:table-cell office:value-type="float" office:value="14.25361" calcext:value-type="float">
            <text:p>14,25361</text:p>
          </table:table-cell>
          <table:table-cell office:value-type="float" office:value="1.272735" calcext:value-type="float">
            <text:p>1,272735</text:p>
          </table:table-cell>
          <table:table-cell/>
          <table:table-cell table:formula="of:=([.L99]/[.D99])*100" office:value-type="float" office:value="80.2164762283453" calcext:value-type="float">
            <text:p>80,2164762283453</text:p>
          </table:table-cell>
          <table:table-cell table:formula="of:=([.O99]/[.D99])*100" office:value-type="float" office:value="4.6730958923555" calcext:value-type="float">
            <text:p>4,6730958923555</text:p>
          </table:table-cell>
          <table:table-cell table:formula="of:=([.S99]/[.D99])*100" office:value-type="float" office:value="11.4961539981562" calcext:value-type="float">
            <text:p>11,4961539981562</text:p>
          </table:table-cell>
          <table:table-cell table:formula="of:=([.F99]/[.D99])*100" office:value-type="float" office:value="2.58775393008399" calcext:value-type="float">
            <text:p>2,58775393008399</text:p>
          </table:table-cell>
          <table:table-cell table:formula="of:=([.T99]/[.D99])*100" office:value-type="float" office:value="1.02651591834233" calcext:value-type="float">
            <text:p>1,02651591834233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966.627" calcext:value-type="float">
            <text:p>4966,627</text:p>
          </table:table-cell>
          <table:table-cell office:value-type="float" office:value="4952.21" calcext:value-type="float">
            <text:p>4952,21</text:p>
          </table:table-cell>
          <table:table-cell office:value-type="float" office:value="125.5244" calcext:value-type="float">
            <text:p>125,5244</text:p>
          </table:table-cell>
          <table:table-cell office:value-type="float" office:value="97.46528" calcext:value-type="float">
            <text:p>97,46528</text:p>
          </table:table-cell>
          <table:table-cell office:value-type="float" office:value="3.25826" calcext:value-type="float">
            <text:p>3,25826</text:p>
          </table:table-cell>
          <table:table-cell office:value-type="float" office:value="1.164222" calcext:value-type="float">
            <text:p>1,164222</text:p>
          </table:table-cell>
          <table:table-cell office:value-type="float" office:value="0.06137617" calcext:value-type="float">
            <text:p>0,06137617</text:p>
          </table:table-cell>
          <table:table-cell office:value-type="float" office:value="1.159982" calcext:value-type="float">
            <text:p>1,159982</text:p>
          </table:table-cell>
          <table:table-cell office:value-type="float" office:value="0.06132389" calcext:value-type="float">
            <text:p>0,06132389</text:p>
          </table:table-cell>
          <table:table-cell office:value-type="float" office:value="0.8113559" calcext:value-type="float">
            <text:p>0,8113559</text:p>
          </table:table-cell>
          <table:table-cell office:value-type="float" office:value="100.6799" calcext:value-type="float">
            <text:p>100,6799</text:p>
          </table:table-cell>
          <table:table-cell office:value-type="float" office:value="5.439459" calcext:value-type="float">
            <text:p>5,439459</text:p>
          </table:table-cell>
          <table:table-cell office:value-type="float" office:value="95.24045" calcext:value-type="float">
            <text:p>95,24045</text:p>
          </table:table-cell>
          <table:table-cell office:value-type="float" office:value="5.88062" calcext:value-type="float">
            <text:p>5,88062</text:p>
          </table:table-cell>
          <table:table-cell office:value-type="float" office:value="3.460524" calcext:value-type="float">
            <text:p>3,460524</text:p>
          </table:table-cell>
          <table:table-cell office:value-type="float" office:value="14.40876" calcext:value-type="float">
            <text:p>14,40876</text:p>
          </table:table-cell>
          <table:table-cell office:value-type="float" office:value="0.00004607605" calcext:value-type="float">
            <text:p>0,00004607605</text:p>
          </table:table-cell>
          <table:table-cell office:value-type="float" office:value="14.40881" calcext:value-type="float">
            <text:p>14,40881</text:p>
          </table:table-cell>
          <table:table-cell office:value-type="float" office:value="1.296846" calcext:value-type="float">
            <text:p>1,296846</text:p>
          </table:table-cell>
          <table:table-cell/>
          <table:table-cell table:formula="of:=([.L100]/[.D100])*100" office:value-type="float" office:value="80.207433773832" calcext:value-type="float">
            <text:p>80,207433773832</text:p>
          </table:table-cell>
          <table:table-cell table:formula="of:=([.O100]/[.D100])*100" office:value-type="float" office:value="4.68484215021143" calcext:value-type="float">
            <text:p>4,68484215021143</text:p>
          </table:table-cell>
          <table:table-cell table:formula="of:=([.S100]/[.D100])*100" office:value-type="float" office:value="11.4788917533165" calcext:value-type="float">
            <text:p>11,4788917533165</text:p>
          </table:table-cell>
          <table:table-cell table:formula="of:=([.F100]/[.D100])*100" office:value-type="float" office:value="2.59571844199215" calcext:value-type="float">
            <text:p>2,59571844199215</text:p>
          </table:table-cell>
          <table:table-cell table:formula="of:=([.T100]/[.D100])*100" office:value-type="float" office:value="1.0331425603309" calcext:value-type="float">
            <text:p>1,03314256033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16.937" calcext:value-type="float">
            <text:p>5016,937</text:p>
          </table:table-cell>
          <table:table-cell office:value-type="float" office:value="5002.277" calcext:value-type="float">
            <text:p>5002,277</text:p>
          </table:table-cell>
          <table:table-cell office:value-type="float" office:value="127.0723" calcext:value-type="float">
            <text:p>127,0723</text:p>
          </table:table-cell>
          <table:table-cell office:value-type="float" office:value="97.45971" calcext:value-type="float">
            <text:p>97,45971</text:p>
          </table:table-cell>
          <table:table-cell office:value-type="float" office:value="3.30999" calcext:value-type="float">
            <text:p>3,30999</text:p>
          </table:table-cell>
          <table:table-cell office:value-type="float" office:value="1.187822" calcext:value-type="float">
            <text:p>1,187822</text:p>
          </table:table-cell>
          <table:table-cell office:value-type="float" office:value="0.06353862" calcext:value-type="float">
            <text:p>0,06353862</text:p>
          </table:table-cell>
          <table:table-cell office:value-type="float" office:value="1.183557" calcext:value-type="float">
            <text:p>1,183557</text:p>
          </table:table-cell>
          <table:table-cell office:value-type="float" office:value="0.06349046" calcext:value-type="float">
            <text:p>0,06349046</text:p>
          </table:table-cell>
          <table:table-cell office:value-type="float" office:value="0.8115822" calcext:value-type="float">
            <text:p>0,8115822</text:p>
          </table:table-cell>
          <table:table-cell office:value-type="float" office:value="101.9087" calcext:value-type="float">
            <text:p>101,9087</text:p>
          </table:table-cell>
          <table:table-cell office:value-type="float" office:value="5.492986" calcext:value-type="float">
            <text:p>5,492986</text:p>
          </table:table-cell>
          <table:table-cell office:value-type="float" office:value="96.41575" calcext:value-type="float">
            <text:p>96,41575</text:p>
          </table:table-cell>
          <table:table-cell office:value-type="float" office:value="5.968305" calcext:value-type="float">
            <text:p>5,968305</text:p>
          </table:table-cell>
          <table:table-cell office:value-type="float" office:value="3.449263" calcext:value-type="float">
            <text:p>3,449263</text:p>
          </table:table-cell>
          <table:table-cell office:value-type="float" office:value="14.56404" calcext:value-type="float">
            <text:p>14,56404</text:p>
          </table:table-cell>
          <table:table-cell office:value-type="float" office:value="0.00004605945" calcext:value-type="float">
            <text:p>0,00004605945</text:p>
          </table:table-cell>
          <table:table-cell office:value-type="float" office:value="14.56409" calcext:value-type="float">
            <text:p>14,56409</text:p>
          </table:table-cell>
          <table:table-cell office:value-type="float" office:value="1.321214" calcext:value-type="float">
            <text:p>1,321214</text:p>
          </table:table-cell>
          <table:table-cell/>
          <table:table-cell table:formula="of:=([.L101]/[.D101])*100" office:value-type="float" office:value="80.1974151723074" calcext:value-type="float">
            <text:p>80,1974151723074</text:p>
          </table:table-cell>
          <table:table-cell table:formula="of:=([.O101]/[.D101])*100" office:value-type="float" office:value="4.69677892034692" calcext:value-type="float">
            <text:p>4,69677892034692</text:p>
          </table:table-cell>
          <table:table-cell table:formula="of:=([.S101]/[.D101])*100" office:value-type="float" office:value="11.4612626040451" calcext:value-type="float">
            <text:p>11,4612626040451</text:p>
          </table:table-cell>
          <table:table-cell table:formula="of:=([.F101]/[.D101])*100" office:value-type="float" office:value="2.60480844369701" calcext:value-type="float">
            <text:p>2,60480844369701</text:p>
          </table:table-cell>
          <table:table-cell table:formula="of:=([.T101]/[.D101])*100" office:value-type="float" office:value="1.03973407264998" calcext:value-type="float">
            <text:p>1,03973407264998</text:p>
          </table:table-cell>
        </table:table-row>
        <table:table-row table:style-name="ro1" table:number-rows-repeated="8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1">
            <text:p>EPC_50Hz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383.8701885464" calcext:value-type="float">
            <text:p>383,8701885464</text:p>
          </table:table-cell>
          <table:table-cell table:formula="of:=[.A112]/([.E112]/100)" office:value-type="float" office:value="407.86644108642" calcext:value-type="float">
            <text:p>407,86644108642</text:p>
          </table:table-cell>
          <table:table-cell table:formula="of:=[.A112]" office:value-type="float" office:value="383.8701885464" calcext:value-type="float">
            <text:p>383,8701885464</text:p>
          </table:table-cell>
          <table:table-cell table:formula="of:=[.B112]-[.C112]" office:value-type="float" office:value="23.9962525400197" calcext:value-type="float">
            <text:p>23,9962525400197</text:p>
          </table:table-cell>
          <table:table-cell office:value-type="float" office:value="94.1166396342632" calcext:value-type="float">
            <text:p>94,1166396342632</text:p>
          </table:table-cell>
          <table:table-cell table:number-columns-repeated="21"/>
        </table:table-row>
        <table:table-row table:style-name="ro1">
          <table:table-cell office:value-type="float" office:value="388.621728220568" calcext:value-type="float">
            <text:p>388,621728220568</text:p>
          </table:table-cell>
          <table:table-cell table:formula="of:=[.A113]/([.E113]/100)" office:value-type="float" office:value="413.33748761388" calcext:value-type="float">
            <text:p>413,33748761388</text:p>
          </table:table-cell>
          <table:table-cell table:formula="of:=[.A113]" office:value-type="float" office:value="388.621728220568" calcext:value-type="float">
            <text:p>388,621728220568</text:p>
          </table:table-cell>
          <table:table-cell table:formula="of:=[.B113]-[.C113]" office:value-type="float" office:value="24.7157593933123" calcext:value-type="float">
            <text:p>24,7157593933123</text:p>
          </table:table-cell>
          <table:table-cell office:value-type="float" office:value="94.0204408905682" calcext:value-type="float">
            <text:p>94,0204408905682</text:p>
          </table:table-cell>
          <table:table-cell table:number-columns-repeated="21"/>
        </table:table-row>
        <table:table-row table:style-name="ro1">
          <table:table-cell office:value-type="float" office:value="398.988785702322" calcext:value-type="float">
            <text:p>398,988785702322</text:p>
          </table:table-cell>
          <table:table-cell table:formula="of:=[.A114]/([.E114]/100)" office:value-type="float" office:value="423.17383283032" calcext:value-type="float">
            <text:p>423,17383283032</text:p>
          </table:table-cell>
          <table:table-cell table:formula="of:=[.A114]" office:value-type="float" office:value="398.988785702322" calcext:value-type="float">
            <text:p>398,988785702322</text:p>
          </table:table-cell>
          <table:table-cell table:formula="of:=[.B114]-[.C114]" office:value-type="float" office:value="24.1850471279982" calcext:value-type="float">
            <text:p>24,1850471279982</text:p>
          </table:table-cell>
          <table:table-cell office:value-type="float" office:value="94.2848434256341" calcext:value-type="float">
            <text:p>94,2848434256341</text:p>
          </table:table-cell>
          <table:table-cell table:number-columns-repeated="21"/>
        </table:table-row>
        <table:table-row table:style-name="ro1">
          <table:table-cell office:value-type="float" office:value="402.133657039698" calcext:value-type="float">
            <text:p>402,133657039698</text:p>
          </table:table-cell>
          <table:table-cell table:formula="of:=[.A115]/([.E115]/100)" office:value-type="float" office:value="425.752393802084" calcext:value-type="float">
            <text:p>425,752393802084</text:p>
          </table:table-cell>
          <table:table-cell table:formula="of:=[.A115]" office:value-type="float" office:value="402.133657039698" calcext:value-type="float">
            <text:p>402,133657039698</text:p>
          </table:table-cell>
          <table:table-cell table:formula="of:=[.B115]-[.C115]" office:value-type="float" office:value="23.618736762386" calcext:value-type="float">
            <text:p>23,618736762386</text:p>
          </table:table-cell>
          <table:table-cell office:value-type="float" office:value="94.4524711766235" calcext:value-type="float">
            <text:p>94,4524711766235</text:p>
          </table:table-cell>
          <table:table-cell table:number-columns-repeated="21"/>
        </table:table-row>
        <table:table-row table:style-name="ro1">
          <table:table-cell office:value-type="float" office:value="416.562386586073" calcext:value-type="float">
            <text:p>416,562386586073</text:p>
          </table:table-cell>
          <table:table-cell table:formula="of:=[.A116]/([.E116]/100)" office:value-type="float" office:value="440.311587336144" calcext:value-type="float">
            <text:p>440,311587336144</text:p>
          </table:table-cell>
          <table:table-cell table:formula="of:=[.A116]" office:value-type="float" office:value="416.562386586073" calcext:value-type="float">
            <text:p>416,562386586073</text:p>
          </table:table-cell>
          <table:table-cell table:formula="of:=[.B116]-[.C116]" office:value-type="float" office:value="23.7492007500713" calcext:value-type="float">
            <text:p>23,7492007500713</text:p>
          </table:table-cell>
          <table:table-cell office:value-type="float" office:value="94.6062739584592" calcext:value-type="float">
            <text:p>94,6062739584592</text:p>
          </table:table-cell>
          <table:table-cell table:number-columns-repeated="21"/>
        </table:table-row>
        <table:table-row table:style-name="ro1">
          <table:table-cell office:value-type="float" office:value="417.940502473658" calcext:value-type="float">
            <text:p>417,940502473658</text:p>
          </table:table-cell>
          <table:table-cell table:formula="of:=[.A117]/([.E117]/100)" office:value-type="float" office:value="441.074231726037" calcext:value-type="float">
            <text:p>441,074231726037</text:p>
          </table:table-cell>
          <table:table-cell table:formula="of:=[.A117]" office:value-type="float" office:value="417.940502473658" calcext:value-type="float">
            <text:p>417,940502473658</text:p>
          </table:table-cell>
          <table:table-cell table:formula="of:=[.B117]-[.C117]" office:value-type="float" office:value="23.1337292523787" calcext:value-type="float">
            <text:p>23,1337292523787</text:p>
          </table:table-cell>
          <table:table-cell office:value-type="float" office:value="94.7551392513114" calcext:value-type="float">
            <text:p>94,7551392513114</text:p>
          </table:table-cell>
          <table:table-cell table:number-columns-repeated="21"/>
        </table:table-row>
        <table:table-row table:style-name="ro1">
          <table:table-cell office:value-type="float" office:value="432.071145475821" calcext:value-type="float">
            <text:p>432,071145475821</text:p>
          </table:table-cell>
          <table:table-cell table:formula="of:=[.A118]/([.E118]/100)" office:value-type="float" office:value="455.307306233711" calcext:value-type="float">
            <text:p>455,307306233711</text:p>
          </table:table-cell>
          <table:table-cell table:formula="of:=[.A118]" office:value-type="float" office:value="432.071145475821" calcext:value-type="float">
            <text:p>432,071145475821</text:p>
          </table:table-cell>
          <table:table-cell table:formula="of:=[.B118]-[.C118]" office:value-type="float" office:value="23.2361607578903" calcext:value-type="float">
            <text:p>23,2361607578903</text:p>
          </table:table-cell>
          <table:table-cell office:value-type="float" office:value="94.8965983106884" calcext:value-type="float">
            <text:p>94,8965983106884</text:p>
          </table:table-cell>
          <table:table-cell table:number-columns-repeated="21"/>
        </table:table-row>
        <table:table-row table:style-name="ro1">
          <table:table-cell office:value-type="float" office:value="434.766749479286" calcext:value-type="float">
            <text:p>434,766749479286</text:p>
          </table:table-cell>
          <table:table-cell table:formula="of:=[.A119]/([.E119]/100)" office:value-type="float" office:value="457.455252610211" calcext:value-type="float">
            <text:p>457,455252610211</text:p>
          </table:table-cell>
          <table:table-cell table:formula="of:=[.A119]" office:value-type="float" office:value="434.766749479286" calcext:value-type="float">
            <text:p>434,766749479286</text:p>
          </table:table-cell>
          <table:table-cell table:formula="of:=[.B119]-[.C119]" office:value-type="float" office:value="22.6885031309255" calcext:value-type="float">
            <text:p>22,6885031309255</text:p>
          </table:table-cell>
          <table:table-cell office:value-type="float" office:value="95.0402792401079" calcext:value-type="float">
            <text:p>95,0402792401079</text:p>
          </table:table-cell>
          <table:table-cell table:number-columns-repeated="21"/>
        </table:table-row>
        <table:table-row table:style-name="ro1">
          <table:table-cell office:value-type="float" office:value="452.734868098623" calcext:value-type="float">
            <text:p>452,734868098623</text:p>
          </table:table-cell>
          <table:table-cell table:formula="of:=[.A120]/([.E120]/100)" office:value-type="float" office:value="475.329449854967" calcext:value-type="float">
            <text:p>475,329449854967</text:p>
          </table:table-cell>
          <table:table-cell table:formula="of:=[.A120]" office:value-type="float" office:value="452.734868098623" calcext:value-type="float">
            <text:p>452,734868098623</text:p>
          </table:table-cell>
          <table:table-cell table:formula="of:=[.B120]-[.C120]" office:value-type="float" office:value="22.5945817563439" calcext:value-type="float">
            <text:p>22,5945817563439</text:p>
          </table:table-cell>
          <table:table-cell office:value-type="float" office:value="95.2465428423932" calcext:value-type="float">
            <text:p>95,2465428423932</text:p>
          </table:table-cell>
          <table:table-cell table:number-columns-repeated="21"/>
        </table:table-row>
        <table:table-row table:style-name="ro1">
          <table:table-cell office:value-type="float" office:value="469.238019604211" calcext:value-type="float">
            <text:p>469,238019604211</text:p>
          </table:table-cell>
          <table:table-cell table:formula="of:=[.A121]/([.E121]/100)" office:value-type="float" office:value="491.576259315488" calcext:value-type="float">
            <text:p>491,576259315488</text:p>
          </table:table-cell>
          <table:table-cell table:formula="of:=[.A121]" office:value-type="float" office:value="469.238019604211" calcext:value-type="float">
            <text:p>469,238019604211</text:p>
          </table:table-cell>
          <table:table-cell table:formula="of:=[.B121]-[.C121]" office:value-type="float" office:value="22.3382397112772" calcext:value-type="float">
            <text:p>22,3382397112772</text:p>
          </table:table-cell>
          <table:table-cell office:value-type="float" office:value="95.4557936255134" calcext:value-type="float">
            <text:p>95,4557936255134</text:p>
          </table:table-cell>
          <table:table-cell table:number-columns-repeated="21"/>
        </table:table-row>
        <table:table-row table:style-name="ro1">
          <table:table-cell office:value-type="float" office:value="491.620668291683" calcext:value-type="float">
            <text:p>491,620668291683</text:p>
          </table:table-cell>
          <table:table-cell table:formula="of:=[.A122]/([.E122]/100)" office:value-type="float" office:value="514.194651044528" calcext:value-type="float">
            <text:p>514,194651044528</text:p>
          </table:table-cell>
          <table:table-cell table:formula="of:=[.A122]" office:value-type="float" office:value="491.620668291683" calcext:value-type="float">
            <text:p>491,620668291683</text:p>
          </table:table-cell>
          <table:table-cell table:formula="of:=[.B122]-[.C122]" office:value-type="float" office:value="22.5739827528453" calcext:value-type="float">
            <text:p>22,5739827528453</text:p>
          </table:table-cell>
          <table:table-cell office:value-type="float" office:value="95.6098371099371" calcext:value-type="float">
            <text:p>95,6098371099371</text:p>
          </table:table-cell>
          <table:table-cell table:number-columns-repeated="21"/>
        </table:table-row>
        <table:table-row table:style-name="ro1">
          <table:table-cell office:value-type="float" office:value="521.703549217024" calcext:value-type="float">
            <text:p>521,703549217024</text:p>
          </table:table-cell>
          <table:table-cell table:formula="of:=[.A123]/([.E123]/100)" office:value-type="float" office:value="544.738016083655" calcext:value-type="float">
            <text:p>544,738016083655</text:p>
          </table:table-cell>
          <table:table-cell table:formula="of:=[.A123]" office:value-type="float" office:value="521.703549217024" calcext:value-type="float">
            <text:p>521,703549217024</text:p>
          </table:table-cell>
          <table:table-cell table:formula="of:=[.B123]-[.C123]" office:value-type="float" office:value="23.0344668666309" calcext:value-type="float">
            <text:p>23,0344668666309</text:p>
          </table:table-cell>
          <table:table-cell office:value-type="float" office:value="95.7714596399504" calcext:value-type="float">
            <text:p>95,7714596399504</text:p>
          </table:table-cell>
          <table:table-cell table:number-columns-repeated="21"/>
        </table:table-row>
        <table:table-row table:style-name="ro1">
          <table:table-cell office:value-type="float" office:value="542.433802074882" calcext:value-type="float">
            <text:p>542,433802074882</text:p>
          </table:table-cell>
          <table:table-cell table:formula="of:=[.A124]/([.E124]/100)" office:value-type="float" office:value="565.518741348462" calcext:value-type="float">
            <text:p>565,518741348462</text:p>
          </table:table-cell>
          <table:table-cell table:formula="of:=[.A124]" office:value-type="float" office:value="542.433802074882" calcext:value-type="float">
            <text:p>542,433802074882</text:p>
          </table:table-cell>
          <table:table-cell table:formula="of:=[.B124]-[.C124]" office:value-type="float" office:value="23.0849392735795" calcext:value-type="float">
            <text:p>23,0849392735795</text:p>
          </table:table-cell>
          <table:table-cell office:value-type="float" office:value="95.9179179069231" calcext:value-type="float">
            <text:p>95,9179179069231</text:p>
          </table:table-cell>
          <table:table-cell table:number-columns-repeated="21"/>
        </table:table-row>
        <table:table-row table:style-name="ro1">
          <table:table-cell office:value-type="float" office:value="571.08479640021" calcext:value-type="float">
            <text:p>571,08479640021</text:p>
          </table:table-cell>
          <table:table-cell table:formula="of:=[.A125]/([.E125]/100)" office:value-type="float" office:value="594.425206417014" calcext:value-type="float">
            <text:p>594,425206417014</text:p>
          </table:table-cell>
          <table:table-cell table:formula="of:=[.A125]" office:value-type="float" office:value="571.08479640021" calcext:value-type="float">
            <text:p>571,08479640021</text:p>
          </table:table-cell>
          <table:table-cell table:formula="of:=[.B125]-[.C125]" office:value-type="float" office:value="23.3404100168038" calcext:value-type="float">
            <text:p>23,3404100168038</text:p>
          </table:table-cell>
          <table:table-cell office:value-type="float" office:value="96.073448809903" calcext:value-type="float">
            <text:p>96,073448809903</text:p>
          </table:table-cell>
          <table:table-cell table:number-columns-repeated="21"/>
        </table:table-row>
        <table:table-row table:style-name="ro1">
          <table:table-cell office:value-type="float" office:value="591.813761889517" calcext:value-type="float">
            <text:p>591,813761889517</text:p>
          </table:table-cell>
          <table:table-cell table:formula="of:=[.A126]/([.E126]/100)" office:value-type="float" office:value="615.084653290535" calcext:value-type="float">
            <text:p>615,084653290535</text:p>
          </table:table-cell>
          <table:table-cell table:formula="of:=[.A126]" office:value-type="float" office:value="591.813761889517" calcext:value-type="float">
            <text:p>591,813761889517</text:p>
          </table:table-cell>
          <table:table-cell table:formula="of:=[.B126]-[.C126]" office:value-type="float" office:value="23.2708914010183" calcext:value-type="float">
            <text:p>23,2708914010183</text:p>
          </table:table-cell>
          <table:table-cell office:value-type="float" office:value="96.2166359904242" calcext:value-type="float">
            <text:p>96,2166359904242</text:p>
          </table:table-cell>
          <table:table-cell table:number-columns-repeated="21"/>
        </table:table-row>
        <table:table-row table:style-name="ro1">
          <table:table-cell office:value-type="float" office:value="620.460772659333" calcext:value-type="float">
            <text:p>620,460772659333</text:p>
          </table:table-cell>
          <table:table-cell table:formula="of:=[.A127]/([.E127]/100)" office:value-type="float" office:value="643.88501966248" calcext:value-type="float">
            <text:p>643,88501966248</text:p>
          </table:table-cell>
          <table:table-cell table:formula="of:=[.A127]" office:value-type="float" office:value="620.460772659333" calcext:value-type="float">
            <text:p>620,460772659333</text:p>
          </table:table-cell>
          <table:table-cell table:formula="of:=[.B127]-[.C127]" office:value-type="float" office:value="23.4242470031465" calcext:value-type="float">
            <text:p>23,4242470031465</text:p>
          </table:table-cell>
          <table:table-cell office:value-type="float" office:value="96.362045040988" calcext:value-type="float">
            <text:p>96,362045040988</text:p>
          </table:table-cell>
          <table:table-cell table:number-columns-repeated="21"/>
        </table:table-row>
        <table:table-row table:style-name="ro1">
          <table:table-cell office:value-type="float" office:value="642.071085231823" calcext:value-type="float">
            <text:p>642,071085231823</text:p>
          </table:table-cell>
          <table:table-cell table:formula="of:=[.A128]/([.E128]/100)" office:value-type="float" office:value="665.293461023477" calcext:value-type="float">
            <text:p>665,293461023477</text:p>
          </table:table-cell>
          <table:table-cell table:formula="of:=[.A128]" office:value-type="float" office:value="642.071085231823" calcext:value-type="float">
            <text:p>642,071085231823</text:p>
          </table:table-cell>
          <table:table-cell table:formula="of:=[.B128]-[.C128]" office:value-type="float" office:value="23.2223757916545" calcext:value-type="float">
            <text:p>23,2223757916545</text:p>
          </table:table-cell>
          <table:table-cell office:value-type="float" office:value="96.50945377459" calcext:value-type="float">
            <text:p>96,50945377459</text:p>
          </table:table-cell>
          <table:table-cell table:number-columns-repeated="21"/>
        </table:table-row>
        <table:table-row table:style-name="ro1">
          <table:table-cell office:value-type="float" office:value="666.75757709907" calcext:value-type="float">
            <text:p>666,75757709907</text:p>
          </table:table-cell>
          <table:table-cell table:formula="of:=[.A129]/([.E129]/100)" office:value-type="float" office:value="689.868517196497" calcext:value-type="float">
            <text:p>689,868517196497</text:p>
          </table:table-cell>
          <table:table-cell table:formula="of:=[.A129]" office:value-type="float" office:value="666.75757709907" calcext:value-type="float">
            <text:p>666,75757709907</text:p>
          </table:table-cell>
          <table:table-cell table:formula="of:=[.B129]-[.C129]" office:value-type="float" office:value="23.1109400974274" calcext:value-type="float">
            <text:p>23,1109400974274</text:p>
          </table:table-cell>
          <table:table-cell office:value-type="float" office:value="96.6499500236152" calcext:value-type="float">
            <text:p>96,6499500236152</text:p>
          </table:table-cell>
          <table:table-cell table:number-columns-repeated="21"/>
        </table:table-row>
        <table:table-row table:style-name="ro1">
          <table:table-cell office:value-type="float" office:value="697.591054613882" calcext:value-type="float">
            <text:p>697,591054613882</text:p>
          </table:table-cell>
          <table:table-cell table:formula="of:=[.A130]/([.E130]/100)" office:value-type="float" office:value="720.927706918649" calcext:value-type="float">
            <text:p>720,927706918649</text:p>
          </table:table-cell>
          <table:table-cell table:formula="of:=[.A130]" office:value-type="float" office:value="697.591054613882" calcext:value-type="float">
            <text:p>697,591054613882</text:p>
          </table:table-cell>
          <table:table-cell table:formula="of:=[.B130]-[.C130]" office:value-type="float" office:value="23.3366523047666" calcext:value-type="float">
            <text:p>23,3366523047666</text:p>
          </table:table-cell>
          <table:table-cell office:value-type="float" office:value="96.7629691464473" calcext:value-type="float">
            <text:p>96,7629691464473</text:p>
          </table:table-cell>
          <table:table-cell table:number-columns-repeated="21"/>
        </table:table-row>
        <table:table-row table:style-name="ro1">
          <table:table-cell office:value-type="float" office:value="728.423715985614" calcext:value-type="float">
            <text:p>728,423715985614</text:p>
          </table:table-cell>
          <table:table-cell table:formula="of:=[.A131]/([.E131]/100)" office:value-type="float" office:value="751.929680518748" calcext:value-type="float">
            <text:p>751,929680518748</text:p>
          </table:table-cell>
          <table:table-cell table:formula="of:=[.A131]" office:value-type="float" office:value="728.423715985614" calcext:value-type="float">
            <text:p>728,423715985614</text:p>
          </table:table-cell>
          <table:table-cell table:formula="of:=[.B131]-[.C131]" office:value-type="float" office:value="23.5059645331344" calcext:value-type="float">
            <text:p>23,5059645331344</text:p>
          </table:table-cell>
          <table:table-cell office:value-type="float" office:value="96.8739145239063" calcext:value-type="float">
            <text:p>96,8739145239063</text:p>
          </table:table-cell>
          <table:table-cell table:number-columns-repeated="21"/>
        </table:table-row>
        <table:table-row table:style-name="ro1">
          <table:table-cell office:value-type="float" office:value="756.171254494664" calcext:value-type="float">
            <text:p>756,171254494664</text:p>
          </table:table-cell>
          <table:table-cell table:formula="of:=[.A132]/([.E132]/100)" office:value-type="float" office:value="779.806828328655" calcext:value-type="float">
            <text:p>779,806828328655</text:p>
          </table:table-cell>
          <table:table-cell table:formula="of:=[.A132]" office:value-type="float" office:value="756.171254494664" calcext:value-type="float">
            <text:p>756,171254494664</text:p>
          </table:table-cell>
          <table:table-cell table:formula="of:=[.B132]-[.C132]" office:value-type="float" office:value="23.635573833991" calcext:value-type="float">
            <text:p>23,635573833991</text:p>
          </table:table-cell>
          <table:table-cell office:value-type="float" office:value="96.9690475928957" calcext:value-type="float">
            <text:p>96,9690475928957</text:p>
          </table:table-cell>
          <table:table-cell table:number-columns-repeated="21"/>
        </table:table-row>
        <table:table-row table:style-name="ro1">
          <table:table-cell office:value-type="float" office:value="787.008710706994" calcext:value-type="float">
            <text:p>787,008710706994</text:p>
          </table:table-cell>
          <table:table-cell table:formula="of:=[.A133]/([.E133]/100)" office:value-type="float" office:value="810.578917180599" calcext:value-type="float">
            <text:p>810,578917180599</text:p>
          </table:table-cell>
          <table:table-cell table:formula="of:=[.A133]" office:value-type="float" office:value="787.008710706994" calcext:value-type="float">
            <text:p>787,008710706994</text:p>
          </table:table-cell>
          <table:table-cell table:formula="of:=[.B133]-[.C133]" office:value-type="float" office:value="23.5702064736051" calcext:value-type="float">
            <text:p>23,5702064736051</text:p>
          </table:table-cell>
          <table:table-cell office:value-type="float" office:value="97.0921762244214" calcext:value-type="float">
            <text:p>97,0921762244214</text:p>
          </table:table-cell>
          <table:table-cell table:number-columns-repeated="21"/>
        </table:table-row>
        <table:table-row table:style-name="ro1">
          <table:table-cell office:value-type="float" office:value="820.920883957728" calcext:value-type="float">
            <text:p>820,920883957728</text:p>
          </table:table-cell>
          <table:table-cell table:formula="of:=[.A134]/([.E134]/100)" office:value-type="float" office:value="844.528175028159" calcext:value-type="float">
            <text:p>844,528175028159</text:p>
          </table:table-cell>
          <table:table-cell table:formula="of:=[.A134]" office:value-type="float" office:value="820.920883957728" calcext:value-type="float">
            <text:p>820,920883957728</text:p>
          </table:table-cell>
          <table:table-cell table:formula="of:=[.B134]-[.C134]" office:value-type="float" office:value="23.607291070431" calcext:value-type="float">
            <text:p>23,607291070431</text:p>
          </table:table-cell>
          <table:table-cell office:value-type="float" office:value="97.2046769109102" calcext:value-type="float">
            <text:p>97,2046769109102</text:p>
          </table:table-cell>
          <table:table-cell table:number-columns-repeated="21"/>
        </table:table-row>
        <table:table-row table:style-name="ro1">
          <table:table-cell office:value-type="float" office:value="857.915950251655" calcext:value-type="float">
            <text:p>857,915950251655</text:p>
          </table:table-cell>
          <table:table-cell table:formula="of:=[.A135]/([.E135]/100)" office:value-type="float" office:value="881.474917610744" calcext:value-type="float">
            <text:p>881,474917610744</text:p>
          </table:table-cell>
          <table:table-cell table:formula="of:=[.A135]" office:value-type="float" office:value="857.915950251655" calcext:value-type="float">
            <text:p>857,915950251655</text:p>
          </table:table-cell>
          <table:table-cell table:formula="of:=[.B135]-[.C135]" office:value-type="float" office:value="23.5589673590887" calcext:value-type="float">
            <text:p>23,5589673590887</text:p>
          </table:table-cell>
          <table:table-cell office:value-type="float" office:value="97.3273241372601" calcext:value-type="float">
            <text:p>97,3273241372601</text:p>
          </table:table-cell>
          <table:table-cell table:number-columns-repeated="21"/>
        </table:table-row>
        <table:table-row table:style-name="ro1">
          <table:table-cell office:value-type="float" office:value="910.30038536182" calcext:value-type="float">
            <text:p>910,30038536182</text:p>
          </table:table-cell>
          <table:table-cell table:formula="of:=[.A136]/([.E136]/100)" office:value-type="float" office:value="934.245696819835" calcext:value-type="float">
            <text:p>934,245696819835</text:p>
          </table:table-cell>
          <table:table-cell table:formula="of:=[.A136]" office:value-type="float" office:value="910.30038536182" calcext:value-type="float">
            <text:p>910,30038536182</text:p>
          </table:table-cell>
          <table:table-cell table:formula="of:=[.B136]-[.C136]" office:value-type="float" office:value="23.9453114580153" calcext:value-type="float">
            <text:p>23,9453114580153</text:p>
          </table:table-cell>
          <table:table-cell office:value-type="float" office:value="97.4369363926936" calcext:value-type="float">
            <text:p>97,4369363926936</text:p>
          </table:table-cell>
          <table:table-cell table:number-columns-repeated="21"/>
        </table:table-row>
        <table:table-row table:style-name="ro1">
          <table:table-cell office:value-type="float" office:value="968.844595599809" calcext:value-type="float">
            <text:p>968,844595599809</text:p>
          </table:table-cell>
          <table:table-cell table:formula="of:=[.A137]/([.E137]/100)" office:value-type="float" office:value="993.161474701445" calcext:value-type="float">
            <text:p>993,161474701445</text:p>
          </table:table-cell>
          <table:table-cell table:formula="of:=[.A137]" office:value-type="float" office:value="968.844595599809" calcext:value-type="float">
            <text:p>968,844595599809</text:p>
          </table:table-cell>
          <table:table-cell table:formula="of:=[.B137]-[.C137]" office:value-type="float" office:value="24.3168791016357" calcext:value-type="float">
            <text:p>24,3168791016357</text:p>
          </table:table-cell>
          <table:table-cell office:value-type="float" office:value="97.5515684285936" calcext:value-type="float">
            <text:p>97,5515684285936</text:p>
          </table:table-cell>
          <table:table-cell table:number-columns-repeated="21"/>
        </table:table-row>
        <table:table-row table:style-name="ro1">
          <table:table-cell office:value-type="float" office:value="1027.38835242498" calcext:value-type="float">
            <text:p>1027,38835242498</text:p>
          </table:table-cell>
          <table:table-cell table:formula="of:=[.A138]/([.E138]/100)" office:value-type="float" office:value="1051.95089689437" calcext:value-type="float">
            <text:p>1051,95089689437</text:p>
          </table:table-cell>
          <table:table-cell table:formula="of:=[.A138]" office:value-type="float" office:value="1027.38835242498" calcext:value-type="float">
            <text:p>1027,38835242498</text:p>
          </table:table-cell>
          <table:table-cell table:formula="of:=[.B138]-[.C138]" office:value-type="float" office:value="24.5625444693935" calcext:value-type="float">
            <text:p>24,5625444693935</text:p>
          </table:table-cell>
          <table:table-cell office:value-type="float" office:value="97.6650483837308" calcext:value-type="float">
            <text:p>97,6650483837308</text:p>
          </table:table-cell>
          <table:table-cell table:number-columns-repeated="21"/>
        </table:table-row>
        <table:table-row table:style-name="ro1">
          <table:table-cell office:value-type="float" office:value="1092.08698221985" calcext:value-type="float">
            <text:p>1092,08698221985</text:p>
          </table:table-cell>
          <table:table-cell table:formula="of:=[.A139]/([.E139]/100)" office:value-type="float" office:value="1116.98351512294" calcext:value-type="float">
            <text:p>1116,98351512294</text:p>
          </table:table-cell>
          <table:table-cell table:formula="of:=[.A139]" office:value-type="float" office:value="1092.08698221985" calcext:value-type="float">
            <text:p>1092,08698221985</text:p>
          </table:table-cell>
          <table:table-cell table:formula="of:=[.B139]-[.C139]" office:value-type="float" office:value="24.8965329030914" calcext:value-type="float">
            <text:p>24,8965329030914</text:p>
          </table:table-cell>
          <table:table-cell office:value-type="float" office:value="97.7710921812171" calcext:value-type="float">
            <text:p>97,7710921812171</text:p>
          </table:table-cell>
          <table:table-cell table:number-columns-repeated="21"/>
        </table:table-row>
        <table:table-row table:style-name="ro1">
          <table:table-cell office:value-type="float" office:value="1159.85968912276" calcext:value-type="float">
            <text:p>1159,85968912276</text:p>
          </table:table-cell>
          <table:table-cell table:formula="of:=[.A140]/([.E140]/100)" office:value-type="float" office:value="1185.16434606417" calcext:value-type="float">
            <text:p>1185,16434606417</text:p>
          </table:table-cell>
          <table:table-cell table:formula="of:=[.A140]" office:value-type="float" office:value="1159.85968912276" calcext:value-type="float">
            <text:p>1159,85968912276</text:p>
          </table:table-cell>
          <table:table-cell table:formula="of:=[.B140]-[.C140]" office:value-type="float" office:value="25.3046569414075" calcext:value-type="float">
            <text:p>25,3046569414075</text:p>
          </table:table-cell>
          <table:table-cell office:value-type="float" office:value="97.8648820287716" calcext:value-type="float">
            <text:p>97,8648820287716</text:p>
          </table:table-cell>
          <table:table-cell table:number-columns-repeated="21"/>
        </table:table-row>
        <table:table-row table:style-name="ro1">
          <table:table-cell office:value-type="float" office:value="1227.6327669998" calcext:value-type="float">
            <text:p>1227,6327669998</text:p>
          </table:table-cell>
          <table:table-cell table:formula="of:=[.A141]/([.E141]/100)" office:value-type="float" office:value="1253.20293818831" calcext:value-type="float">
            <text:p>1253,20293818831</text:p>
          </table:table-cell>
          <table:table-cell table:formula="of:=[.A141]" office:value-type="float" office:value="1227.6327669998" calcext:value-type="float">
            <text:p>1227,6327669998</text:p>
          </table:table-cell>
          <table:table-cell table:formula="of:=[.B141]-[.C141]" office:value-type="float" office:value="25.5701711885147" calcext:value-type="float">
            <text:p>25,5701711885147</text:p>
          </table:table-cell>
          <table:table-cell office:value-type="float" office:value="97.9596144878594" calcext:value-type="float">
            <text:p>97,9596144878594</text:p>
          </table:table-cell>
          <table:table-cell table:number-columns-repeated="21"/>
        </table:table-row>
        <table:table-row table:style-name="ro1">
          <table:table-cell office:value-type="float" office:value="1295.3999092908" calcext:value-type="float">
            <text:p>1295,3999092908</text:p>
          </table:table-cell>
          <table:table-cell table:formula="of:=[.A142]/([.E142]/100)" office:value-type="float" office:value="1321.30724067014" calcext:value-type="float">
            <text:p>1321,30724067014</text:p>
          </table:table-cell>
          <table:table-cell table:formula="of:=[.A142]" office:value-type="float" office:value="1295.3999092908" calcext:value-type="float">
            <text:p>1295,3999092908</text:p>
          </table:table-cell>
          <table:table-cell table:formula="of:=[.B142]-[.C142]" office:value-type="float" office:value="25.9073313793419" calcext:value-type="float">
            <text:p>25,9073313793419</text:p>
          </table:table-cell>
          <table:table-cell office:value-type="float" office:value="98.0392651624158" calcext:value-type="float">
            <text:p>98,0392651624158</text:p>
          </table:table-cell>
          <table:table-cell table:number-columns-repeated="21"/>
        </table:table-row>
        <table:table-row table:style-name="ro1">
          <table:table-cell office:value-type="float" office:value="1363.16278537933" calcext:value-type="float">
            <text:p>1363,16278537933</text:p>
          </table:table-cell>
          <table:table-cell table:formula="of:=[.A143]/([.E143]/100)" office:value-type="float" office:value="1389.45012854796" calcext:value-type="float">
            <text:p>1389,45012854796</text:p>
          </table:table-cell>
          <table:table-cell table:formula="of:=[.A143]" office:value-type="float" office:value="1363.16278537933" calcext:value-type="float">
            <text:p>1363,16278537933</text:p>
          </table:table-cell>
          <table:table-cell table:formula="of:=[.B143]-[.C143]" office:value-type="float" office:value="26.2873431686251" calcext:value-type="float">
            <text:p>26,2873431686251</text:p>
          </table:table-cell>
          <table:table-cell office:value-type="float" office:value="98.1080758043402" calcext:value-type="float">
            <text:p>98,1080758043402</text:p>
          </table:table-cell>
          <table:table-cell table:number-columns-repeated="21"/>
        </table:table-row>
        <table:table-row table:style-name="ro1">
          <table:table-cell office:value-type="float" office:value="1430.92529049373" calcext:value-type="float">
            <text:p>1430,92529049373</text:p>
          </table:table-cell>
          <table:table-cell table:formula="of:=[.A144]/([.E144]/100)" office:value-type="float" office:value="1457.51111178777" calcext:value-type="float">
            <text:p>1457,51111178777</text:p>
          </table:table-cell>
          <table:table-cell table:formula="of:=[.A144]" office:value-type="float" office:value="1430.92529049373" calcext:value-type="float">
            <text:p>1430,92529049373</text:p>
          </table:table-cell>
          <table:table-cell table:formula="of:=[.B144]-[.C144]" office:value-type="float" office:value="26.5858212940398" calcext:value-type="float">
            <text:p>26,5858212940398</text:p>
          </table:table-cell>
          <table:table-cell office:value-type="float" office:value="98.1759438347314" calcext:value-type="float">
            <text:p>98,1759438347314</text:p>
          </table:table-cell>
          <table:table-cell table:number-columns-repeated="21"/>
        </table:table-row>
        <table:table-row table:style-name="ro1">
          <table:table-cell office:value-type="float" office:value="1497.4482041096" calcext:value-type="float">
            <text:p>1497,4482041096</text:p>
          </table:table-cell>
          <table:table-cell table:formula="of:=[.A145]/([.E145]/100)" office:value-type="float" office:value="1524.53299129028" calcext:value-type="float">
            <text:p>1524,53299129028</text:p>
          </table:table-cell>
          <table:table-cell table:formula="of:=[.A145]" office:value-type="float" office:value="1497.4482041096" calcext:value-type="float">
            <text:p>1497,4482041096</text:p>
          </table:table-cell>
          <table:table-cell table:formula="of:=[.B145]-[.C145]" office:value-type="float" office:value="27.0847871806755" calcext:value-type="float">
            <text:p>27,0847871806755</text:p>
          </table:table-cell>
          <table:table-cell office:value-type="float" office:value="98.2234043254287" calcext:value-type="float">
            <text:p>98,2234043254287</text:p>
          </table:table-cell>
          <table:table-cell table:number-columns-repeated="21"/>
        </table:table-row>
        <table:table-row table:style-name="ro1">
          <table:table-cell office:value-type="float" office:value="1566.44065539522" calcext:value-type="float">
            <text:p>1566,44065539522</text:p>
          </table:table-cell>
          <table:table-cell table:formula="of:=[.A146]/([.E146]/100)" office:value-type="float" office:value="1593.73865743593" calcext:value-type="float">
            <text:p>1593,73865743593</text:p>
          </table:table-cell>
          <table:table-cell table:formula="of:=[.A146]" office:value-type="float" office:value="1566.44065539522" calcext:value-type="float">
            <text:p>1566,44065539522</text:p>
          </table:table-cell>
          <table:table-cell table:formula="of:=[.B146]-[.C146]" office:value-type="float" office:value="27.2980020407078" calcext:value-type="float">
            <text:p>27,2980020407078</text:p>
          </table:table-cell>
          <table:table-cell office:value-type="float" office:value="98.2871719956504" calcext:value-type="float">
            <text:p>98,2871719956504</text:p>
          </table:table-cell>
          <table:table-cell table:number-columns-repeated="21"/>
        </table:table-row>
        <table:table-row table:style-name="ro1">
          <table:table-cell office:value-type="float" office:value="1634.1940716435" calcext:value-type="float">
            <text:p>1634,1940716435</text:p>
          </table:table-cell>
          <table:table-cell table:formula="of:=[.A147]/([.E147]/100)" office:value-type="float" office:value="1661.91572260853" calcext:value-type="float">
            <text:p>1661,91572260853</text:p>
          </table:table-cell>
          <table:table-cell table:formula="of:=[.A147]" office:value-type="float" office:value="1634.1940716435" calcext:value-type="float">
            <text:p>1634,1940716435</text:p>
          </table:table-cell>
          <table:table-cell table:formula="of:=[.B147]-[.C147]" office:value-type="float" office:value="27.7216509650327" calcext:value-type="float">
            <text:p>27,7216509650327</text:p>
          </table:table-cell>
          <table:table-cell office:value-type="float" office:value="98.331946043478" calcext:value-type="float">
            <text:p>98,331946043478</text:p>
          </table:table-cell>
          <table:table-cell table:number-columns-repeated="21"/>
        </table:table-row>
        <table:table-row table:style-name="ro1">
          <table:table-cell office:value-type="float" office:value="1701.94804435297" calcext:value-type="float">
            <text:p>1701,94804435297</text:p>
          </table:table-cell>
          <table:table-cell table:formula="of:=[.A148]/([.E148]/100)" office:value-type="float" office:value="1730.00643029486" calcext:value-type="float">
            <text:p>1730,00643029486</text:p>
          </table:table-cell>
          <table:table-cell table:formula="of:=[.A148]" office:value-type="float" office:value="1701.94804435297" calcext:value-type="float">
            <text:p>1701,94804435297</text:p>
          </table:table-cell>
          <table:table-cell table:formula="of:=[.B148]-[.C148]" office:value-type="float" office:value="28.0583859418939" calcext:value-type="float">
            <text:p>28,0583859418939</text:p>
          </table:table-cell>
          <table:table-cell office:value-type="float" office:value="98.3781340086053" calcext:value-type="float">
            <text:p>98,3781340086053</text:p>
          </table:table-cell>
          <table:table-cell table:number-columns-repeated="21"/>
        </table:table-row>
        <table:table-row table:style-name="ro1">
          <table:table-cell office:value-type="float" office:value="1769.69737988584" calcext:value-type="float">
            <text:p>1769,69737988584</text:p>
          </table:table-cell>
          <table:table-cell table:formula="of:=[.A149]/([.E149]/100)" office:value-type="float" office:value="1798.24379285592" calcext:value-type="float">
            <text:p>1798,24379285592</text:p>
          </table:table-cell>
          <table:table-cell table:formula="of:=[.A149]" office:value-type="float" office:value="1769.69737988584" calcext:value-type="float">
            <text:p>1769,69737988584</text:p>
          </table:table-cell>
          <table:table-cell table:formula="of:=[.B149]-[.C149]" office:value-type="float" office:value="28.5464129700797" calcext:value-type="float">
            <text:p>28,5464129700797</text:p>
          </table:table-cell>
          <table:table-cell office:value-type="float" office:value="98.4125393295676" calcext:value-type="float">
            <text:p>98,4125393295676</text:p>
          </table:table-cell>
          <table:table-cell table:number-columns-repeated="21"/>
        </table:table-row>
        <table:table-row table:style-name="ro1">
          <table:table-cell office:value-type="float" office:value="1837.44727187991" calcext:value-type="float">
            <text:p>1837,44727187991</text:p>
          </table:table-cell>
          <table:table-cell table:formula="of:=[.A150]/([.E150]/100)" office:value-type="float" office:value="1866.40721959212" calcext:value-type="float">
            <text:p>1866,40721959212</text:p>
          </table:table-cell>
          <table:table-cell table:formula="of:=[.A150]" office:value-type="float" office:value="1837.44727187991" calcext:value-type="float">
            <text:p>1837,44727187991</text:p>
          </table:table-cell>
          <table:table-cell table:formula="of:=[.B150]-[.C150]" office:value-type="float" office:value="28.959947712211" calcext:value-type="float">
            <text:p>28,959947712211</text:p>
          </table:table-cell>
          <table:table-cell office:value-type="float" office:value="98.4483585678296" calcext:value-type="float">
            <text:p>98,4483585678296</text:p>
          </table:table-cell>
          <table:table-cell table:number-columns-repeated="21"/>
        </table:table-row>
        <table:table-row table:style-name="ro1">
          <table:table-cell office:value-type="float" office:value="1905.19734936104" calcext:value-type="float">
            <text:p>1905,19734936104</text:p>
          </table:table-cell>
          <table:table-cell table:formula="of:=[.A151]/([.E151]/100)" office:value-type="float" office:value="1934.511994044" calcext:value-type="float">
            <text:p>1934,511994044</text:p>
          </table:table-cell>
          <table:table-cell table:formula="of:=[.A151]" office:value-type="float" office:value="1905.19734936104" calcext:value-type="float">
            <text:p>1905,19734936104</text:p>
          </table:table-cell>
          <table:table-cell table:formula="of:=[.B151]-[.C151]" office:value-type="float" office:value="29.3146446829553" calcext:value-type="float">
            <text:p>29,3146446829553</text:p>
          </table:table-cell>
          <table:table-cell office:value-type="float" office:value="98.4846491118582" calcext:value-type="float">
            <text:p>98,4846491118582</text:p>
          </table:table-cell>
          <table:table-cell table:number-columns-repeated="21"/>
        </table:table-row>
        <table:table-row table:style-name="ro1">
          <table:table-cell office:value-type="float" office:value="1972.9370395666" calcext:value-type="float">
            <text:p>1972,9370395666</text:p>
          </table:table-cell>
          <table:table-cell table:formula="of:=[.A152]/([.E152]/100)" office:value-type="float" office:value="2003.09266757875" calcext:value-type="float">
            <text:p>2003,09266757875</text:p>
          </table:table-cell>
          <table:table-cell table:formula="of:=[.A152]" office:value-type="float" office:value="1972.9370395666" calcext:value-type="float">
            <text:p>1972,9370395666</text:p>
          </table:table-cell>
          <table:table-cell table:formula="of:=[.B152]-[.C152]" office:value-type="float" office:value="30.1556280121483" calcext:value-type="float">
            <text:p>30,1556280121483</text:p>
          </table:table-cell>
          <table:table-cell office:value-type="float" office:value="98.494546532957" calcext:value-type="float">
            <text:p>98,494546532957</text:p>
          </table:table-cell>
          <table:table-cell table:number-columns-repeated="21"/>
        </table:table-row>
        <table:table-row table:style-name="ro1">
          <table:table-cell office:value-type="float" office:value="2040.68043951343" calcext:value-type="float">
            <text:p>2040,68043951343</text:p>
          </table:table-cell>
          <table:table-cell table:formula="of:=[.A153]/([.E153]/100)" office:value-type="float" office:value="2071.46510240242" calcext:value-type="float">
            <text:p>2071,46510240242</text:p>
          </table:table-cell>
          <table:table-cell table:formula="of:=[.A153]" office:value-type="float" office:value="2040.68043951343" calcext:value-type="float">
            <text:p>2040,68043951343</text:p>
          </table:table-cell>
          <table:table-cell table:formula="of:=[.B153]-[.C153]" office:value-type="float" office:value="30.7846628889888" calcext:value-type="float">
            <text:p>30,7846628889888</text:p>
          </table:table-cell>
          <table:table-cell office:value-type="float" office:value="98.5138700693878" calcext:value-type="float">
            <text:p>98,5138700693878</text:p>
          </table:table-cell>
          <table:table-cell table:number-columns-repeated="21"/>
        </table:table-row>
        <table:table-row table:style-name="ro1">
          <table:table-cell office:value-type="float" office:value="2108.42346848614" calcext:value-type="float">
            <text:p>2108,42346848614</text:p>
          </table:table-cell>
          <table:table-cell table:formula="of:=[.A154]/([.E154]/100)" office:value-type="float" office:value="2139.83081398234" calcext:value-type="float">
            <text:p>2139,83081398234</text:p>
          </table:table-cell>
          <table:table-cell table:formula="of:=[.A154]" office:value-type="float" office:value="2108.42346848614" calcext:value-type="float">
            <text:p>2108,42346848614</text:p>
          </table:table-cell>
          <table:table-cell table:formula="of:=[.B154]-[.C154]" office:value-type="float" office:value="31.4073454962004" calcext:value-type="float">
            <text:p>31,4073454962004</text:p>
          </table:table-cell>
          <table:table-cell office:value-type="float" office:value="98.5322509942854" calcext:value-type="float">
            <text:p>98,5322509942854</text:p>
          </table:table-cell>
          <table:table-cell table:number-columns-repeated="21"/>
        </table:table-row>
        <table:table-row table:style-name="ro1">
          <table:table-cell office:value-type="float" office:value="2176.16612648472" calcext:value-type="float">
            <text:p>2176,16612648472</text:p>
          </table:table-cell>
          <table:table-cell table:formula="of:=[.A155]/([.E155]/100)" office:value-type="float" office:value="2208.19176780073" calcext:value-type="float">
            <text:p>2208,19176780073</text:p>
          </table:table-cell>
          <table:table-cell table:formula="of:=[.A155]" office:value-type="float" office:value="2176.16612648472" calcext:value-type="float">
            <text:p>2176,16612648472</text:p>
          </table:table-cell>
          <table:table-cell table:formula="of:=[.B155]-[.C155]" office:value-type="float" office:value="32.0256413160109" calcext:value-type="float">
            <text:p>32,0256413160109</text:p>
          </table:table-cell>
          <table:table-cell office:value-type="float" office:value="98.5496893076498" calcext:value-type="float">
            <text:p>98,5496893076498</text:p>
          </table:table-cell>
          <table:table-cell table:number-columns-repeated="21"/>
        </table:table-row>
        <table:table-row table:style-name="ro1">
          <table:table-cell office:value-type="float" office:value="2243.91267971163" calcext:value-type="float">
            <text:p>2243,91267971163</text:p>
          </table:table-cell>
          <table:table-cell table:formula="of:=[.A156]/([.E156]/100)" office:value-type="float" office:value="2276.30391437864" calcext:value-type="float">
            <text:p>2276,30391437864</text:p>
          </table:table-cell>
          <table:table-cell table:formula="of:=[.A156]" office:value-type="float" office:value="2243.91267971163" calcext:value-type="float">
            <text:p>2243,91267971163</text:p>
          </table:table-cell>
          <table:table-cell table:formula="of:=[.B156]-[.C156]" office:value-type="float" office:value="32.3912346670095" calcext:value-type="float">
            <text:p>32,3912346670095</text:p>
          </table:table-cell>
          <table:table-cell office:value-type="float" office:value="98.577025042113" calcext:value-type="float">
            <text:p>98,577025042113</text:p>
          </table:table-cell>
          <table:table-cell table:number-columns-repeated="21"/>
        </table:table-row>
        <table:table-row table:style-name="ro1">
          <table:table-cell office:value-type="float" office:value="2311.65051504655" calcext:value-type="float">
            <text:p>2311,65051504655</text:p>
          </table:table-cell>
          <table:table-cell table:formula="of:=[.A157]/([.E157]/100)" office:value-type="float" office:value="2344.89623329188" calcext:value-type="float">
            <text:p>2344,89623329188</text:p>
          </table:table-cell>
          <table:table-cell table:formula="of:=[.A157]" office:value-type="float" office:value="2311.65051504655" calcext:value-type="float">
            <text:p>2311,65051504655</text:p>
          </table:table-cell>
          <table:table-cell table:formula="of:=[.B157]-[.C157]" office:value-type="float" office:value="33.2457182453277" calcext:value-type="float">
            <text:p>33,2457182453277</text:p>
          </table:table-cell>
          <table:table-cell office:value-type="float" office:value="98.5822094055456" calcext:value-type="float">
            <text:p>98,5822094055456</text:p>
          </table:table-cell>
          <table:table-cell table:number-columns-repeated="21"/>
        </table:table-row>
        <table:table-row table:style-name="ro1">
          <table:table-cell office:value-type="float" office:value="2379.39206012275" calcext:value-type="float">
            <text:p>2379,39206012275</text:p>
          </table:table-cell>
          <table:table-cell table:formula="of:=[.A158]/([.E158]/100)" office:value-type="float" office:value="2413.25436552075" calcext:value-type="float">
            <text:p>2413,25436552075</text:p>
          </table:table-cell>
          <table:table-cell table:formula="of:=[.A158]" office:value-type="float" office:value="2379.39206012275" calcext:value-type="float">
            <text:p>2379,39206012275</text:p>
          </table:table-cell>
          <table:table-cell table:formula="of:=[.B158]-[.C158]" office:value-type="float" office:value="33.8623053979982" calcext:value-type="float">
            <text:p>33,8623053979982</text:p>
          </table:table-cell>
          <table:table-cell office:value-type="float" office:value="98.5968198843104" calcext:value-type="float">
            <text:p>98,5968198843104</text:p>
          </table:table-cell>
          <table:table-cell table:number-columns-repeated="21"/>
        </table:table-row>
        <table:table-row table:style-name="ro1">
          <table:table-cell office:value-type="float" office:value="2447.13583104371" calcext:value-type="float">
            <text:p>2447,13583104371</text:p>
          </table:table-cell>
          <table:table-cell table:formula="of:=[.A159]/([.E159]/100)" office:value-type="float" office:value="2481.45217984116" calcext:value-type="float">
            <text:p>2481,45217984116</text:p>
          </table:table-cell>
          <table:table-cell table:formula="of:=[.A159]" office:value-type="float" office:value="2447.13583104371" calcext:value-type="float">
            <text:p>2447,13583104371</text:p>
          </table:table-cell>
          <table:table-cell table:formula="of:=[.B159]-[.C159]" office:value-type="float" office:value="34.3163487974521" calcext:value-type="float">
            <text:p>34,3163487974521</text:p>
          </table:table-cell>
          <table:table-cell office:value-type="float" office:value="98.6170860322745" calcext:value-type="float">
            <text:p>98,6170860322745</text:p>
          </table:table-cell>
          <table:table-cell table:number-columns-repeated="21"/>
        </table:table-row>
        <table:table-row table:style-name="ro1">
          <table:table-cell office:value-type="float" office:value="2514.87236796918" calcext:value-type="float">
            <text:p>2514,87236796918</text:p>
          </table:table-cell>
          <table:table-cell table:formula="of:=[.A160]/([.E160]/100)" office:value-type="float" office:value="2550.08984169766" calcext:value-type="float">
            <text:p>2550,08984169766</text:p>
          </table:table-cell>
          <table:table-cell table:formula="of:=[.A160]" office:value-type="float" office:value="2514.87236796918" calcext:value-type="float">
            <text:p>2514,87236796918</text:p>
          </table:table-cell>
          <table:table-cell table:formula="of:=[.B160]-[.C160]" office:value-type="float" office:value="35.2174737284768" calcext:value-type="float">
            <text:p>35,2174737284768</text:p>
          </table:table-cell>
          <table:table-cell office:value-type="float" office:value="98.6189712553409" calcext:value-type="float">
            <text:p>98,6189712553409</text:p>
          </table:table-cell>
          <table:table-cell table:number-columns-repeated="21"/>
        </table:table-row>
        <table:table-row table:style-name="ro1">
          <table:table-cell office:value-type="float" office:value="2582.61502596776" calcext:value-type="float">
            <text:p>2582,61502596776</text:p>
          </table:table-cell>
          <table:table-cell table:formula="of:=[.A161]/([.E161]/100)" office:value-type="float" office:value="2618.31816188406" calcext:value-type="float">
            <text:p>2618,31816188406</text:p>
          </table:table-cell>
          <table:table-cell table:formula="of:=[.A161]" office:value-type="float" office:value="2582.61502596776" calcext:value-type="float">
            <text:p>2582,61502596776</text:p>
          </table:table-cell>
          <table:table-cell table:formula="of:=[.B161]-[.C161]" office:value-type="float" office:value="35.703135916302" calcext:value-type="float">
            <text:p>35,703135916302</text:p>
          </table:table-cell>
          <table:table-cell office:value-type="float" office:value="98.6364095687053" calcext:value-type="float">
            <text:p>98,6364095687053</text:p>
          </table:table-cell>
          <table:table-cell table:number-columns-repeated="21"/>
        </table:table-row>
        <table:table-row table:style-name="ro1">
          <table:table-cell office:value-type="float" office:value="2650.353788738" calcext:value-type="float">
            <text:p>2650,353788738</text:p>
          </table:table-cell>
          <table:table-cell table:formula="of:=[.A162]/([.E162]/100)" office:value-type="float" office:value="2686.78796454591" calcext:value-type="float">
            <text:p>2686,78796454591</text:p>
          </table:table-cell>
          <table:table-cell table:formula="of:=[.A162]" office:value-type="float" office:value="2650.353788738" calcext:value-type="float">
            <text:p>2650,353788738</text:p>
          </table:table-cell>
          <table:table-cell table:formula="of:=[.B162]-[.C162]" office:value-type="float" office:value="36.4341758079117" calcext:value-type="float">
            <text:p>36,4341758079117</text:p>
          </table:table-cell>
          <table:table-cell office:value-type="float" office:value="98.643950460971" calcext:value-type="float">
            <text:p>98,643950460971</text:p>
          </table:table-cell>
          <table:table-cell table:number-columns-repeated="21"/>
        </table:table-row>
        <table:table-row table:style-name="ro1">
          <table:table-cell office:value-type="float" office:value="2718.0912530988" calcext:value-type="float">
            <text:p>2718,0912530988</text:p>
          </table:table-cell>
          <table:table-cell table:formula="of:=[.A163]/([.E163]/100)" office:value-type="float" office:value="2755.33812848136" calcext:value-type="float">
            <text:p>2755,33812848136</text:p>
          </table:table-cell>
          <table:table-cell table:formula="of:=[.A163]" office:value-type="float" office:value="2718.0912530988" calcext:value-type="float">
            <text:p>2718,0912530988</text:p>
          </table:table-cell>
          <table:table-cell table:formula="of:=[.B163]-[.C163]" office:value-type="float" office:value="37.2468753825619" calcext:value-type="float">
            <text:p>37,2468753825619</text:p>
          </table:table-cell>
          <table:table-cell office:value-type="float" office:value="98.6481922128704" calcext:value-type="float">
            <text:p>98,6481922128704</text:p>
          </table:table-cell>
          <table:table-cell table:number-columns-repeated="21"/>
        </table:table-row>
        <table:table-row table:style-name="ro1">
          <table:table-cell office:value-type="float" office:value="2785.83261268793" calcext:value-type="float">
            <text:p>2785,83261268793</text:p>
          </table:table-cell>
          <table:table-cell table:formula="of:=[.A164]/([.E164]/100)" office:value-type="float" office:value="2823.6030646717" calcext:value-type="float">
            <text:p>2823,6030646717</text:p>
          </table:table-cell>
          <table:table-cell table:formula="of:=[.A164]" office:value-type="float" office:value="2785.83261268793" calcext:value-type="float">
            <text:p>2785,83261268793</text:p>
          </table:table-cell>
          <table:table-cell table:formula="of:=[.B164]-[.C164]" office:value-type="float" office:value="37.7704519837657" calcext:value-type="float">
            <text:p>37,7704519837657</text:p>
          </table:table-cell>
          <table:table-cell office:value-type="float" office:value="98.6623313858686" calcext:value-type="float">
            <text:p>98,6623313858686</text:p>
          </table:table-cell>
          <table:table-cell table:number-columns-repeated="21"/>
        </table:table-row>
        <table:table-row table:style-name="ro1">
          <table:table-cell office:value-type="float" office:value="2853.56636730744" calcext:value-type="float">
            <text:p>2853,56636730744</text:p>
          </table:table-cell>
          <table:table-cell table:formula="of:=[.A165]/([.E165]/100)" office:value-type="float" office:value="2892.40714274709" calcext:value-type="float">
            <text:p>2892,40714274709</text:p>
          </table:table-cell>
          <table:table-cell table:formula="of:=[.A165]" office:value-type="float" office:value="2853.56636730744" calcext:value-type="float">
            <text:p>2853,56636730744</text:p>
          </table:table-cell>
          <table:table-cell table:formula="of:=[.B165]-[.C165]" office:value-type="float" office:value="38.840775439653" calcext:value-type="float">
            <text:p>38,840775439653</text:p>
          </table:table-cell>
          <table:table-cell office:value-type="float" office:value="98.657147022436" calcext:value-type="float">
            <text:p>98,657147022436</text:p>
          </table:table-cell>
          <table:table-cell table:number-columns-repeated="21"/>
        </table:table-row>
        <table:table-row table:style-name="ro1">
          <table:table-cell office:value-type="float" office:value="2912.06676137903" calcext:value-type="float">
            <text:p>2912,06676137903</text:p>
          </table:table-cell>
          <table:table-cell table:formula="of:=[.A166]/([.E166]/100)" office:value-type="float" office:value="2951.60510076526" calcext:value-type="float">
            <text:p>2951,60510076526</text:p>
          </table:table-cell>
          <table:table-cell table:formula="of:=[.A166]" office:value-type="float" office:value="2912.06676137903" calcext:value-type="float">
            <text:p>2912,06676137903</text:p>
          </table:table-cell>
          <table:table-cell table:formula="of:=[.B166]-[.C166]" office:value-type="float" office:value="39.5383393862267" calcext:value-type="float">
            <text:p>39,5383393862267</text:p>
          </table:table-cell>
          <table:table-cell office:value-type="float" office:value="98.6604461628022" calcext:value-type="float">
            <text:p>98,6604461628022</text:p>
          </table:table-cell>
          <table:table-cell table:number-columns-repeated="21"/>
        </table:table-row>
        <table:table-row table:style-name="ro1">
          <table:table-cell office:value-type="float" office:value="2979.81301318947" calcext:value-type="float">
            <text:p>2979,81301318947</text:p>
          </table:table-cell>
          <table:table-cell table:formula="of:=[.A167]/([.E167]/100)" office:value-type="float" office:value="3019.45801302037" calcext:value-type="float">
            <text:p>3019,45801302037</text:p>
          </table:table-cell>
          <table:table-cell table:formula="of:=[.A167]" office:value-type="float" office:value="2979.81301318947" calcext:value-type="float">
            <text:p>2979,81301318947</text:p>
          </table:table-cell>
          <table:table-cell table:formula="of:=[.B167]-[.C167]" office:value-type="float" office:value="39.6449998308958" calcext:value-type="float">
            <text:p>39,6449998308958</text:p>
          </table:table-cell>
          <table:table-cell office:value-type="float" office:value="98.6870160253946" calcext:value-type="float">
            <text:p>98,6870160253946</text:p>
          </table:table-cell>
          <table:table-cell table:number-columns-repeated="21"/>
        </table:table-row>
        <table:table-row table:style-name="ro1">
          <table:table-cell office:value-type="float" office:value="3161.47542314604" calcext:value-type="float">
            <text:p>3161,47542314604</text:p>
          </table:table-cell>
          <table:table-cell table:formula="of:=[.A168]/([.E168]/100)" office:value-type="float" office:value="3202.93341862316" calcext:value-type="float">
            <text:p>3202,93341862316</text:p>
          </table:table-cell>
          <table:table-cell table:formula="of:=[.A168]" office:value-type="float" office:value="3161.47542314604" calcext:value-type="float">
            <text:p>3161,47542314604</text:p>
          </table:table-cell>
          <table:table-cell table:formula="of:=[.B168]-[.C168]" office:value-type="float" office:value="41.4579954771166" calcext:value-type="float">
            <text:p>41,4579954771166</text:p>
          </table:table-cell>
          <table:table-cell office:value-type="float" office:value="98.7056241870011" calcext:value-type="float">
            <text:p>98,7056241870011</text:p>
          </table:table-cell>
          <table:table-cell table:number-columns-repeated="21"/>
        </table:table-row>
        <table:table-row table:style-name="ro1">
          <table:table-cell office:value-type="float" office:value="3343.13083759048" calcext:value-type="float">
            <text:p>3343,13083759048</text:p>
          </table:table-cell>
          <table:table-cell table:formula="of:=[.A169]/([.E169]/100)" office:value-type="float" office:value="3386.94238051731" calcext:value-type="float">
            <text:p>3386,94238051731</text:p>
          </table:table-cell>
          <table:table-cell table:formula="of:=[.A169]" office:value-type="float" office:value="3343.13083759048" calcext:value-type="float">
            <text:p>3343,13083759048</text:p>
          </table:table-cell>
          <table:table-cell table:formula="of:=[.B169]-[.C169]" office:value-type="float" office:value="43.8115429268323" calcext:value-type="float">
            <text:p>43,8115429268323</text:p>
          </table:table-cell>
          <table:table-cell office:value-type="float" office:value="98.7064573882671" calcext:value-type="float">
            <text:p>98,7064573882671</text:p>
          </table:table-cell>
          <table:table-cell table:number-columns-repeated="21"/>
        </table:table-row>
        <table:table-row table:style-name="ro1">
          <table:table-cell office:value-type="float" office:value="3524.78355584796" calcext:value-type="float">
            <text:p>3524,78355584796</text:p>
          </table:table-cell>
          <table:table-cell table:formula="of:=[.A170]/([.E170]/100)" office:value-type="float" office:value="3571.19336261183" calcext:value-type="float">
            <text:p>3571,19336261183</text:p>
          </table:table-cell>
          <table:table-cell table:formula="of:=[.A170]" office:value-type="float" office:value="3524.78355584796" calcext:value-type="float">
            <text:p>3524,78355584796</text:p>
          </table:table-cell>
          <table:table-cell table:formula="of:=[.B170]-[.C170]" office:value-type="float" office:value="46.4098067638683" calcext:value-type="float">
            <text:p>46,4098067638683</text:p>
          </table:table-cell>
          <table:table-cell office:value-type="float" office:value="98.7004398235685" calcext:value-type="float">
            <text:p>98,7004398235685</text:p>
          </table:table-cell>
          <table:table-cell table:number-columns-repeated="21"/>
        </table:table-row>
        <table:table-row table:style-name="ro1">
          <table:table-cell office:value-type="float" office:value="3709.509963678" calcext:value-type="float">
            <text:p>3709,509963678</text:p>
          </table:table-cell>
          <table:table-cell table:formula="of:=[.A171]/([.E171]/100)" office:value-type="float" office:value="3759.08539777234" calcext:value-type="float">
            <text:p>3759,08539777234</text:p>
          </table:table-cell>
          <table:table-cell table:formula="of:=[.A171]" office:value-type="float" office:value="3709.509963678" calcext:value-type="float">
            <text:p>3709,509963678</text:p>
          </table:table-cell>
          <table:table-cell table:formula="of:=[.B171]-[.C171]" office:value-type="float" office:value="49.5754340943408" calcext:value-type="float">
            <text:p>49,5754340943408</text:p>
          </table:table-cell>
          <table:table-cell office:value-type="float" office:value="98.6811836165329" calcext:value-type="float">
            <text:p>98,6811836165329</text:p>
          </table:table-cell>
          <table:table-cell table:number-columns-repeated="21"/>
        </table:table-row>
        <table:table-row table:style-name="ro1">
          <table:table-cell office:value-type="float" office:value="3808.02251422593" calcext:value-type="float">
            <text:p>3808,02251422593</text:p>
          </table:table-cell>
          <table:table-cell table:formula="of:=[.A172]/([.E172]/100)" office:value-type="float" office:value="3860.1312976149" calcext:value-type="float">
            <text:p>3860,1312976149</text:p>
          </table:table-cell>
          <table:table-cell table:formula="of:=[.A172]" office:value-type="float" office:value="3808.02251422593" calcext:value-type="float">
            <text:p>3808,02251422593</text:p>
          </table:table-cell>
          <table:table-cell table:formula="of:=[.B172]-[.C172]" office:value-type="float" office:value="52.1087833889656" calcext:value-type="float">
            <text:p>52,1087833889656</text:p>
          </table:table-cell>
          <table:table-cell office:value-type="float" office:value="98.6500774359369" calcext:value-type="float">
            <text:p>98,6500774359369</text:p>
          </table:table-cell>
          <table:table-cell table:number-columns-repeated="21"/>
        </table:table-row>
        <table:table-row table:style-name="ro1">
          <table:table-cell office:value-type="float" office:value="3891.15892913471" calcext:value-type="float">
            <text:p>3891,15892913471</text:p>
          </table:table-cell>
          <table:table-cell table:formula="of:=[.A173]/([.E173]/100)" office:value-type="float" office:value="3943.78357324749" calcext:value-type="float">
            <text:p>3943,78357324749</text:p>
          </table:table-cell>
          <table:table-cell table:formula="of:=[.A173]" office:value-type="float" office:value="3891.15892913471" calcext:value-type="float">
            <text:p>3891,15892913471</text:p>
          </table:table-cell>
          <table:table-cell table:formula="of:=[.B173]-[.C173]" office:value-type="float" office:value="52.6246441127769" calcext:value-type="float">
            <text:p>52,6246441127769</text:p>
          </table:table-cell>
          <table:table-cell office:value-type="float" office:value="98.6656305262349" calcext:value-type="float">
            <text:p>98,6656305262349</text:p>
          </table:table-cell>
          <table:table-cell table:number-columns-repeated="21"/>
        </table:table-row>
        <table:table-row table:style-name="ro1">
          <table:table-cell office:value-type="float" office:value="4075.89674110691" calcext:value-type="float">
            <text:p>4075,89674110691</text:p>
          </table:table-cell>
          <table:table-cell table:formula="of:=[.A174]/([.E174]/100)" office:value-type="float" office:value="4130.61285439848" calcext:value-type="float">
            <text:p>4130,61285439848</text:p>
          </table:table-cell>
          <table:table-cell table:formula="of:=[.A174]" office:value-type="float" office:value="4075.89674110691" calcext:value-type="float">
            <text:p>4075,89674110691</text:p>
          </table:table-cell>
          <table:table-cell table:formula="of:=[.B174]-[.C174]" office:value-type="float" office:value="54.7161132915721" calcext:value-type="float">
            <text:p>54,7161132915721</text:p>
          </table:table-cell>
          <table:table-cell office:value-type="float" office:value="98.6753512076711" calcext:value-type="float">
            <text:p>98,6753512076711</text:p>
          </table:table-cell>
          <table:table-cell table:number-columns-repeated="21"/>
        </table:table-row>
        <table:table-row table:style-name="ro1">
          <table:table-cell office:value-type="float" office:value="4248.31028247211" calcext:value-type="float">
            <text:p>4248,31028247211</text:p>
          </table:table-cell>
          <table:table-cell table:formula="of:=[.A175]/([.E175]/100)" office:value-type="float" office:value="4305.87822324867" calcext:value-type="float">
            <text:p>4305,87822324867</text:p>
          </table:table-cell>
          <table:table-cell table:formula="of:=[.A175]" office:value-type="float" office:value="4248.31028247211" calcext:value-type="float">
            <text:p>4248,31028247211</text:p>
          </table:table-cell>
          <table:table-cell table:formula="of:=[.B175]-[.C175]" office:value-type="float" office:value="57.5679407765629" calcext:value-type="float">
            <text:p>57,5679407765629</text:p>
          </table:table-cell>
          <table:table-cell office:value-type="float" office:value="98.6630383445185" calcext:value-type="float">
            <text:p>98,6630383445185</text:p>
          </table:table-cell>
          <table:table-cell table:number-columns-repeated="21"/>
        </table:table-row>
        <table:table-row table:style-name="ro1">
          <table:table-cell office:value-type="float" office:value="4405.33500552017" calcext:value-type="float">
            <text:p>4405,33500552017</text:p>
          </table:table-cell>
          <table:table-cell table:formula="of:=[.A176]/([.E176]/100)" office:value-type="float" office:value="4464.93477568551" calcext:value-type="float">
            <text:p>4464,93477568551</text:p>
          </table:table-cell>
          <table:table-cell table:formula="of:=[.A176]" office:value-type="float" office:value="4405.33500552017" calcext:value-type="float">
            <text:p>4405,33500552017</text:p>
          </table:table-cell>
          <table:table-cell table:formula="of:=[.B176]-[.C176]" office:value-type="float" office:value="59.5997701653423" calcext:value-type="float">
            <text:p>59,5997701653423</text:p>
          </table:table-cell>
          <table:table-cell office:value-type="float" office:value="98.6651592204683" calcext:value-type="float">
            <text:p>98,6651592204683</text:p>
          </table:table-cell>
          <table:table-cell table:number-columns-repeated="21"/>
        </table:table-row>
        <table:table-row table:style-name="ro1">
          <table:table-cell office:value-type="float" office:value="4473.0702440362" calcext:value-type="float">
            <text:p>4473,0702440362</text:p>
          </table:table-cell>
          <table:table-cell table:formula="of:=[.A177]/([.E177]/100)" office:value-type="float" office:value="4533.65137345192" calcext:value-type="float">
            <text:p>4533,65137345192</text:p>
          </table:table-cell>
          <table:table-cell table:formula="of:=[.A177]" office:value-type="float" office:value="4473.0702440362" calcext:value-type="float">
            <text:p>4473,0702440362</text:p>
          </table:table-cell>
          <table:table-cell table:formula="of:=[.B177]-[.C177]" office:value-type="float" office:value="60.581129415722" calcext:value-type="float">
            <text:p>60,581129415722</text:p>
          </table:table-cell>
          <table:table-cell office:value-type="float" office:value="98.6637453031684" calcext:value-type="float">
            <text:p>98,6637453031684</text:p>
          </table:table-cell>
          <table:table-cell table:number-columns-repeated="21"/>
        </table:table-row>
        <table:table-row table:style-name="ro1">
          <table:table-cell office:value-type="float" office:value="4540.8030712204" calcext:value-type="float">
            <text:p>4540,8030712204</text:p>
          </table:table-cell>
          <table:table-cell table:formula="of:=[.A178]/([.E178]/100)" office:value-type="float" office:value="4602.65332356389" calcext:value-type="float">
            <text:p>4602,65332356389</text:p>
          </table:table-cell>
          <table:table-cell table:formula="of:=[.A178]" office:value-type="float" office:value="4540.8030712204" calcext:value-type="float">
            <text:p>4540,8030712204</text:p>
          </table:table-cell>
          <table:table-cell table:formula="of:=[.B178]-[.C178]" office:value-type="float" office:value="61.8502523434872" calcext:value-type="float">
            <text:p>61,8502523434872</text:p>
          </table:table-cell>
          <table:table-cell office:value-type="float" office:value="98.6562044109028" calcext:value-type="float">
            <text:p>98,6562044109028</text:p>
          </table:table-cell>
          <table:table-cell table:number-columns-repeated="21"/>
        </table:table-row>
        <table:table-row table:style-name="ro1">
          <table:table-cell office:value-type="float" office:value="4608.52829343498" calcext:value-type="float">
            <text:p>4608,52829343498</text:p>
          </table:table-cell>
          <table:table-cell table:formula="of:=[.A179]/([.E179]/100)" office:value-type="float" office:value="4672.57338867563" calcext:value-type="float">
            <text:p>4672,57338867563</text:p>
          </table:table-cell>
          <table:table-cell table:formula="of:=[.A179]" office:value-type="float" office:value="4608.52829343498" calcext:value-type="float">
            <text:p>4608,52829343498</text:p>
          </table:table-cell>
          <table:table-cell table:formula="of:=[.B179]-[.C179]" office:value-type="float" office:value="64.04509524065" calcext:value-type="float">
            <text:p>64,04509524065</text:p>
          </table:table-cell>
          <table:table-cell office:value-type="float" office:value="98.6293399822062" calcext:value-type="float">
            <text:p>98,6293399822062</text:p>
          </table:table-cell>
          <table:table-cell table:number-columns-repeated="21"/>
        </table:table-row>
        <table:table-row table:style-name="ro1">
          <table:table-cell office:value-type="float" office:value="4657.79068978205" calcext:value-type="float">
            <text:p>4657,79068978205</text:p>
          </table:table-cell>
          <table:table-cell table:formula="of:=[.A180]/([.E180]/100)" office:value-type="float" office:value="4722.52038858048" calcext:value-type="float">
            <text:p>4722,52038858048</text:p>
          </table:table-cell>
          <table:table-cell table:formula="of:=[.A180]" office:value-type="float" office:value="4657.79068978205" calcext:value-type="float">
            <text:p>4657,79068978205</text:p>
          </table:table-cell>
          <table:table-cell table:formula="of:=[.B180]-[.C180]" office:value-type="float" office:value="64.7296987984328" calcext:value-type="float">
            <text:p>64,7296987984328</text:p>
          </table:table-cell>
          <table:table-cell office:value-type="float" office:value="98.6293399822062" calcext:value-type="float">
            <text:p>98,6293399822062</text:p>
          </table:table-cell>
          <table:table-cell table:number-columns-repeated="21"/>
        </table:table-row>
        <table:table-row table:style-name="ro1">
          <table:table-cell office:value-type="float" office:value="4802.4836763688" calcext:value-type="float">
            <text:p>4802,4836763688</text:p>
          </table:table-cell>
          <table:table-cell table:formula="of:=[.A181]/([.E181]/100)" office:value-type="float" office:value="4871.14454077052" calcext:value-type="float">
            <text:p>4871,14454077052</text:p>
          </table:table-cell>
          <table:table-cell table:formula="of:=[.A181]" office:value-type="float" office:value="4802.4836763688" calcext:value-type="float">
            <text:p>4802,4836763688</text:p>
          </table:table-cell>
          <table:table-cell table:formula="of:=[.B181]-[.C181]" office:value-type="float" office:value="68.6608644017169" calcext:value-type="float">
            <text:p>68,6608644017169</text:p>
          </table:table-cell>
          <table:table-cell office:value-type="float" office:value="98.5904572564612" calcext:value-type="float">
            <text:p>98,5904572564612</text:p>
          </table:table-cell>
          <table:table-cell table:number-columns-repeated="21"/>
        </table:table-row>
        <table:table-row table:style-name="ro1">
          <table:table-cell office:value-type="float" office:value="4984.13366200436" calcext:value-type="float">
            <text:p>4984,13366200436</text:p>
          </table:table-cell>
          <table:table-cell table:formula="of:=[.A182]/([.E182]/100)" office:value-type="float" office:value="5056.0562467679" calcext:value-type="float">
            <text:p>5056,0562467679</text:p>
          </table:table-cell>
          <table:table-cell table:formula="of:=[.A182]" office:value-type="float" office:value="4984.13366200436" calcext:value-type="float">
            <text:p>4984,13366200436</text:p>
          </table:table-cell>
          <table:table-cell table:formula="of:=[.B182]-[.C182]" office:value-type="float" office:value="71.9225847635353" calcext:value-type="float">
            <text:p>71,9225847635353</text:p>
          </table:table-cell>
          <table:table-cell office:value-type="float" office:value="98.5774963478796" calcext:value-type="float">
            <text:p>98,5774963478796</text:p>
          </table:table-cell>
          <table:table-cell table:number-columns-repeated="21"/>
        </table:table-row>
        <table:table-row table:style-name="ro1">
          <table:table-cell office:value-type="float" office:value="5165.78109719279" calcext:value-type="float">
            <text:p>5165,78109719279</text:p>
          </table:table-cell>
          <table:table-cell table:formula="of:=[.A183]/([.E183]/100)" office:value-type="float" office:value="5241.35860633474" calcext:value-type="float">
            <text:p>5241,35860633474</text:p>
          </table:table-cell>
          <table:table-cell table:formula="of:=[.A183]" office:value-type="float" office:value="5165.78109719279" calcext:value-type="float">
            <text:p>5165,78109719279</text:p>
          </table:table-cell>
          <table:table-cell table:formula="of:=[.B183]-[.C183]" office:value-type="float" office:value="75.5775091419446" calcext:value-type="float">
            <text:p>75,5775091419446</text:p>
          </table:table-cell>
          <table:table-cell office:value-type="float" office:value="98.5580549850071" calcext:value-type="float">
            <text:p>98,5580549850071</text:p>
          </table:table-cell>
          <table:table-cell table:number-columns-repeated="21"/>
        </table:table-row>
        <table:table-row table:style-name="ro1">
          <table:table-cell office:value-type="float" office:value="5276.61383763231" calcext:value-type="float">
            <text:p>5276,61383763231</text:p>
          </table:table-cell>
          <table:table-cell table:formula="of:=[.A184]/([.E184]/100)" office:value-type="float" office:value="5354.86916617937" calcext:value-type="float">
            <text:p>5354,86916617937</text:p>
          </table:table-cell>
          <table:table-cell table:formula="of:=[.A184]" office:value-type="float" office:value="5276.61383763231" calcext:value-type="float">
            <text:p>5276,61383763231</text:p>
          </table:table-cell>
          <table:table-cell table:formula="of:=[.B184]-[.C184]" office:value-type="float" office:value="78.2553285470594" calcext:value-type="float">
            <text:p>78,2553285470594</text:p>
          </table:table-cell>
          <table:table-cell office:value-type="float" office:value="98.5386136221346" calcext:value-type="float">
            <text:p>98,5386136221346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1">
            <text:p>80Ruby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office:value-type="float" office:value="277.502940966605" calcext:value-type="float">
            <text:p>277,502940966605</text:p>
          </table:table-cell>
          <table:table-cell table:number-columns-repeated="3"/>
          <table:table-cell office:value-type="float" office:value="95.0515531732869" calcext:value-type="float">
            <text:p>95,0515531732869</text:p>
          </table:table-cell>
          <table:table-cell table:number-columns-repeated="21"/>
        </table:table-row>
        <table:table-row table:style-name="ro1">
          <table:table-cell office:value-type="float" office:value="327.482409692574" calcext:value-type="float">
            <text:p>327,482409692574</text:p>
          </table:table-cell>
          <table:table-cell table:number-columns-repeated="3"/>
          <table:table-cell office:value-type="float" office:value="95.1350790285909" calcext:value-type="float">
            <text:p>95,1350790285909</text:p>
          </table:table-cell>
          <table:table-cell table:number-columns-repeated="21"/>
        </table:table-row>
        <table:table-row table:style-name="ro1">
          <table:table-cell office:value-type="float" office:value="379.868338636056" calcext:value-type="float">
            <text:p>379,868338636056</text:p>
          </table:table-cell>
          <table:table-cell table:number-columns-repeated="3"/>
          <table:table-cell office:value-type="float" office:value="95.2484869786804" calcext:value-type="float">
            <text:p>95,2484869786804</text:p>
          </table:table-cell>
          <table:table-cell table:number-columns-repeated="21"/>
        </table:table-row>
        <table:table-row table:style-name="ro1">
          <table:table-cell office:value-type="float" office:value="441.495557699442" calcext:value-type="float">
            <text:p>441,495557699442</text:p>
          </table:table-cell>
          <table:table-cell table:number-columns-repeated="3"/>
          <table:table-cell office:value-type="float" office:value="95.3735597464934" calcext:value-type="float">
            <text:p>95,3735597464934</text:p>
          </table:table-cell>
          <table:table-cell table:number-columns-repeated="21"/>
        </table:table-row>
        <table:table-row table:style-name="ro1">
          <table:table-cell office:value-type="float" office:value="500.045370824453" calcext:value-type="float">
            <text:p>500,045370824453</text:p>
          </table:table-cell>
          <table:table-cell table:number-columns-repeated="3"/>
          <table:table-cell office:value-type="float" office:value="95.5024282089625" calcext:value-type="float">
            <text:p>95,5024282089625</text:p>
          </table:table-cell>
          <table:table-cell table:number-columns-repeated="21"/>
        </table:table-row>
        <table:table-row table:style-name="ro1">
          <table:table-cell office:value-type="float" office:value="540.129679560421" calcext:value-type="float">
            <text:p>540,129679560421</text:p>
          </table:table-cell>
          <table:table-cell table:number-columns-repeated="3"/>
          <table:table-cell office:value-type="float" office:value="95.651355220427" calcext:value-type="float">
            <text:p>95,651355220427</text:p>
          </table:table-cell>
          <table:table-cell table:number-columns-repeated="21"/>
        </table:table-row>
        <table:table-row table:style-name="ro1">
          <table:table-cell office:value-type="float" office:value="577.134116925792" calcext:value-type="float">
            <text:p>577,134116925792</text:p>
          </table:table-cell>
          <table:table-cell table:number-columns-repeated="3"/>
          <table:table-cell office:value-type="float" office:value="95.7978134873997" calcext:value-type="float">
            <text:p>95,7978134873997</text:p>
          </table:table-cell>
          <table:table-cell table:number-columns-repeated="21"/>
        </table:table-row>
        <table:table-row table:style-name="ro1">
          <table:table-cell office:value-type="float" office:value="614.140424619056" calcext:value-type="float">
            <text:p>614,140424619056</text:p>
          </table:table-cell>
          <table:table-cell table:number-columns-repeated="3"/>
          <table:table-cell office:value-type="float" office:value="95.9490240875191" calcext:value-type="float">
            <text:p>95,9490240875191</text:p>
          </table:table-cell>
          <table:table-cell table:number-columns-repeated="21"/>
        </table:table-row>
        <table:table-row table:style-name="ro1">
          <table:table-cell office:value-type="float" office:value="651.147072371937" calcext:value-type="float">
            <text:p>651,147072371937</text:p>
          </table:table-cell>
          <table:table-cell table:number-columns-repeated="3"/>
          <table:table-cell office:value-type="float" office:value="96.1010987482106" calcext:value-type="float">
            <text:p>96,1010987482106</text:p>
          </table:table-cell>
          <table:table-cell table:number-columns-repeated="21"/>
        </table:table-row>
        <table:table-row table:style-name="ro1">
          <table:table-cell office:value-type="float" office:value="681.985888822735" calcext:value-type="float">
            <text:p>681,985888822735</text:p>
          </table:table-cell>
          <table:table-cell table:number-columns-repeated="3"/>
          <table:table-cell office:value-type="float" office:value="96.2276836220248" calcext:value-type="float">
            <text:p>96,2276836220248</text:p>
          </table:table-cell>
          <table:table-cell table:number-columns-repeated="21"/>
        </table:table-row>
        <table:table-row table:style-name="ro1">
          <table:table-cell office:value-type="float" office:value="706.648457495931" calcext:value-type="float">
            <text:p>706,648457495931</text:p>
          </table:table-cell>
          <table:table-cell table:number-columns-repeated="3"/>
          <table:table-cell office:value-type="float" office:value="96.307393209802" calcext:value-type="float">
            <text:p>96,307393209802</text:p>
          </table:table-cell>
          <table:table-cell table:number-columns-repeated="21"/>
        </table:table-row>
        <table:table-row table:style-name="ro1">
          <table:table-cell office:value-type="float" office:value="737.488889229909" calcext:value-type="float">
            <text:p>737,488889229909</text:p>
          </table:table-cell>
          <table:table-cell table:number-columns-repeated="3"/>
          <table:table-cell office:value-type="float" office:value="96.4380823713337" calcext:value-type="float">
            <text:p>96,4380823713337</text:p>
          </table:table-cell>
          <table:table-cell table:number-columns-repeated="21"/>
        </table:table-row>
        <table:table-row table:style-name="ro1">
          <table:table-cell office:value-type="float" office:value="774.494290097528" calcext:value-type="float">
            <text:p>774,494290097528</text:p>
          </table:table-cell>
          <table:table-cell table:number-columns-repeated="3"/>
          <table:table-cell office:value-type="float" office:value="96.5869888099274" calcext:value-type="float">
            <text:p>96,5869888099274</text:p>
          </table:table-cell>
          <table:table-cell table:number-columns-repeated="21"/>
        </table:table-row>
        <table:table-row table:style-name="ro1">
          <table:table-cell office:value-type="float" office:value="811.500371084381" calcext:value-type="float">
            <text:p>811,500371084381</text:p>
          </table:table-cell>
          <table:table-cell table:number-columns-repeated="3"/>
          <table:table-cell office:value-type="float" office:value="96.7376233696654" calcext:value-type="float">
            <text:p>96,7376233696654</text:p>
          </table:table-cell>
          <table:table-cell table:number-columns-repeated="21"/>
        </table:table-row>
        <table:table-row table:style-name="ro1">
          <table:table-cell office:value-type="float" office:value="848.506282041425" calcext:value-type="float">
            <text:p>848,506282041425</text:p>
          </table:table-cell>
          <table:table-cell table:number-columns-repeated="3"/>
          <table:table-cell office:value-type="float" office:value="96.8878258991173" calcext:value-type="float">
            <text:p>96,8878258991173</text:p>
          </table:table-cell>
          <table:table-cell table:number-columns-repeated="21"/>
        </table:table-row>
        <table:table-row table:style-name="ro1">
          <table:table-cell office:value-type="float" office:value="885.512589734689" calcext:value-type="float">
            <text:p>885,512589734689</text:p>
          </table:table-cell>
          <table:table-cell table:number-columns-repeated="3"/>
          <table:table-cell office:value-type="float" office:value="97.0390364992366" calcext:value-type="float">
            <text:p>97,0390364992366</text:p>
          </table:table-cell>
          <table:table-cell table:number-columns-repeated="21"/>
        </table:table-row>
        <table:table-row table:style-name="ro1">
          <table:table-cell office:value-type="float" office:value="922.514306623124" calcext:value-type="float">
            <text:p>922,514306623124</text:p>
          </table:table-cell>
          <table:table-cell table:number-columns-repeated="3"/>
          <table:table-cell office:value-type="float" office:value="97.1785822816325" calcext:value-type="float">
            <text:p>97,1785822816325</text:p>
          </table:table-cell>
          <table:table-cell table:number-columns-repeated="21"/>
        </table:table-row>
        <table:table-row table:style-name="ro1">
          <table:table-cell office:value-type="float" office:value="956.438041900834" calcext:value-type="float">
            <text:p>956,438041900834</text:p>
          </table:table-cell>
          <table:table-cell table:number-columns-repeated="3"/>
          <table:table-cell office:value-type="float" office:value="97.3204610275731" calcext:value-type="float">
            <text:p>97,3204610275731</text:p>
          </table:table-cell>
          <table:table-cell table:number-columns-repeated="21"/>
        </table:table-row>
        <table:table-row table:style-name="ro1">
          <table:table-cell office:value-type="float" office:value="978.015096642788" calcext:value-type="float">
            <text:p>978,015096642788</text:p>
          </table:table-cell>
          <table:table-cell table:number-columns-repeated="3"/>
          <table:table-cell office:value-type="float" office:value="97.3833646372227" calcext:value-type="float">
            <text:p>97,3833646372227</text:p>
          </table:table-cell>
          <table:table-cell table:number-columns-repeated="21"/>
        </table:table-row>
        <table:table-row table:style-name="ro1">
          <table:table-cell office:value-type="float" office:value="1008.84787703539" calcext:value-type="float">
            <text:p>1008,84787703539</text:p>
          </table:table-cell>
          <table:table-cell table:number-columns-repeated="3"/>
          <table:table-cell office:value-type="float" office:value="97.494612435882" calcext:value-type="float">
            <text:p>97,494612435882</text:p>
          </table:table-cell>
          <table:table-cell table:number-columns-repeated="21"/>
        </table:table-row>
        <table:table-row table:style-name="ro1">
          <table:table-cell office:value-type="float" office:value="1098.15630443381" calcext:value-type="float">
            <text:p>1098,15630443381</text:p>
          </table:table-cell>
          <table:table-cell table:number-columns-repeated="3"/>
          <table:table-cell office:value-type="float" office:value="97.5462793305461" calcext:value-type="float">
            <text:p>97,5462793305461</text:p>
          </table:table-cell>
          <table:table-cell table:number-columns-repeated="21"/>
        </table:table-row>
        <table:table-row table:style-name="ro1">
          <table:table-cell office:value-type="float" office:value="1193.62139526736" calcext:value-type="float">
            <text:p>1193,62139526736</text:p>
          </table:table-cell>
          <table:table-cell table:number-columns-repeated="3"/>
          <table:table-cell office:value-type="float" office:value="97.5950594773898" calcext:value-type="float">
            <text:p>97,5950594773898</text:p>
          </table:table-cell>
          <table:table-cell table:number-columns-repeated="21"/>
        </table:table-row>
        <table:table-row table:style-name="ro1">
          <table:table-cell office:value-type="float" office:value="1292.16495925235" calcext:value-type="float">
            <text:p>1292,16495925235</text:p>
          </table:table-cell>
          <table:table-cell table:number-columns-repeated="3"/>
          <table:table-cell office:value-type="float" office:value="97.6427556209703" calcext:value-type="float">
            <text:p>97,6427556209703</text:p>
          </table:table-cell>
          <table:table-cell table:number-columns-repeated="21"/>
        </table:table-row>
        <table:table-row table:style-name="ro1">
          <table:table-cell office:value-type="float" office:value="1384.55092772973" calcext:value-type="float">
            <text:p>1384,55092772973</text:p>
          </table:table-cell>
          <table:table-cell table:number-columns-repeated="3"/>
          <table:table-cell office:value-type="float" office:value="97.6909702008941" calcext:value-type="float">
            <text:p>97,6909702008941</text:p>
          </table:table-cell>
          <table:table-cell table:number-columns-repeated="21"/>
        </table:table-row>
        <table:table-row table:style-name="ro1">
          <table:table-cell office:value-type="float" office:value="1483.09428767895" calcext:value-type="float">
            <text:p>1483,09428767895</text:p>
          </table:table-cell>
          <table:table-cell table:number-columns-repeated="3"/>
          <table:table-cell office:value-type="float" office:value="97.7381479081313" calcext:value-type="float">
            <text:p>97,7381479081313</text:p>
          </table:table-cell>
          <table:table-cell table:number-columns-repeated="21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21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21"/>
        </table:table-row>
        <table:table-row table:style-name="ro1">
          <table:table-cell office:value-type="float" office:value="1575.48066422787" calcext:value-type="float">
            <text:p>1575,48066422787</text:p>
          </table:table-cell>
          <table:table-cell table:number-columns-repeated="3"/>
          <table:table-cell office:value-type="float" office:value="97.7873993607416" calcext:value-type="float">
            <text:p>97,7873993607416</text:p>
          </table:table-cell>
          <table:table-cell table:number-columns-repeated="21"/>
        </table:table-row>
        <table:table-row table:style-name="ro1">
          <table:table-cell office:value-type="float" office:value="1674.02443224863" calcext:value-type="float">
            <text:p>1674,02443224863</text:p>
          </table:table-cell>
          <table:table-cell table:number-columns-repeated="3"/>
          <table:table-cell office:value-type="float" office:value="97.8356139406654" calcext:value-type="float">
            <text:p>97,8356139406654</text:p>
          </table:table-cell>
          <table:table-cell table:number-columns-repeated="21"/>
        </table:table-row>
        <table:table-row table:style-name="ro1">
          <table:table-cell office:value-type="float" office:value="1769.48926340028" calcext:value-type="float">
            <text:p>1769,48926340028</text:p>
          </table:table-cell>
          <table:table-cell table:number-columns-repeated="3"/>
          <table:table-cell office:value-type="float" office:value="97.8837342594359" calcext:value-type="float">
            <text:p>97,8837342594359</text:p>
          </table:table-cell>
          <table:table-cell table:number-columns-repeated="21"/>
        </table:table-row>
        <table:table-row table:style-name="ro1">
          <table:table-cell office:value-type="float" office:value="1864.95396471099" calcext:value-type="float">
            <text:p>1864,95396471099</text:p>
          </table:table-cell>
          <table:table-cell table:number-columns-repeated="3"/>
          <table:table-cell office:value-type="float" office:value="97.9315246641697" calcext:value-type="float">
            <text:p>97,9315246641697</text:p>
          </table:table-cell>
          <table:table-cell table:number-columns-repeated="21"/>
        </table:table-row>
        <table:table-row table:style-name="ro1">
          <table:table-cell office:value-type="float" office:value="1960.41925958031" calcext:value-type="float">
            <text:p>1960,41925958031</text:p>
          </table:table-cell>
          <table:table-cell table:number-columns-repeated="3"/>
          <table:table-cell office:value-type="float" office:value="97.9808232473567" calcext:value-type="float">
            <text:p>97,9808232473567</text:p>
          </table:table-cell>
          <table:table-cell table:number-columns-repeated="21"/>
        </table:table-row>
        <table:table-row table:style-name="ro1">
          <table:table-cell office:value-type="float" office:value="2055.88349717336" calcext:value-type="float">
            <text:p>2055,88349717336</text:p>
          </table:table-cell>
          <table:table-cell table:number-columns-repeated="3"/>
          <table:table-cell office:value-type="float" office:value="98.027435387674" calcext:value-type="float">
            <text:p>98,027435387674</text:p>
          </table:table-cell>
          <table:table-cell table:number-columns-repeated="21"/>
        </table:table-row>
        <table:table-row table:style-name="ro1">
          <table:table-cell office:value-type="float" office:value="2154.42726519412" calcext:value-type="float">
            <text:p>2154,42726519412</text:p>
          </table:table-cell>
          <table:table-cell table:number-columns-repeated="3"/>
          <table:table-cell office:value-type="float" office:value="98.0756499675977" calcext:value-type="float">
            <text:p>98,0756499675977</text:p>
          </table:table-cell>
          <table:table-cell table:number-columns-repeated="21"/>
        </table:table-row>
        <table:table-row table:style-name="ro1">
          <table:table-cell office:value-type="float" office:value="2249.89241167379" calcext:value-type="float">
            <text:p>2249,89241167379</text:p>
          </table:table-cell>
          <table:table-cell table:number-columns-repeated="3"/>
          <table:table-cell office:value-type="float" office:value="98.1245715061714" calcext:value-type="float">
            <text:p>98,1245715061714</text:p>
          </table:table-cell>
          <table:table-cell table:number-columns-repeated="21"/>
        </table:table-row>
        <table:table-row table:style-name="ro1">
          <table:table-cell office:value-type="float" office:value="2345.35720572803" calcext:value-type="float">
            <text:p>2345,35720572803</text:p>
          </table:table-cell>
          <table:table-cell table:number-columns-repeated="3"/>
          <table:table-cell office:value-type="float" office:value="98.1725975637885" calcext:value-type="float">
            <text:p>98,1725975637885</text:p>
          </table:table-cell>
          <table:table-cell table:number-columns-repeated="21"/>
        </table:table-row>
        <table:table-row table:style-name="ro1">
          <table:table-cell office:value-type="float" office:value="2440.82055298318" calcext:value-type="float">
            <text:p>2440,82055298318</text:p>
          </table:table-cell>
          <table:table-cell table:number-columns-repeated="3"/>
          <table:table-cell office:value-type="float" office:value="98.2169474364262" calcext:value-type="float">
            <text:p>98,2169474364262</text:p>
          </table:table-cell>
          <table:table-cell table:number-columns-repeated="21"/>
        </table:table-row>
        <table:table-row table:style-name="ro1">
          <table:table-cell office:value-type="float" office:value="2536.26776286378" calcext:value-type="float">
            <text:p>2536,26776286378</text:p>
          </table:table-cell>
          <table:table-cell table:number-columns-repeated="3"/>
          <table:table-cell office:value-type="float" office:value="98.2202937073691" calcext:value-type="float">
            <text:p>98,2202937073691</text:p>
          </table:table-cell>
          <table:table-cell table:number-columns-repeated="21"/>
        </table:table-row>
        <table:table-row table:style-name="ro1">
          <table:table-cell office:value-type="float" office:value="2622.44675917716" calcext:value-type="float">
            <text:p>2622,44675917716</text:p>
          </table:table-cell>
          <table:table-cell table:number-columns-repeated="3"/>
          <table:table-cell office:value-type="float" office:value="98.1435651285656" calcext:value-type="float">
            <text:p>98,1435651285656</text:p>
          </table:table-cell>
          <table:table-cell table:number-columns-repeated="21"/>
        </table:table-row>
        <table:table-row table:style-name="ro1">
          <table:table-cell office:value-type="float" office:value="2711.70363508339" calcext:value-type="float">
            <text:p>2711,70363508339</text:p>
          </table:table-cell>
          <table:table-cell table:number-columns-repeated="3"/>
          <table:table-cell office:value-type="float" office:value="98.0642443680459" calcext:value-type="float">
            <text:p>98,0642443680459</text:p>
          </table:table-cell>
          <table:table-cell table:number-columns-repeated="21"/>
        </table:table-row>
        <table:table-row table:style-name="ro1">
          <table:table-cell office:value-type="float" office:value="2800.96010291807" calcext:value-type="float">
            <text:p>2800,96010291807</text:p>
          </table:table-cell>
          <table:table-cell table:number-columns-repeated="3"/>
          <table:table-cell office:value-type="float" office:value="97.9838867348396" calcext:value-type="float">
            <text:p>97,9838867348396</text:p>
          </table:table-cell>
          <table:table-cell table:number-columns-repeated="21"/>
        </table:table-row>
        <table:table-row table:style-name="ro1">
          <table:table-cell office:value-type="float" office:value="2887.13828308838" calcext:value-type="float">
            <text:p>2887,13828308838</text:p>
          </table:table-cell>
          <table:table-cell table:number-columns-repeated="3"/>
          <table:table-cell office:value-type="float" office:value="97.9050844106631" calcext:value-type="float">
            <text:p>97,9050844106631</text:p>
          </table:table-cell>
          <table:table-cell table:number-columns-repeated="21"/>
        </table:table-row>
        <table:table-row table:style-name="ro1">
          <table:table-cell office:value-type="float" office:value="2976.39497350754" calcext:value-type="float">
            <text:p>2976,39497350754</text:p>
          </table:table-cell>
          <table:table-cell table:number-columns-repeated="3"/>
          <table:table-cell office:value-type="float" office:value="97.8252923443767" calcext:value-type="float">
            <text:p>97,8252923443767</text:p>
          </table:table-cell>
          <table:table-cell table:number-columns-repeated="21"/>
        </table:table-row>
        <table:table-row table:style-name="ro1">
          <table:table-cell office:value-type="float" office:value="3065.65162682929" calcext:value-type="float">
            <text:p>3065,65162682929</text:p>
          </table:table-cell>
          <table:table-cell table:number-columns-repeated="3"/>
          <table:table-cell office:value-type="float" office:value="97.7454060169371" calcext:value-type="float">
            <text:p>97,7454060169371</text:p>
          </table:table-cell>
          <table:table-cell table:number-columns-repeated="21"/>
        </table:table-row>
        <table:table-row table:style-name="ro1">
          <table:table-cell office:value-type="float" office:value="3151.82960296383" calcext:value-type="float">
            <text:p>3151,82960296383</text:p>
          </table:table-cell>
          <table:table-cell table:number-columns-repeated="3"/>
          <table:table-cell office:value-type="float" office:value="97.6660852564173" calcext:value-type="float">
            <text:p>97,6660852564173</text:p>
          </table:table-cell>
          <table:table-cell table:number-columns-repeated="21"/>
        </table:table-row>
        <table:table-row table:style-name="ro1">
          <table:table-cell office:value-type="float" office:value="3238.00778313413" calcext:value-type="float">
            <text:p>3238,00778313413</text:p>
          </table:table-cell>
          <table:table-cell table:number-columns-repeated="3"/>
          <table:table-cell office:value-type="float" office:value="97.5872829322408" calcext:value-type="float">
            <text:p>97,5872829322408</text:p>
          </table:table-cell>
          <table:table-cell table:number-columns-repeated="21"/>
        </table:table-row>
        <table:table-row table:style-name="ro1">
          <table:table-cell office:value-type="float" office:value="3330.34315074051" calcext:value-type="float">
            <text:p>3330,34315074051</text:p>
          </table:table-cell>
          <table:table-cell table:number-columns-repeated="3"/>
          <table:table-cell office:value-type="float" office:value="97.5069252990345" calcext:value-type="float">
            <text:p>97,5069252990345</text:p>
          </table:table-cell>
          <table:table-cell table:number-columns-repeated="21"/>
        </table:table-row>
        <table:table-row table:style-name="ro1">
          <table:table-cell office:value-type="float" office:value="3416.52092283927" calcext:value-type="float">
            <text:p>3416,52092283927</text:p>
          </table:table-cell>
          <table:table-cell table:number-columns-repeated="3"/>
          <table:table-cell office:value-type="float" office:value="97.4270861021715" calcext:value-type="float">
            <text:p>97,4270861021715</text:p>
          </table:table-cell>
          <table:table-cell table:number-columns-repeated="21"/>
        </table:table-row>
        <table:table-row table:style-name="ro1">
          <table:table-cell office:value-type="float" office:value="3502.69930704535" calcext:value-type="float">
            <text:p>3502,69930704535</text:p>
          </table:table-cell>
          <table:table-cell table:number-columns-repeated="3"/>
          <table:table-cell office:value-type="float" office:value="97.3488022143383" calcext:value-type="float">
            <text:p>97,3488022143383</text:p>
          </table:table-cell>
          <table:table-cell table:number-columns-repeated="21"/>
        </table:table-row>
        <table:table-row table:style-name="ro1">
          <table:table-cell office:value-type="float" office:value="3595.03426658019" calcext:value-type="float">
            <text:p>3595,03426658019</text:p>
          </table:table-cell>
          <table:table-cell table:number-columns-repeated="3"/>
          <table:table-cell office:value-type="float" office:value="97.2674077084455" calcext:value-type="float">
            <text:p>97,2674077084455</text:p>
          </table:table-cell>
          <table:table-cell table:number-columns-repeated="21"/>
        </table:table-row>
        <table:table-row table:style-name="ro1">
          <table:table-cell office:value-type="float" office:value="3681.21244675049" calcext:value-type="float">
            <text:p>3681,21244675049</text:p>
          </table:table-cell>
          <table:table-cell table:number-columns-repeated="3"/>
          <table:table-cell office:value-type="float" office:value="97.188605384269" calcext:value-type="float">
            <text:p>97,188605384269</text:p>
          </table:table-cell>
          <table:table-cell table:number-columns-repeated="21"/>
        </table:table-row>
        <table:table-row table:style-name="ro1">
          <table:table-cell office:value-type="float" office:value="3767.39042288503" calcext:value-type="float">
            <text:p>3767,39042288503</text:p>
          </table:table-cell>
          <table:table-cell table:number-columns-repeated="3"/>
          <table:table-cell office:value-type="float" office:value="97.1092846237492" calcext:value-type="float">
            <text:p>97,1092846237492</text:p>
          </table:table-cell>
          <table:table-cell table:number-columns-repeated="21"/>
        </table:table-row>
        <table:table-row table:style-name="ro1">
          <table:table-cell office:value-type="float" office:value="3859.72579049141" calcext:value-type="float">
            <text:p>3859,72579049141</text:p>
          </table:table-cell>
          <table:table-cell table:number-columns-repeated="3"/>
          <table:table-cell office:value-type="float" office:value="97.0289269905429" calcext:value-type="float">
            <text:p>97,0289269905429</text:p>
          </table:table-cell>
          <table:table-cell table:number-columns-repeated="21"/>
        </table:table-row>
        <table:table-row table:style-name="ro1">
          <table:table-cell office:value-type="float" office:value="3945.90356259017" calcext:value-type="float">
            <text:p>3945,90356259017</text:p>
          </table:table-cell>
          <table:table-cell table:number-columns-repeated="3"/>
          <table:table-cell office:value-type="float" office:value="96.9490877936799" calcext:value-type="float">
            <text:p>96,9490877936799</text:p>
          </table:table-cell>
          <table:table-cell table:number-columns-repeated="21"/>
        </table:table-row>
        <table:table-row table:style-name="ro1">
          <table:table-cell office:value-type="float" office:value="4032.08174276048" calcext:value-type="float">
            <text:p>4032,08174276048</text:p>
          </table:table-cell>
          <table:table-cell table:number-columns-repeated="3"/>
          <table:table-cell office:value-type="float" office:value="96.8702854695034" calcext:value-type="float">
            <text:p>96,8702854695034</text:p>
          </table:table-cell>
          <table:table-cell table:number-columns-repeated="21"/>
        </table:table-row>
        <table:table-row table:style-name="ro1">
          <table:table-cell office:value-type="float" office:value="4124.41690633108" calcext:value-type="float">
            <text:p>4124,41690633108</text:p>
          </table:table-cell>
          <table:table-cell table:number-columns-repeated="3"/>
          <table:table-cell office:value-type="float" office:value="96.7894093999539" calcext:value-type="float">
            <text:p>96,7894093999539</text:p>
          </table:table-cell>
          <table:table-cell table:number-columns-repeated="21"/>
        </table:table-row>
        <table:table-row table:style-name="ro1">
          <table:table-cell office:value-type="float" office:value="4210.59488246562" calcext:value-type="float">
            <text:p>4210,59488246562</text:p>
          </table:table-cell>
          <table:table-cell table:number-columns-repeated="3"/>
          <table:table-cell office:value-type="float" office:value="96.7100886394341" calcext:value-type="float">
            <text:p>96,7100886394341</text:p>
          </table:table-cell>
          <table:table-cell table:number-columns-repeated="21"/>
        </table:table-row>
        <table:table-row table:style-name="ro1">
          <table:table-cell office:value-type="float" office:value="4296.77306263592" calcext:value-type="float">
            <text:p>4296,77306263592</text:p>
          </table:table-cell>
          <table:table-cell table:number-columns-repeated="3"/>
          <table:table-cell office:value-type="float" office:value="96.6312863152576" calcext:value-type="float">
            <text:p>96,6312863152576</text:p>
          </table:table-cell>
          <table:table-cell table:number-columns-repeated="21"/>
        </table:table-row>
        <table:table-row table:style-name="ro1">
          <table:table-cell office:value-type="float" office:value="4386.02969740897" calcext:value-type="float">
            <text:p>4386,02969740897</text:p>
          </table:table-cell>
          <table:table-cell table:number-columns-repeated="3"/>
          <table:table-cell office:value-type="float" office:value="96.5513528572413" calcext:value-type="float">
            <text:p>96,5513528572413</text:p>
          </table:table-cell>
          <table:table-cell table:number-columns-repeated="21"/>
        </table:table-row>
        <table:table-row table:style-name="ro1">
          <table:table-cell office:value-type="float" office:value="4475.28620234107" calcext:value-type="float">
            <text:p>4475,28620234107</text:p>
          </table:table-cell>
          <table:table-cell table:number-columns-repeated="3"/>
          <table:table-cell office:value-type="float" office:value="96.4710894851883" calcext:value-type="float">
            <text:p>96,4710894851883</text:p>
          </table:table-cell>
          <table:table-cell table:number-columns-repeated="21"/>
        </table:table-row>
        <table:table-row table:style-name="ro1">
          <table:table-cell office:value-type="float" office:value="4561.46458654714" calcext:value-type="float">
            <text:p>4561,46458654714</text:p>
          </table:table-cell>
          <table:table-cell table:number-columns-repeated="3"/>
          <table:table-cell office:value-type="float" office:value="96.3928055973551" calcext:value-type="float">
            <text:p>96,3928055973551</text:p>
          </table:table-cell>
          <table:table-cell table:number-columns-repeated="21"/>
        </table:table-row>
        <table:table-row table:style-name="ro1">
          <table:table-cell office:value-type="float" office:value="4650.72103583312" calcext:value-type="float">
            <text:p>4650,72103583312</text:p>
          </table:table-cell>
          <table:table-cell table:number-columns-repeated="3"/>
          <table:table-cell office:value-type="float" office:value="96.3124008335722" calcext:value-type="float">
            <text:p>96,3124008335722</text:p>
          </table:table-cell>
          <table:table-cell table:number-columns-repeated="21"/>
        </table:table-row>
        <table:table-row table:style-name="ro1">
          <table:table-cell office:value-type="float" office:value="4739.97772625228" calcext:value-type="float">
            <text:p>4739,97772625228</text:p>
          </table:table-cell>
          <table:table-cell table:number-columns-repeated="3"/>
          <table:table-cell office:value-type="float" office:value="96.2326087672858" calcext:value-type="float">
            <text:p>96,2326087672858</text:p>
          </table:table-cell>
          <table:table-cell table:number-columns-repeated="21"/>
        </table:table-row>
        <table:table-row table:style-name="ro1">
          <table:table-cell office:value-type="float" office:value="4826.15590642259" calcext:value-type="float">
            <text:p>4826,15590642259</text:p>
          </table:table-cell>
          <table:table-cell table:number-columns-repeated="3"/>
          <table:table-cell office:value-type="float" office:value="96.1538064431093" calcext:value-type="float">
            <text:p>96,1538064431093</text:p>
          </table:table-cell>
          <table:table-cell table:number-columns-repeated="21"/>
        </table:table-row>
        <table:table-row table:style-name="ro1">
          <table:table-cell office:value-type="float" office:value="4915.41255974434" calcext:value-type="float">
            <text:p>4915,41255974434</text:p>
          </table:table-cell>
          <table:table-cell table:number-columns-repeated="3"/>
          <table:table-cell office:value-type="float" office:value="96.0739201156696" calcext:value-type="float">
            <text:p>96,0739201156696</text:p>
          </table:table-cell>
          <table:table-cell table:number-columns-repeated="21"/>
        </table:table-row>
        <table:table-row table:style-name="ro1">
          <table:table-cell office:value-type="float" office:value="4989.2798521993" calcext:value-type="float">
            <text:p>4989,2798521993</text:p>
          </table:table-cell>
          <table:table-cell table:number-columns-repeated="3"/>
          <table:table-cell office:value-type="float" office:value="96.0070889579649" calcext:value-type="float">
            <text:p>96,0070889579649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1">
            <text:p>OCP_min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office:value-type="float" office:value="500.634101465262" calcext:value-type="float">
            <text:p>500,63410146526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565.290690617134" calcext:value-type="float">
            <text:p>565,29069061713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633.026485594352" calcext:value-type="float">
            <text:p>633,02648559435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700.762790660996" calcext:value-type="float">
            <text:p>700,76279066099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768.498075548789" calcext:value-type="float">
            <text:p>768,49807554878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846.702435803415" calcext:value-type="float">
            <text:p>846,70243580341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914.437822709093" calcext:value-type="float">
            <text:p>914,43782270909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982.481609681366" calcext:value-type="float">
            <text:p>982,48160968136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050.21791474801" calcext:value-type="float">
            <text:p>1050,21791474801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117.95370972523" calcext:value-type="float">
            <text:p>1117,9537097252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185.68899461302" calcext:value-type="float">
            <text:p>1185,6889946130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260.50615704725" calcext:value-type="float">
            <text:p>1260,506157047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328.24195202447" calcext:value-type="float">
            <text:p>1328,2419520244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395.97815507322" calcext:value-type="float">
            <text:p>1395,9781550732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472.34085446044" calcext:value-type="float">
            <text:p>1472,3408544604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33658179343" calcext:value-type="float">
            <text:p>1501,3365817934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38146966287" calcext:value-type="float">
            <text:p>1501,3814696628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43599255478" calcext:value-type="float">
            <text:p>1501,4359925547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49691990282" calcext:value-type="float">
            <text:p>1501,4969199028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54180777225" calcext:value-type="float">
            <text:p>1501,541807772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58669564168" calcext:value-type="float">
            <text:p>1501,5866956416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63158351112" calcext:value-type="float">
            <text:p>1501,6315835111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67647138055" calcext:value-type="float">
            <text:p>1501,6764713805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72458981635" calcext:value-type="float">
            <text:p>1501,7245898163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1.76947768579" calcext:value-type="float">
            <text:p>1501,7694776857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21"/>
        </table:table-row>
        <table:table-row table:style-name="ro1">
          <table:table-cell office:value-type="float" office:value="1508.47046579061" calcext:value-type="float">
            <text:p>1508,4704657906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579.97353188676" calcext:value-type="float">
            <text:p>1579,9735318867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647.70973493551" calcext:value-type="float">
            <text:p>1647,7097349355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715.75301181836" calcext:value-type="float">
            <text:p>1715,7530118183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752.90078431227" calcext:value-type="float">
            <text:p>1752,900784312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783.48880679558" calcext:value-type="float">
            <text:p>1783,4888067955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826.79437883287" calcext:value-type="float">
            <text:p>1826,794378832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858.30607124769" calcext:value-type="float">
            <text:p>1858,3060712476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900.68797335347" calcext:value-type="float">
            <text:p>1900,6879733534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929.73654595094" calcext:value-type="float">
            <text:p>1929,7365459509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1997.47336110701" calcext:value-type="float">
            <text:p>1997,4733611070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065.20813590538" calcext:value-type="float">
            <text:p>2065,2081359053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136.63861060862" calcext:value-type="float">
            <text:p>2136,6386106086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211.45587506073" calcext:value-type="float">
            <text:p>2211,4558750607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279.1926902168" calcext:value-type="float">
            <text:p>2279,19269021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346.92746501517" calcext:value-type="float">
            <text:p>2346,92746501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414.97114996956" calcext:value-type="float">
            <text:p>2414,9711499695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493.17520417053" calcext:value-type="float">
            <text:p>2493,1752041705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571.3792583715" calcext:value-type="float">
            <text:p>2571,379258371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639.11546142026" calcext:value-type="float">
            <text:p>2639,115461420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707.15873830311" calcext:value-type="float">
            <text:p>2707,1587383031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774.89453328033" calcext:value-type="float">
            <text:p>2774,8945332803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849.71179773244" calcext:value-type="float">
            <text:p>2849,7117977324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921.14227243568" calcext:value-type="float">
            <text:p>2921,142272435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2988.87908759175" calcext:value-type="float">
            <text:p>2988,879087591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056.61386239012" calcext:value-type="float">
            <text:p>3056,613862390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128.04433709337" calcext:value-type="float">
            <text:p>3128,0443370933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202.86160154548" calcext:value-type="float">
            <text:p>3202,8616015454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270.59841670155" calcext:value-type="float">
            <text:p>3270,5984167015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338.33319149992" calcext:value-type="float">
            <text:p>3338,3331914999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406.3768764543" calcext:value-type="float">
            <text:p>3406,37687645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484.58093065527" calcext:value-type="float">
            <text:p>3484,580930655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562.78498485625" calcext:value-type="float">
            <text:p>3562,7849848562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630.521187905" calcext:value-type="float">
            <text:p>3630,521187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698.56446478785" calcext:value-type="float">
            <text:p>3698,5644647878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766.30025976507" calcext:value-type="float">
            <text:p>3766,3002597650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841.11752421718" calcext:value-type="float">
            <text:p>3841,1175242171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912.54799892043" calcext:value-type="float">
            <text:p>3912,547998920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3980.2848140765" calcext:value-type="float">
            <text:p>3980,284814076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048.01958887487" calcext:value-type="float">
            <text:p>4048,019588874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119.45006357812" calcext:value-type="float">
            <text:p>4119,450063578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194.26732803022" calcext:value-type="float">
            <text:p>4194,2673280302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262.00414318629" calcext:value-type="float">
            <text:p>4262,0041431862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329.73891798466" calcext:value-type="float">
            <text:p>4329,7389179846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397.78260293905" calcext:value-type="float">
            <text:p>4397,78260293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475.98665714002" calcext:value-type="float">
            <text:p>4475,9866571400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554.19071134099" calcext:value-type="float">
            <text:p>4554,1907113409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621.92691438975" calcext:value-type="float">
            <text:p>4621,926914389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689.9701912726" calcext:value-type="float">
            <text:p>4689,97019127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757.70598624982" calcext:value-type="float">
            <text:p>4757,7059862498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832.52325070193" calcext:value-type="float">
            <text:p>4832,5232507019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903.95372540517" calcext:value-type="float">
            <text:p>4903,95372540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4971.69054056124" calcext:value-type="float">
            <text:p>4971,6905405612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office:value-type="float" office:value="5011.71521741439" calcext:value-type="float">
            <text:p>5011,7152174143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1">
            <text:p>OCP_peak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1647.90724156103" calcext:value-type="float">
            <text:p>1647,9072415610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1715.64262846671" calcext:value-type="float">
            <text:p>1715,64262846671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21"/>
        </table:table-row>
        <table:table-row table:style-name="ro1">
          <table:table-cell office:value-type="float" office:value="1783.68672149263" calcext:value-type="float">
            <text:p>1783,686721492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1851.42200638043" calcext:value-type="float">
            <text:p>1851,4220063804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21"/>
        </table:table-row>
        <table:table-row table:style-name="ro1">
          <table:table-cell office:value-type="float" office:value="1919.15780135765" calcext:value-type="float">
            <text:p>1919,1578013576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21"/>
        </table:table-row>
        <table:table-row table:style-name="ro1">
          <table:table-cell office:value-type="float" office:value="1993.97516782764" calcext:value-type="float">
            <text:p>1993,97516782764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21"/>
        </table:table-row>
        <table:table-row table:style-name="ro1">
          <table:table-cell office:value-type="float" office:value="2061.7113708764" calcext:value-type="float">
            <text:p>2061,711370876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129.44716585362" calcext:value-type="float">
            <text:p>2129,4471658536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200.87764055687" calcext:value-type="float">
            <text:p>2200,8776405568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268.61343553409" calcext:value-type="float">
            <text:p>2268,613435534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340.04391023733" calcext:value-type="float">
            <text:p>2340,0439102373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407.77970521455" calcext:value-type="float">
            <text:p>2407,77970521455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475.51550019177" calcext:value-type="float">
            <text:p>2475,5155001917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550.33276464388" calcext:value-type="float">
            <text:p>2550,3327646438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618.0685596211" calcext:value-type="float">
            <text:p>2618,068559621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685.80435459832" calcext:value-type="float">
            <text:p>2685,8043545983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753.84803955271" calcext:value-type="float">
            <text:p>2753,8480395527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821.58383452993" calcext:value-type="float">
            <text:p>2821,5838345299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899.7878887309" calcext:value-type="float">
            <text:p>2899,78788873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2967.52317361869" calcext:value-type="float">
            <text:p>2967,52317361869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21"/>
        </table:table-row>
        <table:table-row table:style-name="ro1">
          <table:table-cell office:value-type="float" office:value="3045.72773790908" calcext:value-type="float">
            <text:p>3045,7277379090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113.4635328863" calcext:value-type="float">
            <text:p>3113,46353288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181.19932786352" calcext:value-type="float">
            <text:p>3181,199327863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249.24301281791" calcext:value-type="float">
            <text:p>3249,2430128179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316.97880779513" calcext:value-type="float">
            <text:p>3316,9788077951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391.79607224724" calcext:value-type="float">
            <text:p>3391,7960722472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459.53186722446" calcext:value-type="float">
            <text:p>3459,5318672244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527.26766220167" calcext:value-type="float">
            <text:p>3527,2676622016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598.6976268155" calcext:value-type="float">
            <text:p>3598,697626815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21"/>
        </table:table-row>
        <table:table-row table:style-name="ro1">
          <table:table-cell office:value-type="float" office:value="3666.43393188214" calcext:value-type="float">
            <text:p>3666,433931882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734.16972685936" calcext:value-type="float">
            <text:p>3734,169726859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805.60020156261" calcext:value-type="float">
            <text:p>3805,6002015626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873.33599653983" calcext:value-type="float">
            <text:p>3873,3359965398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3948.15326099194" calcext:value-type="float">
            <text:p>3948,1532609919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015.88854587973" calcext:value-type="float">
            <text:p>4015,8885458797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21"/>
        </table:table-row>
        <table:table-row table:style-name="ro1">
          <table:table-cell office:value-type="float" office:value="4083.62485094638" calcext:value-type="float">
            <text:p>4083,6248509463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151.66853590076" calcext:value-type="float">
            <text:p>4151,668535900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219.40433087798" calcext:value-type="float">
            <text:p>4219,4043308779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287.1401258552" calcext:value-type="float">
            <text:p>4287,14012585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365.34418005617" calcext:value-type="float">
            <text:p>4365,3441800561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443.54823425714" calcext:value-type="float">
            <text:p>4443,548234257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511.28402923436" calcext:value-type="float">
            <text:p>4511,284029234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579.01982421158" calcext:value-type="float">
            <text:p>4579,0198242115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647.06350916597" calcext:value-type="float">
            <text:p>4647,0635091659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714.79879405376" calcext:value-type="float">
            <text:p>4714,79879405376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21"/>
        </table:table-row>
        <table:table-row table:style-name="ro1">
          <table:table-cell office:value-type="float" office:value="4782.5350991204" calcext:value-type="float">
            <text:p>4782,535099120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857.35236357251" calcext:value-type="float">
            <text:p>4857,3523635725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925.08815854973" calcext:value-type="float">
            <text:p>4925,0881585497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>
          <table:table-cell office:value-type="float" office:value="4968.80853530776" calcext:value-type="float">
            <text:p>4968,808535307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21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6" table:number-rows-spanned="1">
            <text:p>iTHD_EPC_50Hz</text:p>
          </table:table-cell>
          <table:covered-table-cell table:number-columns-repeated="15"/>
          <table:table-cell table:number-columns-repeated="10"/>
        </table:table-row>
        <table:table-row table:style-name="ro1">
          <table:table-cell office:value-type="float" office:value="253.742348109824" calcext:value-type="float">
            <text:p>253,742348109824</text:p>
          </table:table-cell>
          <table:table-cell table:number-columns-repeated="14"/>
          <table:table-cell office:value-type="float" office:value="7.34857547476844" calcext:value-type="float">
            <text:p>7,34857547476844</text:p>
          </table:table-cell>
          <table:table-cell table:number-columns-repeated="10"/>
        </table:table-row>
        <table:table-row table:style-name="ro1">
          <table:table-cell office:value-type="float" office:value="296.768215528705" calcext:value-type="float">
            <text:p>296,768215528705</text:p>
          </table:table-cell>
          <table:table-cell table:number-columns-repeated="14"/>
          <table:table-cell office:value-type="float" office:value="6.70635164970489" calcext:value-type="float">
            <text:p>6,70635164970489</text:p>
          </table:table-cell>
          <table:table-cell table:number-columns-repeated="10"/>
        </table:table-row>
        <table:table-row table:style-name="ro1">
          <table:table-cell office:value-type="float" office:value="333.640993976667" calcext:value-type="float">
            <text:p>333,640993976667</text:p>
          </table:table-cell>
          <table:table-cell table:number-columns-repeated="14"/>
          <table:table-cell office:value-type="float" office:value="6.11386232961259" calcext:value-type="float">
            <text:p>6,11386232961259</text:p>
          </table:table-cell>
          <table:table-cell table:number-columns-repeated="10"/>
        </table:table-row>
        <table:table-row table:style-name="ro1">
          <table:table-cell office:value-type="float" office:value="370.512426678231" calcext:value-type="float">
            <text:p>370,512426678231</text:p>
          </table:table-cell>
          <table:table-cell table:number-columns-repeated="14"/>
          <table:table-cell office:value-type="float" office:value="5.51272353039485" calcext:value-type="float">
            <text:p>5,51272353039485</text:p>
          </table:table-cell>
          <table:table-cell table:number-columns-repeated="10"/>
        </table:table-row>
        <table:table-row table:style-name="ro1">
          <table:table-cell office:value-type="float" office:value="407.382513633396" calcext:value-type="float">
            <text:p>407,382513633396</text:p>
          </table:table-cell>
          <table:table-cell table:number-columns-repeated="14"/>
          <table:table-cell office:value-type="float" office:value="4.90293525205168" calcext:value-type="float">
            <text:p>4,90293525205168</text:p>
          </table:table-cell>
          <table:table-cell table:number-columns-repeated="10"/>
        </table:table-row>
        <table:table-row table:style-name="ro1">
          <table:table-cell office:value-type="float" office:value="459.652098968123" calcext:value-type="float">
            <text:p>459,652098968123</text:p>
          </table:table-cell>
          <table:table-cell table:number-columns-repeated="14"/>
          <table:table-cell office:value-type="float" office:value="4.27663433174178" calcext:value-type="float">
            <text:p>4,27663433174178</text:p>
          </table:table-cell>
          <table:table-cell table:number-columns-repeated="10"/>
        </table:table-row>
        <table:table-row table:style-name="ro1">
          <table:table-cell office:value-type="float" office:value="527.347791758929" calcext:value-type="float">
            <text:p>527,347791758929</text:p>
          </table:table-cell>
          <table:table-cell table:number-columns-repeated="14"/>
          <table:table-cell office:value-type="float" office:value="3.8048445612635" calcext:value-type="float">
            <text:p>3,8048445612635</text:p>
          </table:table-cell>
          <table:table-cell table:number-columns-repeated="10"/>
        </table:table-row>
        <table:table-row table:style-name="ro1">
          <table:table-cell office:value-type="float" office:value="595.047888810675" calcext:value-type="float">
            <text:p>595,047888810675</text:p>
          </table:table-cell>
          <table:table-cell table:number-columns-repeated="14"/>
          <table:table-cell office:value-type="float" office:value="3.36136217701392" calcext:value-type="float">
            <text:p>3,36136217701392</text:p>
          </table:table-cell>
          <table:table-cell table:number-columns-repeated="10"/>
        </table:table-row>
        <table:table-row table:style-name="ro1">
          <table:table-cell office:value-type="float" office:value="662.761932688735" calcext:value-type="float">
            <text:p>662,761932688735</text:p>
          </table:table-cell>
          <table:table-cell table:number-columns-repeated="14"/>
          <table:table-cell office:value-type="float" office:value="3.00751984915522" calcext:value-type="float">
            <text:p>3,00751984915522</text:p>
          </table:table-cell>
          <table:table-cell table:number-columns-repeated="10"/>
        </table:table-row>
        <table:table-row table:style-name="ro1">
          <table:table-cell office:value-type="float" office:value="730.502402132439" calcext:value-type="float">
            <text:p>730,502402132439</text:p>
          </table:table-cell>
          <table:table-cell table:number-columns-repeated="14"/>
          <table:table-cell office:value-type="float" office:value="2.82352183866869" calcext:value-type="float">
            <text:p>2,82352183866869</text:p>
          </table:table-cell>
          <table:table-cell table:number-columns-repeated="10"/>
        </table:table-row>
        <table:table-row table:style-name="ro1">
          <table:table-cell office:value-type="float" office:value="798.243605619633" calcext:value-type="float">
            <text:p>798,243605619633</text:p>
          </table:table-cell>
          <table:table-cell table:number-columns-repeated="14"/>
          <table:table-cell office:value-type="float" office:value="2.64424172588694" calcext:value-type="float">
            <text:p>2,64424172588694</text:p>
          </table:table-cell>
          <table:table-cell table:number-columns-repeated="10"/>
        </table:table-row>
        <table:table-row table:style-name="ro1">
          <table:table-cell office:value-type="float" office:value="865.989580389513" calcext:value-type="float">
            <text:p>865,989580389513</text:p>
          </table:table-cell>
          <table:table-cell table:number-columns-repeated="14"/>
          <table:table-cell office:value-type="float" office:value="2.49562794818629" calcext:value-type="float">
            <text:p>2,49562794818629</text:p>
          </table:table-cell>
          <table:table-cell table:number-columns-repeated="10"/>
        </table:table-row>
        <table:table-row table:style-name="ro1">
          <table:table-cell office:value-type="float" office:value="933.743629637785" calcext:value-type="float">
            <text:p>933,743629637785</text:p>
          </table:table-cell>
          <table:table-cell table:number-columns-repeated="14"/>
          <table:table-cell office:value-type="float" office:value="2.39891104523824" calcext:value-type="float">
            <text:p>2,39891104523824</text:p>
          </table:table-cell>
          <table:table-cell table:number-columns-repeated="10"/>
        </table:table-row>
        <table:table-row table:style-name="ro1">
          <table:table-cell office:value-type="float" office:value="1001.49767888606" calcext:value-type="float">
            <text:p>1001,49767888606</text:p>
          </table:table-cell>
          <table:table-cell table:number-columns-repeated="14"/>
          <table:table-cell office:value-type="float" office:value="2.30219414229019" calcext:value-type="float">
            <text:p>2,30219414229019</text:p>
          </table:table-cell>
          <table:table-cell table:number-columns-repeated="10"/>
        </table:table-row>
        <table:table-row table:style-name="ro1">
          <table:table-cell office:value-type="float" office:value="1069.25282919956" calcext:value-type="float">
            <text:p>1069,25282919956</text:p>
          </table:table-cell>
          <table:table-cell table:number-columns-repeated="14"/>
          <table:table-cell office:value-type="float" office:value="2.21255408589932" calcext:value-type="float">
            <text:p>2,21255408589932</text:p>
          </table:table-cell>
          <table:table-cell table:number-columns-repeated="10"/>
        </table:table-row>
        <table:table-row table:style-name="ro1">
          <table:table-cell office:value-type="float" office:value="1137.01018164354" calcext:value-type="float">
            <text:p>1137,01018164354</text:p>
          </table:table-cell>
          <table:table-cell table:number-columns-repeated="14"/>
          <table:table-cell office:value-type="float" office:value="2.1370677226228" calcext:value-type="float">
            <text:p>2,1370677226228</text:p>
          </table:table-cell>
          <table:table-cell table:number-columns-repeated="10"/>
        </table:table-row>
        <table:table-row table:style-name="ro1">
          <table:table-cell office:value-type="float" office:value="1204.76716706577" calcext:value-type="float">
            <text:p>1204,76716706577</text:p>
          </table:table-cell>
          <table:table-cell table:number-columns-repeated="14"/>
          <table:table-cell office:value-type="float" office:value="2.05922241049388" calcext:value-type="float">
            <text:p>2,05922241049388</text:p>
          </table:table-cell>
          <table:table-cell table:number-columns-repeated="10"/>
        </table:table-row>
        <table:table-row table:style-name="ro1">
          <table:table-cell office:value-type="float" office:value="1272.52562057499" calcext:value-type="float">
            <text:p>1272,52562057499</text:p>
          </table:table-cell>
          <table:table-cell table:number-columns-repeated="14"/>
          <table:table-cell office:value-type="float" office:value="1.99081289377453" calcext:value-type="float">
            <text:p>1,99081289377453</text:p>
          </table:table-cell>
          <table:table-cell table:number-columns-repeated="10"/>
        </table:table-row>
        <table:table-row table:style-name="ro1">
          <table:table-cell office:value-type="float" office:value="1340.28701025816" calcext:value-type="float">
            <text:p>1340,28701025816</text:p>
          </table:table-cell>
          <table:table-cell table:number-columns-repeated="14"/>
          <table:table-cell office:value-type="float" office:value="1.94127496787431" calcext:value-type="float">
            <text:p>1,94127496787431</text:p>
          </table:table-cell>
          <table:table-cell table:number-columns-repeated="10"/>
        </table:table-row>
        <table:table-row table:style-name="ro1">
          <table:table-cell office:value-type="float" office:value="1408.0432616369" calcext:value-type="float">
            <text:p>1408,0432616369</text:p>
          </table:table-cell>
          <table:table-cell table:number-columns-repeated="14"/>
          <table:table-cell office:value-type="float" office:value="1.85871175804061" calcext:value-type="float">
            <text:p>1,85871175804061</text:p>
          </table:table-cell>
          <table:table-cell table:number-columns-repeated="10"/>
        </table:table-row>
        <table:table-row table:style-name="ro1">
          <table:table-cell office:value-type="float" office:value="1475.80465132007" calcext:value-type="float">
            <text:p>1475,80465132007</text:p>
          </table:table-cell>
          <table:table-cell table:number-columns-repeated="14"/>
          <table:table-cell office:value-type="float" office:value="1.8091738321404" calcext:value-type="float">
            <text:p>1,8091738321404</text:p>
          </table:table-cell>
          <table:table-cell table:number-columns-repeated="10"/>
        </table:table-row>
        <table:table-row table:style-name="ro1">
          <table:table-cell office:value-type="float" office:value="1543.56934419895" calcext:value-type="float">
            <text:p>1543,56934419895</text:p>
          </table:table-cell>
          <table:table-cell table:number-columns-repeated="14"/>
          <table:table-cell office:value-type="float" office:value="1.7808664459117" calcext:value-type="float">
            <text:p>1,7808664459117</text:p>
          </table:table-cell>
          <table:table-cell table:number-columns-repeated="10"/>
        </table:table-row>
        <table:table-row table:style-name="ro1">
          <table:table-cell office:value-type="float" office:value="1611.32853175166" calcext:value-type="float">
            <text:p>1611,32853175166</text:p>
          </table:table-cell>
          <table:table-cell table:number-columns-repeated="14"/>
          <table:table-cell office:value-type="float" office:value="1.71717482689713" calcext:value-type="float">
            <text:p>1,71717482689713</text:p>
          </table:table-cell>
          <table:table-cell table:number-columns-repeated="10"/>
        </table:table-row>
        <table:table-row table:style-name="ro1">
          <table:table-cell office:value-type="float" office:value="1685.25478568673" calcext:value-type="float">
            <text:p>1685,25478568673</text:p>
          </table:table-cell>
          <table:table-cell table:number-columns-repeated="14"/>
          <table:table-cell office:value-type="float" office:value="1.69358533837322" calcext:value-type="float">
            <text:p>1,69358533837322</text:p>
          </table:table-cell>
          <table:table-cell table:number-columns-repeated="10"/>
        </table:table-row>
        <table:table-row table:style-name="ro1">
          <table:table-cell office:value-type="float" office:value="1753.02168069608" calcext:value-type="float">
            <text:p>1753,02168069608</text:p>
          </table:table-cell>
          <table:table-cell table:number-columns-repeated="14"/>
          <table:table-cell office:value-type="float" office:value="1.67943164525887" calcext:value-type="float">
            <text:p>1,67943164525887</text:p>
          </table:table-cell>
          <table:table-cell table:number-columns-repeated="10"/>
        </table:table-row>
        <table:table-row table:style-name="ro1">
          <table:table-cell office:value-type="float" office:value="1820.79041081416" calcext:value-type="float">
            <text:p>1820,79041081416</text:p>
          </table:table-cell>
          <table:table-cell table:number-columns-repeated="14"/>
          <table:table-cell office:value-type="float" office:value="1.67707269640648" calcext:value-type="float">
            <text:p>1,67707269640648</text:p>
          </table:table-cell>
          <table:table-cell table:number-columns-repeated="10"/>
        </table:table-row>
        <table:table-row table:style-name="ro1">
          <table:table-cell office:value-type="float" office:value="1888.55290156257" calcext:value-type="float">
            <text:p>1888,55290156257</text:p>
          </table:table-cell>
          <table:table-cell table:number-columns-repeated="14"/>
          <table:table-cell office:value-type="float" office:value="1.63461161706343" calcext:value-type="float">
            <text:p>1,63461161706343</text:p>
          </table:table-cell>
          <table:table-cell table:number-columns-repeated="10"/>
        </table:table-row>
        <table:table-row table:style-name="ro1">
          <table:table-cell office:value-type="float" office:value="1956.31282315876" calcext:value-type="float">
            <text:p>1956,31282315876</text:p>
          </table:table-cell>
          <table:table-cell table:number-columns-repeated="14"/>
          <table:table-cell office:value-type="float" office:value="1.57563789575365" calcext:value-type="float">
            <text:p>1,57563789575365</text:p>
          </table:table-cell>
          <table:table-cell table:number-columns-repeated="10"/>
        </table:table-row>
        <table:table-row table:style-name="ro1">
          <table:table-cell office:value-type="float" office:value="2024.0731117767" calcext:value-type="float">
            <text:p>2024,0731117767</text:p>
          </table:table-cell>
          <table:table-cell table:number-columns-repeated="14"/>
          <table:table-cell office:value-type="float" office:value="1.51902312329626" calcext:value-type="float">
            <text:p>1,51902312329626</text:p>
          </table:table-cell>
          <table:table-cell table:number-columns-repeated="10"/>
        </table:table-row>
        <table:table-row table:style-name="ro1">
          <table:table-cell office:value-type="float" office:value="2091.84184189477" calcext:value-type="float">
            <text:p>2091,84184189477</text:p>
          </table:table-cell>
          <table:table-cell table:number-columns-repeated="14"/>
          <table:table-cell office:value-type="float" office:value="1.51666417444387" calcext:value-type="float">
            <text:p>1,51666417444387</text:p>
          </table:table-cell>
          <table:table-cell table:number-columns-repeated="10"/>
        </table:table-row>
        <table:table-row table:style-name="ro1">
          <table:table-cell office:value-type="float" office:value="2159.60726881714" calcext:value-type="float">
            <text:p>2159,60726881714</text:p>
          </table:table-cell>
          <table:table-cell table:number-columns-repeated="14"/>
          <table:table-cell office:value-type="float" office:value="1.49307468591995" calcext:value-type="float">
            <text:p>1,49307468591995</text:p>
          </table:table-cell>
          <table:table-cell table:number-columns-repeated="10"/>
        </table:table-row>
        <table:table-row table:style-name="ro1">
          <table:table-cell office:value-type="float" office:value="2227.37930213092" calcext:value-type="float">
            <text:p>2227,37930213092</text:p>
          </table:table-cell>
          <table:table-cell table:number-columns-repeated="14"/>
          <table:table-cell office:value-type="float" office:value="1.51194627673909" calcext:value-type="float">
            <text:p>1,51194627673909</text:p>
          </table:table-cell>
          <table:table-cell table:number-columns-repeated="10"/>
        </table:table-row>
        <table:table-row table:style-name="ro1">
          <table:table-cell office:value-type="float" office:value="2295.14693118376" calcext:value-type="float">
            <text:p>2295,14693118376</text:p>
          </table:table-cell>
          <table:table-cell table:number-columns-repeated="14"/>
          <table:table-cell office:value-type="float" office:value="1.50251048132952" calcext:value-type="float">
            <text:p>1,50251048132952</text:p>
          </table:table-cell>
          <table:table-cell table:number-columns-repeated="10"/>
        </table:table-row>
        <table:table-row table:style-name="ro1">
          <table:table-cell office:value-type="float" office:value="2362.90685277995" calcext:value-type="float">
            <text:p>2362,90685277995</text:p>
          </table:table-cell>
          <table:table-cell table:number-columns-repeated="14"/>
          <table:table-cell office:value-type="float" office:value="1.44353676001973" calcext:value-type="float">
            <text:p>1,44353676001973</text:p>
          </table:table-cell>
          <table:table-cell table:number-columns-repeated="10"/>
        </table:table-row>
        <table:table-row table:style-name="ro1">
          <table:table-cell office:value-type="float" office:value="2430.67631694152" calcext:value-type="float">
            <text:p>2430,67631694152</text:p>
          </table:table-cell>
          <table:table-cell table:number-columns-repeated="14"/>
          <table:table-cell office:value-type="float" office:value="1.44589570887213" calcext:value-type="float">
            <text:p>1,44589570887213</text:p>
          </table:table-cell>
          <table:table-cell table:number-columns-repeated="10"/>
        </table:table-row>
        <table:table-row table:style-name="ro1">
          <table:table-cell office:value-type="float" office:value="2498.43733960294" calcext:value-type="float">
            <text:p>2498,43733960294</text:p>
          </table:table-cell>
          <table:table-cell table:number-columns-repeated="14"/>
          <table:table-cell office:value-type="float" office:value="1.39399883411951" calcext:value-type="float">
            <text:p>1,39399883411951</text:p>
          </table:table-cell>
          <table:table-cell table:number-columns-repeated="10"/>
        </table:table-row>
        <table:table-row table:style-name="ro1">
          <table:table-cell office:value-type="float" office:value="2566.20166546008" calcext:value-type="float">
            <text:p>2566,20166546008</text:p>
          </table:table-cell>
          <table:table-cell table:number-columns-repeated="14"/>
          <table:table-cell office:value-type="float" office:value="1.36333249903843" calcext:value-type="float">
            <text:p>1,36333249903843</text:p>
          </table:table-cell>
          <table:table-cell table:number-columns-repeated="10"/>
        </table:table-row>
        <table:table-row table:style-name="ro1">
          <table:table-cell office:value-type="float" office:value="2633.9740657956" calcext:value-type="float">
            <text:p>2633,9740657956</text:p>
          </table:table-cell>
          <table:table-cell table:number-columns-repeated="14"/>
          <table:table-cell office:value-type="float" office:value="1.38456303870995" calcext:value-type="float">
            <text:p>1,38456303870995</text:p>
          </table:table-cell>
          <table:table-cell table:number-columns-repeated="10"/>
        </table:table-row>
        <table:table-row table:style-name="ro1">
          <table:table-cell office:value-type="float" office:value="2701.73068419609" calcext:value-type="float">
            <text:p>2701,73068419609</text:p>
          </table:table-cell>
          <table:table-cell table:number-columns-repeated="14"/>
          <table:table-cell office:value-type="float" office:value="1.30435877772864" calcext:value-type="float">
            <text:p>1,30435877772864</text:p>
          </table:table-cell>
          <table:table-cell table:number-columns-repeated="10"/>
        </table:table-row>
        <table:table-row table:style-name="ro1">
          <table:table-cell office:value-type="float" office:value="2769.49464303148" calcext:value-type="float">
            <text:p>2769,49464303148</text:p>
          </table:table-cell>
          <table:table-cell table:number-columns-repeated="14"/>
          <table:table-cell office:value-type="float" office:value="1.27133349379516" calcext:value-type="float">
            <text:p>1,27133349379516</text:p>
          </table:table-cell>
          <table:table-cell table:number-columns-repeated="10"/>
        </table:table-row>
        <table:table-row table:style-name="ro1">
          <table:table-cell office:value-type="float" office:value="2837.2597029321" calcext:value-type="float">
            <text:p>2837,2597029321</text:p>
          </table:table-cell>
          <table:table-cell table:number-columns-repeated="14"/>
          <table:table-cell office:value-type="float" office:value="1.24538505641886" calcext:value-type="float">
            <text:p>1,24538505641886</text:p>
          </table:table-cell>
          <table:table-cell table:number-columns-repeated="10"/>
        </table:table-row>
        <table:table-row table:style-name="ro1">
          <table:table-cell office:value-type="float" office:value="2905.02256070226" calcext:value-type="float">
            <text:p>2905,02256070226</text:p>
          </table:table-cell>
          <table:table-cell table:number-columns-repeated="14"/>
          <table:table-cell office:value-type="float" office:value="1.20528292592821" calcext:value-type="float">
            <text:p>1,20528292592821</text:p>
          </table:table-cell>
          <table:table-cell table:number-columns-repeated="10"/>
        </table:table-row>
        <table:table-row table:style-name="ro1">
          <table:table-cell office:value-type="float" office:value="2972.79826423349" calcext:value-type="float">
            <text:p>2972,79826423349</text:p>
          </table:table-cell>
          <table:table-cell table:number-columns-repeated="14"/>
          <table:table-cell office:value-type="float" office:value="1.24774400527125" calcext:value-type="float">
            <text:p>1,24774400527125</text:p>
          </table:table-cell>
          <table:table-cell table:number-columns-repeated="10"/>
        </table:table-row>
        <table:table-row table:style-name="ro1">
          <table:table-cell office:value-type="float" office:value="3040.56552626458" calcext:value-type="float">
            <text:p>3040,56552626458</text:p>
          </table:table-cell>
          <table:table-cell table:number-columns-repeated="14"/>
          <table:table-cell office:value-type="float" office:value="1.23594926100929" calcext:value-type="float">
            <text:p>1,23594926100929</text:p>
          </table:table-cell>
          <table:table-cell table:number-columns-repeated="10"/>
        </table:table-row>
        <table:table-row table:style-name="ro1">
          <table:table-cell office:value-type="float" office:value="3108.32985212171" calcext:value-type="float">
            <text:p>3108,32985212171</text:p>
          </table:table-cell>
          <table:table-cell table:number-columns-repeated="14"/>
          <table:table-cell office:value-type="float" office:value="1.20528292592821" calcext:value-type="float">
            <text:p>1,20528292592821</text:p>
          </table:table-cell>
          <table:table-cell table:number-columns-repeated="10"/>
        </table:table-row>
        <table:table-row table:style-name="ro1">
          <table:table-cell office:value-type="float" office:value="3176.10665671818" calcext:value-type="float">
            <text:p>3176,10665671818</text:p>
          </table:table-cell>
          <table:table-cell table:number-columns-repeated="14"/>
          <table:table-cell office:value-type="float" office:value="1.25482085182842" calcext:value-type="float">
            <text:p>1,25482085182842</text:p>
          </table:table-cell>
          <table:table-cell table:number-columns-repeated="10"/>
        </table:table-row>
        <table:table-row table:style-name="ro1">
          <table:table-cell office:value-type="float" office:value="3243.8643761839" calcext:value-type="float">
            <text:p>3243,8643761839</text:p>
          </table:table-cell>
          <table:table-cell table:number-columns-repeated="14"/>
          <table:table-cell office:value-type="float" office:value="1.18169343740429" calcext:value-type="float">
            <text:p>1,18169343740429</text:p>
          </table:table-cell>
          <table:table-cell table:number-columns-repeated="10"/>
        </table:table-row>
        <table:table-row table:style-name="ro1">
          <table:table-cell office:value-type="float" office:value="3311.63310630198" calcext:value-type="float">
            <text:p>3311,63310630198</text:p>
          </table:table-cell>
          <table:table-cell table:number-columns-repeated="14"/>
          <table:table-cell office:value-type="float" office:value="1.1793344885519" calcext:value-type="float">
            <text:p>1,1793344885519</text:p>
          </table:table-cell>
          <table:table-cell table:number-columns-repeated="10"/>
        </table:table-row>
        <table:table-row table:style-name="ro1">
          <table:table-cell office:value-type="float" office:value="3379.40734174623" calcext:value-type="float">
            <text:p>3379,40734174623</text:p>
          </table:table-cell>
          <table:table-cell table:number-columns-repeated="14"/>
          <table:table-cell office:value-type="float" office:value="1.21235977248538" calcext:value-type="float">
            <text:p>1,21235977248538</text:p>
          </table:table-cell>
          <table:table-cell table:number-columns-repeated="10"/>
        </table:table-row>
        <table:table-row table:style-name="ro1">
          <table:table-cell office:value-type="float" office:value="3447.16983249464" calcext:value-type="float">
            <text:p>3447,16983249464</text:p>
          </table:table-cell>
          <table:table-cell table:number-columns-repeated="14"/>
          <table:table-cell office:value-type="float" office:value="1.16989869314233" calcext:value-type="float">
            <text:p>1,16989869314233</text:p>
          </table:table-cell>
          <table:table-cell table:number-columns-repeated="10"/>
        </table:table-row>
        <table:table-row table:style-name="ro1">
          <table:table-cell office:value-type="float" office:value="3514.93232324304" calcext:value-type="float">
            <text:p>3514,93232324304</text:p>
          </table:table-cell>
          <table:table-cell table:number-columns-repeated="14"/>
          <table:table-cell office:value-type="float" office:value="1.12743761379929" calcext:value-type="float">
            <text:p>1,12743761379929</text:p>
          </table:table-cell>
          <table:table-cell table:number-columns-repeated="10"/>
        </table:table-row>
        <table:table-row table:style-name="ro1">
          <table:table-cell office:value-type="float" office:value="3582.69297888273" calcext:value-type="float">
            <text:p>3582,69297888273</text:p>
          </table:table-cell>
          <table:table-cell table:number-columns-repeated="14"/>
          <table:table-cell office:value-type="float" office:value="1.07318179019429" calcext:value-type="float">
            <text:p>1,07318179019429</text:p>
          </table:table-cell>
          <table:table-cell table:number-columns-repeated="10"/>
        </table:table-row>
        <table:table-row table:style-name="ro1">
          <table:table-cell office:value-type="float" office:value="3650.45069834845" calcext:value-type="float">
            <text:p>3650,45069834845</text:p>
          </table:table-cell>
          <table:table-cell table:number-columns-repeated="14"/>
          <table:table-cell office:value-type="float" office:value="1.00005437577016" calcext:value-type="float">
            <text:p>1,00005437577016</text:p>
          </table:table-cell>
          <table:table-cell table:number-columns-repeated="10"/>
        </table:table-row>
        <table:table-row table:style-name="ro1">
          <table:table-cell office:value-type="float" office:value="3718.2175933578" calcext:value-type="float">
            <text:p>3718,2175933578</text:p>
          </table:table-cell>
          <table:table-cell table:number-columns-repeated="14"/>
          <table:table-cell office:value-type="float" office:value="0.985900682655807" calcext:value-type="float">
            <text:p>0,985900682655807</text:p>
          </table:table-cell>
          <table:table-cell table:number-columns-repeated="10"/>
        </table:table-row>
        <table:table-row table:style-name="ro1">
          <table:table-cell office:value-type="float" office:value="3785.98448836715" calcext:value-type="float">
            <text:p>3785,98448836715</text:p>
          </table:table-cell>
          <table:table-cell table:number-columns-repeated="14"/>
          <table:table-cell office:value-type="float" office:value="0.971746989541458" calcext:value-type="float">
            <text:p>0,971746989541458</text:p>
          </table:table-cell>
          <table:table-cell table:number-columns-repeated="10"/>
        </table:table-row>
        <table:table-row table:style-name="ro1">
          <table:table-cell office:value-type="float" office:value="3853.75248444173" calcext:value-type="float">
            <text:p>3853,75248444173</text:p>
          </table:table-cell>
          <table:table-cell table:number-columns-repeated="14"/>
          <table:table-cell office:value-type="float" office:value="0.964670142984286" calcext:value-type="float">
            <text:p>0,964670142984286</text:p>
          </table:table-cell>
          <table:table-cell table:number-columns-repeated="10"/>
        </table:table-row>
        <table:table-row table:style-name="ro1">
          <table:table-cell office:value-type="float" office:value="3921.52304966853" calcext:value-type="float">
            <text:p>3921,52304966853</text:p>
          </table:table-cell>
          <table:table-cell table:number-columns-repeated="14"/>
          <table:table-cell office:value-type="float" office:value="0.974105938393851" calcext:value-type="float">
            <text:p>0,974105938393851</text:p>
          </table:table-cell>
          <table:table-cell table:number-columns-repeated="10"/>
        </table:table-row>
        <table:table-row table:style-name="ro1">
          <table:table-cell office:value-type="float" office:value="3989.28921063439" calcext:value-type="float">
            <text:p>3989,28921063439</text:p>
          </table:table-cell>
          <table:table-cell table:number-columns-repeated="14"/>
          <table:table-cell office:value-type="float" office:value="0.95523434757472" calcext:value-type="float">
            <text:p>0,95523434757472</text:p>
          </table:table-cell>
          <table:table-cell table:number-columns-repeated="10"/>
        </table:table-row>
        <table:table-row table:style-name="ro1">
          <table:table-cell office:value-type="float" office:value="4057.06161096991" calcext:value-type="float">
            <text:p>4057,06161096991</text:p>
          </table:table-cell>
          <table:table-cell table:number-columns-repeated="14"/>
          <table:table-cell office:value-type="float" office:value="0.976464887246241" calcext:value-type="float">
            <text:p>0,976464887246241</text:p>
          </table:table-cell>
          <table:table-cell table:number-columns-repeated="10"/>
        </table:table-row>
        <table:table-row table:style-name="ro1">
          <table:table-cell office:value-type="float" office:value="4124.83364428369" calcext:value-type="float">
            <text:p>4124,83364428369</text:p>
          </table:table-cell>
          <table:table-cell table:number-columns-repeated="14"/>
          <table:table-cell office:value-type="float" office:value="0.995336478065372" calcext:value-type="float">
            <text:p>0,995336478065372</text:p>
          </table:table-cell>
          <table:table-cell table:number-columns-repeated="10"/>
        </table:table-row>
        <table:table-row table:style-name="ro1">
          <table:table-cell office:value-type="float" office:value="4192.59503396687" calcext:value-type="float">
            <text:p>4192,59503396687</text:p>
          </table:table-cell>
          <table:table-cell table:number-columns-repeated="14"/>
          <table:table-cell office:value-type="float" office:value="0.945798552165154" calcext:value-type="float">
            <text:p>0,945798552165154</text:p>
          </table:table-cell>
          <table:table-cell table:number-columns-repeated="10"/>
        </table:table-row>
        <table:table-row table:style-name="ro1">
          <table:table-cell office:value-type="float" office:value="4260.36706728065" calcext:value-type="float">
            <text:p>4260,36706728065</text:p>
          </table:table-cell>
          <table:table-cell table:number-columns-repeated="14"/>
          <table:table-cell office:value-type="float" office:value="0.964670142984286" calcext:value-type="float">
            <text:p>0,964670142984286</text:p>
          </table:table-cell>
          <table:table-cell table:number-columns-repeated="10"/>
        </table:table-row>
        <table:table-row table:style-name="ro1">
          <table:table-cell office:value-type="float" office:value="4328.13249420302" calcext:value-type="float">
            <text:p>4328,13249420302</text:p>
          </table:table-cell>
          <table:table-cell table:number-columns-repeated="14"/>
          <table:table-cell office:value-type="float" office:value="0.941080654460372" calcext:value-type="float">
            <text:p>0,941080654460372</text:p>
          </table:table-cell>
          <table:table-cell table:number-columns-repeated="10"/>
        </table:table-row>
        <table:table-row table:style-name="ro1">
          <table:table-cell office:value-type="float" office:value="4395.89498495143" calcext:value-type="float">
            <text:p>4395,89498495143</text:p>
          </table:table-cell>
          <table:table-cell table:number-columns-repeated="14"/>
          <table:table-cell office:value-type="float" office:value="0.898619575117326" calcext:value-type="float">
            <text:p>0,898619575117326</text:p>
          </table:table-cell>
          <table:table-cell table:number-columns-repeated="10"/>
        </table:table-row>
        <table:table-row table:style-name="ro1">
          <table:table-cell office:value-type="float" office:value="4463.6710555044" calcext:value-type="float">
            <text:p>4463,6710555044</text:p>
          </table:table-cell>
          <table:table-cell table:number-columns-repeated="14"/>
          <table:table-cell office:value-type="float" office:value="0.943439603312761" calcext:value-type="float">
            <text:p>0,943439603312761</text:p>
          </table:table-cell>
          <table:table-cell table:number-columns-repeated="10"/>
        </table:table-row>
        <table:table-row table:style-name="ro1">
          <table:table-cell office:value-type="float" office:value="4531.43134412234" calcext:value-type="float">
            <text:p>4531,43134412234</text:p>
          </table:table-cell>
          <table:table-cell table:number-columns-repeated="14"/>
          <table:table-cell office:value-type="float" office:value="0.886824830855371" calcext:value-type="float">
            <text:p>0,886824830855371</text:p>
          </table:table-cell>
          <table:table-cell table:number-columns-repeated="10"/>
        </table:table-row>
        <table:table-row table:style-name="ro1">
          <table:table-cell office:value-type="float" office:value="4599.19970721867" calcext:value-type="float">
            <text:p>4599,19970721867</text:p>
          </table:table-cell>
          <table:table-cell table:number-columns-repeated="14"/>
          <table:table-cell office:value-type="float" office:value="0.882106933150585" calcext:value-type="float">
            <text:p>0,882106933150585</text:p>
          </table:table-cell>
          <table:table-cell table:number-columns-repeated="10"/>
        </table:table-row>
        <table:table-row table:style-name="ro1">
          <table:table-cell office:value-type="float" office:value="4666.97320861943" calcext:value-type="float">
            <text:p>4666,97320861943</text:p>
          </table:table-cell>
          <table:table-cell table:number-columns-repeated="14"/>
          <table:table-cell office:value-type="float" office:value="0.910414319379282" calcext:value-type="float">
            <text:p>0,910414319379282</text:p>
          </table:table-cell>
          <table:table-cell table:number-columns-repeated="10"/>
        </table:table-row>
        <table:table-row table:style-name="ro1">
          <table:table-cell office:value-type="float" office:value="4734.73569936784" calcext:value-type="float">
            <text:p>4734,73569936784</text:p>
          </table:table-cell>
          <table:table-cell table:number-columns-repeated="14"/>
          <table:table-cell office:value-type="float" office:value="0.86795324003624" calcext:value-type="float">
            <text:p>0,86795324003624</text:p>
          </table:table-cell>
          <table:table-cell table:number-columns-repeated="10"/>
        </table:table-row>
        <table:table-row table:style-name="ro1">
          <table:table-cell office:value-type="float" office:value="4802.49965820322" calcext:value-type="float">
            <text:p>4802,49965820322</text:p>
          </table:table-cell>
          <table:table-cell table:number-columns-repeated="14"/>
          <table:table-cell office:value-type="float" office:value="0.83492795610276" calcext:value-type="float">
            <text:p>0,83492795610276</text:p>
          </table:table-cell>
          <table:table-cell table:number-columns-repeated="10"/>
        </table:table-row>
        <table:table-row table:style-name="ro1">
          <table:table-cell office:value-type="float" office:value="4870.26581916908" calcext:value-type="float">
            <text:p>4870,26581916908</text:p>
          </table:table-cell>
          <table:table-cell table:number-columns-repeated="14"/>
          <table:table-cell office:value-type="float" office:value="0.816056365283629" calcext:value-type="float">
            <text:p>0,816056365283629</text:p>
          </table:table-cell>
          <table:table-cell table:number-columns-repeated="10"/>
        </table:table-row>
        <table:table-row table:style-name="ro1">
          <table:table-cell office:value-type="float" office:value="4938.03785248286" calcext:value-type="float">
            <text:p>4938,03785248286</text:p>
          </table:table-cell>
          <table:table-cell table:number-columns-repeated="14"/>
          <table:table-cell office:value-type="float" office:value="0.83492795610276" calcext:value-type="float">
            <text:p>0,83492795610276</text:p>
          </table:table-cell>
          <table:table-cell table:number-columns-repeated="10"/>
        </table:table-row>
        <table:table-row table:style-name="ro1">
          <table:table-cell office:value-type="float" office:value="5005.81869431853" calcext:value-type="float">
            <text:p>5005,81869431853</text:p>
          </table:table-cell>
          <table:table-cell table:number-columns-repeated="14"/>
          <table:table-cell office:value-type="float" office:value="0.910414319379282" calcext:value-type="float">
            <text:p>0,910414319379282</text:p>
          </table:table-cell>
          <table:table-cell table:number-columns-repeated="10"/>
        </table:table-row>
        <table:table-row table:style-name="ro1">
          <table:table-cell office:value-type="float" office:value="5062.80983089268" calcext:value-type="float">
            <text:p>5062,80983089268</text:p>
          </table:table-cell>
          <table:table-cell table:number-columns-repeated="14"/>
          <table:table-cell office:value-type="float" office:value="0.932824333477001" calcext:value-type="float">
            <text:p>0,932824333477001</text:p>
          </table:table-cell>
          <table:table-cell table:number-columns-repeated="10"/>
        </table:table-row>
        <table:table-row table:style-name="ro1">
          <table:table-cell office:value-type="float" office:value="5141.35431944595" calcext:value-type="float">
            <text:p>5141,35431944595</text:p>
          </table:table-cell>
          <table:table-cell table:number-columns-repeated="14"/>
          <table:table-cell office:value-type="float" office:value="0.893901677412543" calcext:value-type="float">
            <text:p>0,893901677412543</text:p>
          </table:table-cell>
          <table:table-cell table:number-columns-repeated="10"/>
        </table:table-row>
        <table:table-row table:style-name="ro1">
          <table:table-cell office:value-type="float" office:value="5209.12818786845" calcext:value-type="float">
            <text:p>5209,12818786845</text:p>
          </table:table-cell>
          <table:table-cell table:number-columns-repeated="14"/>
          <table:table-cell office:value-type="float" office:value="0.92456801249363" calcext:value-type="float">
            <text:p>0,92456801249363</text:p>
          </table:table-cell>
          <table:table-cell table:number-columns-repeated="10"/>
        </table:table-row>
        <table:table-row table:style-name="ro1">
          <table:table-cell office:value-type="float" office:value="5258.40599544826" calcext:value-type="float">
            <text:p>5258,40599544826</text:p>
          </table:table-cell>
          <table:table-cell table:number-columns-repeated="14"/>
          <table:table-cell office:value-type="float" office:value="0.86795324003624" calcext:value-type="float">
            <text:p>0,86795324003624</text:p>
          </table:table-cell>
          <table:table-cell table:number-columns-repeated="1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6" table:number-rows-spanned="1">
            <text:p>iTHD_OCP_min</text:p>
          </table:table-cell>
          <table:covered-table-cell table:number-columns-repeated="15"/>
          <table:table-cell table:number-columns-repeated="10"/>
        </table:table-row>
        <table:table-row table:style-name="ro1">
          <table:table-cell office:value-type="float" office:value="280.893791011025" calcext:value-type="float">
            <text:p>280,893791011025</text:p>
          </table:table-cell>
          <table:table-cell table:number-columns-repeated="14"/>
          <table:table-cell office:value-type="float" office:value="14.9839031727462" calcext:value-type="float">
            <text:p>14,9839031727462</text:p>
          </table:table-cell>
          <table:table-cell table:number-columns-repeated="10"/>
        </table:table-row>
        <table:table-row table:style-name="ro1">
          <table:table-cell office:value-type="float" office:value="338.101470414769" calcext:value-type="float">
            <text:p>338,101470414769</text:p>
          </table:table-cell>
          <table:table-cell table:number-columns-repeated="14"/>
          <table:table-cell office:value-type="float" office:value="14.9839031727462" calcext:value-type="float">
            <text:p>14,9839031727462</text:p>
          </table:table-cell>
          <table:table-cell table:number-columns-repeated="10"/>
        </table:table-row>
        <table:table-row table:style-name="ro1">
          <table:table-cell office:value-type="float" office:value="415.111808073655" calcext:value-type="float">
            <text:p>415,111808073655</text:p>
          </table:table-cell>
          <table:table-cell table:number-columns-repeated="14"/>
          <table:table-cell office:value-type="float" office:value="14.9839031727462" calcext:value-type="float">
            <text:p>14,9839031727462</text:p>
          </table:table-cell>
          <table:table-cell table:number-columns-repeated="10"/>
        </table:table-row>
        <table:table-row table:style-name="ro1">
          <table:table-cell office:value-type="float" office:value="489.034162402693" calcext:value-type="float">
            <text:p>489,034162402693</text:p>
          </table:table-cell>
          <table:table-cell table:number-columns-repeated="14"/>
          <table:table-cell office:value-type="float" office:value="14.9352498526657" calcext:value-type="float">
            <text:p>14,9352498526657</text:p>
          </table:table-cell>
          <table:table-cell table:number-columns-repeated="10"/>
        </table:table-row>
        <table:table-row table:style-name="ro1">
          <table:table-cell office:value-type="float" office:value="497.623489722626" calcext:value-type="float">
            <text:p>497,623489722626</text:p>
          </table:table-cell>
          <table:table-cell table:number-columns-repeated="14"/>
          <table:table-cell office:value-type="float" office:value="10.7452259273268" calcext:value-type="float">
            <text:p>10,7452259273268</text:p>
          </table:table-cell>
          <table:table-cell table:number-columns-repeated="10"/>
        </table:table-row>
        <table:table-row table:style-name="ro1">
          <table:table-cell office:value-type="float" office:value="497.722603944882" calcext:value-type="float">
            <text:p>497,722603944882</text:p>
          </table:table-cell>
          <table:table-cell table:number-columns-repeated="14"/>
          <table:table-cell office:value-type="float" office:value="11.3822600649151" calcext:value-type="float">
            <text:p>11,3822600649151</text:p>
          </table:table-cell>
          <table:table-cell table:number-columns-repeated="10"/>
        </table:table-row>
        <table:table-row table:style-name="ro1">
          <table:table-cell office:value-type="float" office:value="497.834839194523" calcext:value-type="float">
            <text:p>497,834839194523</text:p>
          </table:table-cell>
          <table:table-cell table:number-columns-repeated="14"/>
          <table:table-cell office:value-type="float" office:value="12.1036266239764" calcext:value-type="float">
            <text:p>12,1036266239764</text:p>
          </table:table-cell>
          <table:table-cell table:number-columns-repeated="10"/>
        </table:table-row>
        <table:table-row table:style-name="ro1">
          <table:table-cell office:value-type="float" office:value="497.947881892004" calcext:value-type="float">
            <text:p>497,947881892004</text:p>
          </table:table-cell>
          <table:table-cell table:number-columns-repeated="14"/>
          <table:table-cell office:value-type="float" office:value="12.8301828705129" calcext:value-type="float">
            <text:p>12,8301828705129</text:p>
          </table:table-cell>
          <table:table-cell table:number-columns-repeated="10"/>
        </table:table-row>
        <table:table-row table:style-name="ro1">
          <table:table-cell office:value-type="float" office:value="498.05688735029" calcext:value-type="float">
            <text:p>498,05688735029</text:p>
          </table:table-cell>
          <table:table-cell table:number-columns-repeated="14"/>
          <table:table-cell office:value-type="float" office:value="13.5307906796731" calcext:value-type="float">
            <text:p>13,5307906796731</text:p>
          </table:table-cell>
          <table:table-cell table:number-columns-repeated="10"/>
        </table:table-row>
        <table:table-row table:style-name="ro1">
          <table:table-cell office:value-type="float" office:value="498.16993004777" calcext:value-type="float">
            <text:p>498,16993004777</text:p>
          </table:table-cell>
          <table:table-cell table:number-columns-repeated="14"/>
          <table:table-cell office:value-type="float" office:value="14.2573469262097" calcext:value-type="float">
            <text:p>14,2573469262097</text:p>
          </table:table-cell>
          <table:table-cell table:number-columns-repeated="10"/>
        </table:table-row>
        <table:table-row table:style-name="ro1">
          <table:table-cell office:value-type="float" office:value="503.681915046879" calcext:value-type="float">
            <text:p>503,681915046879</text:p>
          </table:table-cell>
          <table:table-cell table:number-columns-repeated="14"/>
          <table:table-cell office:value-type="float" office:value="10.0870623478749" calcext:value-type="float">
            <text:p>10,0870623478749</text:p>
          </table:table-cell>
          <table:table-cell table:number-columns-repeated="10"/>
        </table:table-row>
        <table:table-row table:style-name="ro1">
          <table:table-cell office:value-type="float" office:value="580.666875773677" calcext:value-type="float">
            <text:p>580,666875773677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663.838040445274" calcext:value-type="float">
            <text:p>663,838040445274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747.00920511687" calcext:value-type="float">
            <text:p>747,00920511687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833.260783294822" calcext:value-type="float">
            <text:p>833,260783294822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913.351534460064" calcext:value-type="float">
            <text:p>913,351534460064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999.603112638016" calcext:value-type="float">
            <text:p>999,603112638016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1085.85469081597" calcext:value-type="float">
            <text:p>1085,85469081597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1165.94544198121" calcext:value-type="float">
            <text:p>1165,94544198121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1252.19702015916" calcext:value-type="float">
            <text:p>1252,19702015916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1332.2877713244" calcext:value-type="float">
            <text:p>1332,2877713244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1418.53934950235" calcext:value-type="float">
            <text:p>1418,53934950235</text:p>
          </table:table-cell>
          <table:table-cell table:number-columns-repeated="14"/>
          <table:table-cell office:value-type="float" office:value="9.92395788436673" calcext:value-type="float">
            <text:p>9,92395788436673</text:p>
          </table:table-cell>
          <table:table-cell table:number-columns-repeated="10"/>
        </table:table-row>
        <table:table-row table:style-name="ro1">
          <table:table-cell office:value-type="float" office:value="1495.54391967667" calcext:value-type="float">
            <text:p>1495,54391967667</text:p>
          </table:table-cell>
          <table:table-cell table:number-columns-repeated="14"/>
          <table:table-cell office:value-type="float" office:value="9.88688868811486" calcext:value-type="float">
            <text:p>9,88688868811486</text:p>
          </table:table-cell>
          <table:table-cell table:number-columns-repeated="10"/>
        </table:table-row>
        <table:table-row table:style-name="ro1">
          <table:table-cell office:value-type="float" office:value="1501.03629522826" calcext:value-type="float">
            <text:p>1501,03629522826</text:p>
          </table:table-cell>
          <table:table-cell table:number-columns-repeated="14"/>
          <table:table-cell office:value-type="float" office:value="5.59056884252377" calcext:value-type="float">
            <text:p>5,59056884252377</text:p>
          </table:table-cell>
          <table:table-cell table:number-columns-repeated="10"/>
        </table:table-row>
        <table:table-row table:style-name="ro1">
          <table:table-cell office:value-type="float" office:value="1501.14530068655" calcext:value-type="float">
            <text:p>1501,14530068655</text:p>
          </table:table-cell>
          <table:table-cell table:number-columns-repeated="14"/>
          <table:table-cell office:value-type="float" office:value="6.29117665168401" calcext:value-type="float">
            <text:p>6,29117665168401</text:p>
          </table:table-cell>
          <table:table-cell table:number-columns-repeated="10"/>
        </table:table-row>
        <table:table-row table:style-name="ro1">
          <table:table-cell office:value-type="float" office:value="1501.26238062322" calcext:value-type="float">
            <text:p>1501,26238062322</text:p>
          </table:table-cell>
          <table:table-cell table:number-columns-repeated="14"/>
          <table:table-cell office:value-type="float" office:value="7.04368133559686" calcext:value-type="float">
            <text:p>7,04368133559686</text:p>
          </table:table-cell>
          <table:table-cell table:number-columns-repeated="10"/>
        </table:table-row>
        <table:table-row table:style-name="ro1">
          <table:table-cell office:value-type="float" office:value="1501.3754233207" calcext:value-type="float">
            <text:p>1501,3754233207</text:p>
          </table:table-cell>
          <table:table-cell table:number-columns-repeated="14"/>
          <table:table-cell office:value-type="float" office:value="7.7702375821334" calcext:value-type="float">
            <text:p>7,7702375821334</text:p>
          </table:table-cell>
          <table:table-cell table:number-columns-repeated="10"/>
        </table:table-row>
        <table:table-row table:style-name="ro1">
          <table:table-cell office:value-type="float" office:value="1501.48846601818" calcext:value-type="float">
            <text:p>1501,48846601818</text:p>
          </table:table-cell>
          <table:table-cell table:number-columns-repeated="14"/>
          <table:table-cell office:value-type="float" office:value="8.49679382866994" calcext:value-type="float">
            <text:p>8,49679382866994</text:p>
          </table:table-cell>
          <table:table-cell table:number-columns-repeated="10"/>
        </table:table-row>
        <table:table-row table:style-name="ro1">
          <table:table-cell office:value-type="float" office:value="1501.60150871567" calcext:value-type="float">
            <text:p>1501,60150871567</text:p>
          </table:table-cell>
          <table:table-cell table:number-columns-repeated="14"/>
          <table:table-cell office:value-type="float" office:value="9.22335007520649" calcext:value-type="float">
            <text:p>9,22335007520649</text:p>
          </table:table-cell>
          <table:table-cell table:number-columns-repeated="10"/>
        </table:table-row>
        <table:table-row table:style-name="ro1">
          <table:table-cell office:value-type="float" office:value="1510.17206287334" calcext:value-type="float">
            <text:p>1510,17206287334</text:p>
          </table:table-cell>
          <table:table-cell table:number-columns-repeated="14"/>
          <table:table-cell office:value-type="float" office:value="4.9126659160678" calcext:value-type="float">
            <text:p>4,9126659160678</text:p>
          </table:table-cell>
          <table:table-cell table:number-columns-repeated="10"/>
        </table:table-row>
        <table:table-row table:style-name="ro1">
          <table:table-cell office:value-type="float" office:value="1584.09441720238" calcext:value-type="float">
            <text:p>1584,09441720238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1670.34599538033" calcext:value-type="float">
            <text:p>1670,3459953803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1753.51716005193" calcext:value-type="float">
            <text:p>1753,5171600519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1836.68832472352" calcext:value-type="float">
            <text:p>1836,68832472352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1922.93990290147" calcext:value-type="float">
            <text:p>1922,9399029014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2003.03065406672" calcext:value-type="float">
            <text:p>2003,03065406672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2089.28223224467" calcext:value-type="float">
            <text:p>2089,2822322446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2172.45339691626" calcext:value-type="float">
            <text:p>2172,4533969162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2255.62456158786" calcext:value-type="float">
            <text:p>2255,6245615878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2341.87613976581" calcext:value-type="float">
            <text:p>2341,87613976581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2421.96325741578" calcext:value-type="float">
            <text:p>2421,96325741578</text:p>
          </table:table-cell>
          <table:table-cell table:number-columns-repeated="14"/>
          <table:table-cell office:value-type="float" office:value="4.84065900234855" calcext:value-type="float">
            <text:p>4,84065900234855</text:p>
          </table:table-cell>
          <table:table-cell table:number-columns-repeated="10"/>
        </table:table-row>
        <table:table-row table:style-name="ro1">
          <table:table-cell office:value-type="float" office:value="2502.0576420963" calcext:value-type="float">
            <text:p>2502,057642096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2575.99059417822" calcext:value-type="float">
            <text:p>2575,99059417822</text:p>
          </table:table-cell>
          <table:table-cell table:number-columns-repeated="14"/>
          <table:table-cell office:value-type="float" office:value="4.88347392401946" calcext:value-type="float">
            <text:p>4,88347392401946</text:p>
          </table:table-cell>
          <table:table-cell table:number-columns-repeated="10"/>
        </table:table-row>
        <table:table-row table:style-name="ro1">
          <table:table-cell office:value-type="float" office:value="2675.88674315377" calcext:value-type="float">
            <text:p>2675,88674315377</text:p>
          </table:table-cell>
          <table:table-cell table:number-columns-repeated="14"/>
          <table:table-cell office:value-type="float" office:value="4.90108179223909" calcext:value-type="float">
            <text:p>4,90108179223909</text:p>
          </table:table-cell>
          <table:table-cell table:number-columns-repeated="10"/>
        </table:table-row>
        <table:table-row table:style-name="ro1">
          <table:table-cell office:value-type="float" office:value="2760.81843248894" calcext:value-type="float">
            <text:p>2760,81843248894</text:p>
          </table:table-cell>
          <table:table-cell table:number-columns-repeated="14"/>
          <table:table-cell office:value-type="float" office:value="4.90293525205168" calcext:value-type="float">
            <text:p>4,90293525205168</text:p>
          </table:table-cell>
          <table:table-cell table:number-columns-repeated="10"/>
        </table:table-row>
        <table:table-row table:style-name="ro1">
          <table:table-cell office:value-type="float" office:value="2840.90716503459" calcext:value-type="float">
            <text:p>2840,90716503459</text:p>
          </table:table-cell>
          <table:table-cell table:number-columns-repeated="14"/>
          <table:table-cell office:value-type="float" office:value="4.88996103336353" calcext:value-type="float">
            <text:p>4,88996103336353</text:p>
          </table:table-cell>
          <table:table-cell table:number-columns-repeated="10"/>
        </table:table-row>
        <table:table-row table:style-name="ro1">
          <table:table-cell office:value-type="float" office:value="2927.15874321254" calcext:value-type="float">
            <text:p>2927,15874321254</text:p>
          </table:table-cell>
          <table:table-cell table:number-columns-repeated="14"/>
          <table:table-cell office:value-type="float" office:value="4.88996103336353" calcext:value-type="float">
            <text:p>4,88996103336353</text:p>
          </table:table-cell>
          <table:table-cell table:number-columns-repeated="10"/>
        </table:table-row>
        <table:table-row table:style-name="ro1">
          <table:table-cell office:value-type="float" office:value="3013.40830277089" calcext:value-type="float">
            <text:p>3013,40830277089</text:p>
          </table:table-cell>
          <table:table-cell table:number-columns-repeated="14"/>
          <table:table-cell office:value-type="float" office:value="4.87698681467538" calcext:value-type="float">
            <text:p>4,87698681467538</text:p>
          </table:table-cell>
          <table:table-cell table:number-columns-repeated="10"/>
        </table:table-row>
        <table:table-row table:style-name="ro1">
          <table:table-cell office:value-type="float" office:value="3093.49865021222" calcext:value-type="float">
            <text:p>3093,49865021222</text:p>
          </table:table-cell>
          <table:table-cell table:number-columns-repeated="14"/>
          <table:table-cell office:value-type="float" office:value="4.87439197093775" calcext:value-type="float">
            <text:p>4,87439197093775</text:p>
          </table:table-cell>
          <table:table-cell table:number-columns-repeated="10"/>
        </table:table-row>
        <table:table-row table:style-name="ro1">
          <table:table-cell office:value-type="float" office:value="3179.74861349449" calcext:value-type="float">
            <text:p>3179,74861349449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259.83936465973" calcext:value-type="float">
            <text:p>3259,8393646597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346.09094283768" calcext:value-type="float">
            <text:p>3346,09094283768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432.34252101563" calcext:value-type="float">
            <text:p>3432,3425210156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512.43327218088" calcext:value-type="float">
            <text:p>3512,43327218088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598.68485035883" calcext:value-type="float">
            <text:p>3598,68485035883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678.77560152407" calcext:value-type="float">
            <text:p>3678,7756015240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765.02717970202" calcext:value-type="float">
            <text:p>3765,02717970202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851.27875787997" calcext:value-type="float">
            <text:p>3851,2787578799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3931.36950904521" calcext:value-type="float">
            <text:p>3931,36950904521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017.62108722317" calcext:value-type="float">
            <text:p>4017,6210872231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100.79225189476" calcext:value-type="float">
            <text:p>4100,7922518947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183.96341656636" calcext:value-type="float">
            <text:p>4183,9634165663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270.21499474431" calcext:value-type="float">
            <text:p>4270,21499474431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350.30574590955" calcext:value-type="float">
            <text:p>4350,30574590955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436.5573240875" calcext:value-type="float">
            <text:p>4436,5573240875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519.7284887591" calcext:value-type="float">
            <text:p>4519,7284887591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602.8996534307" calcext:value-type="float">
            <text:p>4602,8996534307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689.15123160865" calcext:value-type="float">
            <text:p>4689,15123160865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769.24198277389" calcext:value-type="float">
            <text:p>4769,24198277389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855.49356095184" calcext:value-type="float">
            <text:p>4855,49356095184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4938.66472562344" calcext:value-type="float">
            <text:p>4938,66472562344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  <table:table-row table:style-name="ro1">
          <table:table-cell office:value-type="float" office:value="5006.43382276326" calcext:value-type="float">
            <text:p>5006,43382276326</text:p>
          </table:table-cell>
          <table:table-cell table:number-columns-repeated="14"/>
          <table:table-cell office:value-type="float" office:value="4.86401259598723" calcext:value-type="float">
            <text:p>4,8640125959872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4:39:04.91174171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4T14:48:57.416858180</dc:date>
    <meta:editing-duration>PT1H56M31S</meta:editing-duration>
    <meta:editing-cycles>6</meta:editing-cycles>
    <meta:generator>LibreOffice/24.2.7.2$Linux_X86_64 LibreOffice_project/420$Build-2</meta:generator>
    <meta:document-statistic meta:table-count="1" meta:cell-count="3586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00" chart:origin="0" chart:interval-major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4" chart:maximum="99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ot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905cm" svg:height="20.614cm" xlink:href=".." xlink:type="simple" chart:class="chart:scatter" chart:style-name="ch1">
        <chart:title svg:x="19.285cm" svg:y="0.547cm" chart:style-name="ch2">
          <text:p>Efficency</text:p>
        </chart:title>
        <chart:legend chart:legend-position="end" svg:x="35.464cm" svg:y="9.039cm" style:legend-expansion="custom" svg:width="5.23cm" svg:height="2.14cm" style:legend-expansion-aspect-ratio="2.44392523364486" chart:style-name="ch3"/>
        <chart:plot-area chart:style-name="ch4" table:cell-range-address="losses_summary.A2:losses_summary.A101 losses_summary.E2:losses_summary.E101 losses_summary.A110:losses_summary.A110 losses_summary.E112:losses_summary.E184 losses_summary.A254:losses_summary.A254 losses_summary.E255:losses_summary.E333 losses_summary.A335:losses_summary.A335 losses_summary.E336:losses_summary.E386" chart:data-source-has-labels="row" svg:x="2.121cm" svg:y="1.86cm" svg:width="32.488cm" svg:height="17.069cm">
          <chart:coordinate-region svg:x="2.742cm" svg:y="2.059cm" svg:width="31.726cm" svg:height="15.816cm"/>
          <chart:axis chart:dimension="x" chart:name="primary-x" chart:style-name="ch5">
            <chart:title svg:x="16.94cm" svg:y="19.341cm" chart:style-name="ch6">
              <text:p>Load Power</text:p>
            </chart:title>
            <chart:grid chart:style-name="ch7" chart:class="major"/>
          </chart:axis>
          <chart:axis chart:dimension="y" chart:name="primary-y" chart:style-name="ch8">
            <chart:title svg:x="0.451cm" svg:y="11.952cm" chart:style-name="ch9">
              <text:p>Efficency (%)</text:p>
            </chart:title>
            <chart:grid chart:style-name="ch7" chart:class="major"/>
          </chart:axis>
          <chart:series chart:style-name="ch10" chart:values-cell-range-address="losses_summary.E2:losses_summary.E101" loext:label-string="simulations_efficiency" chart:class="chart:scatter">
            <chart:domain table:cell-range-address="losses_summary.A2:losses_summary.A101"/>
            <chart:data-point chart:repeated="100"/>
          </chart:series>
          <chart:series chart:style-name="ch11" chart:values-cell-range-address="losses_summary.E112:losses_summary.E184" chart:label-cell-address="losses_summary.A110:losses_summary.A110" chart:class="chart:scatter">
            <chart:domain table:cell-range-address="losses_summary.A112:losses_summary.A184"/>
            <chart:data-point chart:repeated="73"/>
          </chart:series>
          <chart:series chart:style-name="ch12" chart:values-cell-range-address="losses_summary.E255:losses_summary.E333" chart:label-cell-address="losses_summary.A254:losses_summary.A254" chart:class="chart:scatter">
            <chart:domain table:cell-range-address="losses_summary.A255:losses_summary.A333"/>
            <chart:data-point chart:repeated="79"/>
          </chart:series>
          <chart:series chart:style-name="ch12" chart:values-cell-range-address="losses_summary.E336:losses_summary.E386" chart:label-cell-address="losses_summary.A335:losses_summary.A335" chart:class="chart:scatter">
            <chart:domain table:cell-range-address="losses_summary.A336:losses_summary.A386"/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_efficiency</text:p>
              </table:table-cell>
              <table:table-cell office:value-type="string">
                <text:p>Colonna A</text:p>
              </table:table-cell>
              <table:table-cell office:value-type="string">
                <text:p>EPC_50Hz</text:p>
                <draw:g>
                  <svg:desc>losses_summary.A110:losses_summary.A110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OCP_min</text:p>
                <draw:g>
                  <svg:desc>losses_summary.A254:losses_summary.A254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OCP_peak</text:p>
                <draw:g>
                  <svg:desc>losses_summary.A335:losses_summary.A3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84.0780614357687">
                <text:p>84.0780614357687</text:p>
                <draw:g>
                  <svg:desc>losses_summary.E2:losses_summary.E101</svg:desc>
                </draw:g>
              </table:table-cell>
              <table:table-cell office:value-type="float" office:value="383.8701885464">
                <text:p>383.8701885464</text:p>
                <draw:g>
                  <svg:desc>losses_summary.A112:losses_summary.A184</svg:desc>
                </draw:g>
              </table:table-cell>
              <table:table-cell office:value-type="float" office:value="94.1166396342632">
                <text:p>94.1166396342632</text:p>
                <draw:g>
                  <svg:desc>losses_summary.E112:losses_summary.E184</svg:desc>
                </draw:g>
              </table:table-cell>
              <table:table-cell office:value-type="float" office:value="500.634101465262">
                <text:p>500.634101465262</text:p>
                <draw:g>
                  <svg:desc>losses_summary.A255:losses_summary.A333</svg:desc>
                </draw:g>
              </table:table-cell>
              <table:table-cell office:value-type="float" office:value="96.9983392462902">
                <text:p>96.9983392462902</text:p>
                <draw:g>
                  <svg:desc>losses_summary.E255:losses_summary.E333</svg:desc>
                </draw:g>
              </table:table-cell>
              <table:table-cell office:value-type="float" office:value="1501.96739238284">
                <text:p>1501.96739238284</text:p>
                <draw:g>
                  <svg:desc>losses_summary.A336:losses_summary.A386</svg:desc>
                </draw:g>
              </table:table-cell>
              <table:table-cell office:value-type="float" office:value="98.7537647045901">
                <text:p>98.7537647045901</text:p>
                <draw:g>
                  <svg:desc>losses_summary.E336:losses_summary.E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1.6796606842046">
                <text:p>91.6796606842046</text:p>
              </table:table-cell>
              <table:table-cell office:value-type="float" office:value="388.621728220568">
                <text:p>388.621728220568</text:p>
              </table:table-cell>
              <table:table-cell office:value-type="float" office:value="94.0204408905682">
                <text:p>94.0204408905682</text:p>
              </table:table-cell>
              <table:table-cell office:value-type="float" office:value="565.290690617134">
                <text:p>565.29069061713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569.70318736006">
                <text:p>1569.7031873600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94.1012175660788">
                <text:p>94.1012175660788</text:p>
              </table:table-cell>
              <table:table-cell office:value-type="float" office:value="398.988785702322">
                <text:p>398.988785702322</text:p>
              </table:table-cell>
              <table:table-cell office:value-type="float" office:value="94.2848434256341">
                <text:p>94.2848434256341</text:p>
              </table:table-cell>
              <table:table-cell office:value-type="float" office:value="633.026485594352">
                <text:p>633.02648559435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647.90724156103">
                <text:p>1647.9072415610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95.259627624515">
                <text:p>95.259627624515</text:p>
              </table:table-cell>
              <table:table-cell office:value-type="float" office:value="402.133657039698">
                <text:p>402.133657039698</text:p>
              </table:table-cell>
              <table:table-cell office:value-type="float" office:value="94.4524711766235">
                <text:p>94.4524711766235</text:p>
              </table:table-cell>
              <table:table-cell office:value-type="float" office:value="700.762790660996">
                <text:p>700.76279066099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15.64262846671">
                <text:p>1715.64262846671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95.85234">
                <text:p>95.85234</text:p>
              </table:table-cell>
              <table:table-cell office:value-type="float" office:value="416.562386586073">
                <text:p>416.562386586073</text:p>
              </table:table-cell>
              <table:table-cell office:value-type="float" office:value="94.6062739584592">
                <text:p>94.6062739584592</text:p>
              </table:table-cell>
              <table:table-cell office:value-type="float" office:value="768.498075548789">
                <text:p>768.49807554878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83.68672149263">
                <text:p>1783.686721492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96.3800103875685">
                <text:p>96.3800103875685</text:p>
              </table:table-cell>
              <table:table-cell office:value-type="float" office:value="417.940502473658">
                <text:p>417.940502473658</text:p>
              </table:table-cell>
              <table:table-cell office:value-type="float" office:value="94.7551392513114">
                <text:p>94.7551392513114</text:p>
              </table:table-cell>
              <table:table-cell office:value-type="float" office:value="846.702435803415">
                <text:p>846.70243580341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851.42200638043">
                <text:p>1851.4220063804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96.61709">
                <text:p>96.61709</text:p>
              </table:table-cell>
              <table:table-cell office:value-type="float" office:value="432.071145475821">
                <text:p>432.071145475821</text:p>
              </table:table-cell>
              <table:table-cell office:value-type="float" office:value="94.8965983106884">
                <text:p>94.8965983106884</text:p>
              </table:table-cell>
              <table:table-cell office:value-type="float" office:value="914.437822709093">
                <text:p>914.43782270909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19.15780135765">
                <text:p>1919.1578013576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96.82651">
                <text:p>96.82651</text:p>
              </table:table-cell>
              <table:table-cell office:value-type="float" office:value="434.766749479286">
                <text:p>434.766749479286</text:p>
              </table:table-cell>
              <table:table-cell office:value-type="float" office:value="95.0402792401079">
                <text:p>95.0402792401079</text:p>
              </table:table-cell>
              <table:table-cell office:value-type="float" office:value="982.481609681366">
                <text:p>982.48160968136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93.97516782764">
                <text:p>1993.97516782764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96.97536">
                <text:p>96.97536</text:p>
              </table:table-cell>
              <table:table-cell office:value-type="float" office:value="452.734868098623">
                <text:p>452.734868098623</text:p>
              </table:table-cell>
              <table:table-cell office:value-type="float" office:value="95.2465428423932">
                <text:p>95.2465428423932</text:p>
              </table:table-cell>
              <table:table-cell office:value-type="float" office:value="1050.21791474801">
                <text:p>1050.21791474801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061.7113708764">
                <text:p>2061.711370876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97.0872">
                <text:p>97.0872</text:p>
              </table:table-cell>
              <table:table-cell office:value-type="float" office:value="469.238019604211">
                <text:p>469.238019604211</text:p>
              </table:table-cell>
              <table:table-cell office:value-type="float" office:value="95.4557936255134">
                <text:p>95.4557936255134</text:p>
              </table:table-cell>
              <table:table-cell office:value-type="float" office:value="1117.95370972523">
                <text:p>1117.9537097252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129.44716585362">
                <text:p>2129.4471658536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97.17409">
                <text:p>97.17409</text:p>
              </table:table-cell>
              <table:table-cell office:value-type="float" office:value="491.620668291683">
                <text:p>491.620668291683</text:p>
              </table:table-cell>
              <table:table-cell office:value-type="float" office:value="95.6098371099371">
                <text:p>95.6098371099371</text:p>
              </table:table-cell>
              <table:table-cell office:value-type="float" office:value="1185.68899461302">
                <text:p>1185.6889946130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00.87764055687">
                <text:p>2200.8776405568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97.24565">
                <text:p>97.24565</text:p>
              </table:table-cell>
              <table:table-cell office:value-type="float" office:value="521.703549217024">
                <text:p>521.703549217024</text:p>
              </table:table-cell>
              <table:table-cell office:value-type="float" office:value="95.7714596399504">
                <text:p>95.7714596399504</text:p>
              </table:table-cell>
              <table:table-cell office:value-type="float" office:value="1260.50615704725">
                <text:p>1260.506157047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68.61343553409">
                <text:p>2268.613435534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97.30273">
                <text:p>97.30273</text:p>
              </table:table-cell>
              <table:table-cell office:value-type="float" office:value="542.433802074882">
                <text:p>542.433802074882</text:p>
              </table:table-cell>
              <table:table-cell office:value-type="float" office:value="95.9179179069231">
                <text:p>95.9179179069231</text:p>
              </table:table-cell>
              <table:table-cell office:value-type="float" office:value="1328.24195202447">
                <text:p>1328.2419520244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340.04391023733">
                <text:p>2340.0439102373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97.34937">
                <text:p>97.34937</text:p>
              </table:table-cell>
              <table:table-cell office:value-type="float" office:value="571.08479640021">
                <text:p>571.08479640021</text:p>
              </table:table-cell>
              <table:table-cell office:value-type="float" office:value="96.073448809903">
                <text:p>96.073448809903</text:p>
              </table:table-cell>
              <table:table-cell office:value-type="float" office:value="1395.97815507322">
                <text:p>1395.9781550732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07.77970521455">
                <text:p>2407.77970521455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97.38909">
                <text:p>97.38909</text:p>
              </table:table-cell>
              <table:table-cell office:value-type="float" office:value="591.813761889517">
                <text:p>591.813761889517</text:p>
              </table:table-cell>
              <table:table-cell office:value-type="float" office:value="96.2166359904242">
                <text:p>96.2166359904242</text:p>
              </table:table-cell>
              <table:table-cell office:value-type="float" office:value="1472.34085446044">
                <text:p>1472.3408544604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75.51550019177">
                <text:p>2475.5155001917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7.42358">
                <text:p>97.42358</text:p>
              </table:table-cell>
              <table:table-cell office:value-type="float" office:value="620.460772659333">
                <text:p>620.460772659333</text:p>
              </table:table-cell>
              <table:table-cell office:value-type="float" office:value="96.362045040988">
                <text:p>96.362045040988</text:p>
              </table:table-cell>
              <table:table-cell office:value-type="float" office:value="1501.33658179343">
                <text:p>1501.3365817934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550.33276464388">
                <text:p>2550.3327646438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7.45315">
                <text:p>97.45315</text:p>
              </table:table-cell>
              <table:table-cell office:value-type="float" office:value="642.071085231823">
                <text:p>642.071085231823</text:p>
              </table:table-cell>
              <table:table-cell office:value-type="float" office:value="96.50945377459">
                <text:p>96.50945377459</text:p>
              </table:table-cell>
              <table:table-cell office:value-type="float" office:value="1501.38146966287">
                <text:p>1501.3814696628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18.0685596211">
                <text:p>2618.068559621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97.47903">
                <text:p>97.47903</text:p>
              </table:table-cell>
              <table:table-cell office:value-type="float" office:value="666.75757709907">
                <text:p>666.75757709907</text:p>
              </table:table-cell>
              <table:table-cell office:value-type="float" office:value="96.6499500236152">
                <text:p>96.6499500236152</text:p>
              </table:table-cell>
              <table:table-cell office:value-type="float" office:value="1501.43599255478">
                <text:p>1501.4359925547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85.80435459832">
                <text:p>2685.8043545983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97.50194">
                <text:p>97.50194</text:p>
              </table:table-cell>
              <table:table-cell office:value-type="float" office:value="697.591054613882">
                <text:p>697.591054613882</text:p>
              </table:table-cell>
              <table:table-cell office:value-type="float" office:value="96.7629691464473">
                <text:p>96.7629691464473</text:p>
              </table:table-cell>
              <table:table-cell office:value-type="float" office:value="1501.49691990282">
                <text:p>1501.4969199028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753.84803955271">
                <text:p>2753.8480395527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97.52216">
                <text:p>97.52216</text:p>
              </table:table-cell>
              <table:table-cell office:value-type="float" office:value="728.423715985614">
                <text:p>728.423715985614</text:p>
              </table:table-cell>
              <table:table-cell office:value-type="float" office:value="96.8739145239063">
                <text:p>96.8739145239063</text:p>
              </table:table-cell>
              <table:table-cell office:value-type="float" office:value="1501.54180777225">
                <text:p>1501.541807772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21.58383452993">
                <text:p>2821.5838345299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97.53983">
                <text:p>97.53983</text:p>
              </table:table-cell>
              <table:table-cell office:value-type="float" office:value="756.171254494664">
                <text:p>756.171254494664</text:p>
              </table:table-cell>
              <table:table-cell office:value-type="float" office:value="96.9690475928957">
                <text:p>96.9690475928957</text:p>
              </table:table-cell>
              <table:table-cell office:value-type="float" office:value="1501.58669564168">
                <text:p>1501.5866956416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99.7878887309">
                <text:p>2899.78788873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97.5556">
                <text:p>97.5556</text:p>
              </table:table-cell>
              <table:table-cell office:value-type="float" office:value="787.008710706994">
                <text:p>787.008710706994</text:p>
              </table:table-cell>
              <table:table-cell office:value-type="float" office:value="97.0921762244214">
                <text:p>97.0921762244214</text:p>
              </table:table-cell>
              <table:table-cell office:value-type="float" office:value="1501.63158351112">
                <text:p>1501.6315835111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967.52317361869">
                <text:p>2967.52317361869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97.56946">
                <text:p>97.56946</text:p>
              </table:table-cell>
              <table:table-cell office:value-type="float" office:value="820.920883957728">
                <text:p>820.920883957728</text:p>
              </table:table-cell>
              <table:table-cell office:value-type="float" office:value="97.2046769109102">
                <text:p>97.2046769109102</text:p>
              </table:table-cell>
              <table:table-cell office:value-type="float" office:value="1501.67647138055">
                <text:p>1501.6764713805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045.72773790908">
                <text:p>3045.7277379090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97.58189">
                <text:p>97.58189</text:p>
              </table:table-cell>
              <table:table-cell office:value-type="float" office:value="857.915950251655">
                <text:p>857.915950251655</text:p>
              </table:table-cell>
              <table:table-cell office:value-type="float" office:value="97.3273241372601">
                <text:p>97.3273241372601</text:p>
              </table:table-cell>
              <table:table-cell office:value-type="float" office:value="1501.72458981635">
                <text:p>1501.7245898163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13.4635328863">
                <text:p>3113.46353288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97.59288">
                <text:p>97.59288</text:p>
              </table:table-cell>
              <table:table-cell office:value-type="float" office:value="910.30038536182">
                <text:p>910.30038536182</text:p>
              </table:table-cell>
              <table:table-cell office:value-type="float" office:value="97.4369363926936">
                <text:p>97.4369363926936</text:p>
              </table:table-cell>
              <table:table-cell office:value-type="float" office:value="1501.76947768579">
                <text:p>1501.7694776857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81.19932786352">
                <text:p>3181.199327863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97.6025">
                <text:p>97.6025</text:p>
              </table:table-cell>
              <table:table-cell office:value-type="float" office:value="968.844595599809">
                <text:p>968.844595599809</text:p>
              </table:table-cell>
              <table:table-cell office:value-type="float" office:value="97.5515684285936">
                <text:p>97.5515684285936</text:p>
              </table:table-cell>
              <table:table-cell office:value-type="float" office:value="1508.47046579061">
                <text:p>1508.4704657906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249.24301281791">
                <text:p>3249.2430128179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97.61109">
                <text:p>97.61109</text:p>
              </table:table-cell>
              <table:table-cell office:value-type="float" office:value="1027.38835242498">
                <text:p>1027.38835242498</text:p>
              </table:table-cell>
              <table:table-cell office:value-type="float" office:value="97.6650483837308">
                <text:p>97.6650483837308</text:p>
              </table:table-cell>
              <table:table-cell office:value-type="float" office:value="1579.97353188676">
                <text:p>1579.9735318867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16.97880779513">
                <text:p>3316.9788077951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97.61881">
                <text:p>97.61881</text:p>
              </table:table-cell>
              <table:table-cell office:value-type="float" office:value="1092.08698221985">
                <text:p>1092.08698221985</text:p>
              </table:table-cell>
              <table:table-cell office:value-type="float" office:value="97.7710921812171">
                <text:p>97.7710921812171</text:p>
              </table:table-cell>
              <table:table-cell office:value-type="float" office:value="1647.70973493551">
                <text:p>1647.7097349355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91.79607224724">
                <text:p>3391.7960722472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97.62578">
                <text:p>97.62578</text:p>
              </table:table-cell>
              <table:table-cell office:value-type="float" office:value="1159.85968912276">
                <text:p>1159.85968912276</text:p>
              </table:table-cell>
              <table:table-cell office:value-type="float" office:value="97.8648820287716">
                <text:p>97.8648820287716</text:p>
              </table:table-cell>
              <table:table-cell office:value-type="float" office:value="1715.75301181836">
                <text:p>1715.7530118183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459.53186722446">
                <text:p>3459.5318672244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97.63198">
                <text:p>97.63198</text:p>
              </table:table-cell>
              <table:table-cell office:value-type="float" office:value="1227.6327669998">
                <text:p>1227.6327669998</text:p>
              </table:table-cell>
              <table:table-cell office:value-type="float" office:value="97.9596144878594">
                <text:p>97.9596144878594</text:p>
              </table:table-cell>
              <table:table-cell office:value-type="float" office:value="1752.90078431227">
                <text:p>1752.900784312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27.26766220167">
                <text:p>3527.2676622016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97.6374">
                <text:p>97.6374</text:p>
              </table:table-cell>
              <table:table-cell office:value-type="float" office:value="1295.3999092908">
                <text:p>1295.3999092908</text:p>
              </table:table-cell>
              <table:table-cell office:value-type="float" office:value="98.0392651624158">
                <text:p>98.0392651624158</text:p>
              </table:table-cell>
              <table:table-cell office:value-type="float" office:value="1783.48880679558">
                <text:p>1783.4888067955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98.6976268155">
                <text:p>3598.697626815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97.6421">
                <text:p>97.6421</text:p>
              </table:table-cell>
              <table:table-cell office:value-type="float" office:value="1363.16278537933">
                <text:p>1363.16278537933</text:p>
              </table:table-cell>
              <table:table-cell office:value-type="float" office:value="98.1080758043402">
                <text:p>98.1080758043402</text:p>
              </table:table-cell>
              <table:table-cell office:value-type="float" office:value="1826.79437883287">
                <text:p>1826.794378832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666.43393188214">
                <text:p>3666.433931882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97.64607">
                <text:p>97.64607</text:p>
              </table:table-cell>
              <table:table-cell office:value-type="float" office:value="1430.92529049373">
                <text:p>1430.92529049373</text:p>
              </table:table-cell>
              <table:table-cell office:value-type="float" office:value="98.1759438347314">
                <text:p>98.1759438347314</text:p>
              </table:table-cell>
              <table:table-cell office:value-type="float" office:value="1858.30607124769">
                <text:p>1858.3060712476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734.16972685936">
                <text:p>3734.169726859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97.6495">
                <text:p>97.6495</text:p>
              </table:table-cell>
              <table:table-cell office:value-type="float" office:value="1497.4482041096">
                <text:p>1497.4482041096</text:p>
              </table:table-cell>
              <table:table-cell office:value-type="float" office:value="98.2234043254287">
                <text:p>98.2234043254287</text:p>
              </table:table-cell>
              <table:table-cell office:value-type="float" office:value="1900.68797335347">
                <text:p>1900.6879733534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05.60020156261">
                <text:p>3805.6002015626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97.65253">
                <text:p>97.65253</text:p>
              </table:table-cell>
              <table:table-cell office:value-type="float" office:value="1566.44065539522">
                <text:p>1566.44065539522</text:p>
              </table:table-cell>
              <table:table-cell office:value-type="float" office:value="98.2871719956504">
                <text:p>98.2871719956504</text:p>
              </table:table-cell>
              <table:table-cell office:value-type="float" office:value="1929.73654595094">
                <text:p>1929.7365459509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73.33599653983">
                <text:p>3873.3359965398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97.6551">
                <text:p>97.6551</text:p>
              </table:table-cell>
              <table:table-cell office:value-type="float" office:value="1634.1940716435">
                <text:p>1634.1940716435</text:p>
              </table:table-cell>
              <table:table-cell office:value-type="float" office:value="98.331946043478">
                <text:p>98.331946043478</text:p>
              </table:table-cell>
              <table:table-cell office:value-type="float" office:value="1997.47336110701">
                <text:p>1997.4733611070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948.15326099194">
                <text:p>3948.1532609919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97.65716">
                <text:p>97.65716</text:p>
              </table:table-cell>
              <table:table-cell office:value-type="float" office:value="1701.94804435297">
                <text:p>1701.94804435297</text:p>
              </table:table-cell>
              <table:table-cell office:value-type="float" office:value="98.3781340086053">
                <text:p>98.3781340086053</text:p>
              </table:table-cell>
              <table:table-cell office:value-type="float" office:value="2065.20813590538">
                <text:p>2065.2081359053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15.88854587973">
                <text:p>4015.8885458797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97.65876">
                <text:p>97.65876</text:p>
              </table:table-cell>
              <table:table-cell office:value-type="float" office:value="1769.69737988584">
                <text:p>1769.69737988584</text:p>
              </table:table-cell>
              <table:table-cell office:value-type="float" office:value="98.4125393295676">
                <text:p>98.4125393295676</text:p>
              </table:table-cell>
              <table:table-cell office:value-type="float" office:value="2136.63861060862">
                <text:p>2136.6386106086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83.62485094638">
                <text:p>4083.6248509463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97.66008">
                <text:p>97.66008</text:p>
              </table:table-cell>
              <table:table-cell office:value-type="float" office:value="1837.44727187991">
                <text:p>1837.44727187991</text:p>
              </table:table-cell>
              <table:table-cell office:value-type="float" office:value="98.4483585678296">
                <text:p>98.4483585678296</text:p>
              </table:table-cell>
              <table:table-cell office:value-type="float" office:value="2211.45587506073">
                <text:p>2211.4558750607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151.66853590076">
                <text:p>4151.668535900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97.661">
                <text:p>97.661</text:p>
              </table:table-cell>
              <table:table-cell office:value-type="float" office:value="1905.19734936104">
                <text:p>1905.19734936104</text:p>
              </table:table-cell>
              <table:table-cell office:value-type="float" office:value="98.4846491118582">
                <text:p>98.4846491118582</text:p>
              </table:table-cell>
              <table:table-cell office:value-type="float" office:value="2279.1926902168">
                <text:p>2279.19269021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19.40433087798">
                <text:p>4219.4043308779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97.66166">
                <text:p>97.66166</text:p>
              </table:table-cell>
              <table:table-cell office:value-type="float" office:value="1972.9370395666">
                <text:p>1972.9370395666</text:p>
              </table:table-cell>
              <table:table-cell office:value-type="float" office:value="98.494546532957">
                <text:p>98.494546532957</text:p>
              </table:table-cell>
              <table:table-cell office:value-type="float" office:value="2346.92746501517">
                <text:p>2346.92746501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87.1401258552">
                <text:p>4287.14012585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97.66202">
                <text:p>97.66202</text:p>
              </table:table-cell>
              <table:table-cell office:value-type="float" office:value="2040.68043951343">
                <text:p>2040.68043951343</text:p>
              </table:table-cell>
              <table:table-cell office:value-type="float" office:value="98.5138700693878">
                <text:p>98.5138700693878</text:p>
              </table:table-cell>
              <table:table-cell office:value-type="float" office:value="2414.97114996956">
                <text:p>2414.9711499695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365.34418005617">
                <text:p>4365.3441800561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97.66207">
                <text:p>97.66207</text:p>
              </table:table-cell>
              <table:table-cell office:value-type="float" office:value="2108.42346848614">
                <text:p>2108.42346848614</text:p>
              </table:table-cell>
              <table:table-cell office:value-type="float" office:value="98.5322509942854">
                <text:p>98.5322509942854</text:p>
              </table:table-cell>
              <table:table-cell office:value-type="float" office:value="2493.17520417053">
                <text:p>2493.1752041705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443.54823425714">
                <text:p>4443.548234257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97.66192">
                <text:p>97.66192</text:p>
              </table:table-cell>
              <table:table-cell office:value-type="float" office:value="2176.16612648472">
                <text:p>2176.16612648472</text:p>
              </table:table-cell>
              <table:table-cell office:value-type="float" office:value="98.5496893076498">
                <text:p>98.5496893076498</text:p>
              </table:table-cell>
              <table:table-cell office:value-type="float" office:value="2571.3792583715">
                <text:p>2571.379258371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11.28402923436">
                <text:p>4511.284029234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97.66145">
                <text:p>97.66145</text:p>
              </table:table-cell>
              <table:table-cell office:value-type="float" office:value="2243.91267971163">
                <text:p>2243.91267971163</text:p>
              </table:table-cell>
              <table:table-cell office:value-type="float" office:value="98.577025042113">
                <text:p>98.577025042113</text:p>
              </table:table-cell>
              <table:table-cell office:value-type="float" office:value="2639.11546142026">
                <text:p>2639.115461420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79.01982421158">
                <text:p>4579.0198242115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97.66073">
                <text:p>97.66073</text:p>
              </table:table-cell>
              <table:table-cell office:value-type="float" office:value="2311.65051504655">
                <text:p>2311.65051504655</text:p>
              </table:table-cell>
              <table:table-cell office:value-type="float" office:value="98.5822094055456">
                <text:p>98.5822094055456</text:p>
              </table:table-cell>
              <table:table-cell office:value-type="float" office:value="2707.15873830311">
                <text:p>2707.1587383031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647.06350916597">
                <text:p>4647.0635091659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97.65985">
                <text:p>97.65985</text:p>
              </table:table-cell>
              <table:table-cell office:value-type="float" office:value="2379.39206012275">
                <text:p>2379.39206012275</text:p>
              </table:table-cell>
              <table:table-cell office:value-type="float" office:value="98.5968198843104">
                <text:p>98.5968198843104</text:p>
              </table:table-cell>
              <table:table-cell office:value-type="float" office:value="2774.89453328033">
                <text:p>2774.8945332803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14.79879405376">
                <text:p>4714.79879405376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97.65877">
                <text:p>97.65877</text:p>
              </table:table-cell>
              <table:table-cell office:value-type="float" office:value="2447.13583104371">
                <text:p>2447.13583104371</text:p>
              </table:table-cell>
              <table:table-cell office:value-type="float" office:value="98.6170860322745">
                <text:p>98.6170860322745</text:p>
              </table:table-cell>
              <table:table-cell office:value-type="float" office:value="2849.71179773244">
                <text:p>2849.7117977324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82.5350991204">
                <text:p>4782.535099120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97.65693">
                <text:p>97.65693</text:p>
              </table:table-cell>
              <table:table-cell office:value-type="float" office:value="2514.87236796918">
                <text:p>2514.87236796918</text:p>
              </table:table-cell>
              <table:table-cell office:value-type="float" office:value="98.6189712553409">
                <text:p>98.6189712553409</text:p>
              </table:table-cell>
              <table:table-cell office:value-type="float" office:value="2921.14227243568">
                <text:p>2921.142272435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857.35236357251">
                <text:p>4857.3523635725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97.65563">
                <text:p>97.65563</text:p>
              </table:table-cell>
              <table:table-cell office:value-type="float" office:value="2582.61502596776">
                <text:p>2582.61502596776</text:p>
              </table:table-cell>
              <table:table-cell office:value-type="float" office:value="98.6364095687053">
                <text:p>98.6364095687053</text:p>
              </table:table-cell>
              <table:table-cell office:value-type="float" office:value="2988.87908759175">
                <text:p>2988.879087591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25.08815854973">
                <text:p>4925.0881585497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97.65428">
                <text:p>97.65428</text:p>
              </table:table-cell>
              <table:table-cell office:value-type="float" office:value="2650.353788738">
                <text:p>2650.353788738</text:p>
              </table:table-cell>
              <table:table-cell office:value-type="float" office:value="98.643950460971">
                <text:p>98.643950460971</text:p>
              </table:table-cell>
              <table:table-cell office:value-type="float" office:value="3056.61386239012">
                <text:p>3056.613862390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68.80853530776">
                <text:p>4968.808535307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97.65266">
                <text:p>97.65266</text:p>
              </table:table-cell>
              <table:table-cell office:value-type="float" office:value="2718.0912530988">
                <text:p>2718.0912530988</text:p>
              </table:table-cell>
              <table:table-cell office:value-type="float" office:value="98.6481922128704">
                <text:p>98.6481922128704</text:p>
              </table:table-cell>
              <table:table-cell office:value-type="float" office:value="3128.04433709337">
                <text:p>3128.0443370933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97.65094">
                <text:p>97.65094</text:p>
              </table:table-cell>
              <table:table-cell office:value-type="float" office:value="2785.83261268793">
                <text:p>2785.83261268793</text:p>
              </table:table-cell>
              <table:table-cell office:value-type="float" office:value="98.6623313858686">
                <text:p>98.6623313858686</text:p>
              </table:table-cell>
              <table:table-cell office:value-type="float" office:value="3202.86160154548">
                <text:p>3202.8616015454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97.64908">
                <text:p>97.64908</text:p>
              </table:table-cell>
              <table:table-cell office:value-type="float" office:value="2853.56636730744">
                <text:p>2853.56636730744</text:p>
              </table:table-cell>
              <table:table-cell office:value-type="float" office:value="98.657147022436">
                <text:p>98.657147022436</text:p>
              </table:table-cell>
              <table:table-cell office:value-type="float" office:value="3270.59841670155">
                <text:p>3270.5984167015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97.64702">
                <text:p>97.64702</text:p>
              </table:table-cell>
              <table:table-cell office:value-type="float" office:value="2912.06676137903">
                <text:p>2912.06676137903</text:p>
              </table:table-cell>
              <table:table-cell office:value-type="float" office:value="98.6604461628022">
                <text:p>98.6604461628022</text:p>
              </table:table-cell>
              <table:table-cell office:value-type="float" office:value="3338.33319149992">
                <text:p>3338.3331914999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97.64436">
                <text:p>97.64436</text:p>
              </table:table-cell>
              <table:table-cell office:value-type="float" office:value="2979.81301318947">
                <text:p>2979.81301318947</text:p>
              </table:table-cell>
              <table:table-cell office:value-type="float" office:value="98.6870160253946">
                <text:p>98.6870160253946</text:p>
              </table:table-cell>
              <table:table-cell office:value-type="float" office:value="3406.3768764543">
                <text:p>3406.37687645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97.64205">
                <text:p>97.64205</text:p>
              </table:table-cell>
              <table:table-cell office:value-type="float" office:value="3161.47542314604">
                <text:p>3161.47542314604</text:p>
              </table:table-cell>
              <table:table-cell office:value-type="float" office:value="98.7056241870011">
                <text:p>98.7056241870011</text:p>
              </table:table-cell>
              <table:table-cell office:value-type="float" office:value="3484.58093065527">
                <text:p>3484.580930655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97.63974">
                <text:p>97.63974</text:p>
              </table:table-cell>
              <table:table-cell office:value-type="float" office:value="3343.13083759048">
                <text:p>3343.13083759048</text:p>
              </table:table-cell>
              <table:table-cell office:value-type="float" office:value="98.7064573882671">
                <text:p>98.7064573882671</text:p>
              </table:table-cell>
              <table:table-cell office:value-type="float" office:value="3562.78498485625">
                <text:p>3562.7849848562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97.63711">
                <text:p>97.63711</text:p>
              </table:table-cell>
              <table:table-cell office:value-type="float" office:value="3524.78355584796">
                <text:p>3524.78355584796</text:p>
              </table:table-cell>
              <table:table-cell office:value-type="float" office:value="98.7004398235685">
                <text:p>98.7004398235685</text:p>
              </table:table-cell>
              <table:table-cell office:value-type="float" office:value="3630.521187905">
                <text:p>3630.521187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97.6345">
                <text:p>97.6345</text:p>
              </table:table-cell>
              <table:table-cell office:value-type="float" office:value="3709.509963678">
                <text:p>3709.509963678</text:p>
              </table:table-cell>
              <table:table-cell office:value-type="float" office:value="98.6811836165329">
                <text:p>98.6811836165329</text:p>
              </table:table-cell>
              <table:table-cell office:value-type="float" office:value="3698.56446478785">
                <text:p>3698.5644647878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97.63169">
                <text:p>97.63169</text:p>
              </table:table-cell>
              <table:table-cell office:value-type="float" office:value="3808.02251422593">
                <text:p>3808.02251422593</text:p>
              </table:table-cell>
              <table:table-cell office:value-type="float" office:value="98.6500774359369">
                <text:p>98.6500774359369</text:p>
              </table:table-cell>
              <table:table-cell office:value-type="float" office:value="3766.30025976507">
                <text:p>3766.3002597650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97.62879">
                <text:p>97.62879</text:p>
              </table:table-cell>
              <table:table-cell office:value-type="float" office:value="3891.15892913471">
                <text:p>3891.15892913471</text:p>
              </table:table-cell>
              <table:table-cell office:value-type="float" office:value="98.6656305262349">
                <text:p>98.6656305262349</text:p>
              </table:table-cell>
              <table:table-cell office:value-type="float" office:value="3841.11752421718">
                <text:p>3841.1175242171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97.62582">
                <text:p>97.62582</text:p>
              </table:table-cell>
              <table:table-cell office:value-type="float" office:value="4075.89674110691">
                <text:p>4075.89674110691</text:p>
              </table:table-cell>
              <table:table-cell office:value-type="float" office:value="98.6753512076711">
                <text:p>98.6753512076711</text:p>
              </table:table-cell>
              <table:table-cell office:value-type="float" office:value="3912.54799892043">
                <text:p>3912.547998920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97.62278">
                <text:p>97.62278</text:p>
              </table:table-cell>
              <table:table-cell office:value-type="float" office:value="4248.31028247211">
                <text:p>4248.31028247211</text:p>
              </table:table-cell>
              <table:table-cell office:value-type="float" office:value="98.6630383445185">
                <text:p>98.6630383445185</text:p>
              </table:table-cell>
              <table:table-cell office:value-type="float" office:value="3980.2848140765">
                <text:p>3980.284814076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97.61969">
                <text:p>97.61969</text:p>
              </table:table-cell>
              <table:table-cell office:value-type="float" office:value="4405.33500552017">
                <text:p>4405.33500552017</text:p>
              </table:table-cell>
              <table:table-cell office:value-type="float" office:value="98.6651592204683">
                <text:p>98.6651592204683</text:p>
              </table:table-cell>
              <table:table-cell office:value-type="float" office:value="4048.01958887487">
                <text:p>4048.019588874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97.61643">
                <text:p>97.61643</text:p>
              </table:table-cell>
              <table:table-cell office:value-type="float" office:value="4473.0702440362">
                <text:p>4473.0702440362</text:p>
              </table:table-cell>
              <table:table-cell office:value-type="float" office:value="98.6637453031684">
                <text:p>98.6637453031684</text:p>
              </table:table-cell>
              <table:table-cell office:value-type="float" office:value="4119.45006357812">
                <text:p>4119.450063578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97.6131">
                <text:p>97.6131</text:p>
              </table:table-cell>
              <table:table-cell office:value-type="float" office:value="4540.8030712204">
                <text:p>4540.8030712204</text:p>
              </table:table-cell>
              <table:table-cell office:value-type="float" office:value="98.6562044109028">
                <text:p>98.6562044109028</text:p>
              </table:table-cell>
              <table:table-cell office:value-type="float" office:value="4194.26732803022">
                <text:p>4194.2673280302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97.60968">
                <text:p>97.60968</text:p>
              </table:table-cell>
              <table:table-cell office:value-type="float" office:value="4608.52829343498">
                <text:p>4608.52829343498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4262.00414318629">
                <text:p>4262.0041431862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97.60615">
                <text:p>97.60615</text:p>
              </table:table-cell>
              <table:table-cell office:value-type="float" office:value="4657.79068978205">
                <text:p>4657.79068978205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4329.73891798466">
                <text:p>4329.7389179846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97.6025">
                <text:p>97.6025</text:p>
              </table:table-cell>
              <table:table-cell office:value-type="float" office:value="4802.4836763688">
                <text:p>4802.4836763688</text:p>
              </table:table-cell>
              <table:table-cell office:value-type="float" office:value="98.5904572564612">
                <text:p>98.5904572564612</text:p>
              </table:table-cell>
              <table:table-cell office:value-type="float" office:value="4397.78260293905">
                <text:p>4397.78260293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97.59879">
                <text:p>97.59879</text:p>
              </table:table-cell>
              <table:table-cell office:value-type="float" office:value="4984.13366200436">
                <text:p>4984.13366200436</text:p>
              </table:table-cell>
              <table:table-cell office:value-type="float" office:value="98.5774963478796">
                <text:p>98.5774963478796</text:p>
              </table:table-cell>
              <table:table-cell office:value-type="float" office:value="4475.98665714002">
                <text:p>4475.9866571400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97.59495">
                <text:p>97.59495</text:p>
              </table:table-cell>
              <table:table-cell office:value-type="float" office:value="5165.78109719279">
                <text:p>5165.78109719279</text:p>
              </table:table-cell>
              <table:table-cell office:value-type="float" office:value="98.5580549850071">
                <text:p>98.5580549850071</text:p>
              </table:table-cell>
              <table:table-cell office:value-type="float" office:value="4554.19071134099">
                <text:p>4554.1907113409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97.59101">
                <text:p>97.59101</text:p>
              </table:table-cell>
              <table:table-cell office:value-type="float" office:value="5276.61383763231">
                <text:p>5276.61383763231</text:p>
              </table:table-cell>
              <table:table-cell office:value-type="float" office:value="98.5386136221346">
                <text:p>98.5386136221346</text:p>
              </table:table-cell>
              <table:table-cell office:value-type="float" office:value="4621.92691438975">
                <text:p>4621.926914389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97.58707">
                <text:p>97.5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9.9701912726">
                <text:p>4689.97019127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97.58304">
                <text:p>97.58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.70598624982">
                <text:p>4757.7059862498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97.57893">
                <text:p>97.57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2.52325070193">
                <text:p>4832.5232507019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97.57471">
                <text:p>97.5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3.95372540517">
                <text:p>4903.95372540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97.57034">
                <text:p>97.5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1.69054056124">
                <text:p>4971.6905405612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97.56598">
                <text:p>97.5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1.71521741439">
                <text:p>5011.7152174143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97.56155">
                <text:p>97.5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97.557">
                <text:p>97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97.55248">
                <text:p>97.5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97.54788">
                <text:p>97.5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97.54323">
                <text:p>97.5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97.53846">
                <text:p>97.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97.53372">
                <text:p>97.5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97.52899">
                <text:p>97.5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97.52417">
                <text:p>97.5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97.51906">
                <text:p>97.5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97.51385">
                <text:p>97.5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97.50886">
                <text:p>97.5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97.50349">
                <text:p>97.5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97.49801">
                <text:p>97.49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97.49254">
                <text:p>97.4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97.48702">
                <text:p>97.4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97.48167">
                <text:p>97.4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97.47627">
                <text:p>97.4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97.47078">
                <text:p>97.4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97.46528">
                <text:p>97.4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97.45971">
                <text:p>97.4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0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uble_20_Dash_20__28_Rounded_29_" svg:stroke-width="0.08cm" svg:stroke-color="#1c1c1c" svg:stroke-linecap="round" draw:fill-color="#1c1c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31cm" svg:height="22.485cm" xlink:href=".." xlink:type="simple" chart:class="chart:scatter" chart:style-name="ch1">
        <chart:title svg:x="19.224cm" svg:y="0.584cm" chart:style-name="ch2">
          <text:p>iTHD</text:p>
        </chart:title>
        <chart:legend chart:legend-position="end" svg:x="35.015cm" svg:y="10.445cm" style:legend-expansion="high" chart:style-name="ch3"/>
        <chart:plot-area chart:style-name="ch4" table:cell-range-address="losses_summary.A2:losses_summary.A101 losses_summary.P2:losses_summary.P101 losses_summary.A390:losses_summary.A390 losses_summary.P391:losses_summary.P467 losses_summary.A471:losses_summary.A471 losses_summary.P472:losses_summary.P543" chart:data-source-has-labels="row" svg:x="2.099cm" svg:y="1.934cm" svg:width="32.12cm" svg:height="18.829cm">
          <chart:coordinate-region svg:x="2.72cm" svg:y="2.133cm" svg:width="31.499cm" svg:height="17.576cm"/>
          <chart:axis chart:dimension="x" chart:name="primary-x" chart:style-name="ch5">
            <chart:title svg:x="16.337cm" svg:y="21.212cm" chart:style-name="ch6">
              <text:p>Load Power(W)</text:p>
            </chart:title>
            <chart:grid chart:style-name="ch7" chart:class="major"/>
          </chart:axis>
          <chart:axis chart:dimension="y" chart:name="primary-y" chart:style-name="ch8">
            <chart:title svg:x="0.451cm" svg:y="12.39cm" chart:style-name="ch9">
              <text:p>iTHD(%)</text:p>
            </chart:title>
            <chart:grid chart:style-name="ch7" chart:class="major"/>
          </chart:axis>
          <chart:series chart:style-name="ch10" chart:values-cell-range-address="losses_summary.P2:losses_summary.P101" loext:label-string="simulations_ithd" chart:class="chart:scatter">
            <chart:domain table:cell-range-address="losses_summary.A2:losses_summary.A101"/>
            <chart:data-point chart:repeated="100"/>
          </chart:series>
          <chart:series chart:style-name="ch11" chart:values-cell-range-address="losses_summary.P391:losses_summary.P467" chart:label-cell-address="losses_summary.A390:losses_summary.A390" chart:class="chart:scatter">
            <chart:domain table:cell-range-address="losses_summary.A391:losses_summary.A467"/>
            <chart:data-point chart:repeated="77"/>
          </chart:series>
          <chart:series chart:style-name="ch12" chart:values-cell-range-address="losses_summary.P472:losses_summary.P543" chart:label-cell-address="losses_summary.A471:losses_summary.A471" chart:class="chart:scatter">
            <chart:domain table:cell-range-address="losses_summary.A472:losses_summary.A543"/>
            <chart:data-point chart:repeated="7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_ithd</text:p>
              </table:table-cell>
              <table:table-cell office:value-type="string">
                <text:p>Colonna A</text:p>
              </table:table-cell>
              <table:table-cell office:value-type="string">
                <text:p>iTHD_EPC_50Hz</text:p>
                <draw:g>
                  <svg:desc>losses_summary.A390:losses_summary.A390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iTHD_OCP_min</text:p>
                <draw:g>
                  <svg:desc>losses_summary.A471:losses_summary.A4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224.47134331826">
                <text:p>224.47134331826</text:p>
                <draw:g>
                  <svg:desc>losses_summary.P2:losses_summary.P101</svg:desc>
                </draw:g>
              </table:table-cell>
              <table:table-cell office:value-type="float" office:value="253.742348109824">
                <text:p>253.742348109824</text:p>
                <draw:g>
                  <svg:desc>losses_summary.A391:losses_summary.A467</svg:desc>
                </draw:g>
              </table:table-cell>
              <table:table-cell office:value-type="float" office:value="7.34857547476844">
                <text:p>7.34857547476844</text:p>
                <draw:g>
                  <svg:desc>losses_summary.P391:losses_summary.P467</svg:desc>
                </draw:g>
              </table:table-cell>
              <table:table-cell office:value-type="float" office:value="280.893791011025">
                <text:p>280.893791011025</text:p>
                <draw:g>
                  <svg:desc>losses_summary.A472:losses_summary.A543</svg:desc>
                </draw:g>
              </table:table-cell>
              <table:table-cell office:value-type="float" office:value="14.9839031727462">
                <text:p>14.9839031727462</text:p>
                <draw:g>
                  <svg:desc>losses_summary.P472:losses_summary.P5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2.751988602735">
                <text:p>142.751988602735</text:p>
              </table:table-cell>
              <table:table-cell office:value-type="float" office:value="296.768215528705">
                <text:p>296.768215528705</text:p>
              </table:table-cell>
              <table:table-cell office:value-type="float" office:value="6.70635164970489">
                <text:p>6.70635164970489</text:p>
              </table:table-cell>
              <table:table-cell office:value-type="float" office:value="338.101470414769">
                <text:p>338.101470414769</text:p>
              </table:table-cell>
              <table:table-cell office:value-type="float" office:value="14.9839031727462">
                <text:p>14.9839031727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00.900581416217">
                <text:p>100.900581416217</text:p>
              </table:table-cell>
              <table:table-cell office:value-type="float" office:value="333.640993976667">
                <text:p>333.640993976667</text:p>
              </table:table-cell>
              <table:table-cell office:value-type="float" office:value="6.11386232961259">
                <text:p>6.11386232961259</text:p>
              </table:table-cell>
              <table:table-cell office:value-type="float" office:value="415.111808073655">
                <text:p>415.111808073655</text:p>
              </table:table-cell>
              <table:table-cell office:value-type="float" office:value="14.9839031727462">
                <text:p>14.9839031727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77.6098511805879">
                <text:p>77.6098511805879</text:p>
              </table:table-cell>
              <table:table-cell office:value-type="float" office:value="370.512426678231">
                <text:p>370.512426678231</text:p>
              </table:table-cell>
              <table:table-cell office:value-type="float" office:value="5.51272353039485">
                <text:p>5.51272353039485</text:p>
              </table:table-cell>
              <table:table-cell office:value-type="float" office:value="489.034162402693">
                <text:p>489.034162402693</text:p>
              </table:table-cell>
              <table:table-cell office:value-type="float" office:value="14.9352498526657">
                <text:p>14.9352498526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2.92027">
                <text:p>52.92027</text:p>
              </table:table-cell>
              <table:table-cell office:value-type="float" office:value="407.382513633396">
                <text:p>407.382513633396</text:p>
              </table:table-cell>
              <table:table-cell office:value-type="float" office:value="4.90293525205168">
                <text:p>4.90293525205168</text:p>
              </table:table-cell>
              <table:table-cell office:value-type="float" office:value="497.623489722626">
                <text:p>497.623489722626</text:p>
              </table:table-cell>
              <table:table-cell office:value-type="float" office:value="10.7452259273268">
                <text:p>10.7452259273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3.0558012574158">
                <text:p>53.0558012574158</text:p>
              </table:table-cell>
              <table:table-cell office:value-type="float" office:value="459.652098968123">
                <text:p>459.652098968123</text:p>
              </table:table-cell>
              <table:table-cell office:value-type="float" office:value="4.27663433174178">
                <text:p>4.27663433174178</text:p>
              </table:table-cell>
              <table:table-cell office:value-type="float" office:value="497.722603944882">
                <text:p>497.722603944882</text:p>
              </table:table-cell>
              <table:table-cell office:value-type="float" office:value="11.3822600649151">
                <text:p>11.3822600649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41.15312">
                <text:p>41.15312</text:p>
              </table:table-cell>
              <table:table-cell office:value-type="float" office:value="527.347791758929">
                <text:p>527.347791758929</text:p>
              </table:table-cell>
              <table:table-cell office:value-type="float" office:value="3.8048445612635">
                <text:p>3.8048445612635</text:p>
              </table:table-cell>
              <table:table-cell office:value-type="float" office:value="497.834839194523">
                <text:p>497.834839194523</text:p>
              </table:table-cell>
              <table:table-cell office:value-type="float" office:value="12.1036266239764">
                <text:p>12.1036266239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7.8047">
                <text:p>37.8047</text:p>
              </table:table-cell>
              <table:table-cell office:value-type="float" office:value="595.047888810675">
                <text:p>595.047888810675</text:p>
              </table:table-cell>
              <table:table-cell office:value-type="float" office:value="3.36136217701392">
                <text:p>3.36136217701392</text:p>
              </table:table-cell>
              <table:table-cell office:value-type="float" office:value="497.947881892004">
                <text:p>497.947881892004</text:p>
              </table:table-cell>
              <table:table-cell office:value-type="float" office:value="12.8301828705129">
                <text:p>12.8301828705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33.53494">
                <text:p>33.53494</text:p>
              </table:table-cell>
              <table:table-cell office:value-type="float" office:value="662.761932688735">
                <text:p>662.761932688735</text:p>
              </table:table-cell>
              <table:table-cell office:value-type="float" office:value="3.00751984915522">
                <text:p>3.00751984915522</text:p>
              </table:table-cell>
              <table:table-cell office:value-type="float" office:value="498.05688735029">
                <text:p>498.05688735029</text:p>
              </table:table-cell>
              <table:table-cell office:value-type="float" office:value="13.5307906796731">
                <text:p>13.5307906796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0.74423">
                <text:p>30.74423</text:p>
              </table:table-cell>
              <table:table-cell office:value-type="float" office:value="730.502402132439">
                <text:p>730.502402132439</text:p>
              </table:table-cell>
              <table:table-cell office:value-type="float" office:value="2.82352183866869">
                <text:p>2.82352183866869</text:p>
              </table:table-cell>
              <table:table-cell office:value-type="float" office:value="498.16993004777">
                <text:p>498.16993004777</text:p>
              </table:table-cell>
              <table:table-cell office:value-type="float" office:value="14.2573469262097">
                <text:p>14.2573469262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28.71033">
                <text:p>28.71033</text:p>
              </table:table-cell>
              <table:table-cell office:value-type="float" office:value="798.243605619633">
                <text:p>798.243605619633</text:p>
              </table:table-cell>
              <table:table-cell office:value-type="float" office:value="2.64424172588694">
                <text:p>2.64424172588694</text:p>
              </table:table-cell>
              <table:table-cell office:value-type="float" office:value="503.681915046879">
                <text:p>503.681915046879</text:p>
              </table:table-cell>
              <table:table-cell office:value-type="float" office:value="10.0870623478749">
                <text:p>10.0870623478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26.64918">
                <text:p>26.64918</text:p>
              </table:table-cell>
              <table:table-cell office:value-type="float" office:value="865.989580389513">
                <text:p>865.989580389513</text:p>
              </table:table-cell>
              <table:table-cell office:value-type="float" office:value="2.49562794818629">
                <text:p>2.49562794818629</text:p>
              </table:table-cell>
              <table:table-cell office:value-type="float" office:value="580.666875773677">
                <text:p>580.66687577367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24.23697">
                <text:p>24.23697</text:p>
              </table:table-cell>
              <table:table-cell office:value-type="float" office:value="933.743629637785">
                <text:p>933.743629637785</text:p>
              </table:table-cell>
              <table:table-cell office:value-type="float" office:value="2.39891104523824">
                <text:p>2.39891104523824</text:p>
              </table:table-cell>
              <table:table-cell office:value-type="float" office:value="663.838040445274">
                <text:p>663.83804044527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22.39759">
                <text:p>22.39759</text:p>
              </table:table-cell>
              <table:table-cell office:value-type="float" office:value="1001.49767888606">
                <text:p>1001.49767888606</text:p>
              </table:table-cell>
              <table:table-cell office:value-type="float" office:value="2.30219414229019">
                <text:p>2.30219414229019</text:p>
              </table:table-cell>
              <table:table-cell office:value-type="float" office:value="747.00920511687">
                <text:p>747.0092051168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20.87613">
                <text:p>20.87613</text:p>
              </table:table-cell>
              <table:table-cell office:value-type="float" office:value="1069.25282919956">
                <text:p>1069.25282919956</text:p>
              </table:table-cell>
              <table:table-cell office:value-type="float" office:value="2.21255408589932">
                <text:p>2.21255408589932</text:p>
              </table:table-cell>
              <table:table-cell office:value-type="float" office:value="833.260783294822">
                <text:p>833.260783294822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9.5318">
                <text:p>19.5318</text:p>
              </table:table-cell>
              <table:table-cell office:value-type="float" office:value="1137.01018164354">
                <text:p>1137.01018164354</text:p>
              </table:table-cell>
              <table:table-cell office:value-type="float" office:value="2.1370677226228">
                <text:p>2.1370677226228</text:p>
              </table:table-cell>
              <table:table-cell office:value-type="float" office:value="913.351534460064">
                <text:p>913.35153446006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18.44495">
                <text:p>18.44495</text:p>
              </table:table-cell>
              <table:table-cell office:value-type="float" office:value="1204.76716706577">
                <text:p>1204.76716706577</text:p>
              </table:table-cell>
              <table:table-cell office:value-type="float" office:value="2.05922241049388">
                <text:p>2.05922241049388</text:p>
              </table:table-cell>
              <table:table-cell office:value-type="float" office:value="999.603112638016">
                <text:p>999.603112638016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7.55746">
                <text:p>17.55746</text:p>
              </table:table-cell>
              <table:table-cell office:value-type="float" office:value="1272.52562057499">
                <text:p>1272.52562057499</text:p>
              </table:table-cell>
              <table:table-cell office:value-type="float" office:value="1.99081289377453">
                <text:p>1.99081289377453</text:p>
              </table:table-cell>
              <table:table-cell office:value-type="float" office:value="1085.85469081597">
                <text:p>1085.8546908159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6.67848">
                <text:p>16.67848</text:p>
              </table:table-cell>
              <table:table-cell office:value-type="float" office:value="1340.28701025816">
                <text:p>1340.28701025816</text:p>
              </table:table-cell>
              <table:table-cell office:value-type="float" office:value="1.94127496787431">
                <text:p>1.94127496787431</text:p>
              </table:table-cell>
              <table:table-cell office:value-type="float" office:value="1165.94544198121">
                <text:p>1165.94544198121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5.8156">
                <text:p>15.8156</text:p>
              </table:table-cell>
              <table:table-cell office:value-type="float" office:value="1408.0432616369">
                <text:p>1408.0432616369</text:p>
              </table:table-cell>
              <table:table-cell office:value-type="float" office:value="1.85871175804061">
                <text:p>1.85871175804061</text:p>
              </table:table-cell>
              <table:table-cell office:value-type="float" office:value="1252.19702015916">
                <text:p>1252.19702015916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15.08548">
                <text:p>15.08548</text:p>
              </table:table-cell>
              <table:table-cell office:value-type="float" office:value="1475.80465132007">
                <text:p>1475.80465132007</text:p>
              </table:table-cell>
              <table:table-cell office:value-type="float" office:value="1.8091738321404">
                <text:p>1.8091738321404</text:p>
              </table:table-cell>
              <table:table-cell office:value-type="float" office:value="1332.2877713244">
                <text:p>1332.287771324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4.50796">
                <text:p>14.50796</text:p>
              </table:table-cell>
              <table:table-cell office:value-type="float" office:value="1543.56934419895">
                <text:p>1543.56934419895</text:p>
              </table:table-cell>
              <table:table-cell office:value-type="float" office:value="1.7808664459117">
                <text:p>1.7808664459117</text:p>
              </table:table-cell>
              <table:table-cell office:value-type="float" office:value="1418.53934950235">
                <text:p>1418.53934950235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13.96622">
                <text:p>13.96622</text:p>
              </table:table-cell>
              <table:table-cell office:value-type="float" office:value="1611.32853175166">
                <text:p>1611.32853175166</text:p>
              </table:table-cell>
              <table:table-cell office:value-type="float" office:value="1.71717482689713">
                <text:p>1.71717482689713</text:p>
              </table:table-cell>
              <table:table-cell office:value-type="float" office:value="1495.54391967667">
                <text:p>1495.54391967667</text:p>
              </table:table-cell>
              <table:table-cell office:value-type="float" office:value="9.88688868811486">
                <text:p>9.8868886881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3.37075">
                <text:p>13.37075</text:p>
              </table:table-cell>
              <table:table-cell office:value-type="float" office:value="1685.25478568673">
                <text:p>1685.25478568673</text:p>
              </table:table-cell>
              <table:table-cell office:value-type="float" office:value="1.69358533837322">
                <text:p>1.69358533837322</text:p>
              </table:table-cell>
              <table:table-cell office:value-type="float" office:value="1501.03629522826">
                <text:p>1501.03629522826</text:p>
              </table:table-cell>
              <table:table-cell office:value-type="float" office:value="5.59056884252377">
                <text:p>5.59056884252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13.02337">
                <text:p>13.02337</text:p>
              </table:table-cell>
              <table:table-cell office:value-type="float" office:value="1753.02168069608">
                <text:p>1753.02168069608</text:p>
              </table:table-cell>
              <table:table-cell office:value-type="float" office:value="1.67943164525887">
                <text:p>1.67943164525887</text:p>
              </table:table-cell>
              <table:table-cell office:value-type="float" office:value="1501.14530068655">
                <text:p>1501.14530068655</text:p>
              </table:table-cell>
              <table:table-cell office:value-type="float" office:value="6.29117665168401">
                <text:p>6.29117665168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12.50268">
                <text:p>12.50268</text:p>
              </table:table-cell>
              <table:table-cell office:value-type="float" office:value="1820.79041081416">
                <text:p>1820.79041081416</text:p>
              </table:table-cell>
              <table:table-cell office:value-type="float" office:value="1.67707269640648">
                <text:p>1.67707269640648</text:p>
              </table:table-cell>
              <table:table-cell office:value-type="float" office:value="1501.26238062322">
                <text:p>1501.26238062322</text:p>
              </table:table-cell>
              <table:table-cell office:value-type="float" office:value="7.04368133559686">
                <text:p>7.04368133559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12.06279">
                <text:p>12.06279</text:p>
              </table:table-cell>
              <table:table-cell office:value-type="float" office:value="1888.55290156257">
                <text:p>1888.55290156257</text:p>
              </table:table-cell>
              <table:table-cell office:value-type="float" office:value="1.63461161706343">
                <text:p>1.63461161706343</text:p>
              </table:table-cell>
              <table:table-cell office:value-type="float" office:value="1501.3754233207">
                <text:p>1501.3754233207</text:p>
              </table:table-cell>
              <table:table-cell office:value-type="float" office:value="7.7702375821334">
                <text:p>7.7702375821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11.59471">
                <text:p>11.59471</text:p>
              </table:table-cell>
              <table:table-cell office:value-type="float" office:value="1956.31282315876">
                <text:p>1956.31282315876</text:p>
              </table:table-cell>
              <table:table-cell office:value-type="float" office:value="1.57563789575365">
                <text:p>1.57563789575365</text:p>
              </table:table-cell>
              <table:table-cell office:value-type="float" office:value="1501.48846601818">
                <text:p>1501.48846601818</text:p>
              </table:table-cell>
              <table:table-cell office:value-type="float" office:value="8.49679382866994">
                <text:p>8.49679382866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1.20085">
                <text:p>11.20085</text:p>
              </table:table-cell>
              <table:table-cell office:value-type="float" office:value="2024.0731117767">
                <text:p>2024.0731117767</text:p>
              </table:table-cell>
              <table:table-cell office:value-type="float" office:value="1.51902312329626">
                <text:p>1.51902312329626</text:p>
              </table:table-cell>
              <table:table-cell office:value-type="float" office:value="1501.60150871567">
                <text:p>1501.60150871567</text:p>
              </table:table-cell>
              <table:table-cell office:value-type="float" office:value="9.22335007520649">
                <text:p>9.22335007520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10.83844">
                <text:p>10.83844</text:p>
              </table:table-cell>
              <table:table-cell office:value-type="float" office:value="2091.84184189477">
                <text:p>2091.84184189477</text:p>
              </table:table-cell>
              <table:table-cell office:value-type="float" office:value="1.51666417444387">
                <text:p>1.51666417444387</text:p>
              </table:table-cell>
              <table:table-cell office:value-type="float" office:value="1510.17206287334">
                <text:p>1510.17206287334</text:p>
              </table:table-cell>
              <table:table-cell office:value-type="float" office:value="4.9126659160678">
                <text:p>4.9126659160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10.50916">
                <text:p>10.50916</text:p>
              </table:table-cell>
              <table:table-cell office:value-type="float" office:value="2159.60726881714">
                <text:p>2159.60726881714</text:p>
              </table:table-cell>
              <table:table-cell office:value-type="float" office:value="1.49307468591995">
                <text:p>1.49307468591995</text:p>
              </table:table-cell>
              <table:table-cell office:value-type="float" office:value="1584.09441720238">
                <text:p>1584.0944172023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10.23655">
                <text:p>10.23655</text:p>
              </table:table-cell>
              <table:table-cell office:value-type="float" office:value="2227.37930213092">
                <text:p>2227.37930213092</text:p>
              </table:table-cell>
              <table:table-cell office:value-type="float" office:value="1.51194627673909">
                <text:p>1.51194627673909</text:p>
              </table:table-cell>
              <table:table-cell office:value-type="float" office:value="1670.34599538033">
                <text:p>1670.3459953803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9.937587">
                <text:p>9.937587</text:p>
              </table:table-cell>
              <table:table-cell office:value-type="float" office:value="2295.14693118376">
                <text:p>2295.14693118376</text:p>
              </table:table-cell>
              <table:table-cell office:value-type="float" office:value="1.50251048132952">
                <text:p>1.50251048132952</text:p>
              </table:table-cell>
              <table:table-cell office:value-type="float" office:value="1753.51716005193">
                <text:p>1753.5171600519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9.627526">
                <text:p>9.627526</text:p>
              </table:table-cell>
              <table:table-cell office:value-type="float" office:value="2362.90685277995">
                <text:p>2362.90685277995</text:p>
              </table:table-cell>
              <table:table-cell office:value-type="float" office:value="1.44353676001973">
                <text:p>1.44353676001973</text:p>
              </table:table-cell>
              <table:table-cell office:value-type="float" office:value="1836.68832472352">
                <text:p>1836.6883247235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9.322042">
                <text:p>9.322042</text:p>
              </table:table-cell>
              <table:table-cell office:value-type="float" office:value="2430.67631694152">
                <text:p>2430.67631694152</text:p>
              </table:table-cell>
              <table:table-cell office:value-type="float" office:value="1.44589570887213">
                <text:p>1.44589570887213</text:p>
              </table:table-cell>
              <table:table-cell office:value-type="float" office:value="1922.93990290147">
                <text:p>1922.9399029014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9.063236">
                <text:p>9.063236</text:p>
              </table:table-cell>
              <table:table-cell office:value-type="float" office:value="2498.43733960294">
                <text:p>2498.43733960294</text:p>
              </table:table-cell>
              <table:table-cell office:value-type="float" office:value="1.39399883411951">
                <text:p>1.39399883411951</text:p>
              </table:table-cell>
              <table:table-cell office:value-type="float" office:value="2003.03065406672">
                <text:p>2003.0306540667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8.79719">
                <text:p>8.79719</text:p>
              </table:table-cell>
              <table:table-cell office:value-type="float" office:value="2566.20166546008">
                <text:p>2566.20166546008</text:p>
              </table:table-cell>
              <table:table-cell office:value-type="float" office:value="1.36333249903843">
                <text:p>1.36333249903843</text:p>
              </table:table-cell>
              <table:table-cell office:value-type="float" office:value="2089.28223224467">
                <text:p>2089.2822322446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8.481279">
                <text:p>8.481279</text:p>
              </table:table-cell>
              <table:table-cell office:value-type="float" office:value="2633.9740657956">
                <text:p>2633.9740657956</text:p>
              </table:table-cell>
              <table:table-cell office:value-type="float" office:value="1.38456303870995">
                <text:p>1.38456303870995</text:p>
              </table:table-cell>
              <table:table-cell office:value-type="float" office:value="2172.45339691626">
                <text:p>2172.4533969162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8.215373">
                <text:p>8.215373</text:p>
              </table:table-cell>
              <table:table-cell office:value-type="float" office:value="2701.73068419609">
                <text:p>2701.73068419609</text:p>
              </table:table-cell>
              <table:table-cell office:value-type="float" office:value="1.30435877772864">
                <text:p>1.30435877772864</text:p>
              </table:table-cell>
              <table:table-cell office:value-type="float" office:value="2255.62456158786">
                <text:p>2255.6245615878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7.992791">
                <text:p>7.992791</text:p>
              </table:table-cell>
              <table:table-cell office:value-type="float" office:value="2769.49464303148">
                <text:p>2769.49464303148</text:p>
              </table:table-cell>
              <table:table-cell office:value-type="float" office:value="1.27133349379516">
                <text:p>1.27133349379516</text:p>
              </table:table-cell>
              <table:table-cell office:value-type="float" office:value="2341.87613976581">
                <text:p>2341.8761397658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7.831628">
                <text:p>7.831628</text:p>
              </table:table-cell>
              <table:table-cell office:value-type="float" office:value="2837.2597029321">
                <text:p>2837.2597029321</text:p>
              </table:table-cell>
              <table:table-cell office:value-type="float" office:value="1.24538505641886">
                <text:p>1.24538505641886</text:p>
              </table:table-cell>
              <table:table-cell office:value-type="float" office:value="2421.96325741578">
                <text:p>2421.96325741578</text:p>
              </table:table-cell>
              <table:table-cell office:value-type="float" office:value="4.84065900234855">
                <text:p>4.84065900234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7.678129">
                <text:p>7.678129</text:p>
              </table:table-cell>
              <table:table-cell office:value-type="float" office:value="2905.02256070226">
                <text:p>2905.02256070226</text:p>
              </table:table-cell>
              <table:table-cell office:value-type="float" office:value="1.20528292592821">
                <text:p>1.20528292592821</text:p>
              </table:table-cell>
              <table:table-cell office:value-type="float" office:value="2502.0576420963">
                <text:p>2502.057642096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7.493235">
                <text:p>7.493235</text:p>
              </table:table-cell>
              <table:table-cell office:value-type="float" office:value="2972.79826423349">
                <text:p>2972.79826423349</text:p>
              </table:table-cell>
              <table:table-cell office:value-type="float" office:value="1.24774400527125">
                <text:p>1.24774400527125</text:p>
              </table:table-cell>
              <table:table-cell office:value-type="float" office:value="2575.99059417822">
                <text:p>2575.99059417822</text:p>
              </table:table-cell>
              <table:table-cell office:value-type="float" office:value="4.88347392401946">
                <text:p>4.88347392401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7.315907">
                <text:p>7.315907</text:p>
              </table:table-cell>
              <table:table-cell office:value-type="float" office:value="3040.56552626458">
                <text:p>3040.56552626458</text:p>
              </table:table-cell>
              <table:table-cell office:value-type="float" office:value="1.23594926100929">
                <text:p>1.23594926100929</text:p>
              </table:table-cell>
              <table:table-cell office:value-type="float" office:value="2675.88674315377">
                <text:p>2675.88674315377</text:p>
              </table:table-cell>
              <table:table-cell office:value-type="float" office:value="4.90108179223909">
                <text:p>4.90108179223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7.12301">
                <text:p>7.12301</text:p>
              </table:table-cell>
              <table:table-cell office:value-type="float" office:value="3108.32985212171">
                <text:p>3108.32985212171</text:p>
              </table:table-cell>
              <table:table-cell office:value-type="float" office:value="1.20528292592821">
                <text:p>1.20528292592821</text:p>
              </table:table-cell>
              <table:table-cell office:value-type="float" office:value="2760.81843248894">
                <text:p>2760.81843248894</text:p>
              </table:table-cell>
              <table:table-cell office:value-type="float" office:value="4.90293525205168">
                <text:p>4.90293525205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6.878308">
                <text:p>6.878308</text:p>
              </table:table-cell>
              <table:table-cell office:value-type="float" office:value="3176.10665671818">
                <text:p>3176.10665671818</text:p>
              </table:table-cell>
              <table:table-cell office:value-type="float" office:value="1.25482085182842">
                <text:p>1.25482085182842</text:p>
              </table:table-cell>
              <table:table-cell office:value-type="float" office:value="2840.90716503459">
                <text:p>2840.90716503459</text:p>
              </table:table-cell>
              <table:table-cell office:value-type="float" office:value="4.88996103336353">
                <text:p>4.88996103336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6.728102">
                <text:p>6.728102</text:p>
              </table:table-cell>
              <table:table-cell office:value-type="float" office:value="3243.8643761839">
                <text:p>3243.8643761839</text:p>
              </table:table-cell>
              <table:table-cell office:value-type="float" office:value="1.18169343740429">
                <text:p>1.18169343740429</text:p>
              </table:table-cell>
              <table:table-cell office:value-type="float" office:value="2927.15874321254">
                <text:p>2927.15874321254</text:p>
              </table:table-cell>
              <table:table-cell office:value-type="float" office:value="4.88996103336353">
                <text:p>4.88996103336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6.577839">
                <text:p>6.577839</text:p>
              </table:table-cell>
              <table:table-cell office:value-type="float" office:value="3311.63310630198">
                <text:p>3311.63310630198</text:p>
              </table:table-cell>
              <table:table-cell office:value-type="float" office:value="1.1793344885519">
                <text:p>1.1793344885519</text:p>
              </table:table-cell>
              <table:table-cell office:value-type="float" office:value="3013.40830277089">
                <text:p>3013.40830277089</text:p>
              </table:table-cell>
              <table:table-cell office:value-type="float" office:value="4.87698681467538">
                <text:p>4.87698681467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6.555424">
                <text:p>6.555424</text:p>
              </table:table-cell>
              <table:table-cell office:value-type="float" office:value="3379.40734174623">
                <text:p>3379.40734174623</text:p>
              </table:table-cell>
              <table:table-cell office:value-type="float" office:value="1.21235977248538">
                <text:p>1.21235977248538</text:p>
              </table:table-cell>
              <table:table-cell office:value-type="float" office:value="3093.49865021222">
                <text:p>3093.49865021222</text:p>
              </table:table-cell>
              <table:table-cell office:value-type="float" office:value="4.87439197093775">
                <text:p>4.87439197093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6.472648">
                <text:p>6.472648</text:p>
              </table:table-cell>
              <table:table-cell office:value-type="float" office:value="3447.16983249464">
                <text:p>3447.16983249464</text:p>
              </table:table-cell>
              <table:table-cell office:value-type="float" office:value="1.16989869314233">
                <text:p>1.16989869314233</text:p>
              </table:table-cell>
              <table:table-cell office:value-type="float" office:value="3179.74861349449">
                <text:p>3179.74861349449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6.323946">
                <text:p>6.323946</text:p>
              </table:table-cell>
              <table:table-cell office:value-type="float" office:value="3514.93232324304">
                <text:p>3514.93232324304</text:p>
              </table:table-cell>
              <table:table-cell office:value-type="float" office:value="1.12743761379929">
                <text:p>1.12743761379929</text:p>
              </table:table-cell>
              <table:table-cell office:value-type="float" office:value="3259.83936465973">
                <text:p>3259.8393646597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6.194813">
                <text:p>6.194813</text:p>
              </table:table-cell>
              <table:table-cell office:value-type="float" office:value="3582.69297888273">
                <text:p>3582.69297888273</text:p>
              </table:table-cell>
              <table:table-cell office:value-type="float" office:value="1.07318179019429">
                <text:p>1.07318179019429</text:p>
              </table:table-cell>
              <table:table-cell office:value-type="float" office:value="3346.09094283768">
                <text:p>3346.0909428376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6.028892">
                <text:p>6.028892</text:p>
              </table:table-cell>
              <table:table-cell office:value-type="float" office:value="3650.45069834845">
                <text:p>3650.45069834845</text:p>
              </table:table-cell>
              <table:table-cell office:value-type="float" office:value="1.00005437577016">
                <text:p>1.00005437577016</text:p>
              </table:table-cell>
              <table:table-cell office:value-type="float" office:value="3432.34252101563">
                <text:p>3432.3425210156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5.937532">
                <text:p>5.937532</text:p>
              </table:table-cell>
              <table:table-cell office:value-type="float" office:value="3718.2175933578">
                <text:p>3718.2175933578</text:p>
              </table:table-cell>
              <table:table-cell office:value-type="float" office:value="0.985900682655807">
                <text:p>0.985900682655807</text:p>
              </table:table-cell>
              <table:table-cell office:value-type="float" office:value="3512.43327218088">
                <text:p>3512.4332721808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5.881345">
                <text:p>5.881345</text:p>
              </table:table-cell>
              <table:table-cell office:value-type="float" office:value="3785.98448836715">
                <text:p>3785.98448836715</text:p>
              </table:table-cell>
              <table:table-cell office:value-type="float" office:value="0.971746989541458">
                <text:p>0.971746989541458</text:p>
              </table:table-cell>
              <table:table-cell office:value-type="float" office:value="3598.68485035883">
                <text:p>3598.6848503588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5.85351">
                <text:p>5.85351</text:p>
              </table:table-cell>
              <table:table-cell office:value-type="float" office:value="3853.75248444173">
                <text:p>3853.75248444173</text:p>
              </table:table-cell>
              <table:table-cell office:value-type="float" office:value="0.964670142984286">
                <text:p>0.964670142984286</text:p>
              </table:table-cell>
              <table:table-cell office:value-type="float" office:value="3678.77560152407">
                <text:p>3678.7756015240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5.764213">
                <text:p>5.764213</text:p>
              </table:table-cell>
              <table:table-cell office:value-type="float" office:value="3921.52304966853">
                <text:p>3921.52304966853</text:p>
              </table:table-cell>
              <table:table-cell office:value-type="float" office:value="0.974105938393851">
                <text:p>0.974105938393851</text:p>
              </table:table-cell>
              <table:table-cell office:value-type="float" office:value="3765.02717970202">
                <text:p>3765.0271797020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5.675325">
                <text:p>5.675325</text:p>
              </table:table-cell>
              <table:table-cell office:value-type="float" office:value="3989.28921063439">
                <text:p>3989.28921063439</text:p>
              </table:table-cell>
              <table:table-cell office:value-type="float" office:value="0.95523434757472">
                <text:p>0.95523434757472</text:p>
              </table:table-cell>
              <table:table-cell office:value-type="float" office:value="3851.27875787997">
                <text:p>3851.2787578799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5.595998">
                <text:p>5.595998</text:p>
              </table:table-cell>
              <table:table-cell office:value-type="float" office:value="4057.06161096991">
                <text:p>4057.06161096991</text:p>
              </table:table-cell>
              <table:table-cell office:value-type="float" office:value="0.976464887246241">
                <text:p>0.976464887246241</text:p>
              </table:table-cell>
              <table:table-cell office:value-type="float" office:value="3931.36950904521">
                <text:p>3931.3695090452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5.496038">
                <text:p>5.496038</text:p>
              </table:table-cell>
              <table:table-cell office:value-type="float" office:value="4124.83364428369">
                <text:p>4124.83364428369</text:p>
              </table:table-cell>
              <table:table-cell office:value-type="float" office:value="0.995336478065372">
                <text:p>0.995336478065372</text:p>
              </table:table-cell>
              <table:table-cell office:value-type="float" office:value="4017.62108722317">
                <text:p>4017.6210872231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5.378618">
                <text:p>5.378618</text:p>
              </table:table-cell>
              <table:table-cell office:value-type="float" office:value="4192.59503396687">
                <text:p>4192.59503396687</text:p>
              </table:table-cell>
              <table:table-cell office:value-type="float" office:value="0.945798552165154">
                <text:p>0.945798552165154</text:p>
              </table:table-cell>
              <table:table-cell office:value-type="float" office:value="4100.79225189476">
                <text:p>4100.7922518947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5.294364">
                <text:p>5.294364</text:p>
              </table:table-cell>
              <table:table-cell office:value-type="float" office:value="4260.36706728065">
                <text:p>4260.36706728065</text:p>
              </table:table-cell>
              <table:table-cell office:value-type="float" office:value="0.964670142984286">
                <text:p>0.964670142984286</text:p>
              </table:table-cell>
              <table:table-cell office:value-type="float" office:value="4183.96341656636">
                <text:p>4183.9634165663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5.217234">
                <text:p>5.217234</text:p>
              </table:table-cell>
              <table:table-cell office:value-type="float" office:value="4328.13249420302">
                <text:p>4328.13249420302</text:p>
              </table:table-cell>
              <table:table-cell office:value-type="float" office:value="0.941080654460372">
                <text:p>0.941080654460372</text:p>
              </table:table-cell>
              <table:table-cell office:value-type="float" office:value="4270.21499474431">
                <text:p>4270.2149947443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5.168372">
                <text:p>5.168372</text:p>
              </table:table-cell>
              <table:table-cell office:value-type="float" office:value="4395.89498495143">
                <text:p>4395.89498495143</text:p>
              </table:table-cell>
              <table:table-cell office:value-type="float" office:value="0.898619575117326">
                <text:p>0.898619575117326</text:p>
              </table:table-cell>
              <table:table-cell office:value-type="float" office:value="4350.30574590955">
                <text:p>4350.3057459095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5.107139">
                <text:p>5.107139</text:p>
              </table:table-cell>
              <table:table-cell office:value-type="float" office:value="4463.6710555044">
                <text:p>4463.6710555044</text:p>
              </table:table-cell>
              <table:table-cell office:value-type="float" office:value="0.943439603312761">
                <text:p>0.943439603312761</text:p>
              </table:table-cell>
              <table:table-cell office:value-type="float" office:value="4436.5573240875">
                <text:p>4436.557324087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5.032189">
                <text:p>5.032189</text:p>
              </table:table-cell>
              <table:table-cell office:value-type="float" office:value="4531.43134412234">
                <text:p>4531.43134412234</text:p>
              </table:table-cell>
              <table:table-cell office:value-type="float" office:value="0.886824830855371">
                <text:p>0.886824830855371</text:p>
              </table:table-cell>
              <table:table-cell office:value-type="float" office:value="4519.7284887591">
                <text:p>4519.728488759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4.955383">
                <text:p>4.955383</text:p>
              </table:table-cell>
              <table:table-cell office:value-type="float" office:value="4599.19970721867">
                <text:p>4599.19970721867</text:p>
              </table:table-cell>
              <table:table-cell office:value-type="float" office:value="0.882106933150585">
                <text:p>0.882106933150585</text:p>
              </table:table-cell>
              <table:table-cell office:value-type="float" office:value="4602.8996534307">
                <text:p>4602.899653430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4.884972">
                <text:p>4.884972</text:p>
              </table:table-cell>
              <table:table-cell office:value-type="float" office:value="4666.97320861943">
                <text:p>4666.97320861943</text:p>
              </table:table-cell>
              <table:table-cell office:value-type="float" office:value="0.910414319379282">
                <text:p>0.910414319379282</text:p>
              </table:table-cell>
              <table:table-cell office:value-type="float" office:value="4689.15123160865">
                <text:p>4689.1512316086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4.836078">
                <text:p>4.836078</text:p>
              </table:table-cell>
              <table:table-cell office:value-type="float" office:value="4734.73569936784">
                <text:p>4734.73569936784</text:p>
              </table:table-cell>
              <table:table-cell office:value-type="float" office:value="0.86795324003624">
                <text:p>0.86795324003624</text:p>
              </table:table-cell>
              <table:table-cell office:value-type="float" office:value="4769.24198277389">
                <text:p>4769.24198277389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4.773309">
                <text:p>4.773309</text:p>
              </table:table-cell>
              <table:table-cell office:value-type="float" office:value="4802.49965820322">
                <text:p>4802.49965820322</text:p>
              </table:table-cell>
              <table:table-cell office:value-type="float" office:value="0.83492795610276">
                <text:p>0.83492795610276</text:p>
              </table:table-cell>
              <table:table-cell office:value-type="float" office:value="4855.49356095184">
                <text:p>4855.49356095184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4.708873">
                <text:p>4.708873</text:p>
              </table:table-cell>
              <table:table-cell office:value-type="float" office:value="4870.26581916908">
                <text:p>4870.26581916908</text:p>
              </table:table-cell>
              <table:table-cell office:value-type="float" office:value="0.816056365283629">
                <text:p>0.816056365283629</text:p>
              </table:table-cell>
              <table:table-cell office:value-type="float" office:value="4938.66472562344">
                <text:p>4938.66472562344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4.639505">
                <text:p>4.639505</text:p>
              </table:table-cell>
              <table:table-cell office:value-type="float" office:value="4938.03785248286">
                <text:p>4938.03785248286</text:p>
              </table:table-cell>
              <table:table-cell office:value-type="float" office:value="0.83492795610276">
                <text:p>0.83492795610276</text:p>
              </table:table-cell>
              <table:table-cell office:value-type="float" office:value="5006.43382276326">
                <text:p>5006.4338227632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4.583518">
                <text:p>4.583518</text:p>
              </table:table-cell>
              <table:table-cell office:value-type="float" office:value="5005.81869431853">
                <text:p>5005.81869431853</text:p>
              </table:table-cell>
              <table:table-cell office:value-type="float" office:value="0.910414319379282">
                <text:p>0.91041431937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4.544998">
                <text:p>4.544998</text:p>
              </table:table-cell>
              <table:table-cell office:value-type="float" office:value="5062.80983089268">
                <text:p>5062.80983089268</text:p>
              </table:table-cell>
              <table:table-cell office:value-type="float" office:value="0.932824333477001">
                <text:p>0.93282433347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4.499962">
                <text:p>4.499962</text:p>
              </table:table-cell>
              <table:table-cell office:value-type="float" office:value="5141.35431944595">
                <text:p>5141.35431944595</text:p>
              </table:table-cell>
              <table:table-cell office:value-type="float" office:value="0.893901677412543">
                <text:p>0.89390167741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4.460174">
                <text:p>4.460174</text:p>
              </table:table-cell>
              <table:table-cell office:value-type="float" office:value="5209.12818786845">
                <text:p>5209.12818786845</text:p>
              </table:table-cell>
              <table:table-cell office:value-type="float" office:value="0.92456801249363">
                <text:p>0.9245680124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4.407134">
                <text:p>4.407134</text:p>
              </table:table-cell>
              <table:table-cell office:value-type="float" office:value="5258.40599544826">
                <text:p>5258.40599544826</text:p>
              </table:table-cell>
              <table:table-cell office:value-type="float" office:value="0.86795324003624">
                <text:p>0.8679532400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4.351827">
                <text:p>4.35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4.297168">
                <text:p>4.2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4.259707">
                <text:p>4.25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4.226764">
                <text:p>4.22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4.211755">
                <text:p>4.21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4.211733">
                <text:p>4.21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4.168085">
                <text:p>4.16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4.095847">
                <text:p>4.09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4.001467">
                <text:p>4.00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3.932955">
                <text:p>3.93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3.884494">
                <text:p>3.88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3.826103">
                <text:p>3.82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3.777201">
                <text:p>3.77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3.724441">
                <text:p>3.72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3.669512">
                <text:p>3.66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3.628263">
                <text:p>3.62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3.581778">
                <text:p>3.58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3.543893">
                <text:p>3.5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3.49592">
                <text:p>3.4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3.493523">
                <text:p>3.49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3.474292">
                <text:p>3.47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3.460524">
                <text:p>3.46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3.449263">
                <text:p>3.44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1c1c1c" svg:stroke-linecap="round" draw:fill-color="#1c1c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9.927cm" svg:height="22.327cm" xlink:href=".." xlink:type="simple" chart:class="chart:scatter" chart:style-name="ch1">
        <chart:title svg:x="19.034cm" svg:y="0.581cm" chart:style-name="ch2">
          <text:p>Losses</text:p>
        </chart:title>
        <chart:legend chart:legend-position="end" svg:x="35.084cm" svg:y="9.37cm" style:legend-expansion="high" chart:style-name="ch3"/>
        <chart:plot-area chart:style-name="ch4" table:cell-range-address="losses_summary.A112:losses_summary.A184 losses_summary.D112:losses_summary.D184 losses_summary.D1:losses_summary.D101 losses_summary.F1:losses_summary.F101 losses_summary.L1:losses_summary.L101 losses_summary.O1:losses_summary.O101 losses_summary.S1:losses_summary.T101" chart:data-source-has-labels="row" svg:x="2.101cm" svg:y="1.928cm" svg:width="32.185cm" svg:height="18.68cm">
          <chart:coordinate-region svg:x="2.908cm" svg:y="2.127cm" svg:width="31.378cm" svg:height="17.427cm"/>
          <chart:axis chart:dimension="x" chart:name="primary-x" chart:style-name="ch5">
            <chart:title svg:x="16.291cm" svg:y="21.054cm" chart:style-name="ch6">
              <text:p>Load Power (W)</text:p>
            </chart:title>
            <chart:grid chart:style-name="ch7" chart:class="major"/>
          </chart:axis>
          <chart:axis chart:dimension="y" chart:name="primary-y" chart:style-name="ch8">
            <chart:title svg:x="0.451cm" svg:y="12.283cm" chart:style-name="ch9">
              <text:p>Loss(W)</text:p>
            </chart:title>
            <chart:grid chart:style-name="ch7" chart:class="major"/>
          </chart:axis>
          <chart:series chart:style-name="ch10" chart:values-cell-range-address="losses_summary.D112:losses_summary.D184" loext:label-string="epc_50_hz" chart:class="chart:scatter">
            <chart:domain table:cell-range-address="losses_summary.A112:losses_summary.A184"/>
            <chart:data-point chart:repeated="73"/>
          </chart:series>
          <chart:series chart:style-name="ch11" chart:values-cell-range-address="losses_summary.D2:losses_summary.D101" chart:label-cell-address="losses_summary.D1:losses_summary.D1" chart:class="chart:scatter">
            <chart:domain table:cell-range-address="losses_summary.A2:losses_summary.A101"/>
            <chart:data-point chart:repeated="100"/>
          </chart:series>
          <chart:series chart:style-name="ch12" chart:values-cell-range-address="losses_summary.F2:losses_summary.F101" chart:label-cell-address="losses_summary.F1:losses_summary.F1" chart:class="chart:scatter">
            <chart:domain table:cell-range-address="losses_summary.A2:losses_summary.A101"/>
            <chart:data-point chart:repeated="100"/>
          </chart:series>
          <chart:series chart:style-name="ch13" chart:values-cell-range-address="losses_summary.L2:losses_summary.L101" chart:label-cell-address="losses_summary.L1:losses_summary.L1" chart:class="chart:scatter">
            <chart:domain table:cell-range-address="losses_summary.A2:losses_summary.A101"/>
            <chart:data-point chart:repeated="100"/>
          </chart:series>
          <chart:series chart:style-name="ch14" chart:values-cell-range-address="losses_summary.O2:losses_summary.O101" chart:label-cell-address="losses_summary.O1:losses_summary.O1" chart:class="chart:scatter">
            <chart:domain table:cell-range-address="losses_summary.A2:losses_summary.A101"/>
            <chart:data-point chart:repeated="100"/>
          </chart:series>
          <chart:series chart:style-name="ch15" chart:values-cell-range-address="losses_summary.S2:losses_summary.S101" chart:label-cell-address="losses_summary.S1:losses_summary.S1" chart:class="chart:scatter">
            <chart:domain table:cell-range-address="losses_summary.A2:losses_summary.A101"/>
            <chart:data-point chart:repeated="100"/>
          </chart:series>
          <chart:series chart:style-name="ch16" chart:values-cell-range-address="losses_summary.T2:losses_summary.T101" chart:label-cell-address="losses_summary.T1:losses_summary.T1" chart:class="chart:scatter">
            <chart:domain table:cell-range-address="losses_summary.A2:losses_summary.A101"/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epc_50_hz</text:p>
              </table:table-cell>
              <table:table-cell office:value-type="string">
                <text:p>Colonna A</text:p>
              </table:table-cell>
              <table:table-cell office:value-type="string">
                <text:p>Losses</text:p>
                <draw:g>
                  <svg:desc>losses_summary.D1:losses_summary.D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Caps_losses</text:p>
                <draw:g>
                  <svg:desc>losses_summary.F1:losses_summary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aN_total_losses</text:p>
                <draw:g>
                  <svg:desc>losses_summary.L1:losses_summary.L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L_losses</text:p>
                <draw:g>
                  <svg:desc>losses_summary.O1:losses_summary.O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Si_total</text:p>
                <draw:g>
                  <svg:desc>losses_summary.S1:losses_summary.S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EMI_losses</text:p>
                <draw:g>
                  <svg:desc>losses_summary.T1:losses_summary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.8701885464">
                <text:p>383.8701885464</text:p>
                <draw:g>
                  <svg:desc>losses_summary.A112:losses_summary.A184</svg:desc>
                </draw:g>
              </table:table-cell>
              <table:table-cell office:value-type="float" office:value="23.9962525400197">
                <text:p>23.9962525400197</text:p>
                <draw:g>
                  <svg:desc>losses_summary.D112:losses_summary.D184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7.96072323593492">
                <text:p>7.96072323593492</text:p>
                <draw:g>
                  <svg:desc>losses_summary.D2:losses_summary.D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0.811799962001621">
                <text:p>0.811799962001621</text:p>
                <draw:g>
                  <svg:desc>losses_summary.F2:losses_summary.F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4.91783522941106">
                <text:p>4.91783522941106</text:p>
                <draw:g>
                  <svg:desc>losses_summary.L2:losses_summary.L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1.80529672281003">
                <text:p>1.80529672281003</text:p>
                <draw:g>
                  <svg:desc>losses_summary.O2:losses_summary.O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0.353098157078724">
                <text:p>0.353098157078724</text:p>
                <draw:g>
                  <svg:desc>losses_summary.S2:losses_summary.S101</svg:desc>
                </draw:g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0.0726931646359359">
                <text:p>0.0726931646359359</text:p>
                <draw:g>
                  <svg:desc>losses_summary.T2:losses_summary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.621728220568">
                <text:p>388.621728220568</text:p>
              </table:table-cell>
              <table:table-cell office:value-type="float" office:value="24.7157593933123">
                <text:p>24.7157593933123</text:p>
              </table:table-cell>
              <table:table-cell office:value-type="float" office:value="100">
                <text:p>100</text:p>
              </table:table-cell>
              <table:table-cell office:value-type="float" office:value="8.32028109106539">
                <text:p>8.32028109106539</text:p>
              </table:table-cell>
              <table:table-cell office:value-type="float" office:value="100">
                <text:p>100</text:p>
              </table:table-cell>
              <table:table-cell office:value-type="float" office:value="0.812974857504904">
                <text:p>0.812974857504904</text:p>
              </table:table-cell>
              <table:table-cell office:value-type="float" office:value="100">
                <text:p>100</text:p>
              </table:table-cell>
              <table:table-cell office:value-type="float" office:value="5.22988035473526">
                <text:p>5.22988035473526</text:p>
              </table:table-cell>
              <table:table-cell office:value-type="float" office:value="100">
                <text:p>100</text:p>
              </table:table-cell>
              <table:table-cell office:value-type="float" office:value="1.80482783699536">
                <text:p>1.80482783699536</text:p>
              </table:table-cell>
              <table:table-cell office:value-type="float" office:value="100">
                <text:p>100</text:p>
              </table:table-cell>
              <table:table-cell office:value-type="float" office:value="0.422711922142738">
                <text:p>0.422711922142738</text:p>
              </table:table-cell>
              <table:table-cell office:value-type="float" office:value="100">
                <text:p>100</text:p>
              </table:table-cell>
              <table:table-cell office:value-type="float" office:value="0.0498861196944658">
                <text:p>0.0498861196944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8.988785702322">
                <text:p>398.988785702322</text:p>
              </table:table-cell>
              <table:table-cell office:value-type="float" office:value="24.1850471279982">
                <text:p>24.1850471279982</text:p>
              </table:table-cell>
              <table:table-cell office:value-type="float" office:value="150">
                <text:p>150</text:p>
              </table:table-cell>
              <table:table-cell office:value-type="float" office:value="8.84817853162813">
                <text:p>8.84817853162813</text:p>
              </table:table-cell>
              <table:table-cell office:value-type="float" office:value="150">
                <text:p>150</text:p>
              </table:table-cell>
              <table:table-cell office:value-type="float" office:value="0.81490935660504">
                <text:p>0.81490935660504</text:p>
              </table:table-cell>
              <table:table-cell office:value-type="float" office:value="150">
                <text:p>150</text:p>
              </table:table-cell>
              <table:table-cell office:value-type="float" office:value="5.6786320952747">
                <text:p>5.6786320952747</text:p>
              </table:table-cell>
              <table:table-cell office:value-type="float" office:value="150">
                <text:p>150</text:p>
              </table:table-cell>
              <table:table-cell office:value-type="float" office:value="1.80521005550922">
                <text:p>1.80521005550922</text:p>
              </table:table-cell>
              <table:table-cell office:value-type="float" office:value="150">
                <text:p>150</text:p>
              </table:table-cell>
              <table:table-cell office:value-type="float" office:value="0.508185963635365">
                <text:p>0.508185963635365</text:p>
              </table:table-cell>
              <table:table-cell office:value-type="float" office:value="150">
                <text:p>150</text:p>
              </table:table-cell>
              <table:table-cell office:value-type="float" office:value="0.0412410606119529">
                <text:p>0.0412410606119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.133657039698">
                <text:p>402.133657039698</text:p>
              </table:table-cell>
              <table:table-cell office:value-type="float" office:value="23.618736762386">
                <text:p>23.618736762386</text:p>
              </table:table-cell>
              <table:table-cell office:value-type="float" office:value="200">
                <text:p>200</text:p>
              </table:table-cell>
              <table:table-cell office:value-type="float" office:value="9.48074626161961">
                <text:p>9.48074626161961</text:p>
              </table:table-cell>
              <table:table-cell office:value-type="float" office:value="200">
                <text:p>200</text:p>
              </table:table-cell>
              <table:table-cell office:value-type="float" office:value="0.81782278670652">
                <text:p>0.81782278670652</text:p>
              </table:table-cell>
              <table:table-cell office:value-type="float" office:value="200">
                <text:p>200</text:p>
              </table:table-cell>
              <table:table-cell office:value-type="float" office:value="6.19988238047612">
                <text:p>6.19988238047612</text:p>
              </table:table-cell>
              <table:table-cell office:value-type="float" office:value="200">
                <text:p>200</text:p>
              </table:table-cell>
              <table:table-cell office:value-type="float" office:value="1.8081795008168">
                <text:p>1.8081795008168</text:p>
              </table:table-cell>
              <table:table-cell office:value-type="float" office:value="200">
                <text:p>200</text:p>
              </table:table-cell>
              <table:table-cell office:value-type="float" office:value="0.609791985024823">
                <text:p>0.609791985024823</text:p>
              </table:table-cell>
              <table:table-cell office:value-type="float" office:value="200">
                <text:p>200</text:p>
              </table:table-cell>
              <table:table-cell office:value-type="float" office:value="0.0450696085872516">
                <text:p>0.0450696085872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.562386586073">
                <text:p>416.562386586073</text:p>
              </table:table-cell>
              <table:table-cell office:value-type="float" office:value="23.7492007500713">
                <text:p>23.7492007500713</text:p>
              </table:table-cell>
              <table:table-cell office:value-type="float" office:value="250">
                <text:p>250</text:p>
              </table:table-cell>
              <table:table-cell office:value-type="float" office:value="10.36917">
                <text:p>10.36917</text:p>
              </table:table-cell>
              <table:table-cell office:value-type="float" office:value="250">
                <text:p>250</text:p>
              </table:table-cell>
              <table:table-cell office:value-type="float" office:value="0.8239494">
                <text:p>0.8239494</text:p>
              </table:table-cell>
              <table:table-cell office:value-type="float" office:value="250">
                <text:p>250</text:p>
              </table:table-cell>
              <table:table-cell office:value-type="float" office:value="6.857323">
                <text:p>6.857323</text:p>
              </table:table-cell>
              <table:table-cell office:value-type="float" office:value="250">
                <text:p>250</text:p>
              </table:table-cell>
              <table:table-cell office:value-type="float" office:value="1.811476">
                <text:p>1.811476</text:p>
              </table:table-cell>
              <table:table-cell office:value-type="float" office:value="250">
                <text:p>250</text:p>
              </table:table-cell>
              <table:table-cell office:value-type="float" office:value="0.7254062">
                <text:p>0.7254062</text:p>
              </table:table-cell>
              <table:table-cell office:value-type="float" office:value="250">
                <text:p>250</text:p>
              </table:table-cell>
              <table:table-cell office:value-type="float" office:value="0.1510153">
                <text:p>0.1510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.940502473658">
                <text:p>417.940502473658</text:p>
              </table:table-cell>
              <table:table-cell office:value-type="float" office:value="23.1337292523787">
                <text:p>23.1337292523787</text:p>
              </table:table-cell>
              <table:table-cell office:value-type="float" office:value="300">
                <text:p>300</text:p>
              </table:table-cell>
              <table:table-cell office:value-type="float" office:value="10.859989909994">
                <text:p>10.859989909994</text:p>
              </table:table-cell>
              <table:table-cell office:value-type="float" office:value="300">
                <text:p>300</text:p>
              </table:table-cell>
              <table:table-cell office:value-type="float" office:value="0.825240453951475">
                <text:p>0.825240453951475</text:p>
              </table:table-cell>
              <table:table-cell office:value-type="float" office:value="300">
                <text:p>300</text:p>
              </table:table-cell>
              <table:table-cell office:value-type="float" office:value="7.32700868348168">
                <text:p>7.32700868348168</text:p>
              </table:table-cell>
              <table:table-cell office:value-type="float" office:value="300">
                <text:p>300</text:p>
              </table:table-cell>
              <table:table-cell office:value-type="float" office:value="1.81620729931823">
                <text:p>1.81620729931823</text:p>
              </table:table-cell>
              <table:table-cell office:value-type="float" office:value="300">
                <text:p>300</text:p>
              </table:table-cell>
              <table:table-cell office:value-type="float" office:value="0.816504296621965">
                <text:p>0.816504296621965</text:p>
              </table:table-cell>
              <table:table-cell office:value-type="float" office:value="300">
                <text:p>300</text:p>
              </table:table-cell>
              <table:table-cell office:value-type="float" office:value="0.0750291766350748">
                <text:p>0.0750291766350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.071145475821">
                <text:p>432.071145475821</text:p>
              </table:table-cell>
              <table:table-cell office:value-type="float" office:value="23.2361607578903">
                <text:p>23.2361607578903</text:p>
              </table:table-cell>
              <table:table-cell office:value-type="float" office:value="350">
                <text:p>350</text:p>
              </table:table-cell>
              <table:table-cell office:value-type="float" office:value="11.84022">
                <text:p>11.84022</text:p>
              </table:table-cell>
              <table:table-cell office:value-type="float" office:value="350">
                <text:p>350</text:p>
              </table:table-cell>
              <table:table-cell office:value-type="float" office:value="0.8313001">
                <text:p>0.8313001</text:p>
              </table:table-cell>
              <table:table-cell office:value-type="float" office:value="350">
                <text:p>350</text:p>
              </table:table-cell>
              <table:table-cell office:value-type="float" office:value="8.096946">
                <text:p>8.096946</text:p>
              </table:table-cell>
              <table:table-cell office:value-type="float" office:value="350">
                <text:p>350</text:p>
              </table:table-cell>
              <table:table-cell office:value-type="float" office:value="1.820473">
                <text:p>1.820473</text:p>
              </table:table-cell>
              <table:table-cell office:value-type="float" office:value="350">
                <text:p>350</text:p>
              </table:table-cell>
              <table:table-cell office:value-type="float" office:value="0.9388483">
                <text:p>0.9388483</text:p>
              </table:table-cell>
              <table:table-cell office:value-type="float" office:value="350">
                <text:p>350</text:p>
              </table:table-cell>
              <table:table-cell office:value-type="float" office:value="0.1526476">
                <text:p>0.1526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.766749479286">
                <text:p>434.766749479286</text:p>
              </table:table-cell>
              <table:table-cell office:value-type="float" office:value="22.6885031309255">
                <text:p>22.6885031309255</text:p>
              </table:table-cell>
              <table:table-cell office:value-type="float" office:value="400">
                <text:p>400</text:p>
              </table:table-cell>
              <table:table-cell office:value-type="float" office:value="12.694">
                <text:p>12.694</text:p>
              </table:table-cell>
              <table:table-cell office:value-type="float" office:value="400">
                <text:p>400</text:p>
              </table:table-cell>
              <table:table-cell office:value-type="float" office:value="0.8351975">
                <text:p>0.8351975</text:p>
              </table:table-cell>
              <table:table-cell office:value-type="float" office:value="400">
                <text:p>400</text:p>
              </table:table-cell>
              <table:table-cell office:value-type="float" office:value="8.825287">
                <text:p>8.825287</text:p>
              </table:table-cell>
              <table:table-cell office:value-type="float" office:value="400">
                <text:p>400</text:p>
              </table:table-cell>
              <table:table-cell office:value-type="float" office:value="1.825717">
                <text:p>1.825717</text:p>
              </table:table-cell>
              <table:table-cell office:value-type="float" office:value="400">
                <text:p>400</text:p>
              </table:table-cell>
              <table:table-cell office:value-type="float" office:value="1.054102">
                <text:p>1.054102</text:p>
              </table:table-cell>
              <table:table-cell office:value-type="float" office:value="400">
                <text:p>400</text:p>
              </table:table-cell>
              <table:table-cell office:value-type="float" office:value="0.1536974">
                <text:p>0.1536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.734868098623">
                <text:p>452.734868098623</text:p>
              </table:table-cell>
              <table:table-cell office:value-type="float" office:value="22.5945817563439">
                <text:p>22.5945817563439</text:p>
              </table:table-cell>
              <table:table-cell office:value-type="float" office:value="450">
                <text:p>450</text:p>
              </table:table-cell>
              <table:table-cell office:value-type="float" office:value="13.61091">
                <text:p>13.61091</text:p>
              </table:table-cell>
              <table:table-cell office:value-type="float" office:value="450">
                <text:p>450</text:p>
              </table:table-cell>
              <table:table-cell office:value-type="float" office:value="0.8383315">
                <text:p>0.8383315</text:p>
              </table:table-cell>
              <table:table-cell office:value-type="float" office:value="450">
                <text:p>450</text:p>
              </table:table-cell>
              <table:table-cell office:value-type="float" office:value="9.61248">
                <text:p>9.61248</text:p>
              </table:table-cell>
              <table:table-cell office:value-type="float" office:value="450">
                <text:p>450</text:p>
              </table:table-cell>
              <table:table-cell office:value-type="float" office:value="1.831502">
                <text:p>1.831502</text:p>
              </table:table-cell>
              <table:table-cell office:value-type="float" office:value="450">
                <text:p>450</text:p>
              </table:table-cell>
              <table:table-cell office:value-type="float" office:value="1.17744">
                <text:p>1.17744</text:p>
              </table:table-cell>
              <table:table-cell office:value-type="float" office:value="450">
                <text:p>450</text:p>
              </table:table-cell>
              <table:table-cell office:value-type="float" office:value="0.1511576">
                <text:p>0.1511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9.238019604211">
                <text:p>469.238019604211</text:p>
              </table:table-cell>
              <table:table-cell office:value-type="float" office:value="22.3382397112772">
                <text:p>22.3382397112772</text:p>
              </table:table-cell>
              <table:table-cell office:value-type="float" office:value="500">
                <text:p>500</text:p>
              </table:table-cell>
              <table:table-cell office:value-type="float" office:value="14.56406">
                <text:p>14.56406</text:p>
              </table:table-cell>
              <table:table-cell office:value-type="float" office:value="500">
                <text:p>500</text:p>
              </table:table-cell>
              <table:table-cell office:value-type="float" office:value="0.8427263">
                <text:p>0.8427263</text:p>
              </table:table-cell>
              <table:table-cell office:value-type="float" office:value="500">
                <text:p>500</text:p>
              </table:table-cell>
              <table:table-cell office:value-type="float" office:value="10.42813">
                <text:p>10.42813</text:p>
              </table:table-cell>
              <table:table-cell office:value-type="float" office:value="500">
                <text:p>500</text:p>
              </table:table-cell>
              <table:table-cell office:value-type="float" office:value="1.83886">
                <text:p>1.83886</text:p>
              </table:table-cell>
              <table:table-cell office:value-type="float" office:value="500">
                <text:p>500</text:p>
              </table:table-cell>
              <table:table-cell office:value-type="float" office:value="1.303756">
                <text:p>1.303756</text:p>
              </table:table-cell>
              <table:table-cell office:value-type="float" office:value="500">
                <text:p>500</text:p>
              </table:table-cell>
              <table:table-cell office:value-type="float" office:value="0.1505846">
                <text:p>0.1505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1.620668291683">
                <text:p>491.620668291683</text:p>
              </table:table-cell>
              <table:table-cell office:value-type="float" office:value="22.5739827528453">
                <text:p>22.5739827528453</text:p>
              </table:table-cell>
              <table:table-cell office:value-type="float" office:value="550">
                <text:p>550</text:p>
              </table:table-cell>
              <table:table-cell office:value-type="float" office:value="15.54258">
                <text:p>15.54258</text:p>
              </table:table-cell>
              <table:table-cell office:value-type="float" office:value="550">
                <text:p>550</text:p>
              </table:table-cell>
              <table:table-cell office:value-type="float" office:value="0.8480639">
                <text:p>0.8480639</text:p>
              </table:table-cell>
              <table:table-cell office:value-type="float" office:value="550">
                <text:p>550</text:p>
              </table:table-cell>
              <table:table-cell office:value-type="float" office:value="11.26484">
                <text:p>11.26484</text:p>
              </table:table-cell>
              <table:table-cell office:value-type="float" office:value="550">
                <text:p>550</text:p>
              </table:table-cell>
              <table:table-cell office:value-type="float" office:value="1.846072">
                <text:p>1.846072</text:p>
              </table:table-cell>
              <table:table-cell office:value-type="float" office:value="550">
                <text:p>550</text:p>
              </table:table-cell>
              <table:table-cell office:value-type="float" office:value="1.431123">
                <text:p>1.431123</text:p>
              </table:table-cell>
              <table:table-cell office:value-type="float" office:value="550">
                <text:p>550</text:p>
              </table:table-cell>
              <table:table-cell office:value-type="float" office:value="0.1524754">
                <text:p>0.1524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1.703549217024">
                <text:p>521.703549217024</text:p>
              </table:table-cell>
              <table:table-cell office:value-type="float" office:value="23.0344668666309">
                <text:p>23.0344668666309</text:p>
              </table:table-cell>
              <table:table-cell office:value-type="float" office:value="600">
                <text:p>600</text:p>
              </table:table-cell>
              <table:table-cell office:value-type="float" office:value="16.52622">
                <text:p>16.52622</text:p>
              </table:table-cell>
              <table:table-cell office:value-type="float" office:value="600">
                <text:p>600</text:p>
              </table:table-cell>
              <table:table-cell office:value-type="float" office:value="0.8536427">
                <text:p>0.8536427</text:p>
              </table:table-cell>
              <table:table-cell office:value-type="float" office:value="600">
                <text:p>600</text:p>
              </table:table-cell>
              <table:table-cell office:value-type="float" office:value="12.10329">
                <text:p>12.10329</text:p>
              </table:table-cell>
              <table:table-cell office:value-type="float" office:value="600">
                <text:p>600</text:p>
              </table:table-cell>
              <table:table-cell office:value-type="float" office:value="1.853946">
                <text:p>1.853946</text:p>
              </table:table-cell>
              <table:table-cell office:value-type="float" office:value="600">
                <text:p>600</text:p>
              </table:table-cell>
              <table:table-cell office:value-type="float" office:value="1.561608">
                <text:p>1.561608</text:p>
              </table:table-cell>
              <table:table-cell office:value-type="float" office:value="600">
                <text:p>600</text:p>
              </table:table-cell>
              <table:table-cell office:value-type="float" office:value="0.153742">
                <text:p>0.153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.433802074882">
                <text:p>542.433802074882</text:p>
              </table:table-cell>
              <table:table-cell office:value-type="float" office:value="23.0849392735795">
                <text:p>23.0849392735795</text:p>
              </table:table-cell>
              <table:table-cell office:value-type="float" office:value="650">
                <text:p>650</text:p>
              </table:table-cell>
              <table:table-cell office:value-type="float" office:value="17.53242">
                <text:p>17.53242</text:p>
              </table:table-cell>
              <table:table-cell office:value-type="float" office:value="650">
                <text:p>650</text:p>
              </table:table-cell>
              <table:table-cell office:value-type="float" office:value="0.8594937">
                <text:p>0.8594937</text:p>
              </table:table-cell>
              <table:table-cell office:value-type="float" office:value="650">
                <text:p>650</text:p>
              </table:table-cell>
              <table:table-cell office:value-type="float" office:value="12.96016">
                <text:p>12.96016</text:p>
              </table:table-cell>
              <table:table-cell office:value-type="float" office:value="650">
                <text:p>650</text:p>
              </table:table-cell>
              <table:table-cell office:value-type="float" office:value="1.862814">
                <text:p>1.862814</text:p>
              </table:table-cell>
              <table:table-cell office:value-type="float" office:value="650">
                <text:p>650</text:p>
              </table:table-cell>
              <table:table-cell office:value-type="float" office:value="1.694906">
                <text:p>1.694906</text:p>
              </table:table-cell>
              <table:table-cell office:value-type="float" office:value="650">
                <text:p>650</text:p>
              </table:table-cell>
              <table:table-cell office:value-type="float" office:value="0.1550494">
                <text:p>0.1550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.08479640021">
                <text:p>571.08479640021</text:p>
              </table:table-cell>
              <table:table-cell office:value-type="float" office:value="23.3404100168038">
                <text:p>23.3404100168038</text:p>
              </table:table-cell>
              <table:table-cell office:value-type="float" office:value="700">
                <text:p>700</text:p>
              </table:table-cell>
              <table:table-cell office:value-type="float" office:value="18.55459">
                <text:p>18.55459</text:p>
              </table:table-cell>
              <table:table-cell office:value-type="float" office:value="700">
                <text:p>700</text:p>
              </table:table-cell>
              <table:table-cell office:value-type="float" office:value="0.8659053">
                <text:p>0.8659053</text:p>
              </table:table-cell>
              <table:table-cell office:value-type="float" office:value="700">
                <text:p>700</text:p>
              </table:table-cell>
              <table:table-cell office:value-type="float" office:value="13.8309">
                <text:p>13.8309</text:p>
              </table:table-cell>
              <table:table-cell office:value-type="float" office:value="700">
                <text:p>700</text:p>
              </table:table-cell>
              <table:table-cell office:value-type="float" office:value="1.872899">
                <text:p>1.872899</text:p>
              </table:table-cell>
              <table:table-cell office:value-type="float" office:value="700">
                <text:p>700</text:p>
              </table:table-cell>
              <table:table-cell office:value-type="float" office:value="1.827763">
                <text:p>1.827763</text:p>
              </table:table-cell>
              <table:table-cell office:value-type="float" office:value="700">
                <text:p>700</text:p>
              </table:table-cell>
              <table:table-cell office:value-type="float" office:value="0.1571306">
                <text:p>0.1571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1.813761889517">
                <text:p>591.813761889517</text:p>
              </table:table-cell>
              <table:table-cell office:value-type="float" office:value="23.2708914010183">
                <text:p>23.2708914010183</text:p>
              </table:table-cell>
              <table:table-cell office:value-type="float" office:value="750">
                <text:p>750</text:p>
              </table:table-cell>
              <table:table-cell office:value-type="float" office:value="19.58205">
                <text:p>19.58205</text:p>
              </table:table-cell>
              <table:table-cell office:value-type="float" office:value="750">
                <text:p>750</text:p>
              </table:table-cell>
              <table:table-cell office:value-type="float" office:value="0.8729021">
                <text:p>0.8729021</text:p>
              </table:table-cell>
              <table:table-cell office:value-type="float" office:value="750">
                <text:p>750</text:p>
              </table:table-cell>
              <table:table-cell office:value-type="float" office:value="14.7053">
                <text:p>14.7053</text:p>
              </table:table-cell>
              <table:table-cell office:value-type="float" office:value="750">
                <text:p>750</text:p>
              </table:table-cell>
              <table:table-cell office:value-type="float" office:value="1.883519">
                <text:p>1.883519</text:p>
              </table:table-cell>
              <table:table-cell office:value-type="float" office:value="750">
                <text:p>750</text:p>
              </table:table-cell>
              <table:table-cell office:value-type="float" office:value="1.960935">
                <text:p>1.960935</text:p>
              </table:table-cell>
              <table:table-cell office:value-type="float" office:value="750">
                <text:p>750</text:p>
              </table:table-cell>
              <table:table-cell office:value-type="float" office:value="0.1593934">
                <text:p>0.1593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0.460772659333">
                <text:p>620.460772659333</text:p>
              </table:table-cell>
              <table:table-cell office:value-type="float" office:value="23.4242470031465">
                <text:p>23.4242470031465</text:p>
              </table:table-cell>
              <table:table-cell office:value-type="float" office:value="800">
                <text:p>800</text:p>
              </table:table-cell>
              <table:table-cell office:value-type="float" office:value="20.61164">
                <text:p>20.61164</text:p>
              </table:table-cell>
              <table:table-cell office:value-type="float" office:value="800">
                <text:p>800</text:p>
              </table:table-cell>
              <table:table-cell office:value-type="float" office:value="0.8805299">
                <text:p>0.8805299</text:p>
              </table:table-cell>
              <table:table-cell office:value-type="float" office:value="800">
                <text:p>800</text:p>
              </table:table-cell>
              <table:table-cell office:value-type="float" office:value="15.58073">
                <text:p>15.58073</text:p>
              </table:table-cell>
              <table:table-cell office:value-type="float" office:value="800">
                <text:p>800</text:p>
              </table:table-cell>
              <table:table-cell office:value-type="float" office:value="1.894171">
                <text:p>1.894171</text:p>
              </table:table-cell>
              <table:table-cell office:value-type="float" office:value="800">
                <text:p>800</text:p>
              </table:table-cell>
              <table:table-cell office:value-type="float" office:value="2.094439">
                <text:p>2.094439</text:p>
              </table:table-cell>
              <table:table-cell office:value-type="float" office:value="800">
                <text:p>800</text:p>
              </table:table-cell>
              <table:table-cell office:value-type="float" office:value="0.1617709">
                <text:p>0.161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2.071085231823">
                <text:p>642.071085231823</text:p>
              </table:table-cell>
              <table:table-cell office:value-type="float" office:value="23.2223757916545">
                <text:p>23.2223757916545</text:p>
              </table:table-cell>
              <table:table-cell office:value-type="float" office:value="850">
                <text:p>850</text:p>
              </table:table-cell>
              <table:table-cell office:value-type="float" office:value="21.64852">
                <text:p>21.64852</text:p>
              </table:table-cell>
              <table:table-cell office:value-type="float" office:value="850">
                <text:p>850</text:p>
              </table:table-cell>
              <table:table-cell office:value-type="float" office:value="0.8886793">
                <text:p>0.8886793</text:p>
              </table:table-cell>
              <table:table-cell office:value-type="float" office:value="850">
                <text:p>850</text:p>
              </table:table-cell>
              <table:table-cell office:value-type="float" office:value="16.45931">
                <text:p>16.45931</text:p>
              </table:table-cell>
              <table:table-cell office:value-type="float" office:value="850">
                <text:p>850</text:p>
              </table:table-cell>
              <table:table-cell office:value-type="float" office:value="1.906006">
                <text:p>1.906006</text:p>
              </table:table-cell>
              <table:table-cell office:value-type="float" office:value="850">
                <text:p>850</text:p>
              </table:table-cell>
              <table:table-cell office:value-type="float" office:value="2.229889">
                <text:p>2.229889</text:p>
              </table:table-cell>
              <table:table-cell office:value-type="float" office:value="850">
                <text:p>850</text:p>
              </table:table-cell>
              <table:table-cell office:value-type="float" office:value="0.1646379">
                <text:p>0.1646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6.75757709907">
                <text:p>666.75757709907</text:p>
              </table:table-cell>
              <table:table-cell office:value-type="float" office:value="23.1109400974274">
                <text:p>23.1109400974274</text:p>
              </table:table-cell>
              <table:table-cell office:value-type="float" office:value="900">
                <text:p>900</text:p>
              </table:table-cell>
              <table:table-cell office:value-type="float" office:value="22.68906">
                <text:p>22.68906</text:p>
              </table:table-cell>
              <table:table-cell office:value-type="float" office:value="900">
                <text:p>900</text:p>
              </table:table-cell>
              <table:table-cell office:value-type="float" office:value="0.8974331">
                <text:p>0.8974331</text:p>
              </table:table-cell>
              <table:table-cell office:value-type="float" office:value="900">
                <text:p>900</text:p>
              </table:table-cell>
              <table:table-cell office:value-type="float" office:value="17.3389">
                <text:p>17.3389</text:p>
              </table:table-cell>
              <table:table-cell office:value-type="float" office:value="900">
                <text:p>900</text:p>
              </table:table-cell>
              <table:table-cell office:value-type="float" office:value="1.918662">
                <text:p>1.918662</text:p>
              </table:table-cell>
              <table:table-cell office:value-type="float" office:value="900">
                <text:p>900</text:p>
              </table:table-cell>
              <table:table-cell office:value-type="float" office:value="2.366241">
                <text:p>2.366241</text:p>
              </table:table-cell>
              <table:table-cell office:value-type="float" office:value="900">
                <text:p>900</text:p>
              </table:table-cell>
              <table:table-cell office:value-type="float" office:value="0.167817">
                <text:p>0.167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7.591054613882">
                <text:p>697.591054613882</text:p>
              </table:table-cell>
              <table:table-cell office:value-type="float" office:value="23.3366523047666">
                <text:p>23.3366523047666</text:p>
              </table:table-cell>
              <table:table-cell office:value-type="float" office:value="950">
                <text:p>950</text:p>
              </table:table-cell>
              <table:table-cell office:value-type="float" office:value="23.732">
                <text:p>23.732</text:p>
              </table:table-cell>
              <table:table-cell office:value-type="float" office:value="950">
                <text:p>950</text:p>
              </table:table-cell>
              <table:table-cell office:value-type="float" office:value="0.9065527">
                <text:p>0.9065527</text:p>
              </table:table-cell>
              <table:table-cell office:value-type="float" office:value="950">
                <text:p>950</text:p>
              </table:table-cell>
              <table:table-cell office:value-type="float" office:value="18.21917">
                <text:p>18.21917</text:p>
              </table:table-cell>
              <table:table-cell office:value-type="float" office:value="950">
                <text:p>950</text:p>
              </table:table-cell>
              <table:table-cell office:value-type="float" office:value="1.931762">
                <text:p>1.931762</text:p>
              </table:table-cell>
              <table:table-cell office:value-type="float" office:value="950">
                <text:p>950</text:p>
              </table:table-cell>
              <table:table-cell office:value-type="float" office:value="2.503392">
                <text:p>2.503392</text:p>
              </table:table-cell>
              <table:table-cell office:value-type="float" office:value="950">
                <text:p>950</text:p>
              </table:table-cell>
              <table:table-cell office:value-type="float" office:value="0.1711229">
                <text:p>0.1711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8.423715985614">
                <text:p>728.423715985614</text:p>
              </table:table-cell>
              <table:table-cell office:value-type="float" office:value="23.5059645331344">
                <text:p>23.5059645331344</text:p>
              </table:table-cell>
              <table:table-cell office:value-type="float" office:value="1000">
                <text:p>1000</text:p>
              </table:table-cell>
              <table:table-cell office:value-type="float" office:value="24.77889">
                <text:p>24.77889</text:p>
              </table:table-cell>
              <table:table-cell office:value-type="float" office:value="1000">
                <text:p>1000</text:p>
              </table:table-cell>
              <table:table-cell office:value-type="float" office:value="0.9160255">
                <text:p>0.9160255</text:p>
              </table:table-cell>
              <table:table-cell office:value-type="float" office:value="1000">
                <text:p>1000</text:p>
              </table:table-cell>
              <table:table-cell office:value-type="float" office:value="19.10208">
                <text:p>19.10208</text:p>
              </table:table-cell>
              <table:table-cell office:value-type="float" office:value="1000">
                <text:p>1000</text:p>
              </table:table-cell>
              <table:table-cell office:value-type="float" office:value="1.944916">
                <text:p>1.944916</text:p>
              </table:table-cell>
              <table:table-cell office:value-type="float" office:value="1000">
                <text:p>1000</text:p>
              </table:table-cell>
              <table:table-cell office:value-type="float" office:value="2.641621">
                <text:p>2.641621</text:p>
              </table:table-cell>
              <table:table-cell office:value-type="float" office:value="1000">
                <text:p>1000</text:p>
              </table:table-cell>
              <table:table-cell office:value-type="float" office:value="0.1742404">
                <text:p>0.1742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6.171254494664">
                <text:p>756.171254494664</text:p>
              </table:table-cell>
              <table:table-cell office:value-type="float" office:value="23.635573833991">
                <text:p>23.635573833991</text:p>
              </table:table-cell>
              <table:table-cell office:value-type="float" office:value="1050">
                <text:p>1050</text:p>
              </table:table-cell>
              <table:table-cell office:value-type="float" office:value="25.8323">
                <text:p>25.8323</text:p>
              </table:table-cell>
              <table:table-cell office:value-type="float" office:value="1050">
                <text:p>1050</text:p>
              </table:table-cell>
              <table:table-cell office:value-type="float" office:value="0.9262307">
                <text:p>0.9262307</text:p>
              </table:table-cell>
              <table:table-cell office:value-type="float" office:value="1050">
                <text:p>1050</text:p>
              </table:table-cell>
              <table:table-cell office:value-type="float" office:value="19.98783">
                <text:p>19.98783</text:p>
              </table:table-cell>
              <table:table-cell office:value-type="float" office:value="1050">
                <text:p>1050</text:p>
              </table:table-cell>
              <table:table-cell office:value-type="float" office:value="1.95994">
                <text:p>1.95994</text:p>
              </table:table-cell>
              <table:table-cell office:value-type="float" office:value="1050">
                <text:p>1050</text:p>
              </table:table-cell>
              <table:table-cell office:value-type="float" office:value="2.780305">
                <text:p>2.780305</text:p>
              </table:table-cell>
              <table:table-cell office:value-type="float" office:value="1050">
                <text:p>1050</text:p>
              </table:table-cell>
              <table:table-cell office:value-type="float" office:value="0.1779899">
                <text:p>0.1779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7.008710706994">
                <text:p>787.008710706994</text:p>
              </table:table-cell>
              <table:table-cell office:value-type="float" office:value="23.5702064736051">
                <text:p>23.5702064736051</text:p>
              </table:table-cell>
              <table:table-cell office:value-type="float" office:value="1100">
                <text:p>1100</text:p>
              </table:table-cell>
              <table:table-cell office:value-type="float" office:value="26.88897">
                <text:p>26.88897</text:p>
              </table:table-cell>
              <table:table-cell office:value-type="float" office:value="1100">
                <text:p>1100</text:p>
              </table:table-cell>
              <table:table-cell office:value-type="float" office:value="0.9367008">
                <text:p>0.9367008</text:p>
              </table:table-cell>
              <table:table-cell office:value-type="float" office:value="1100">
                <text:p>1100</text:p>
              </table:table-cell>
              <table:table-cell office:value-type="float" office:value="20.87514">
                <text:p>20.87514</text:p>
              </table:table-cell>
              <table:table-cell office:value-type="float" office:value="1100">
                <text:p>1100</text:p>
              </table:table-cell>
              <table:table-cell office:value-type="float" office:value="1.975487">
                <text:p>1.975487</text:p>
              </table:table-cell>
              <table:table-cell office:value-type="float" office:value="1100">
                <text:p>1100</text:p>
              </table:table-cell>
              <table:table-cell office:value-type="float" office:value="2.919601">
                <text:p>2.919601</text:p>
              </table:table-cell>
              <table:table-cell office:value-type="float" office:value="1100">
                <text:p>1100</text:p>
              </table:table-cell>
              <table:table-cell office:value-type="float" office:value="0.1820344">
                <text:p>0.1820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0.920883957728">
                <text:p>820.920883957728</text:p>
              </table:table-cell>
              <table:table-cell office:value-type="float" office:value="23.607291070431">
                <text:p>23.607291070431</text:p>
              </table:table-cell>
              <table:table-cell office:value-type="float" office:value="1150">
                <text:p>1150</text:p>
              </table:table-cell>
              <table:table-cell office:value-type="float" office:value="27.95189">
                <text:p>27.95189</text:p>
              </table:table-cell>
              <table:table-cell office:value-type="float" office:value="1150">
                <text:p>1150</text:p>
              </table:table-cell>
              <table:table-cell office:value-type="float" office:value="0.9478801">
                <text:p>0.9478801</text:p>
              </table:table-cell>
              <table:table-cell office:value-type="float" office:value="1150">
                <text:p>1150</text:p>
              </table:table-cell>
              <table:table-cell office:value-type="float" office:value="21.76571">
                <text:p>21.76571</text:p>
              </table:table-cell>
              <table:table-cell office:value-type="float" office:value="1150">
                <text:p>1150</text:p>
              </table:table-cell>
              <table:table-cell office:value-type="float" office:value="1.991871">
                <text:p>1.991871</text:p>
              </table:table-cell>
              <table:table-cell office:value-type="float" office:value="1150">
                <text:p>1150</text:p>
              </table:table-cell>
              <table:table-cell office:value-type="float" office:value="3.060152">
                <text:p>3.060152</text:p>
              </table:table-cell>
              <table:table-cell office:value-type="float" office:value="1150">
                <text:p>1150</text:p>
              </table:table-cell>
              <table:table-cell office:value-type="float" office:value="0.1862788">
                <text:p>0.1862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7.915950251655">
                <text:p>857.915950251655</text:p>
              </table:table-cell>
              <table:table-cell office:value-type="float" office:value="23.5589673590887">
                <text:p>23.5589673590887</text:p>
              </table:table-cell>
              <table:table-cell office:value-type="float" office:value="1200">
                <text:p>1200</text:p>
              </table:table-cell>
              <table:table-cell office:value-type="float" office:value="29.01815">
                <text:p>29.01815</text:p>
              </table:table-cell>
              <table:table-cell office:value-type="float" office:value="1200">
                <text:p>1200</text:p>
              </table:table-cell>
              <table:table-cell office:value-type="float" office:value="0.9593018">
                <text:p>0.9593018</text:p>
              </table:table-cell>
              <table:table-cell office:value-type="float" office:value="1200">
                <text:p>1200</text:p>
              </table:table-cell>
              <table:table-cell office:value-type="float" office:value="22.65811">
                <text:p>22.65811</text:p>
              </table:table-cell>
              <table:table-cell office:value-type="float" office:value="1200">
                <text:p>1200</text:p>
              </table:table-cell>
              <table:table-cell office:value-type="float" office:value="2.008839">
                <text:p>2.008839</text:p>
              </table:table-cell>
              <table:table-cell office:value-type="float" office:value="1200">
                <text:p>1200</text:p>
              </table:table-cell>
              <table:table-cell office:value-type="float" office:value="3.201114">
                <text:p>3.201114</text:p>
              </table:table-cell>
              <table:table-cell office:value-type="float" office:value="1200">
                <text:p>1200</text:p>
              </table:table-cell>
              <table:table-cell office:value-type="float" office:value="0.1907812">
                <text:p>0.1907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0.30038536182">
                <text:p>910.30038536182</text:p>
              </table:table-cell>
              <table:table-cell office:value-type="float" office:value="23.9453114580153">
                <text:p>23.9453114580153</text:p>
              </table:table-cell>
              <table:table-cell office:value-type="float" office:value="1250">
                <text:p>1250</text:p>
              </table:table-cell>
              <table:table-cell office:value-type="float" office:value="30.08992">
                <text:p>30.08992</text:p>
              </table:table-cell>
              <table:table-cell office:value-type="float" office:value="1250">
                <text:p>1250</text:p>
              </table:table-cell>
              <table:table-cell office:value-type="float" office:value="0.9712056">
                <text:p>0.9712056</text:p>
              </table:table-cell>
              <table:table-cell office:value-type="float" office:value="1250">
                <text:p>1250</text:p>
              </table:table-cell>
              <table:table-cell office:value-type="float" office:value="23.55372">
                <text:p>23.55372</text:p>
              </table:table-cell>
              <table:table-cell office:value-type="float" office:value="1250">
                <text:p>1250</text:p>
              </table:table-cell>
              <table:table-cell office:value-type="float" office:value="2.026514">
                <text:p>2.026514</text:p>
              </table:table-cell>
              <table:table-cell office:value-type="float" office:value="1250">
                <text:p>1250</text:p>
              </table:table-cell>
              <table:table-cell office:value-type="float" office:value="3.342572">
                <text:p>3.342572</text:p>
              </table:table-cell>
              <table:table-cell office:value-type="float" office:value="1250">
                <text:p>1250</text:p>
              </table:table-cell>
              <table:table-cell office:value-type="float" office:value="0.1959065">
                <text:p>0.1959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8.844595599809">
                <text:p>968.844595599809</text:p>
              </table:table-cell>
              <table:table-cell office:value-type="float" office:value="24.3168791016357">
                <text:p>24.3168791016357</text:p>
              </table:table-cell>
              <table:table-cell office:value-type="float" office:value="1300">
                <text:p>1300</text:p>
              </table:table-cell>
              <table:table-cell office:value-type="float" office:value="31.16843">
                <text:p>31.16843</text:p>
              </table:table-cell>
              <table:table-cell office:value-type="float" office:value="1300">
                <text:p>1300</text:p>
              </table:table-cell>
              <table:table-cell office:value-type="float" office:value="0.983714">
                <text:p>0.983714</text:p>
              </table:table-cell>
              <table:table-cell office:value-type="float" office:value="1300">
                <text:p>1300</text:p>
              </table:table-cell>
              <table:table-cell office:value-type="float" office:value="24.45378">
                <text:p>24.45378</text:p>
              </table:table-cell>
              <table:table-cell office:value-type="float" office:value="1300">
                <text:p>1300</text:p>
              </table:table-cell>
              <table:table-cell office:value-type="float" office:value="2.045008">
                <text:p>2.045008</text:p>
              </table:table-cell>
              <table:table-cell office:value-type="float" office:value="1300">
                <text:p>1300</text:p>
              </table:table-cell>
              <table:table-cell office:value-type="float" office:value="3.484975">
                <text:p>3.484975</text:p>
              </table:table-cell>
              <table:table-cell office:value-type="float" office:value="1300">
                <text:p>1300</text:p>
              </table:table-cell>
              <table:table-cell office:value-type="float" office:value="0.2009566">
                <text:p>0.2009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7.38835242498">
                <text:p>1027.38835242498</text:p>
              </table:table-cell>
              <table:table-cell office:value-type="float" office:value="24.5625444693935">
                <text:p>24.5625444693935</text:p>
              </table:table-cell>
              <table:table-cell office:value-type="float" office:value="1350">
                <text:p>1350</text:p>
              </table:table-cell>
              <table:table-cell office:value-type="float" office:value="32.25132">
                <text:p>32.25132</text:p>
              </table:table-cell>
              <table:table-cell office:value-type="float" office:value="1350">
                <text:p>1350</text:p>
              </table:table-cell>
              <table:table-cell office:value-type="float" office:value="0.9968885">
                <text:p>0.9968885</text:p>
              </table:table-cell>
              <table:table-cell office:value-type="float" office:value="1350">
                <text:p>1350</text:p>
              </table:table-cell>
              <table:table-cell office:value-type="float" office:value="25.35581">
                <text:p>25.35581</text:p>
              </table:table-cell>
              <table:table-cell office:value-type="float" office:value="1350">
                <text:p>1350</text:p>
              </table:table-cell>
              <table:table-cell office:value-type="float" office:value="2.06463">
                <text:p>2.06463</text:p>
              </table:table-cell>
              <table:table-cell office:value-type="float" office:value="1350">
                <text:p>1350</text:p>
              </table:table-cell>
              <table:table-cell office:value-type="float" office:value="3.627712">
                <text:p>3.627712</text:p>
              </table:table-cell>
              <table:table-cell office:value-type="float" office:value="1350">
                <text:p>1350</text:p>
              </table:table-cell>
              <table:table-cell office:value-type="float" office:value="0.2062734">
                <text:p>0.2062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2.08698221985">
                <text:p>1092.08698221985</text:p>
              </table:table-cell>
              <table:table-cell office:value-type="float" office:value="24.8965329030914">
                <text:p>24.8965329030914</text:p>
              </table:table-cell>
              <table:table-cell office:value-type="float" office:value="1400">
                <text:p>1400</text:p>
              </table:table-cell>
              <table:table-cell office:value-type="float" office:value="33.33784">
                <text:p>33.33784</text:p>
              </table:table-cell>
              <table:table-cell office:value-type="float" office:value="1400">
                <text:p>1400</text:p>
              </table:table-cell>
              <table:table-cell office:value-type="float" office:value="1.010276">
                <text:p>1.010276</text:p>
              </table:table-cell>
              <table:table-cell office:value-type="float" office:value="1400">
                <text:p>1400</text:p>
              </table:table-cell>
              <table:table-cell office:value-type="float" office:value="26.25969">
                <text:p>26.25969</text:p>
              </table:table-cell>
              <table:table-cell office:value-type="float" office:value="1400">
                <text:p>1400</text:p>
              </table:table-cell>
              <table:table-cell office:value-type="float" office:value="2.084914">
                <text:p>2.084914</text:p>
              </table:table-cell>
              <table:table-cell office:value-type="float" office:value="1400">
                <text:p>1400</text:p>
              </table:table-cell>
              <table:table-cell office:value-type="float" office:value="3.771196">
                <text:p>3.771196</text:p>
              </table:table-cell>
              <table:table-cell office:value-type="float" office:value="1400">
                <text:p>1400</text:p>
              </table:table-cell>
              <table:table-cell office:value-type="float" office:value="0.2117669">
                <text:p>0.2117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9.85968912276">
                <text:p>1159.85968912276</text:p>
              </table:table-cell>
              <table:table-cell office:value-type="float" office:value="25.3046569414075">
                <text:p>25.3046569414075</text:p>
              </table:table-cell>
              <table:table-cell office:value-type="float" office:value="1450">
                <text:p>1450</text:p>
              </table:table-cell>
              <table:table-cell office:value-type="float" office:value="34.42754">
                <text:p>34.42754</text:p>
              </table:table-cell>
              <table:table-cell office:value-type="float" office:value="1450">
                <text:p>1450</text:p>
              </table:table-cell>
              <table:table-cell office:value-type="float" office:value="1.024059">
                <text:p>1.024059</text:p>
              </table:table-cell>
              <table:table-cell office:value-type="float" office:value="1450">
                <text:p>1450</text:p>
              </table:table-cell>
              <table:table-cell office:value-type="float" office:value="27.16522">
                <text:p>27.16522</text:p>
              </table:table-cell>
              <table:table-cell office:value-type="float" office:value="1450">
                <text:p>1450</text:p>
              </table:table-cell>
              <table:table-cell office:value-type="float" office:value="2.105895">
                <text:p>2.105895</text:p>
              </table:table-cell>
              <table:table-cell office:value-type="float" office:value="1450">
                <text:p>1450</text:p>
              </table:table-cell>
              <table:table-cell office:value-type="float" office:value="3.914755">
                <text:p>3.914755</text:p>
              </table:table-cell>
              <table:table-cell office:value-type="float" office:value="1450">
                <text:p>1450</text:p>
              </table:table-cell>
              <table:table-cell office:value-type="float" office:value="0.2176123">
                <text:p>0.2176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7.6327669998">
                <text:p>1227.6327669998</text:p>
              </table:table-cell>
              <table:table-cell office:value-type="float" office:value="25.5701711885147">
                <text:p>25.5701711885147</text:p>
              </table:table-cell>
              <table:table-cell office:value-type="float" office:value="1500">
                <text:p>1500</text:p>
              </table:table-cell>
              <table:table-cell office:value-type="float" office:value="35.52175">
                <text:p>35.52175</text:p>
              </table:table-cell>
              <table:table-cell office:value-type="float" office:value="1500">
                <text:p>1500</text:p>
              </table:table-cell>
              <table:table-cell office:value-type="float" office:value="1.03835">
                <text:p>1.03835</text:p>
              </table:table-cell>
              <table:table-cell office:value-type="float" office:value="1500">
                <text:p>1500</text:p>
              </table:table-cell>
              <table:table-cell office:value-type="float" office:value="28.07324">
                <text:p>28.07324</text:p>
              </table:table-cell>
              <table:table-cell office:value-type="float" office:value="1500">
                <text:p>1500</text:p>
              </table:table-cell>
              <table:table-cell office:value-type="float" office:value="2.127802">
                <text:p>2.127802</text:p>
              </table:table-cell>
              <table:table-cell office:value-type="float" office:value="1500">
                <text:p>1500</text:p>
              </table:table-cell>
              <table:table-cell office:value-type="float" office:value="4.058576">
                <text:p>4.058576</text:p>
              </table:table-cell>
              <table:table-cell office:value-type="float" office:value="1500">
                <text:p>1500</text:p>
              </table:table-cell>
              <table:table-cell office:value-type="float" office:value="0.223783">
                <text:p>0.223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5.3999092908">
                <text:p>1295.3999092908</text:p>
              </table:table-cell>
              <table:table-cell office:value-type="float" office:value="25.9073313793419">
                <text:p>25.9073313793419</text:p>
              </table:table-cell>
              <table:table-cell office:value-type="float" office:value="1550">
                <text:p>1550</text:p>
              </table:table-cell>
              <table:table-cell office:value-type="float" office:value="36.62197">
                <text:p>36.62197</text:p>
              </table:table-cell>
              <table:table-cell office:value-type="float" office:value="1550">
                <text:p>1550</text:p>
              </table:table-cell>
              <table:table-cell office:value-type="float" office:value="1.053056">
                <text:p>1.053056</text:p>
              </table:table-cell>
              <table:table-cell office:value-type="float" office:value="1550">
                <text:p>1550</text:p>
              </table:table-cell>
              <table:table-cell office:value-type="float" office:value="28.98545">
                <text:p>28.98545</text:p>
              </table:table-cell>
              <table:table-cell office:value-type="float" office:value="1550">
                <text:p>1550</text:p>
              </table:table-cell>
              <table:table-cell office:value-type="float" office:value="2.150401">
                <text:p>2.150401</text:p>
              </table:table-cell>
              <table:table-cell office:value-type="float" office:value="1550">
                <text:p>1550</text:p>
              </table:table-cell>
              <table:table-cell office:value-type="float" office:value="4.202861">
                <text:p>4.202861</text:p>
              </table:table-cell>
              <table:table-cell office:value-type="float" office:value="1550">
                <text:p>1550</text:p>
              </table:table-cell>
              <table:table-cell office:value-type="float" office:value="0.2302038">
                <text:p>0.2302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3.16278537933">
                <text:p>1363.16278537933</text:p>
              </table:table-cell>
              <table:table-cell office:value-type="float" office:value="26.2873431686251">
                <text:p>26.2873431686251</text:p>
              </table:table-cell>
              <table:table-cell office:value-type="float" office:value="1600">
                <text:p>1600</text:p>
              </table:table-cell>
              <table:table-cell office:value-type="float" office:value="37.72819">
                <text:p>37.72819</text:p>
              </table:table-cell>
              <table:table-cell office:value-type="float" office:value="1600">
                <text:p>1600</text:p>
              </table:table-cell>
              <table:table-cell office:value-type="float" office:value="1.068517">
                <text:p>1.068517</text:p>
              </table:table-cell>
              <table:table-cell office:value-type="float" office:value="1600">
                <text:p>1600</text:p>
              </table:table-cell>
              <table:table-cell office:value-type="float" office:value="29.90123">
                <text:p>29.90123</text:p>
              </table:table-cell>
              <table:table-cell office:value-type="float" office:value="1600">
                <text:p>1600</text:p>
              </table:table-cell>
              <table:table-cell office:value-type="float" office:value="2.173925">
                <text:p>2.173925</text:p>
              </table:table-cell>
              <table:table-cell office:value-type="float" office:value="1600">
                <text:p>1600</text:p>
              </table:table-cell>
              <table:table-cell office:value-type="float" office:value="4.347441">
                <text:p>4.347441</text:p>
              </table:table-cell>
              <table:table-cell office:value-type="float" office:value="1600">
                <text:p>1600</text:p>
              </table:table-cell>
              <table:table-cell office:value-type="float" office:value="0.2370772">
                <text:p>0.2370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0.92529049373">
                <text:p>1430.92529049373</text:p>
              </table:table-cell>
              <table:table-cell office:value-type="float" office:value="26.5858212940398">
                <text:p>26.5858212940398</text:p>
              </table:table-cell>
              <table:table-cell office:value-type="float" office:value="1650">
                <text:p>1650</text:p>
              </table:table-cell>
              <table:table-cell office:value-type="float" office:value="38.84187">
                <text:p>38.84187</text:p>
              </table:table-cell>
              <table:table-cell office:value-type="float" office:value="1650">
                <text:p>1650</text:p>
              </table:table-cell>
              <table:table-cell office:value-type="float" office:value="1.084829">
                <text:p>1.084829</text:p>
              </table:table-cell>
              <table:table-cell office:value-type="float" office:value="1650">
                <text:p>1650</text:p>
              </table:table-cell>
              <table:table-cell office:value-type="float" office:value="30.82126">
                <text:p>30.82126</text:p>
              </table:table-cell>
              <table:table-cell office:value-type="float" office:value="1650">
                <text:p>1650</text:p>
              </table:table-cell>
              <table:table-cell office:value-type="float" office:value="2.198939">
                <text:p>2.198939</text:p>
              </table:table-cell>
              <table:table-cell office:value-type="float" office:value="1650">
                <text:p>1650</text:p>
              </table:table-cell>
              <table:table-cell office:value-type="float" office:value="4.492659">
                <text:p>4.492659</text:p>
              </table:table-cell>
              <table:table-cell office:value-type="float" office:value="1650">
                <text:p>1650</text:p>
              </table:table-cell>
              <table:table-cell office:value-type="float" office:value="0.2441807">
                <text:p>0.2441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7.4482041096">
                <text:p>1497.4482041096</text:p>
              </table:table-cell>
              <table:table-cell office:value-type="float" office:value="27.0847871806755">
                <text:p>27.0847871806755</text:p>
              </table:table-cell>
              <table:table-cell office:value-type="float" office:value="1700">
                <text:p>1700</text:p>
              </table:table-cell>
              <table:table-cell office:value-type="float" office:value="39.96062">
                <text:p>39.96062</text:p>
              </table:table-cell>
              <table:table-cell office:value-type="float" office:value="1700">
                <text:p>1700</text:p>
              </table:table-cell>
              <table:table-cell office:value-type="float" office:value="1.101162">
                <text:p>1.101162</text:p>
              </table:table-cell>
              <table:table-cell office:value-type="float" office:value="1700">
                <text:p>1700</text:p>
              </table:table-cell>
              <table:table-cell office:value-type="float" office:value="31.74541">
                <text:p>31.74541</text:p>
              </table:table-cell>
              <table:table-cell office:value-type="float" office:value="1700">
                <text:p>1700</text:p>
              </table:table-cell>
              <table:table-cell office:value-type="float" office:value="2.224478">
                <text:p>2.224478</text:p>
              </table:table-cell>
              <table:table-cell office:value-type="float" office:value="1700">
                <text:p>1700</text:p>
              </table:table-cell>
              <table:table-cell office:value-type="float" office:value="4.638021">
                <text:p>4.638021</text:p>
              </table:table-cell>
              <table:table-cell office:value-type="float" office:value="1700">
                <text:p>1700</text:p>
              </table:table-cell>
              <table:table-cell office:value-type="float" office:value="0.2515567">
                <text:p>0.2515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6.44065539522">
                <text:p>1566.44065539522</text:p>
              </table:table-cell>
              <table:table-cell office:value-type="float" office:value="27.2980020407078">
                <text:p>27.2980020407078</text:p>
              </table:table-cell>
              <table:table-cell office:value-type="float" office:value="1750">
                <text:p>1750</text:p>
              </table:table-cell>
              <table:table-cell office:value-type="float" office:value="41.08304">
                <text:p>41.08304</text:p>
              </table:table-cell>
              <table:table-cell office:value-type="float" office:value="1750">
                <text:p>1750</text:p>
              </table:table-cell>
              <table:table-cell office:value-type="float" office:value="1.117707">
                <text:p>1.117707</text:p>
              </table:table-cell>
              <table:table-cell office:value-type="float" office:value="1750">
                <text:p>1750</text:p>
              </table:table-cell>
              <table:table-cell office:value-type="float" office:value="32.67256">
                <text:p>32.67256</text:p>
              </table:table-cell>
              <table:table-cell office:value-type="float" office:value="1750">
                <text:p>1750</text:p>
              </table:table-cell>
              <table:table-cell office:value-type="float" office:value="2.250707">
                <text:p>2.250707</text:p>
              </table:table-cell>
              <table:table-cell office:value-type="float" office:value="1750">
                <text:p>1750</text:p>
              </table:table-cell>
              <table:table-cell office:value-type="float" office:value="4.783233">
                <text:p>4.783233</text:p>
              </table:table-cell>
              <table:table-cell office:value-type="float" office:value="1750">
                <text:p>1750</text:p>
              </table:table-cell>
              <table:table-cell office:value-type="float" office:value="0.2588355">
                <text:p>0.2588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4.1940716435">
                <text:p>1634.1940716435</text:p>
              </table:table-cell>
              <table:table-cell office:value-type="float" office:value="27.7216509650327">
                <text:p>27.7216509650327</text:p>
              </table:table-cell>
              <table:table-cell office:value-type="float" office:value="1800">
                <text:p>1800</text:p>
              </table:table-cell>
              <table:table-cell office:value-type="float" office:value="42.21081">
                <text:p>42.21081</text:p>
              </table:table-cell>
              <table:table-cell office:value-type="float" office:value="1800">
                <text:p>1800</text:p>
              </table:table-cell>
              <table:table-cell office:value-type="float" office:value="1.134891">
                <text:p>1.134891</text:p>
              </table:table-cell>
              <table:table-cell office:value-type="float" office:value="1800">
                <text:p>1800</text:p>
              </table:table-cell>
              <table:table-cell office:value-type="float" office:value="33.60353">
                <text:p>33.60353</text:p>
              </table:table-cell>
              <table:table-cell office:value-type="float" office:value="1800">
                <text:p>1800</text:p>
              </table:table-cell>
              <table:table-cell office:value-type="float" office:value="2.277495">
                <text:p>2.277495</text:p>
              </table:table-cell>
              <table:table-cell office:value-type="float" office:value="1800">
                <text:p>1800</text:p>
              </table:table-cell>
              <table:table-cell office:value-type="float" office:value="4.928186">
                <text:p>4.928186</text:p>
              </table:table-cell>
              <table:table-cell office:value-type="float" office:value="1800">
                <text:p>1800</text:p>
              </table:table-cell>
              <table:table-cell office:value-type="float" office:value="0.2667023">
                <text:p>0.2667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1.94804435297">
                <text:p>1701.94804435297</text:p>
              </table:table-cell>
              <table:table-cell office:value-type="float" office:value="28.0583859418939">
                <text:p>28.0583859418939</text:p>
              </table:table-cell>
              <table:table-cell office:value-type="float" office:value="1850">
                <text:p>1850</text:p>
              </table:table-cell>
              <table:table-cell office:value-type="float" office:value="43.34531">
                <text:p>43.34531</text:p>
              </table:table-cell>
              <table:table-cell office:value-type="float" office:value="1850">
                <text:p>1850</text:p>
              </table:table-cell>
              <table:table-cell office:value-type="float" office:value="1.152606">
                <text:p>1.152606</text:p>
              </table:table-cell>
              <table:table-cell office:value-type="float" office:value="1850">
                <text:p>1850</text:p>
              </table:table-cell>
              <table:table-cell office:value-type="float" office:value="34.5389">
                <text:p>34.5389</text:p>
              </table:table-cell>
              <table:table-cell office:value-type="float" office:value="1850">
                <text:p>1850</text:p>
              </table:table-cell>
              <table:table-cell office:value-type="float" office:value="2.305527">
                <text:p>2.305527</text:p>
              </table:table-cell>
              <table:table-cell office:value-type="float" office:value="1850">
                <text:p>1850</text:p>
              </table:table-cell>
              <table:table-cell office:value-type="float" office:value="5.07313">
                <text:p>5.07313</text:p>
              </table:table-cell>
              <table:table-cell office:value-type="float" office:value="1850">
                <text:p>1850</text:p>
              </table:table-cell>
              <table:table-cell office:value-type="float" office:value="0.2751511">
                <text:p>0.27515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9.69737988584">
                <text:p>1769.69737988584</text:p>
              </table:table-cell>
              <table:table-cell office:value-type="float" office:value="28.5464129700797">
                <text:p>28.5464129700797</text:p>
              </table:table-cell>
              <table:table-cell office:value-type="float" office:value="1900">
                <text:p>1900</text:p>
              </table:table-cell>
              <table:table-cell office:value-type="float" office:value="44.48647">
                <text:p>44.48647</text:p>
              </table:table-cell>
              <table:table-cell office:value-type="float" office:value="1900">
                <text:p>1900</text:p>
              </table:table-cell>
              <table:table-cell office:value-type="float" office:value="1.171216">
                <text:p>1.171216</text:p>
              </table:table-cell>
              <table:table-cell office:value-type="float" office:value="1900">
                <text:p>1900</text:p>
              </table:table-cell>
              <table:table-cell office:value-type="float" office:value="35.47817">
                <text:p>35.47817</text:p>
              </table:table-cell>
              <table:table-cell office:value-type="float" office:value="1900">
                <text:p>1900</text:p>
              </table:table-cell>
              <table:table-cell office:value-type="float" office:value="2.334847">
                <text:p>2.334847</text:p>
              </table:table-cell>
              <table:table-cell office:value-type="float" office:value="1900">
                <text:p>1900</text:p>
              </table:table-cell>
              <table:table-cell office:value-type="float" office:value="5.218081">
                <text:p>5.218081</text:p>
              </table:table-cell>
              <table:table-cell office:value-type="float" office:value="1900">
                <text:p>1900</text:p>
              </table:table-cell>
              <table:table-cell office:value-type="float" office:value="0.2841527">
                <text:p>0.2841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37.44727187991">
                <text:p>1837.44727187991</text:p>
              </table:table-cell>
              <table:table-cell office:value-type="float" office:value="28.959947712211">
                <text:p>28.959947712211</text:p>
              </table:table-cell>
              <table:table-cell office:value-type="float" office:value="1950">
                <text:p>1950</text:p>
              </table:table-cell>
              <table:table-cell office:value-type="float" office:value="45.63172">
                <text:p>45.63172</text:p>
              </table:table-cell>
              <table:table-cell office:value-type="float" office:value="1950">
                <text:p>1950</text:p>
              </table:table-cell>
              <table:table-cell office:value-type="float" office:value="1.189403">
                <text:p>1.189403</text:p>
              </table:table-cell>
              <table:table-cell office:value-type="float" office:value="1950">
                <text:p>1950</text:p>
              </table:table-cell>
              <table:table-cell office:value-type="float" office:value="36.42131">
                <text:p>36.42131</text:p>
              </table:table-cell>
              <table:table-cell office:value-type="float" office:value="1950">
                <text:p>1950</text:p>
              </table:table-cell>
              <table:table-cell office:value-type="float" office:value="2.364666">
                <text:p>2.364666</text:p>
              </table:table-cell>
              <table:table-cell office:value-type="float" office:value="1950">
                <text:p>1950</text:p>
              </table:table-cell>
              <table:table-cell office:value-type="float" office:value="5.363261">
                <text:p>5.363261</text:p>
              </table:table-cell>
              <table:table-cell office:value-type="float" office:value="1950">
                <text:p>1950</text:p>
              </table:table-cell>
              <table:table-cell office:value-type="float" office:value="0.2930856">
                <text:p>0.2930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5.19734936104">
                <text:p>1905.19734936104</text:p>
              </table:table-cell>
              <table:table-cell office:value-type="float" office:value="29.3146446829553">
                <text:p>29.3146446829553</text:p>
              </table:table-cell>
              <table:table-cell office:value-type="float" office:value="2000">
                <text:p>2000</text:p>
              </table:table-cell>
              <table:table-cell office:value-type="float" office:value="46.78339">
                <text:p>46.78339</text:p>
              </table:table-cell>
              <table:table-cell office:value-type="float" office:value="2000">
                <text:p>2000</text:p>
              </table:table-cell>
              <table:table-cell office:value-type="float" office:value="1.208562">
                <text:p>1.208562</text:p>
              </table:table-cell>
              <table:table-cell office:value-type="float" office:value="2000">
                <text:p>2000</text:p>
              </table:table-cell>
              <table:table-cell office:value-type="float" office:value="37.36854">
                <text:p>37.36854</text:p>
              </table:table-cell>
              <table:table-cell office:value-type="float" office:value="2000">
                <text:p>2000</text:p>
              </table:table-cell>
              <table:table-cell office:value-type="float" office:value="2.39534">
                <text:p>2.39534</text:p>
              </table:table-cell>
              <table:table-cell office:value-type="float" office:value="2000">
                <text:p>2000</text:p>
              </table:table-cell>
              <table:table-cell office:value-type="float" office:value="5.508669">
                <text:p>5.508669</text:p>
              </table:table-cell>
              <table:table-cell office:value-type="float" office:value="2000">
                <text:p>2000</text:p>
              </table:table-cell>
              <table:table-cell office:value-type="float" office:value="0.3022871">
                <text:p>0.3022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2.9370395666">
                <text:p>1972.9370395666</text:p>
              </table:table-cell>
              <table:table-cell office:value-type="float" office:value="30.1556280121483">
                <text:p>30.1556280121483</text:p>
              </table:table-cell>
              <table:table-cell office:value-type="float" office:value="2050">
                <text:p>2050</text:p>
              </table:table-cell>
              <table:table-cell office:value-type="float" office:value="47.93966">
                <text:p>47.93966</text:p>
              </table:table-cell>
              <table:table-cell office:value-type="float" office:value="2050">
                <text:p>2050</text:p>
              </table:table-cell>
              <table:table-cell office:value-type="float" office:value="1.228273">
                <text:p>1.228273</text:p>
              </table:table-cell>
              <table:table-cell office:value-type="float" office:value="2050">
                <text:p>2050</text:p>
              </table:table-cell>
              <table:table-cell office:value-type="float" office:value="38.31849">
                <text:p>38.31849</text:p>
              </table:table-cell>
              <table:table-cell office:value-type="float" office:value="2050">
                <text:p>2050</text:p>
              </table:table-cell>
              <table:table-cell office:value-type="float" office:value="2.426716">
                <text:p>2.426716</text:p>
              </table:table-cell>
              <table:table-cell office:value-type="float" office:value="2050">
                <text:p>2050</text:p>
              </table:table-cell>
              <table:table-cell office:value-type="float" office:value="5.654305">
                <text:p>5.654305</text:p>
              </table:table-cell>
              <table:table-cell office:value-type="float" office:value="2050">
                <text:p>2050</text:p>
              </table:table-cell>
              <table:table-cell office:value-type="float" office:value="0.3118785">
                <text:p>0.3118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0.68043951343">
                <text:p>2040.68043951343</text:p>
              </table:table-cell>
              <table:table-cell office:value-type="float" office:value="30.7846628889888">
                <text:p>30.7846628889888</text:p>
              </table:table-cell>
              <table:table-cell office:value-type="float" office:value="2100">
                <text:p>2100</text:p>
              </table:table-cell>
              <table:table-cell office:value-type="float" office:value="49.10165">
                <text:p>49.10165</text:p>
              </table:table-cell>
              <table:table-cell office:value-type="float" office:value="2100">
                <text:p>2100</text:p>
              </table:table-cell>
              <table:table-cell office:value-type="float" office:value="1.248147">
                <text:p>1.248147</text:p>
              </table:table-cell>
              <table:table-cell office:value-type="float" office:value="2100">
                <text:p>2100</text:p>
              </table:table-cell>
              <table:table-cell office:value-type="float" office:value="39.27299">
                <text:p>39.27299</text:p>
              </table:table-cell>
              <table:table-cell office:value-type="float" office:value="2100">
                <text:p>2100</text:p>
              </table:table-cell>
              <table:table-cell office:value-type="float" office:value="2.458828">
                <text:p>2.458828</text:p>
              </table:table-cell>
              <table:table-cell office:value-type="float" office:value="2100">
                <text:p>2100</text:p>
              </table:table-cell>
              <table:table-cell office:value-type="float" office:value="5.800081">
                <text:p>5.800081</text:p>
              </table:table-cell>
              <table:table-cell office:value-type="float" office:value="2100">
                <text:p>2100</text:p>
              </table:table-cell>
              <table:table-cell office:value-type="float" office:value="0.3216025">
                <text:p>0.3216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8.42346848614">
                <text:p>2108.42346848614</text:p>
              </table:table-cell>
              <table:table-cell office:value-type="float" office:value="31.4073454962004">
                <text:p>31.4073454962004</text:p>
              </table:table-cell>
              <table:table-cell office:value-type="float" office:value="2150">
                <text:p>2150</text:p>
              </table:table-cell>
              <table:table-cell office:value-type="float" office:value="50.26967">
                <text:p>50.26967</text:p>
              </table:table-cell>
              <table:table-cell office:value-type="float" office:value="2150">
                <text:p>2150</text:p>
              </table:table-cell>
              <table:table-cell office:value-type="float" office:value="1.268697">
                <text:p>1.268697</text:p>
              </table:table-cell>
              <table:table-cell office:value-type="float" office:value="2150">
                <text:p>2150</text:p>
              </table:table-cell>
              <table:table-cell office:value-type="float" office:value="40.23121">
                <text:p>40.23121</text:p>
              </table:table-cell>
              <table:table-cell office:value-type="float" office:value="2150">
                <text:p>2150</text:p>
              </table:table-cell>
              <table:table-cell office:value-type="float" office:value="2.491987">
                <text:p>2.491987</text:p>
              </table:table-cell>
              <table:table-cell office:value-type="float" office:value="2150">
                <text:p>2150</text:p>
              </table:table-cell>
              <table:table-cell office:value-type="float" office:value="5.946152">
                <text:p>5.946152</text:p>
              </table:table-cell>
              <table:table-cell office:value-type="float" office:value="2150">
                <text:p>2150</text:p>
              </table:table-cell>
              <table:table-cell office:value-type="float" office:value="0.3316201">
                <text:p>0.3316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76.16612648472">
                <text:p>2176.16612648472</text:p>
              </table:table-cell>
              <table:table-cell office:value-type="float" office:value="32.0256413160109">
                <text:p>32.0256413160109</text:p>
              </table:table-cell>
              <table:table-cell office:value-type="float" office:value="2200">
                <text:p>2200</text:p>
              </table:table-cell>
              <table:table-cell office:value-type="float" office:value="51.4423">
                <text:p>51.4423</text:p>
              </table:table-cell>
              <table:table-cell office:value-type="float" office:value="2200">
                <text:p>2200</text:p>
              </table:table-cell>
              <table:table-cell office:value-type="float" office:value="1.28862">
                <text:p>1.28862</text:p>
              </table:table-cell>
              <table:table-cell office:value-type="float" office:value="2200">
                <text:p>2200</text:p>
              </table:table-cell>
              <table:table-cell office:value-type="float" office:value="41.19303">
                <text:p>41.19303</text:p>
              </table:table-cell>
              <table:table-cell office:value-type="float" office:value="2200">
                <text:p>2200</text:p>
              </table:table-cell>
              <table:table-cell office:value-type="float" office:value="2.526026">
                <text:p>2.526026</text:p>
              </table:table-cell>
              <table:table-cell office:value-type="float" office:value="2200">
                <text:p>2200</text:p>
              </table:table-cell>
              <table:table-cell office:value-type="float" office:value="6.092708">
                <text:p>6.092708</text:p>
              </table:table-cell>
              <table:table-cell office:value-type="float" office:value="2200">
                <text:p>2200</text:p>
              </table:table-cell>
              <table:table-cell office:value-type="float" office:value="0.3419217">
                <text:p>0.3419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3.91267971163">
                <text:p>2243.91267971163</text:p>
              </table:table-cell>
              <table:table-cell office:value-type="float" office:value="32.3912346670095">
                <text:p>32.3912346670095</text:p>
              </table:table-cell>
              <table:table-cell office:value-type="float" office:value="2250">
                <text:p>2250</text:p>
              </table:table-cell>
              <table:table-cell office:value-type="float" office:value="52.62232">
                <text:p>52.62232</text:p>
              </table:table-cell>
              <table:table-cell office:value-type="float" office:value="2250">
                <text:p>2250</text:p>
              </table:table-cell>
              <table:table-cell office:value-type="float" office:value="1.310059">
                <text:p>1.310059</text:p>
              </table:table-cell>
              <table:table-cell office:value-type="float" office:value="2250">
                <text:p>2250</text:p>
              </table:table-cell>
              <table:table-cell office:value-type="float" office:value="42.15861">
                <text:p>42.15861</text:p>
              </table:table-cell>
              <table:table-cell office:value-type="float" office:value="2250">
                <text:p>2250</text:p>
              </table:table-cell>
              <table:table-cell office:value-type="float" office:value="2.561679">
                <text:p>2.561679</text:p>
              </table:table-cell>
              <table:table-cell office:value-type="float" office:value="2250">
                <text:p>2250</text:p>
              </table:table-cell>
              <table:table-cell office:value-type="float" office:value="6.239606">
                <text:p>6.239606</text:p>
              </table:table-cell>
              <table:table-cell office:value-type="float" office:value="2250">
                <text:p>2250</text:p>
              </table:table-cell>
              <table:table-cell office:value-type="float" office:value="0.3523743">
                <text:p>0.3523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11.65051504655">
                <text:p>2311.65051504655</text:p>
              </table:table-cell>
              <table:table-cell office:value-type="float" office:value="33.2457182453277">
                <text:p>33.2457182453277</text:p>
              </table:table-cell>
              <table:table-cell office:value-type="float" office:value="2300">
                <text:p>2300</text:p>
              </table:table-cell>
              <table:table-cell office:value-type="float" office:value="53.80854">
                <text:p>53.80854</text:p>
              </table:table-cell>
              <table:table-cell office:value-type="float" office:value="2300">
                <text:p>2300</text:p>
              </table:table-cell>
              <table:table-cell office:value-type="float" office:value="1.33242">
                <text:p>1.33242</text:p>
              </table:table-cell>
              <table:table-cell office:value-type="float" office:value="2300">
                <text:p>2300</text:p>
              </table:table-cell>
              <table:table-cell office:value-type="float" office:value="43.12798">
                <text:p>43.12798</text:p>
              </table:table-cell>
              <table:table-cell office:value-type="float" office:value="2300">
                <text:p>2300</text:p>
              </table:table-cell>
              <table:table-cell office:value-type="float" office:value="2.59847">
                <text:p>2.59847</text:p>
              </table:table-cell>
              <table:table-cell office:value-type="float" office:value="2300">
                <text:p>2300</text:p>
              </table:table-cell>
              <table:table-cell office:value-type="float" office:value="6.386592">
                <text:p>6.386592</text:p>
              </table:table-cell>
              <table:table-cell office:value-type="float" office:value="2300">
                <text:p>2300</text:p>
              </table:table-cell>
              <table:table-cell office:value-type="float" office:value="0.3630825">
                <text:p>0.3630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79.39206012275">
                <text:p>2379.39206012275</text:p>
              </table:table-cell>
              <table:table-cell office:value-type="float" office:value="33.8623053979982">
                <text:p>33.8623053979982</text:p>
              </table:table-cell>
              <table:table-cell office:value-type="float" office:value="2350">
                <text:p>2350</text:p>
              </table:table-cell>
              <table:table-cell office:value-type="float" office:value="54.99919">
                <text:p>54.99919</text:p>
              </table:table-cell>
              <table:table-cell office:value-type="float" office:value="2350">
                <text:p>2350</text:p>
              </table:table-cell>
              <table:table-cell office:value-type="float" office:value="1.354941">
                <text:p>1.354941</text:p>
              </table:table-cell>
              <table:table-cell office:value-type="float" office:value="2350">
                <text:p>2350</text:p>
              </table:table-cell>
              <table:table-cell office:value-type="float" office:value="44.10109">
                <text:p>44.10109</text:p>
              </table:table-cell>
              <table:table-cell office:value-type="float" office:value="2350">
                <text:p>2350</text:p>
              </table:table-cell>
              <table:table-cell office:value-type="float" office:value="2.635863">
                <text:p>2.635863</text:p>
              </table:table-cell>
              <table:table-cell office:value-type="float" office:value="2350">
                <text:p>2350</text:p>
              </table:table-cell>
              <table:table-cell office:value-type="float" office:value="6.533184">
                <text:p>6.533184</text:p>
              </table:table-cell>
              <table:table-cell office:value-type="float" office:value="2350">
                <text:p>2350</text:p>
              </table:table-cell>
              <table:table-cell office:value-type="float" office:value="0.3741179">
                <text:p>0.37411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7.13583104371">
                <text:p>2447.13583104371</text:p>
              </table:table-cell>
              <table:table-cell office:value-type="float" office:value="34.3163487974521">
                <text:p>34.3163487974521</text:p>
              </table:table-cell>
              <table:table-cell office:value-type="float" office:value="2400">
                <text:p>2400</text:p>
              </table:table-cell>
              <table:table-cell office:value-type="float" office:value="56.19543">
                <text:p>56.19543</text:p>
              </table:table-cell>
              <table:table-cell office:value-type="float" office:value="2400">
                <text:p>2400</text:p>
              </table:table-cell>
              <table:table-cell office:value-type="float" office:value="1.378211">
                <text:p>1.378211</text:p>
              </table:table-cell>
              <table:table-cell office:value-type="float" office:value="2400">
                <text:p>2400</text:p>
              </table:table-cell>
              <table:table-cell office:value-type="float" office:value="45.0789">
                <text:p>45.0789</text:p>
              </table:table-cell>
              <table:table-cell office:value-type="float" office:value="2400">
                <text:p>2400</text:p>
              </table:table-cell>
              <table:table-cell office:value-type="float" office:value="2.673529">
                <text:p>2.673529</text:p>
              </table:table-cell>
              <table:table-cell office:value-type="float" office:value="2400">
                <text:p>2400</text:p>
              </table:table-cell>
              <table:table-cell office:value-type="float" office:value="6.679446">
                <text:p>6.679446</text:p>
              </table:table-cell>
              <table:table-cell office:value-type="float" office:value="2400">
                <text:p>2400</text:p>
              </table:table-cell>
              <table:table-cell office:value-type="float" office:value="0.3853497">
                <text:p>0.3853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4.87236796918">
                <text:p>2514.87236796918</text:p>
              </table:table-cell>
              <table:table-cell office:value-type="float" office:value="35.2174737284768">
                <text:p>35.2174737284768</text:p>
              </table:table-cell>
              <table:table-cell office:value-type="float" office:value="2450">
                <text:p>2450</text:p>
              </table:table-cell>
              <table:table-cell office:value-type="float" office:value="57.41151">
                <text:p>57.41151</text:p>
              </table:table-cell>
              <table:table-cell office:value-type="float" office:value="2450">
                <text:p>2450</text:p>
              </table:table-cell>
              <table:table-cell office:value-type="float" office:value="1.401547">
                <text:p>1.401547</text:p>
              </table:table-cell>
              <table:table-cell office:value-type="float" office:value="2450">
                <text:p>2450</text:p>
              </table:table-cell>
              <table:table-cell office:value-type="float" office:value="46.07444">
                <text:p>46.07444</text:p>
              </table:table-cell>
              <table:table-cell office:value-type="float" office:value="2450">
                <text:p>2450</text:p>
              </table:table-cell>
              <table:table-cell office:value-type="float" office:value="2.711856">
                <text:p>2.711856</text:p>
              </table:table-cell>
              <table:table-cell office:value-type="float" office:value="2450">
                <text:p>2450</text:p>
              </table:table-cell>
              <table:table-cell office:value-type="float" office:value="6.826704">
                <text:p>6.826704</text:p>
              </table:table-cell>
              <table:table-cell office:value-type="float" office:value="2450">
                <text:p>2450</text:p>
              </table:table-cell>
              <table:table-cell office:value-type="float" office:value="0.396964">
                <text:p>0.3969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2.61502596776">
                <text:p>2582.61502596776</text:p>
              </table:table-cell>
              <table:table-cell office:value-type="float" office:value="35.703135916302">
                <text:p>35.703135916302</text:p>
              </table:table-cell>
              <table:table-cell office:value-type="float" office:value="2500">
                <text:p>2500</text:p>
              </table:table-cell>
              <table:table-cell office:value-type="float" office:value="58.61597">
                <text:p>58.61597</text:p>
              </table:table-cell>
              <table:table-cell office:value-type="float" office:value="2500">
                <text:p>2500</text:p>
              </table:table-cell>
              <table:table-cell office:value-type="float" office:value="1.424706">
                <text:p>1.424706</text:p>
              </table:table-cell>
              <table:table-cell office:value-type="float" office:value="2500">
                <text:p>2500</text:p>
              </table:table-cell>
              <table:table-cell office:value-type="float" office:value="47.05825">
                <text:p>47.05825</text:p>
              </table:table-cell>
              <table:table-cell office:value-type="float" office:value="2500">
                <text:p>2500</text:p>
              </table:table-cell>
              <table:table-cell office:value-type="float" office:value="2.751135">
                <text:p>2.751135</text:p>
              </table:table-cell>
              <table:table-cell office:value-type="float" office:value="2500">
                <text:p>2500</text:p>
              </table:table-cell>
              <table:table-cell office:value-type="float" office:value="6.973126">
                <text:p>6.973126</text:p>
              </table:table-cell>
              <table:table-cell office:value-type="float" office:value="2500">
                <text:p>2500</text:p>
              </table:table-cell>
              <table:table-cell office:value-type="float" office:value="0.4087554">
                <text:p>0.4087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.353788738">
                <text:p>2650.353788738</text:p>
              </table:table-cell>
              <table:table-cell office:value-type="float" office:value="36.4341758079117">
                <text:p>36.4341758079117</text:p>
              </table:table-cell>
              <table:table-cell office:value-type="float" office:value="2550">
                <text:p>2550</text:p>
              </table:table-cell>
              <table:table-cell office:value-type="float" office:value="59.82304">
                <text:p>59.82304</text:p>
              </table:table-cell>
              <table:table-cell office:value-type="float" office:value="2550">
                <text:p>2550</text:p>
              </table:table-cell>
              <table:table-cell office:value-type="float" office:value="1.449158">
                <text:p>1.449158</text:p>
              </table:table-cell>
              <table:table-cell office:value-type="float" office:value="2550">
                <text:p>2550</text:p>
              </table:table-cell>
              <table:table-cell office:value-type="float" office:value="48.04215">
                <text:p>48.04215</text:p>
              </table:table-cell>
              <table:table-cell office:value-type="float" office:value="2550">
                <text:p>2550</text:p>
              </table:table-cell>
              <table:table-cell office:value-type="float" office:value="2.79158">
                <text:p>2.79158</text:p>
              </table:table-cell>
              <table:table-cell office:value-type="float" office:value="2550">
                <text:p>2550</text:p>
              </table:table-cell>
              <table:table-cell office:value-type="float" office:value="7.1194">
                <text:p>7.1194</text:p>
              </table:table-cell>
              <table:table-cell office:value-type="float" office:value="2550">
                <text:p>2550</text:p>
              </table:table-cell>
              <table:table-cell office:value-type="float" office:value="0.4207572">
                <text:p>0.4207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18.0912530988">
                <text:p>2718.0912530988</text:p>
              </table:table-cell>
              <table:table-cell office:value-type="float" office:value="37.2468753825619">
                <text:p>37.2468753825619</text:p>
              </table:table-cell>
              <table:table-cell office:value-type="float" office:value="2600">
                <text:p>2600</text:p>
              </table:table-cell>
              <table:table-cell office:value-type="float" office:value="61.03838">
                <text:p>61.03838</text:p>
              </table:table-cell>
              <table:table-cell office:value-type="float" office:value="2600">
                <text:p>2600</text:p>
              </table:table-cell>
              <table:table-cell office:value-type="float" office:value="1.473356">
                <text:p>1.473356</text:p>
              </table:table-cell>
              <table:table-cell office:value-type="float" office:value="2600">
                <text:p>2600</text:p>
              </table:table-cell>
              <table:table-cell office:value-type="float" office:value="49.03154">
                <text:p>49.03154</text:p>
              </table:table-cell>
              <table:table-cell office:value-type="float" office:value="2600">
                <text:p>2600</text:p>
              </table:table-cell>
              <table:table-cell office:value-type="float" office:value="2.835067">
                <text:p>2.835067</text:p>
              </table:table-cell>
              <table:table-cell office:value-type="float" office:value="2600">
                <text:p>2600</text:p>
              </table:table-cell>
              <table:table-cell office:value-type="float" office:value="7.265423">
                <text:p>7.265423</text:p>
              </table:table-cell>
              <table:table-cell office:value-type="float" office:value="2600">
                <text:p>2600</text:p>
              </table:table-cell>
              <table:table-cell office:value-type="float" office:value="0.4329917">
                <text:p>0.4329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85.83261268793">
                <text:p>2785.83261268793</text:p>
              </table:table-cell>
              <table:table-cell office:value-type="float" office:value="37.7704519837657">
                <text:p>37.7704519837657</text:p>
              </table:table-cell>
              <table:table-cell office:value-type="float" office:value="2650">
                <text:p>2650</text:p>
              </table:table-cell>
              <table:table-cell office:value-type="float" office:value="62.25818">
                <text:p>62.25818</text:p>
              </table:table-cell>
              <table:table-cell office:value-type="float" office:value="2650">
                <text:p>2650</text:p>
              </table:table-cell>
              <table:table-cell office:value-type="float" office:value="1.498255">
                <text:p>1.498255</text:p>
              </table:table-cell>
              <table:table-cell office:value-type="float" office:value="2650">
                <text:p>2650</text:p>
              </table:table-cell>
              <table:table-cell office:value-type="float" office:value="50.02537">
                <text:p>50.02537</text:p>
              </table:table-cell>
              <table:table-cell office:value-type="float" office:value="2650">
                <text:p>2650</text:p>
              </table:table-cell>
              <table:table-cell office:value-type="float" office:value="2.877354">
                <text:p>2.877354</text:p>
              </table:table-cell>
              <table:table-cell office:value-type="float" office:value="2650">
                <text:p>2650</text:p>
              </table:table-cell>
              <table:table-cell office:value-type="float" office:value="7.41181">
                <text:p>7.41181</text:p>
              </table:table-cell>
              <table:table-cell office:value-type="float" office:value="2650">
                <text:p>2650</text:p>
              </table:table-cell>
              <table:table-cell office:value-type="float" office:value="0.4453904">
                <text:p>0.44539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53.56636730744">
                <text:p>2853.56636730744</text:p>
              </table:table-cell>
              <table:table-cell office:value-type="float" office:value="38.840775439653">
                <text:p>38.840775439653</text:p>
              </table:table-cell>
              <table:table-cell office:value-type="float" office:value="2700">
                <text:p>2700</text:p>
              </table:table-cell>
              <table:table-cell office:value-type="float" office:value="63.48328">
                <text:p>63.48328</text:p>
              </table:table-cell>
              <table:table-cell office:value-type="float" office:value="2700">
                <text:p>2700</text:p>
              </table:table-cell>
              <table:table-cell office:value-type="float" office:value="1.522437">
                <text:p>1.522437</text:p>
              </table:table-cell>
              <table:table-cell office:value-type="float" office:value="2700">
                <text:p>2700</text:p>
              </table:table-cell>
              <table:table-cell office:value-type="float" office:value="51.0237">
                <text:p>51.0237</text:p>
              </table:table-cell>
              <table:table-cell office:value-type="float" office:value="2700">
                <text:p>2700</text:p>
              </table:table-cell>
              <table:table-cell office:value-type="float" office:value="2.920433">
                <text:p>2.920433</text:p>
              </table:table-cell>
              <table:table-cell office:value-type="float" office:value="2700">
                <text:p>2700</text:p>
              </table:table-cell>
              <table:table-cell office:value-type="float" office:value="7.558595">
                <text:p>7.558595</text:p>
              </table:table-cell>
              <table:table-cell office:value-type="float" office:value="2700">
                <text:p>2700</text:p>
              </table:table-cell>
              <table:table-cell office:value-type="float" office:value="0.4581134">
                <text:p>0.4581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12.06676137903">
                <text:p>2912.06676137903</text:p>
              </table:table-cell>
              <table:table-cell office:value-type="float" office:value="39.5383393862267">
                <text:p>39.5383393862267</text:p>
              </table:table-cell>
              <table:table-cell office:value-type="float" office:value="2750">
                <text:p>2750</text:p>
              </table:table-cell>
              <table:table-cell office:value-type="float" office:value="64.71601">
                <text:p>64.71601</text:p>
              </table:table-cell>
              <table:table-cell office:value-type="float" office:value="2750">
                <text:p>2750</text:p>
              </table:table-cell>
              <table:table-cell office:value-type="float" office:value="1.547054">
                <text:p>1.547054</text:p>
              </table:table-cell>
              <table:table-cell office:value-type="float" office:value="2750">
                <text:p>2750</text:p>
              </table:table-cell>
              <table:table-cell office:value-type="float" office:value="52.02725">
                <text:p>52.02725</text:p>
              </table:table-cell>
              <table:table-cell office:value-type="float" office:value="2750">
                <text:p>2750</text:p>
              </table:table-cell>
              <table:table-cell office:value-type="float" office:value="2.964706">
                <text:p>2.964706</text:p>
              </table:table-cell>
              <table:table-cell office:value-type="float" office:value="2750">
                <text:p>2750</text:p>
              </table:table-cell>
              <table:table-cell office:value-type="float" office:value="7.705842">
                <text:p>7.705842</text:p>
              </table:table-cell>
              <table:table-cell office:value-type="float" office:value="2750">
                <text:p>2750</text:p>
              </table:table-cell>
              <table:table-cell office:value-type="float" office:value="0.4711655">
                <text:p>0.4711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79.81301318947">
                <text:p>2979.81301318947</text:p>
              </table:table-cell>
              <table:table-cell office:value-type="float" office:value="39.6449998308958">
                <text:p>39.6449998308958</text:p>
              </table:table-cell>
              <table:table-cell office:value-type="float" office:value="2800">
                <text:p>2800</text:p>
              </table:table-cell>
              <table:table-cell office:value-type="float" office:value="65.96754">
                <text:p>65.96754</text:p>
              </table:table-cell>
              <table:table-cell office:value-type="float" office:value="2800">
                <text:p>2800</text:p>
              </table:table-cell>
              <table:table-cell office:value-type="float" office:value="1.575702">
                <text:p>1.575702</text:p>
              </table:table-cell>
              <table:table-cell office:value-type="float" office:value="2800">
                <text:p>2800</text:p>
              </table:table-cell>
              <table:table-cell office:value-type="float" office:value="53.04349">
                <text:p>53.04349</text:p>
              </table:table-cell>
              <table:table-cell office:value-type="float" office:value="2800">
                <text:p>2800</text:p>
              </table:table-cell>
              <table:table-cell office:value-type="float" office:value="3.009865">
                <text:p>3.009865</text:p>
              </table:table-cell>
              <table:table-cell office:value-type="float" office:value="2800">
                <text:p>2800</text:p>
              </table:table-cell>
              <table:table-cell office:value-type="float" office:value="7.854009">
                <text:p>7.854009</text:p>
              </table:table-cell>
              <table:table-cell office:value-type="float" office:value="2800">
                <text:p>2800</text:p>
              </table:table-cell>
              <table:table-cell office:value-type="float" office:value="0.4844731">
                <text:p>0.48447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61.47542314604">
                <text:p>3161.47542314604</text:p>
              </table:table-cell>
              <table:table-cell office:value-type="float" office:value="41.4579954771166">
                <text:p>41.4579954771166</text:p>
              </table:table-cell>
              <table:table-cell office:value-type="float" office:value="2850">
                <text:p>2850</text:p>
              </table:table-cell>
              <table:table-cell office:value-type="float" office:value="67.21154">
                <text:p>67.21154</text:p>
              </table:table-cell>
              <table:table-cell office:value-type="float" office:value="2850">
                <text:p>2850</text:p>
              </table:table-cell>
              <table:table-cell office:value-type="float" office:value="1.60315">
                <text:p>1.60315</text:p>
              </table:table-cell>
              <table:table-cell office:value-type="float" office:value="2850">
                <text:p>2850</text:p>
              </table:table-cell>
              <table:table-cell office:value-type="float" office:value="54.0524">
                <text:p>54.0524</text:p>
              </table:table-cell>
              <table:table-cell office:value-type="float" office:value="2850">
                <text:p>2850</text:p>
              </table:table-cell>
              <table:table-cell office:value-type="float" office:value="3.056224">
                <text:p>3.056224</text:p>
              </table:table-cell>
              <table:table-cell office:value-type="float" office:value="2850">
                <text:p>2850</text:p>
              </table:table-cell>
              <table:table-cell office:value-type="float" office:value="8.001748">
                <text:p>8.001748</text:p>
              </table:table-cell>
              <table:table-cell office:value-type="float" office:value="2850">
                <text:p>2850</text:p>
              </table:table-cell>
              <table:table-cell office:value-type="float" office:value="0.4980226">
                <text:p>0.4980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43.13083759048">
                <text:p>3343.13083759048</text:p>
              </table:table-cell>
              <table:table-cell office:value-type="float" office:value="43.8115429268323">
                <text:p>43.8115429268323</text:p>
              </table:table-cell>
              <table:table-cell office:value-type="float" office:value="2900">
                <text:p>2900</text:p>
              </table:table-cell>
              <table:table-cell office:value-type="float" office:value="68.45813">
                <text:p>68.45813</text:p>
              </table:table-cell>
              <table:table-cell office:value-type="float" office:value="2900">
                <text:p>2900</text:p>
              </table:table-cell>
              <table:table-cell office:value-type="float" office:value="1.628568">
                <text:p>1.628568</text:p>
              </table:table-cell>
              <table:table-cell office:value-type="float" office:value="2900">
                <text:p>2900</text:p>
              </table:table-cell>
              <table:table-cell office:value-type="float" office:value="55.06468">
                <text:p>55.06468</text:p>
              </table:table-cell>
              <table:table-cell office:value-type="float" office:value="2900">
                <text:p>2900</text:p>
              </table:table-cell>
              <table:table-cell office:value-type="float" office:value="3.10341">
                <text:p>3.10341</text:p>
              </table:table-cell>
              <table:table-cell office:value-type="float" office:value="2900">
                <text:p>2900</text:p>
              </table:table-cell>
              <table:table-cell office:value-type="float" office:value="8.14969">
                <text:p>8.14969</text:p>
              </table:table-cell>
              <table:table-cell office:value-type="float" office:value="2900">
                <text:p>2900</text:p>
              </table:table-cell>
              <table:table-cell office:value-type="float" office:value="0.5117851">
                <text:p>0.5117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24.78355584796">
                <text:p>3524.78355584796</text:p>
              </table:table-cell>
              <table:table-cell office:value-type="float" office:value="46.4098067638683">
                <text:p>46.4098067638683</text:p>
              </table:table-cell>
              <table:table-cell office:value-type="float" office:value="2950">
                <text:p>2950</text:p>
              </table:table-cell>
              <table:table-cell office:value-type="float" office:value="69.71635">
                <text:p>69.71635</text:p>
              </table:table-cell>
              <table:table-cell office:value-type="float" office:value="2950">
                <text:p>2950</text:p>
              </table:table-cell>
              <table:table-cell office:value-type="float" office:value="1.657564">
                <text:p>1.657564</text:p>
              </table:table-cell>
              <table:table-cell office:value-type="float" office:value="2950">
                <text:p>2950</text:p>
              </table:table-cell>
              <table:table-cell office:value-type="float" office:value="56.08129">
                <text:p>56.08129</text:p>
              </table:table-cell>
              <table:table-cell office:value-type="float" office:value="2950">
                <text:p>2950</text:p>
              </table:table-cell>
              <table:table-cell office:value-type="float" office:value="3.153789">
                <text:p>3.153789</text:p>
              </table:table-cell>
              <table:table-cell office:value-type="float" office:value="2950">
                <text:p>2950</text:p>
              </table:table-cell>
              <table:table-cell office:value-type="float" office:value="8.297817">
                <text:p>8.297817</text:p>
              </table:table-cell>
              <table:table-cell office:value-type="float" office:value="2950">
                <text:p>2950</text:p>
              </table:table-cell>
              <table:table-cell office:value-type="float" office:value="0.5258937">
                <text:p>0.52589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09.509963678">
                <text:p>3709.509963678</text:p>
              </table:table-cell>
              <table:table-cell office:value-type="float" office:value="49.5754340943408">
                <text:p>49.5754340943408</text:p>
              </table:table-cell>
              <table:table-cell office:value-type="float" office:value="3000">
                <text:p>3000</text:p>
              </table:table-cell>
              <table:table-cell office:value-type="float" office:value="70.97679">
                <text:p>70.97679</text:p>
              </table:table-cell>
              <table:table-cell office:value-type="float" office:value="3000">
                <text:p>3000</text:p>
              </table:table-cell>
              <table:table-cell office:value-type="float" office:value="1.686935">
                <text:p>1.686935</text:p>
              </table:table-cell>
              <table:table-cell office:value-type="float" office:value="3000">
                <text:p>3000</text:p>
              </table:table-cell>
              <table:table-cell office:value-type="float" office:value="57.10065">
                <text:p>57.10065</text:p>
              </table:table-cell>
              <table:table-cell office:value-type="float" office:value="3000">
                <text:p>3000</text:p>
              </table:table-cell>
              <table:table-cell office:value-type="float" office:value="3.203068">
                <text:p>3.203068</text:p>
              </table:table-cell>
              <table:table-cell office:value-type="float" office:value="3000">
                <text:p>3000</text:p>
              </table:table-cell>
              <table:table-cell office:value-type="float" office:value="8.445956">
                <text:p>8.445956</text:p>
              </table:table-cell>
              <table:table-cell office:value-type="float" office:value="3000">
                <text:p>3000</text:p>
              </table:table-cell>
              <table:table-cell office:value-type="float" office:value="0.5401844">
                <text:p>0.54018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8.02251422593">
                <text:p>3808.02251422593</text:p>
              </table:table-cell>
              <table:table-cell office:value-type="float" office:value="52.1087833889656">
                <text:p>52.1087833889656</text:p>
              </table:table-cell>
              <table:table-cell office:value-type="float" office:value="3050">
                <text:p>3050</text:p>
              </table:table-cell>
              <table:table-cell office:value-type="float" office:value="72.24577">
                <text:p>72.24577</text:p>
              </table:table-cell>
              <table:table-cell office:value-type="float" office:value="3050">
                <text:p>3050</text:p>
              </table:table-cell>
              <table:table-cell office:value-type="float" office:value="1.718867">
                <text:p>1.718867</text:p>
              </table:table-cell>
              <table:table-cell office:value-type="float" office:value="3050">
                <text:p>3050</text:p>
              </table:table-cell>
              <table:table-cell office:value-type="float" office:value="58.12434">
                <text:p>58.12434</text:p>
              </table:table-cell>
              <table:table-cell office:value-type="float" office:value="3050">
                <text:p>3050</text:p>
              </table:table-cell>
              <table:table-cell office:value-type="float" office:value="3.253419">
                <text:p>3.253419</text:p>
              </table:table-cell>
              <table:table-cell office:value-type="float" office:value="3050">
                <text:p>3050</text:p>
              </table:table-cell>
              <table:table-cell office:value-type="float" office:value="8.594412">
                <text:p>8.594412</text:p>
              </table:table-cell>
              <table:table-cell office:value-type="float" office:value="3050">
                <text:p>3050</text:p>
              </table:table-cell>
              <table:table-cell office:value-type="float" office:value="0.5547319">
                <text:p>0.5547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91.15892913471">
                <text:p>3891.15892913471</text:p>
              </table:table-cell>
              <table:table-cell office:value-type="float" office:value="52.6246441127769">
                <text:p>52.6246441127769</text:p>
              </table:table-cell>
              <table:table-cell office:value-type="float" office:value="3100">
                <text:p>3100</text:p>
              </table:table-cell>
              <table:table-cell office:value-type="float" office:value="73.52058">
                <text:p>73.52058</text:p>
              </table:table-cell>
              <table:table-cell office:value-type="float" office:value="3100">
                <text:p>3100</text:p>
              </table:table-cell>
              <table:table-cell office:value-type="float" office:value="1.750798">
                <text:p>1.750798</text:p>
              </table:table-cell>
              <table:table-cell office:value-type="float" office:value="3100">
                <text:p>3100</text:p>
              </table:table-cell>
              <table:table-cell office:value-type="float" office:value="59.15221">
                <text:p>59.15221</text:p>
              </table:table-cell>
              <table:table-cell office:value-type="float" office:value="3100">
                <text:p>3100</text:p>
              </table:table-cell>
              <table:table-cell office:value-type="float" office:value="3.304836">
                <text:p>3.304836</text:p>
              </table:table-cell>
              <table:table-cell office:value-type="float" office:value="3100">
                <text:p>3100</text:p>
              </table:table-cell>
              <table:table-cell office:value-type="float" office:value="8.743146">
                <text:p>8.743146</text:p>
              </table:table-cell>
              <table:table-cell office:value-type="float" office:value="3100">
                <text:p>3100</text:p>
              </table:table-cell>
              <table:table-cell office:value-type="float" office:value="0.5695944">
                <text:p>0.56959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75.89674110691">
                <text:p>4075.89674110691</text:p>
              </table:table-cell>
              <table:table-cell office:value-type="float" office:value="54.7161132915721">
                <text:p>54.7161132915721</text:p>
              </table:table-cell>
              <table:table-cell office:value-type="float" office:value="3150">
                <text:p>3150</text:p>
              </table:table-cell>
              <table:table-cell office:value-type="float" office:value="74.80018">
                <text:p>74.80018</text:p>
              </table:table-cell>
              <table:table-cell office:value-type="float" office:value="3150">
                <text:p>3150</text:p>
              </table:table-cell>
              <table:table-cell office:value-type="float" office:value="1.781974">
                <text:p>1.781974</text:p>
              </table:table-cell>
              <table:table-cell office:value-type="float" office:value="3150">
                <text:p>3150</text:p>
              </table:table-cell>
              <table:table-cell office:value-type="float" office:value="60.18432">
                <text:p>60.18432</text:p>
              </table:table-cell>
              <table:table-cell office:value-type="float" office:value="3150">
                <text:p>3150</text:p>
              </table:table-cell>
              <table:table-cell office:value-type="float" office:value="3.357043">
                <text:p>3.357043</text:p>
              </table:table-cell>
              <table:table-cell office:value-type="float" office:value="3150">
                <text:p>3150</text:p>
              </table:table-cell>
              <table:table-cell office:value-type="float" office:value="8.892171">
                <text:p>8.892171</text:p>
              </table:table-cell>
              <table:table-cell office:value-type="float" office:value="3150">
                <text:p>3150</text:p>
              </table:table-cell>
              <table:table-cell office:value-type="float" office:value="0.5846754">
                <text:p>0.5846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48.31028247211">
                <text:p>4248.31028247211</text:p>
              </table:table-cell>
              <table:table-cell office:value-type="float" office:value="57.5679407765629">
                <text:p>57.5679407765629</text:p>
              </table:table-cell>
              <table:table-cell office:value-type="float" office:value="3200">
                <text:p>3200</text:p>
              </table:table-cell>
              <table:table-cell office:value-type="float" office:value="76.0854">
                <text:p>76.0854</text:p>
              </table:table-cell>
              <table:table-cell office:value-type="float" office:value="3200">
                <text:p>3200</text:p>
              </table:table-cell>
              <table:table-cell office:value-type="float" office:value="1.812694">
                <text:p>1.812694</text:p>
              </table:table-cell>
              <table:table-cell office:value-type="float" office:value="3200">
                <text:p>3200</text:p>
              </table:table-cell>
              <table:table-cell office:value-type="float" office:value="61.22123">
                <text:p>61.22123</text:p>
              </table:table-cell>
              <table:table-cell office:value-type="float" office:value="3200">
                <text:p>3200</text:p>
              </table:table-cell>
              <table:table-cell office:value-type="float" office:value="3.410118">
                <text:p>3.410118</text:p>
              </table:table-cell>
              <table:table-cell office:value-type="float" office:value="3200">
                <text:p>3200</text:p>
              </table:table-cell>
              <table:table-cell office:value-type="float" office:value="9.041331">
                <text:p>9.041331</text:p>
              </table:table-cell>
              <table:table-cell office:value-type="float" office:value="3200">
                <text:p>3200</text:p>
              </table:table-cell>
              <table:table-cell office:value-type="float" office:value="0.6000267">
                <text:p>0.60002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05.33500552017">
                <text:p>4405.33500552017</text:p>
              </table:table-cell>
              <table:table-cell office:value-type="float" office:value="59.5997701653423">
                <text:p>59.5997701653423</text:p>
              </table:table-cell>
              <table:table-cell office:value-type="float" office:value="3250">
                <text:p>3250</text:p>
              </table:table-cell>
              <table:table-cell office:value-type="float" office:value="77.37498">
                <text:p>77.37498</text:p>
              </table:table-cell>
              <table:table-cell office:value-type="float" office:value="3250">
                <text:p>3250</text:p>
              </table:table-cell>
              <table:table-cell office:value-type="float" office:value="1.842327">
                <text:p>1.842327</text:p>
              </table:table-cell>
              <table:table-cell office:value-type="float" office:value="3250">
                <text:p>3250</text:p>
              </table:table-cell>
              <table:table-cell office:value-type="float" office:value="62.26226">
                <text:p>62.26226</text:p>
              </table:table-cell>
              <table:table-cell office:value-type="float" office:value="3250">
                <text:p>3250</text:p>
              </table:table-cell>
              <table:table-cell office:value-type="float" office:value="3.464095">
                <text:p>3.464095</text:p>
              </table:table-cell>
              <table:table-cell office:value-type="float" office:value="3250">
                <text:p>3250</text:p>
              </table:table-cell>
              <table:table-cell office:value-type="float" office:value="9.190685">
                <text:p>9.190685</text:p>
              </table:table-cell>
              <table:table-cell office:value-type="float" office:value="3250">
                <text:p>3250</text:p>
              </table:table-cell>
              <table:table-cell office:value-type="float" office:value="0.6156088">
                <text:p>0.6156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3.0702440362">
                <text:p>4473.0702440362</text:p>
              </table:table-cell>
              <table:table-cell office:value-type="float" office:value="60.581129415722">
                <text:p>60.581129415722</text:p>
              </table:table-cell>
              <table:table-cell office:value-type="float" office:value="3300">
                <text:p>3300</text:p>
              </table:table-cell>
              <table:table-cell office:value-type="float" office:value="78.67344">
                <text:p>78.67344</text:p>
              </table:table-cell>
              <table:table-cell office:value-type="float" office:value="3300">
                <text:p>3300</text:p>
              </table:table-cell>
              <table:table-cell office:value-type="float" office:value="1.874173">
                <text:p>1.874173</text:p>
              </table:table-cell>
              <table:table-cell office:value-type="float" office:value="3300">
                <text:p>3300</text:p>
              </table:table-cell>
              <table:table-cell office:value-type="float" office:value="63.30844">
                <text:p>63.30844</text:p>
              </table:table-cell>
              <table:table-cell office:value-type="float" office:value="3300">
                <text:p>3300</text:p>
              </table:table-cell>
              <table:table-cell office:value-type="float" office:value="3.519124">
                <text:p>3.519124</text:p>
              </table:table-cell>
              <table:table-cell office:value-type="float" office:value="3300">
                <text:p>3300</text:p>
              </table:table-cell>
              <table:table-cell office:value-type="float" office:value="9.340294">
                <text:p>9.340294</text:p>
              </table:table-cell>
              <table:table-cell office:value-type="float" office:value="3300">
                <text:p>3300</text:p>
              </table:table-cell>
              <table:table-cell office:value-type="float" office:value="0.6314083">
                <text:p>0.6314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40.8030712204">
                <text:p>4540.8030712204</text:p>
              </table:table-cell>
              <table:table-cell office:value-type="float" office:value="61.8502523434872">
                <text:p>61.8502523434872</text:p>
              </table:table-cell>
              <table:table-cell office:value-type="float" office:value="3350">
                <text:p>3350</text:p>
              </table:table-cell>
              <table:table-cell office:value-type="float" office:value="79.97768">
                <text:p>79.97768</text:p>
              </table:table-cell>
              <table:table-cell office:value-type="float" office:value="3350">
                <text:p>3350</text:p>
              </table:table-cell>
              <table:table-cell office:value-type="float" office:value="1.906914">
                <text:p>1.906914</text:p>
              </table:table-cell>
              <table:table-cell office:value-type="float" office:value="3350">
                <text:p>3350</text:p>
              </table:table-cell>
              <table:table-cell office:value-type="float" office:value="64.35807">
                <text:p>64.35807</text:p>
              </table:table-cell>
              <table:table-cell office:value-type="float" office:value="3350">
                <text:p>3350</text:p>
              </table:table-cell>
              <table:table-cell office:value-type="float" office:value="3.575133">
                <text:p>3.575133</text:p>
              </table:table-cell>
              <table:table-cell office:value-type="float" office:value="3350">
                <text:p>3350</text:p>
              </table:table-cell>
              <table:table-cell office:value-type="float" office:value="9.490085">
                <text:p>9.490085</text:p>
              </table:table-cell>
              <table:table-cell office:value-type="float" office:value="3350">
                <text:p>3350</text:p>
              </table:table-cell>
              <table:table-cell office:value-type="float" office:value="0.6474788">
                <text:p>0.64747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08.52829343498">
                <text:p>4608.52829343498</text:p>
              </table:table-cell>
              <table:table-cell office:value-type="float" office:value="64.04509524065">
                <text:p>64.04509524065</text:p>
              </table:table-cell>
              <table:table-cell office:value-type="float" office:value="3400">
                <text:p>3400</text:p>
              </table:table-cell>
              <table:table-cell office:value-type="float" office:value="81.28811">
                <text:p>81.28811</text:p>
              </table:table-cell>
              <table:table-cell office:value-type="float" office:value="3400">
                <text:p>3400</text:p>
              </table:table-cell>
              <table:table-cell office:value-type="float" office:value="1.939341">
                <text:p>1.939341</text:p>
              </table:table-cell>
              <table:table-cell office:value-type="float" office:value="3400">
                <text:p>3400</text:p>
              </table:table-cell>
              <table:table-cell office:value-type="float" office:value="65.41281">
                <text:p>65.41281</text:p>
              </table:table-cell>
              <table:table-cell office:value-type="float" office:value="3400">
                <text:p>3400</text:p>
              </table:table-cell>
              <table:table-cell office:value-type="float" office:value="3.63194">
                <text:p>3.63194</text:p>
              </table:table-cell>
              <table:table-cell office:value-type="float" office:value="3400">
                <text:p>3400</text:p>
              </table:table-cell>
              <table:table-cell office:value-type="float" office:value="9.640223">
                <text:p>9.640223</text:p>
              </table:table-cell>
              <table:table-cell office:value-type="float" office:value="3400">
                <text:p>3400</text:p>
              </table:table-cell>
              <table:table-cell office:value-type="float" office:value="0.6637966">
                <text:p>0.6637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57.79068978205">
                <text:p>4657.79068978205</text:p>
              </table:table-cell>
              <table:table-cell office:value-type="float" office:value="64.7296987984328">
                <text:p>64.7296987984328</text:p>
              </table:table-cell>
              <table:table-cell office:value-type="float" office:value="3450">
                <text:p>3450</text:p>
              </table:table-cell>
              <table:table-cell office:value-type="float" office:value="82.60576">
                <text:p>82.60576</text:p>
              </table:table-cell>
              <table:table-cell office:value-type="float" office:value="3450">
                <text:p>3450</text:p>
              </table:table-cell>
              <table:table-cell office:value-type="float" office:value="1.972619">
                <text:p>1.972619</text:p>
              </table:table-cell>
              <table:table-cell office:value-type="float" office:value="3450">
                <text:p>3450</text:p>
              </table:table-cell>
              <table:table-cell office:value-type="float" office:value="66.47216">
                <text:p>66.47216</text:p>
              </table:table-cell>
              <table:table-cell office:value-type="float" office:value="3450">
                <text:p>3450</text:p>
              </table:table-cell>
              <table:table-cell office:value-type="float" office:value="3.689927">
                <text:p>3.689927</text:p>
              </table:table-cell>
              <table:table-cell office:value-type="float" office:value="3450">
                <text:p>3450</text:p>
              </table:table-cell>
              <table:table-cell office:value-type="float" office:value="9.790638">
                <text:p>9.790638</text:p>
              </table:table-cell>
              <table:table-cell office:value-type="float" office:value="3450">
                <text:p>3450</text:p>
              </table:table-cell>
              <table:table-cell office:value-type="float" office:value="0.6804142">
                <text:p>0.6804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02.4836763688">
                <text:p>4802.4836763688</text:p>
              </table:table-cell>
              <table:table-cell office:value-type="float" office:value="68.6608644017169">
                <text:p>68.6608644017169</text:p>
              </table:table-cell>
              <table:table-cell office:value-type="float" office:value="3500">
                <text:p>3500</text:p>
              </table:table-cell>
              <table:table-cell office:value-type="float" office:value="83.93116">
                <text:p>83.93116</text:p>
              </table:table-cell>
              <table:table-cell office:value-type="float" office:value="3500">
                <text:p>3500</text:p>
              </table:table-cell>
              <table:table-cell office:value-type="float" office:value="2.007592">
                <text:p>2.007592</text:p>
              </table:table-cell>
              <table:table-cell office:value-type="float" office:value="3500">
                <text:p>3500</text:p>
              </table:table-cell>
              <table:table-cell office:value-type="float" office:value="67.53592">
                <text:p>67.53592</text:p>
              </table:table-cell>
              <table:table-cell office:value-type="float" office:value="3500">
                <text:p>3500</text:p>
              </table:table-cell>
              <table:table-cell office:value-type="float" office:value="3.749014">
                <text:p>3.749014</text:p>
              </table:table-cell>
              <table:table-cell office:value-type="float" office:value="3500">
                <text:p>3500</text:p>
              </table:table-cell>
              <table:table-cell office:value-type="float" office:value="9.94133">
                <text:p>9.94133</text:p>
              </table:table-cell>
              <table:table-cell office:value-type="float" office:value="3500">
                <text:p>3500</text:p>
              </table:table-cell>
              <table:table-cell office:value-type="float" office:value="0.6972964">
                <text:p>0.69729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4.13366200436">
                <text:p>4984.13366200436</text:p>
              </table:table-cell>
              <table:table-cell office:value-type="float" office:value="71.9225847635353">
                <text:p>71.9225847635353</text:p>
              </table:table-cell>
              <table:table-cell office:value-type="float" office:value="3550">
                <text:p>3550</text:p>
              </table:table-cell>
              <table:table-cell office:value-type="float" office:value="85.26263">
                <text:p>85.26263</text:p>
              </table:table-cell>
              <table:table-cell office:value-type="float" office:value="3550">
                <text:p>3550</text:p>
              </table:table-cell>
              <table:table-cell office:value-type="float" office:value="2.042338">
                <text:p>2.042338</text:p>
              </table:table-cell>
              <table:table-cell office:value-type="float" office:value="3550">
                <text:p>3550</text:p>
              </table:table-cell>
              <table:table-cell office:value-type="float" office:value="68.60439">
                <text:p>68.60439</text:p>
              </table:table-cell>
              <table:table-cell office:value-type="float" office:value="3550">
                <text:p>3550</text:p>
              </table:table-cell>
              <table:table-cell office:value-type="float" office:value="3.809247">
                <text:p>3.809247</text:p>
              </table:table-cell>
              <table:table-cell office:value-type="float" office:value="3550">
                <text:p>3550</text:p>
              </table:table-cell>
              <table:table-cell office:value-type="float" office:value="10.09224">
                <text:p>10.09224</text:p>
              </table:table-cell>
              <table:table-cell office:value-type="float" office:value="3550">
                <text:p>3550</text:p>
              </table:table-cell>
              <table:table-cell office:value-type="float" office:value="0.7144122">
                <text:p>0.7144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65.78109719279">
                <text:p>5165.78109719279</text:p>
              </table:table-cell>
              <table:table-cell office:value-type="float" office:value="75.5775091419446">
                <text:p>75.5775091419446</text:p>
              </table:table-cell>
              <table:table-cell office:value-type="float" office:value="3600">
                <text:p>3600</text:p>
              </table:table-cell>
              <table:table-cell office:value-type="float" office:value="86.60247">
                <text:p>86.60247</text:p>
              </table:table-cell>
              <table:table-cell office:value-type="float" office:value="3600">
                <text:p>3600</text:p>
              </table:table-cell>
              <table:table-cell office:value-type="float" office:value="2.078119">
                <text:p>2.078119</text:p>
              </table:table-cell>
              <table:table-cell office:value-type="float" office:value="3600">
                <text:p>3600</text:p>
              </table:table-cell>
              <table:table-cell office:value-type="float" office:value="69.6777">
                <text:p>69.6777</text:p>
              </table:table-cell>
              <table:table-cell office:value-type="float" office:value="3600">
                <text:p>3600</text:p>
              </table:table-cell>
              <table:table-cell office:value-type="float" office:value="3.871433">
                <text:p>3.871433</text:p>
              </table:table-cell>
              <table:table-cell office:value-type="float" office:value="3600">
                <text:p>3600</text:p>
              </table:table-cell>
              <table:table-cell office:value-type="float" office:value="10.24346">
                <text:p>10.24346</text:p>
              </table:table-cell>
              <table:table-cell office:value-type="float" office:value="3600">
                <text:p>3600</text:p>
              </table:table-cell>
              <table:table-cell office:value-type="float" office:value="0.7317696">
                <text:p>0.7317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76.61383763231">
                <text:p>5276.61383763231</text:p>
              </table:table-cell>
              <table:table-cell office:value-type="float" office:value="78.2553285470594">
                <text:p>78.2553285470594</text:p>
              </table:table-cell>
              <table:table-cell office:value-type="float" office:value="3650">
                <text:p>3650</text:p>
              </table:table-cell>
              <table:table-cell office:value-type="float" office:value="87.94965">
                <text:p>87.94965</text:p>
              </table:table-cell>
              <table:table-cell office:value-type="float" office:value="3650">
                <text:p>3650</text:p>
              </table:table-cell>
              <table:table-cell office:value-type="float" office:value="2.116067">
                <text:p>2.116067</text:p>
              </table:table-cell>
              <table:table-cell office:value-type="float" office:value="3650">
                <text:p>3650</text:p>
              </table:table-cell>
              <table:table-cell office:value-type="float" office:value="70.75571">
                <text:p>70.75571</text:p>
              </table:table-cell>
              <table:table-cell office:value-type="float" office:value="3650">
                <text:p>3650</text:p>
              </table:table-cell>
              <table:table-cell office:value-type="float" office:value="3.933539">
                <text:p>3.933539</text:p>
              </table:table-cell>
              <table:table-cell office:value-type="float" office:value="3650">
                <text:p>3650</text:p>
              </table:table-cell>
              <table:table-cell office:value-type="float" office:value="10.39493">
                <text:p>10.39493</text:p>
              </table:table-cell>
              <table:table-cell office:value-type="float" office:value="3650">
                <text:p>3650</text:p>
              </table:table-cell>
              <table:table-cell office:value-type="float" office:value="0.7494054">
                <text:p>0.7494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89.30061">
                <text:p>89.30061</text:p>
              </table:table-cell>
              <table:table-cell office:value-type="float" office:value="3700">
                <text:p>3700</text:p>
              </table:table-cell>
              <table:table-cell office:value-type="float" office:value="2.151814">
                <text:p>2.151814</text:p>
              </table:table-cell>
              <table:table-cell office:value-type="float" office:value="3700">
                <text:p>3700</text:p>
              </table:table-cell>
              <table:table-cell office:value-type="float" office:value="71.83847">
                <text:p>71.83847</text:p>
              </table:table-cell>
              <table:table-cell office:value-type="float" office:value="3700">
                <text:p>3700</text:p>
              </table:table-cell>
              <table:table-cell office:value-type="float" office:value="3.99634">
                <text:p>3.99634</text:p>
              </table:table-cell>
              <table:table-cell office:value-type="float" office:value="3700">
                <text:p>3700</text:p>
              </table:table-cell>
              <table:table-cell office:value-type="float" office:value="10.54669">
                <text:p>10.54669</text:p>
              </table:table-cell>
              <table:table-cell office:value-type="float" office:value="3700">
                <text:p>3700</text:p>
              </table:table-cell>
              <table:table-cell office:value-type="float" office:value="0.7672902">
                <text:p>0.7672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">
                <text:p>3750</text:p>
              </table:table-cell>
              <table:table-cell office:value-type="float" office:value="90.65927">
                <text:p>90.65927</text:p>
              </table:table-cell>
              <table:table-cell office:value-type="float" office:value="3750">
                <text:p>3750</text:p>
              </table:table-cell>
              <table:table-cell office:value-type="float" office:value="2.188743">
                <text:p>2.188743</text:p>
              </table:table-cell>
              <table:table-cell office:value-type="float" office:value="3750">
                <text:p>3750</text:p>
              </table:table-cell>
              <table:table-cell office:value-type="float" office:value="72.92628">
                <text:p>72.92628</text:p>
              </table:table-cell>
              <table:table-cell office:value-type="float" office:value="3750">
                <text:p>3750</text:p>
              </table:table-cell>
              <table:table-cell office:value-type="float" office:value="4.060072">
                <text:p>4.060072</text:p>
              </table:table-cell>
              <table:table-cell office:value-type="float" office:value="3750">
                <text:p>3750</text:p>
              </table:table-cell>
              <table:table-cell office:value-type="float" office:value="10.69879">
                <text:p>10.69879</text:p>
              </table:table-cell>
              <table:table-cell office:value-type="float" office:value="3750">
                <text:p>3750</text:p>
              </table:table-cell>
              <table:table-cell office:value-type="float" office:value="0.7853879">
                <text:p>0.7853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  <table:table-cell office:value-type="float" office:value="92.0251">
                <text:p>92.0251</text:p>
              </table:table-cell>
              <table:table-cell office:value-type="float" office:value="3800">
                <text:p>3800</text:p>
              </table:table-cell>
              <table:table-cell office:value-type="float" office:value="2.225917">
                <text:p>2.225917</text:p>
              </table:table-cell>
              <table:table-cell office:value-type="float" office:value="3800">
                <text:p>3800</text:p>
              </table:table-cell>
              <table:table-cell office:value-type="float" office:value="74.01938">
                <text:p>74.01938</text:p>
              </table:table-cell>
              <table:table-cell office:value-type="float" office:value="3800">
                <text:p>3800</text:p>
              </table:table-cell>
              <table:table-cell office:value-type="float" office:value="4.124831">
                <text:p>4.124831</text:p>
              </table:table-cell>
              <table:table-cell office:value-type="float" office:value="3800">
                <text:p>3800</text:p>
              </table:table-cell>
              <table:table-cell office:value-type="float" office:value="10.85119">
                <text:p>10.85119</text:p>
              </table:table-cell>
              <table:table-cell office:value-type="float" office:value="3800">
                <text:p>3800</text:p>
              </table:table-cell>
              <table:table-cell office:value-type="float" office:value="0.8037743">
                <text:p>0.8037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">
                <text:p>3850</text:p>
              </table:table-cell>
              <table:table-cell office:value-type="float" office:value="93.39914">
                <text:p>93.39914</text:p>
              </table:table-cell>
              <table:table-cell office:value-type="float" office:value="3850">
                <text:p>3850</text:p>
              </table:table-cell>
              <table:table-cell office:value-type="float" office:value="2.264289">
                <text:p>2.264289</text:p>
              </table:table-cell>
              <table:table-cell office:value-type="float" office:value="3850">
                <text:p>3850</text:p>
              </table:table-cell>
              <table:table-cell office:value-type="float" office:value="75.11789">
                <text:p>75.11789</text:p>
              </table:table-cell>
              <table:table-cell office:value-type="float" office:value="3850">
                <text:p>3850</text:p>
              </table:table-cell>
              <table:table-cell office:value-type="float" office:value="4.190583">
                <text:p>4.190583</text:p>
              </table:table-cell>
              <table:table-cell office:value-type="float" office:value="3850">
                <text:p>3850</text:p>
              </table:table-cell>
              <table:table-cell office:value-type="float" office:value="11.00396">
                <text:p>11.00396</text:p>
              </table:table-cell>
              <table:table-cell office:value-type="float" office:value="3850">
                <text:p>3850</text:p>
              </table:table-cell>
              <table:table-cell office:value-type="float" office:value="0.8224193">
                <text:p>0.8224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94.78295">
                <text:p>94.78295</text:p>
              </table:table-cell>
              <table:table-cell office:value-type="float" office:value="3900">
                <text:p>3900</text:p>
              </table:table-cell>
              <table:table-cell office:value-type="float" office:value="2.305516">
                <text:p>2.305516</text:p>
              </table:table-cell>
              <table:table-cell office:value-type="float" office:value="3900">
                <text:p>3900</text:p>
              </table:table-cell>
              <table:table-cell office:value-type="float" office:value="76.22165">
                <text:p>76.22165</text:p>
              </table:table-cell>
              <table:table-cell office:value-type="float" office:value="3900">
                <text:p>3900</text:p>
              </table:table-cell>
              <table:table-cell office:value-type="float" office:value="4.257418">
                <text:p>4.257418</text:p>
              </table:table-cell>
              <table:table-cell office:value-type="float" office:value="3900">
                <text:p>3900</text:p>
              </table:table-cell>
              <table:table-cell office:value-type="float" office:value="11.15705">
                <text:p>11.15705</text:p>
              </table:table-cell>
              <table:table-cell office:value-type="float" office:value="3900">
                <text:p>3900</text:p>
              </table:table-cell>
              <table:table-cell office:value-type="float" office:value="0.8413133">
                <text:p>0.8413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0">
                <text:p>3950</text:p>
              </table:table-cell>
              <table:table-cell office:value-type="float" office:value="96.17135">
                <text:p>96.17135</text:p>
              </table:table-cell>
              <table:table-cell office:value-type="float" office:value="3950">
                <text:p>3950</text:p>
              </table:table-cell>
              <table:table-cell office:value-type="float" office:value="2.344778">
                <text:p>2.344778</text:p>
              </table:table-cell>
              <table:table-cell office:value-type="float" office:value="3950">
                <text:p>3950</text:p>
              </table:table-cell>
              <table:table-cell office:value-type="float" office:value="77.33068">
                <text:p>77.33068</text:p>
              </table:table-cell>
              <table:table-cell office:value-type="float" office:value="3950">
                <text:p>3950</text:p>
              </table:table-cell>
              <table:table-cell office:value-type="float" office:value="4.325074">
                <text:p>4.325074</text:p>
              </table:table-cell>
              <table:table-cell office:value-type="float" office:value="3950">
                <text:p>3950</text:p>
              </table:table-cell>
              <table:table-cell office:value-type="float" office:value="11.31041">
                <text:p>11.31041</text:p>
              </table:table-cell>
              <table:table-cell office:value-type="float" office:value="3950">
                <text:p>3950</text:p>
              </table:table-cell>
              <table:table-cell office:value-type="float" office:value="0.8604032">
                <text:p>0.8604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97.56635">
                <text:p>97.56635</text:p>
              </table:table-cell>
              <table:table-cell office:value-type="float" office:value="4000">
                <text:p>4000</text:p>
              </table:table-cell>
              <table:table-cell office:value-type="float" office:value="2.383787">
                <text:p>2.383787</text:p>
              </table:table-cell>
              <table:table-cell office:value-type="float" office:value="4000">
                <text:p>4000</text:p>
              </table:table-cell>
              <table:table-cell office:value-type="float" office:value="78.44511">
                <text:p>78.44511</text:p>
              </table:table-cell>
              <table:table-cell office:value-type="float" office:value="4000">
                <text:p>4000</text:p>
              </table:table-cell>
              <table:table-cell office:value-type="float" office:value="4.39366">
                <text:p>4.39366</text:p>
              </table:table-cell>
              <table:table-cell office:value-type="float" office:value="4000">
                <text:p>4000</text:p>
              </table:table-cell>
              <table:table-cell office:value-type="float" office:value="11.46401">
                <text:p>11.46401</text:p>
              </table:table-cell>
              <table:table-cell office:value-type="float" office:value="4000">
                <text:p>4000</text:p>
              </table:table-cell>
              <table:table-cell office:value-type="float" office:value="0.8797813">
                <text:p>0.8797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">
                <text:p>4050</text:p>
              </table:table-cell>
              <table:table-cell office:value-type="float" office:value="98.97116">
                <text:p>98.97116</text:p>
              </table:table-cell>
              <table:table-cell office:value-type="float" office:value="4050">
                <text:p>4050</text:p>
              </table:table-cell>
              <table:table-cell office:value-type="float" office:value="2.425494">
                <text:p>2.425494</text:p>
              </table:table-cell>
              <table:table-cell office:value-type="float" office:value="4050">
                <text:p>4050</text:p>
              </table:table-cell>
              <table:table-cell office:value-type="float" office:value="79.56493">
                <text:p>79.56493</text:p>
              </table:table-cell>
              <table:table-cell office:value-type="float" office:value="4050">
                <text:p>4050</text:p>
              </table:table-cell>
              <table:table-cell office:value-type="float" office:value="4.463423">
                <text:p>4.463423</text:p>
              </table:table-cell>
              <table:table-cell office:value-type="float" office:value="4050">
                <text:p>4050</text:p>
              </table:table-cell>
              <table:table-cell office:value-type="float" office:value="11.61786">
                <text:p>11.61786</text:p>
              </table:table-cell>
              <table:table-cell office:value-type="float" office:value="4050">
                <text:p>4050</text:p>
              </table:table-cell>
              <table:table-cell office:value-type="float" office:value="0.8994457">
                <text:p>0.8994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">
                <text:p>4100</text:p>
              </table:table-cell>
              <table:table-cell office:value-type="float" office:value="100.3793">
                <text:p>100.3793</text:p>
              </table:table-cell>
              <table:table-cell office:value-type="float" office:value="4100">
                <text:p>4100</text:p>
              </table:table-cell>
              <table:table-cell office:value-type="float" office:value="2.464586">
                <text:p>2.464586</text:p>
              </table:table-cell>
              <table:table-cell office:value-type="float" office:value="4100">
                <text:p>4100</text:p>
              </table:table-cell>
              <table:table-cell office:value-type="float" office:value="80.68994">
                <text:p>80.68994</text:p>
              </table:table-cell>
              <table:table-cell office:value-type="float" office:value="4100">
                <text:p>4100</text:p>
              </table:table-cell>
              <table:table-cell office:value-type="float" office:value="4.533625">
                <text:p>4.533625</text:p>
              </table:table-cell>
              <table:table-cell office:value-type="float" office:value="4100">
                <text:p>4100</text:p>
              </table:table-cell>
              <table:table-cell office:value-type="float" office:value="11.7719">
                <text:p>11.7719</text:p>
              </table:table-cell>
              <table:table-cell office:value-type="float" office:value="4100">
                <text:p>4100</text:p>
              </table:table-cell>
              <table:table-cell office:value-type="float" office:value="0.9192771">
                <text:p>0.9192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0">
                <text:p>4150</text:p>
              </table:table-cell>
              <table:table-cell office:value-type="float" office:value="101.795">
                <text:p>101.795</text:p>
              </table:table-cell>
              <table:table-cell office:value-type="float" office:value="4150">
                <text:p>4150</text:p>
              </table:table-cell>
              <table:table-cell office:value-type="float" office:value="2.503663">
                <text:p>2.503663</text:p>
              </table:table-cell>
              <table:table-cell office:value-type="float" office:value="4150">
                <text:p>4150</text:p>
              </table:table-cell>
              <table:table-cell office:value-type="float" office:value="81.82074">
                <text:p>81.82074</text:p>
              </table:table-cell>
              <table:table-cell office:value-type="float" office:value="4150">
                <text:p>4150</text:p>
              </table:table-cell>
              <table:table-cell office:value-type="float" office:value="4.604821">
                <text:p>4.604821</text:p>
              </table:table-cell>
              <table:table-cell office:value-type="float" office:value="4150">
                <text:p>4150</text:p>
              </table:table-cell>
              <table:table-cell office:value-type="float" office:value="11.92618">
                <text:p>11.92618</text:p>
              </table:table-cell>
              <table:table-cell office:value-type="float" office:value="4150">
                <text:p>4150</text:p>
              </table:table-cell>
              <table:table-cell office:value-type="float" office:value="0.939566">
                <text:p>0.939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">
                <text:p>4200</text:p>
              </table:table-cell>
              <table:table-cell office:value-type="float" office:value="103.2175">
                <text:p>103.2175</text:p>
              </table:table-cell>
              <table:table-cell office:value-type="float" office:value="4200">
                <text:p>4200</text:p>
              </table:table-cell>
              <table:table-cell office:value-type="float" office:value="2.542201">
                <text:p>2.542201</text:p>
              </table:table-cell>
              <table:table-cell office:value-type="float" office:value="4200">
                <text:p>4200</text:p>
              </table:table-cell>
              <table:table-cell office:value-type="float" office:value="82.95712">
                <text:p>82.95712</text:p>
              </table:table-cell>
              <table:table-cell office:value-type="float" office:value="4200">
                <text:p>4200</text:p>
              </table:table-cell>
              <table:table-cell office:value-type="float" office:value="4.677291">
                <text:p>4.677291</text:p>
              </table:table-cell>
              <table:table-cell office:value-type="float" office:value="4200">
                <text:p>4200</text:p>
              </table:table-cell>
              <table:table-cell office:value-type="float" office:value="12.0807">
                <text:p>12.0807</text:p>
              </table:table-cell>
              <table:table-cell office:value-type="float" office:value="4200">
                <text:p>4200</text:p>
              </table:table-cell>
              <table:table-cell office:value-type="float" office:value="0.9601634">
                <text:p>0.9601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">
                <text:p>4250</text:p>
              </table:table-cell>
              <table:table-cell office:value-type="float" office:value="104.6501">
                <text:p>104.6501</text:p>
              </table:table-cell>
              <table:table-cell office:value-type="float" office:value="4250">
                <text:p>4250</text:p>
              </table:table-cell>
              <table:table-cell office:value-type="float" office:value="2.584481">
                <text:p>2.584481</text:p>
              </table:table-cell>
              <table:table-cell office:value-type="float" office:value="4250">
                <text:p>4250</text:p>
              </table:table-cell>
              <table:table-cell office:value-type="float" office:value="84.09859">
                <text:p>84.09859</text:p>
              </table:table-cell>
              <table:table-cell office:value-type="float" office:value="4250">
                <text:p>4250</text:p>
              </table:table-cell>
              <table:table-cell office:value-type="float" office:value="4.750835">
                <text:p>4.750835</text:p>
              </table:table-cell>
              <table:table-cell office:value-type="float" office:value="4250">
                <text:p>4250</text:p>
              </table:table-cell>
              <table:table-cell office:value-type="float" office:value="12.2354">
                <text:p>12.2354</text:p>
              </table:table-cell>
              <table:table-cell office:value-type="float" office:value="4250">
                <text:p>4250</text:p>
              </table:table-cell>
              <table:table-cell office:value-type="float" office:value="0.980837">
                <text:p>0.980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">
                <text:p>4300</text:p>
              </table:table-cell>
              <table:table-cell office:value-type="float" office:value="106.0857">
                <text:p>106.0857</text:p>
              </table:table-cell>
              <table:table-cell office:value-type="float" office:value="4300">
                <text:p>4300</text:p>
              </table:table-cell>
              <table:table-cell office:value-type="float" office:value="2.623906">
                <text:p>2.623906</text:p>
              </table:table-cell>
              <table:table-cell office:value-type="float" office:value="4300">
                <text:p>4300</text:p>
              </table:table-cell>
              <table:table-cell office:value-type="float" office:value="85.24504">
                <text:p>85.24504</text:p>
              </table:table-cell>
              <table:table-cell office:value-type="float" office:value="4300">
                <text:p>4300</text:p>
              </table:table-cell>
              <table:table-cell office:value-type="float" office:value="4.824891">
                <text:p>4.824891</text:p>
              </table:table-cell>
              <table:table-cell office:value-type="float" office:value="4300">
                <text:p>4300</text:p>
              </table:table-cell>
              <table:table-cell office:value-type="float" office:value="12.39025">
                <text:p>12.39025</text:p>
              </table:table-cell>
              <table:table-cell office:value-type="float" office:value="4300">
                <text:p>4300</text:p>
              </table:table-cell>
              <table:table-cell office:value-type="float" office:value="1.001637">
                <text:p>1.001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0">
                <text:p>4350</text:p>
              </table:table-cell>
              <table:table-cell office:value-type="float" office:value="107.526">
                <text:p>107.526</text:p>
              </table:table-cell>
              <table:table-cell office:value-type="float" office:value="4350">
                <text:p>4350</text:p>
              </table:table-cell>
              <table:table-cell office:value-type="float" office:value="2.660814">
                <text:p>2.660814</text:p>
              </table:table-cell>
              <table:table-cell office:value-type="float" office:value="4350">
                <text:p>4350</text:p>
              </table:table-cell>
              <table:table-cell office:value-type="float" office:value="86.39724">
                <text:p>86.39724</text:p>
              </table:table-cell>
              <table:table-cell office:value-type="float" office:value="4350">
                <text:p>4350</text:p>
              </table:table-cell>
              <table:table-cell office:value-type="float" office:value="4.899935">
                <text:p>4.899935</text:p>
              </table:table-cell>
              <table:table-cell office:value-type="float" office:value="4350">
                <text:p>4350</text:p>
              </table:table-cell>
              <table:table-cell office:value-type="float" office:value="12.54531">
                <text:p>12.54531</text:p>
              </table:table-cell>
              <table:table-cell office:value-type="float" office:value="4350">
                <text:p>4350</text:p>
              </table:table-cell>
              <table:table-cell office:value-type="float" office:value="1.022682">
                <text:p>1.022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">
                <text:p>4400</text:p>
              </table:table-cell>
              <table:table-cell office:value-type="float" office:value="108.9748">
                <text:p>108.9748</text:p>
              </table:table-cell>
              <table:table-cell office:value-type="float" office:value="4400">
                <text:p>4400</text:p>
              </table:table-cell>
              <table:table-cell office:value-type="float" office:value="2.699673">
                <text:p>2.699673</text:p>
              </table:table-cell>
              <table:table-cell office:value-type="float" office:value="4400">
                <text:p>4400</text:p>
              </table:table-cell>
              <table:table-cell office:value-type="float" office:value="87.55473">
                <text:p>87.55473</text:p>
              </table:table-cell>
              <table:table-cell office:value-type="float" office:value="4400">
                <text:p>4400</text:p>
              </table:table-cell>
              <table:table-cell office:value-type="float" office:value="4.975947">
                <text:p>4.975947</text:p>
              </table:table-cell>
              <table:table-cell office:value-type="float" office:value="4400">
                <text:p>4400</text:p>
              </table:table-cell>
              <table:table-cell office:value-type="float" office:value="12.70047">
                <text:p>12.70047</text:p>
              </table:table-cell>
              <table:table-cell office:value-type="float" office:value="4400">
                <text:p>4400</text:p>
              </table:table-cell>
              <table:table-cell office:value-type="float" office:value="1.044024">
                <text:p>1.044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">
                <text:p>4450</text:p>
              </table:table-cell>
              <table:table-cell office:value-type="float" office:value="110.4416">
                <text:p>110.4416</text:p>
              </table:table-cell>
              <table:table-cell office:value-type="float" office:value="4450">
                <text:p>4450</text:p>
              </table:table-cell>
              <table:table-cell office:value-type="float" office:value="2.748589">
                <text:p>2.748589</text:p>
              </table:table-cell>
              <table:table-cell office:value-type="float" office:value="4450">
                <text:p>4450</text:p>
              </table:table-cell>
              <table:table-cell office:value-type="float" office:value="88.71793">
                <text:p>88.71793</text:p>
              </table:table-cell>
              <table:table-cell office:value-type="float" office:value="4450">
                <text:p>4450</text:p>
              </table:table-cell>
              <table:table-cell office:value-type="float" office:value="5.053518">
                <text:p>5.053518</text:p>
              </table:table-cell>
              <table:table-cell office:value-type="float" office:value="4450">
                <text:p>4450</text:p>
              </table:table-cell>
              <table:table-cell office:value-type="float" office:value="12.85576">
                <text:p>12.85576</text:p>
              </table:table-cell>
              <table:table-cell office:value-type="float" office:value="4450">
                <text:p>4450</text:p>
              </table:table-cell>
              <table:table-cell office:value-type="float" office:value="1.065774">
                <text:p>1.065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">
                <text:p>4500</text:p>
              </table:table-cell>
              <table:table-cell office:value-type="float" office:value="111.9181">
                <text:p>111.9181</text:p>
              </table:table-cell>
              <table:table-cell office:value-type="float" office:value="4500">
                <text:p>4500</text:p>
              </table:table-cell>
              <table:table-cell office:value-type="float" office:value="2.800232">
                <text:p>2.800232</text:p>
              </table:table-cell>
              <table:table-cell office:value-type="float" office:value="4500">
                <text:p>4500</text:p>
              </table:table-cell>
              <table:table-cell office:value-type="float" office:value="89.88668">
                <text:p>89.88668</text:p>
              </table:table-cell>
              <table:table-cell office:value-type="float" office:value="4500">
                <text:p>4500</text:p>
              </table:table-cell>
              <table:table-cell office:value-type="float" office:value="5.132176">
                <text:p>5.132176</text:p>
              </table:table-cell>
              <table:table-cell office:value-type="float" office:value="4500">
                <text:p>4500</text:p>
              </table:table-cell>
              <table:table-cell office:value-type="float" office:value="13.01111">
                <text:p>13.01111</text:p>
              </table:table-cell>
              <table:table-cell office:value-type="float" office:value="4500">
                <text:p>4500</text:p>
              </table:table-cell>
              <table:table-cell office:value-type="float" office:value="1.087867">
                <text:p>1.087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0">
                <text:p>4550</text:p>
              </table:table-cell>
              <table:table-cell office:value-type="float" office:value="113.3895">
                <text:p>113.3895</text:p>
              </table:table-cell>
              <table:table-cell office:value-type="float" office:value="4550">
                <text:p>4550</text:p>
              </table:table-cell>
              <table:table-cell office:value-type="float" office:value="2.840636">
                <text:p>2.840636</text:p>
              </table:table-cell>
              <table:table-cell office:value-type="float" office:value="4550">
                <text:p>4550</text:p>
              </table:table-cell>
              <table:table-cell office:value-type="float" office:value="91.06156">
                <text:p>91.06156</text:p>
              </table:table-cell>
              <table:table-cell office:value-type="float" office:value="4550">
                <text:p>4550</text:p>
              </table:table-cell>
              <table:table-cell office:value-type="float" office:value="5.21086">
                <text:p>5.21086</text:p>
              </table:table-cell>
              <table:table-cell office:value-type="float" office:value="4550">
                <text:p>4550</text:p>
              </table:table-cell>
              <table:table-cell office:value-type="float" office:value="13.16648">
                <text:p>13.16648</text:p>
              </table:table-cell>
              <table:table-cell office:value-type="float" office:value="4550">
                <text:p>4550</text:p>
              </table:table-cell>
              <table:table-cell office:value-type="float" office:value="1.109932">
                <text:p>1.10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">
                <text:p>4600</text:p>
              </table:table-cell>
              <table:table-cell office:value-type="float" office:value="114.8836">
                <text:p>114.8836</text:p>
              </table:table-cell>
              <table:table-cell office:value-type="float" office:value="4600">
                <text:p>4600</text:p>
              </table:table-cell>
              <table:table-cell office:value-type="float" office:value="2.895051">
                <text:p>2.895051</text:p>
              </table:table-cell>
              <table:table-cell office:value-type="float" office:value="4600">
                <text:p>4600</text:p>
              </table:table-cell>
              <table:table-cell office:value-type="float" office:value="92.24258">
                <text:p>92.24258</text:p>
              </table:table-cell>
              <table:table-cell office:value-type="float" office:value="4600">
                <text:p>4600</text:p>
              </table:table-cell>
              <table:table-cell office:value-type="float" office:value="5.291623">
                <text:p>5.291623</text:p>
              </table:table-cell>
              <table:table-cell office:value-type="float" office:value="4600">
                <text:p>4600</text:p>
              </table:table-cell>
              <table:table-cell office:value-type="float" office:value="13.32188">
                <text:p>13.32188</text:p>
              </table:table-cell>
              <table:table-cell office:value-type="float" office:value="4600">
                <text:p>4600</text:p>
              </table:table-cell>
              <table:table-cell office:value-type="float" office:value="1.132511">
                <text:p>1.132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">
                <text:p>4650</text:p>
              </table:table-cell>
              <table:table-cell office:value-type="float" office:value="116.3885">
                <text:p>116.3885</text:p>
              </table:table-cell>
              <table:table-cell office:value-type="float" office:value="4650">
                <text:p>4650</text:p>
              </table:table-cell>
              <table:table-cell office:value-type="float" office:value="2.951857">
                <text:p>2.951857</text:p>
              </table:table-cell>
              <table:table-cell office:value-type="float" office:value="4650">
                <text:p>4650</text:p>
              </table:table-cell>
              <table:table-cell office:value-type="float" office:value="93.43051">
                <text:p>93.43051</text:p>
              </table:table-cell>
              <table:table-cell office:value-type="float" office:value="4650">
                <text:p>4650</text:p>
              </table:table-cell>
              <table:table-cell office:value-type="float" office:value="5.373418">
                <text:p>5.373418</text:p>
              </table:table-cell>
              <table:table-cell office:value-type="float" office:value="4650">
                <text:p>4650</text:p>
              </table:table-cell>
              <table:table-cell office:value-type="float" office:value="13.47734">
                <text:p>13.47734</text:p>
              </table:table-cell>
              <table:table-cell office:value-type="float" office:value="4650">
                <text:p>4650</text:p>
              </table:table-cell>
              <table:table-cell office:value-type="float" office:value="1.155355">
                <text:p>1.155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">
                <text:p>4700</text:p>
              </table:table-cell>
              <table:table-cell office:value-type="float" office:value="117.898">
                <text:p>117.898</text:p>
              </table:table-cell>
              <table:table-cell office:value-type="float" office:value="4700">
                <text:p>4700</text:p>
              </table:table-cell>
              <table:table-cell office:value-type="float" office:value="3.006576">
                <text:p>3.006576</text:p>
              </table:table-cell>
              <table:table-cell office:value-type="float" office:value="4700">
                <text:p>4700</text:p>
              </table:table-cell>
              <table:table-cell office:value-type="float" office:value="94.62428">
                <text:p>94.62428</text:p>
              </table:table-cell>
              <table:table-cell office:value-type="float" office:value="4700">
                <text:p>4700</text:p>
              </table:table-cell>
              <table:table-cell office:value-type="float" office:value="5.456058">
                <text:p>5.456058</text:p>
              </table:table-cell>
              <table:table-cell office:value-type="float" office:value="4700">
                <text:p>4700</text:p>
              </table:table-cell>
              <table:table-cell office:value-type="float" office:value="13.63269">
                <text:p>13.63269</text:p>
              </table:table-cell>
              <table:table-cell office:value-type="float" office:value="4700">
                <text:p>4700</text:p>
              </table:table-cell>
              <table:table-cell office:value-type="float" office:value="1.178423">
                <text:p>1.178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0">
                <text:p>4750</text:p>
              </table:table-cell>
              <table:table-cell office:value-type="float" office:value="119.4157">
                <text:p>119.4157</text:p>
              </table:table-cell>
              <table:table-cell office:value-type="float" office:value="4750">
                <text:p>4750</text:p>
              </table:table-cell>
              <table:table-cell office:value-type="float" office:value="3.062463">
                <text:p>3.062463</text:p>
              </table:table-cell>
              <table:table-cell office:value-type="float" office:value="4750">
                <text:p>4750</text:p>
              </table:table-cell>
              <table:table-cell office:value-type="float" office:value="95.82381">
                <text:p>95.82381</text:p>
              </table:table-cell>
              <table:table-cell office:value-type="float" office:value="4750">
                <text:p>4750</text:p>
              </table:table-cell>
              <table:table-cell office:value-type="float" office:value="5.539715">
                <text:p>5.539715</text:p>
              </table:table-cell>
              <table:table-cell office:value-type="float" office:value="4750">
                <text:p>4750</text:p>
              </table:table-cell>
              <table:table-cell office:value-type="float" office:value="13.78798">
                <text:p>13.78798</text:p>
              </table:table-cell>
              <table:table-cell office:value-type="float" office:value="4750">
                <text:p>4750</text:p>
              </table:table-cell>
              <table:table-cell office:value-type="float" office:value="1.201768">
                <text:p>1.20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">
                <text:p>4800</text:p>
              </table:table-cell>
              <table:table-cell office:value-type="float" office:value="120.9307">
                <text:p>120.9307</text:p>
              </table:table-cell>
              <table:table-cell office:value-type="float" office:value="4800">
                <text:p>4800</text:p>
              </table:table-cell>
              <table:table-cell office:value-type="float" office:value="3.109809">
                <text:p>3.109809</text:p>
              </table:table-cell>
              <table:table-cell office:value-type="float" office:value="4800">
                <text:p>4800</text:p>
              </table:table-cell>
              <table:table-cell office:value-type="float" office:value="97.02908">
                <text:p>97.02908</text:p>
              </table:table-cell>
              <table:table-cell office:value-type="float" office:value="4800">
                <text:p>4800</text:p>
              </table:table-cell>
              <table:table-cell office:value-type="float" office:value="5.623516">
                <text:p>5.623516</text:p>
              </table:table-cell>
              <table:table-cell office:value-type="float" office:value="4800">
                <text:p>4800</text:p>
              </table:table-cell>
              <table:table-cell office:value-type="float" office:value="13.9432">
                <text:p>13.9432</text:p>
              </table:table-cell>
              <table:table-cell office:value-type="float" office:value="4800">
                <text:p>4800</text:p>
              </table:table-cell>
              <table:table-cell office:value-type="float" office:value="1.225144">
                <text:p>1.225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">
                <text:p>4850</text:p>
              </table:table-cell>
              <table:table-cell office:value-type="float" office:value="122.4535">
                <text:p>122.4535</text:p>
              </table:table-cell>
              <table:table-cell office:value-type="float" office:value="4850">
                <text:p>4850</text:p>
              </table:table-cell>
              <table:table-cell office:value-type="float" office:value="3.157958">
                <text:p>3.157958</text:p>
              </table:table-cell>
              <table:table-cell office:value-type="float" office:value="4850">
                <text:p>4850</text:p>
              </table:table-cell>
              <table:table-cell office:value-type="float" office:value="98.24009">
                <text:p>98.24009</text:p>
              </table:table-cell>
              <table:table-cell office:value-type="float" office:value="4850">
                <text:p>4850</text:p>
              </table:table-cell>
              <table:table-cell office:value-type="float" office:value="5.708182">
                <text:p>5.708182</text:p>
              </table:table-cell>
              <table:table-cell office:value-type="float" office:value="4850">
                <text:p>4850</text:p>
              </table:table-cell>
              <table:table-cell office:value-type="float" office:value="14.09839">
                <text:p>14.09839</text:p>
              </table:table-cell>
              <table:table-cell office:value-type="float" office:value="4850">
                <text:p>4850</text:p>
              </table:table-cell>
              <table:table-cell office:value-type="float" office:value="1.24884">
                <text:p>1.24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">
                <text:p>4900</text:p>
              </table:table-cell>
              <table:table-cell office:value-type="float" office:value="123.9859">
                <text:p>123.9859</text:p>
              </table:table-cell>
              <table:table-cell office:value-type="float" office:value="4900">
                <text:p>4900</text:p>
              </table:table-cell>
              <table:table-cell office:value-type="float" office:value="3.20845">
                <text:p>3.20845</text:p>
              </table:table-cell>
              <table:table-cell office:value-type="float" office:value="4900">
                <text:p>4900</text:p>
              </table:table-cell>
              <table:table-cell office:value-type="float" office:value="99.45712">
                <text:p>99.45712</text:p>
              </table:table-cell>
              <table:table-cell office:value-type="float" office:value="4900">
                <text:p>4900</text:p>
              </table:table-cell>
              <table:table-cell office:value-type="float" office:value="5.79398">
                <text:p>5.79398</text:p>
              </table:table-cell>
              <table:table-cell office:value-type="float" office:value="4900">
                <text:p>4900</text:p>
              </table:table-cell>
              <table:table-cell office:value-type="float" office:value="14.25361">
                <text:p>14.25361</text:p>
              </table:table-cell>
              <table:table-cell office:value-type="float" office:value="4900">
                <text:p>4900</text:p>
              </table:table-cell>
              <table:table-cell office:value-type="float" office:value="1.272735">
                <text:p>1.27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0">
                <text:p>4950</text:p>
              </table:table-cell>
              <table:table-cell office:value-type="float" office:value="125.5244">
                <text:p>125.5244</text:p>
              </table:table-cell>
              <table:table-cell office:value-type="float" office:value="4950">
                <text:p>4950</text:p>
              </table:table-cell>
              <table:table-cell office:value-type="float" office:value="3.25826">
                <text:p>3.25826</text:p>
              </table:table-cell>
              <table:table-cell office:value-type="float" office:value="4950">
                <text:p>4950</text:p>
              </table:table-cell>
              <table:table-cell office:value-type="float" office:value="100.6799">
                <text:p>100.6799</text:p>
              </table:table-cell>
              <table:table-cell office:value-type="float" office:value="4950">
                <text:p>4950</text:p>
              </table:table-cell>
              <table:table-cell office:value-type="float" office:value="5.88062">
                <text:p>5.88062</text:p>
              </table:table-cell>
              <table:table-cell office:value-type="float" office:value="4950">
                <text:p>4950</text:p>
              </table:table-cell>
              <table:table-cell office:value-type="float" office:value="14.40881">
                <text:p>14.40881</text:p>
              </table:table-cell>
              <table:table-cell office:value-type="float" office:value="4950">
                <text:p>4950</text:p>
              </table:table-cell>
              <table:table-cell office:value-type="float" office:value="1.296846">
                <text:p>1.296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127.0723">
                <text:p>127.0723</text:p>
              </table:table-cell>
              <table:table-cell office:value-type="float" office:value="5000">
                <text:p>5000</text:p>
              </table:table-cell>
              <table:table-cell office:value-type="float" office:value="3.30999">
                <text:p>3.30999</text:p>
              </table:table-cell>
              <table:table-cell office:value-type="float" office:value="5000">
                <text:p>5000</text:p>
              </table:table-cell>
              <table:table-cell office:value-type="float" office:value="101.9087">
                <text:p>101.9087</text:p>
              </table:table-cell>
              <table:table-cell office:value-type="float" office:value="5000">
                <text:p>5000</text:p>
              </table:table-cell>
              <table:table-cell office:value-type="float" office:value="5.968305">
                <text:p>5.968305</text:p>
              </table:table-cell>
              <table:table-cell office:value-type="float" office:value="5000">
                <text:p>5000</text:p>
              </table:table-cell>
              <table:table-cell office:value-type="float" office:value="14.56409">
                <text:p>14.56409</text:p>
              </table:table-cell>
              <table:table-cell office:value-type="float" office:value="5000">
                <text:p>5000</text:p>
              </table:table-cell>
              <table:table-cell office:value-type="float" office:value="1.321214">
                <text:p>1.321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3.4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ff4000" draw:fill-color="#ff4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729fcf" svg:stroke-linecap="round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9.933cm" svg:height="20.501cm" xlink:href=".." xlink:type="simple" chart:class="chart:scatter" chart:style-name="ch1">
        <chart:title svg:x="17.926cm" svg:y="0.545cm" chart:style-name="ch2">
          <text:p>Capacitor losses</text:p>
        </chart:title>
        <chart:legend chart:legend-position="end" svg:x="35.249cm" svg:y="8.706cm" style:legend-expansion="high" chart:style-name="ch3"/>
        <chart:plot-area chart:style-name="ch4" table:cell-range-address="losses_summary.A2:losses_summary.A101 losses_summary.F2:losses_summary.K101 losses_summary.G1:losses_summary.K1" chart:data-source-has-labels="row" svg:x="1.858cm" svg:y="1.709cm" svg:width="32.428cm" svg:height="17.782cm">
          <chart:coordinate-region svg:x="2.585cm" svg:y="1.909cm" svg:width="31.701cm" svg:height="16.528cm"/>
          <chart:axis chart:dimension="x" chart:name="primary-x" chart:style-name="ch5">
            <chart:title svg:x="16.25cm" svg:y="19.649cm" chart:style-name="ch6">
              <text:p>Load Power(W)</text:p>
            </chart:title>
            <chart:grid chart:style-name="ch7" chart:class="major"/>
          </chart:axis>
          <chart:axis chart:dimension="y" chart:name="primary-y" chart:style-name="ch8">
            <chart:title svg:x="0.208cm" svg:y="11.88cm" chart:style-name="ch9">
              <text:p>Losses(W)</text:p>
            </chart:title>
            <chart:grid chart:style-name="ch7" chart:class="major"/>
          </chart:axis>
          <chart:series chart:style-name="ch10" chart:values-cell-range-address="losses_summary.F2:losses_summary.F101" loext:label-string="total_cap_losses" chart:class="chart:scatter">
            <chart:domain table:cell-range-address="losses_summary.A2:losses_summary.A101"/>
            <chart:data-point chart:repeated="100"/>
          </chart:series>
          <chart:series chart:style-name="ch11" chart:values-cell-range-address="losses_summary.G2:losses_summary.G101" chart:label-cell-address="losses_summary.G1:losses_summary.G1" chart:class="chart:scatter">
            <chart:data-point chart:repeated="100"/>
          </chart:series>
          <chart:series chart:style-name="ch12" chart:values-cell-range-address="losses_summary.H2:losses_summary.H101" chart:label-cell-address="losses_summary.H1:losses_summary.H1" chart:class="chart:scatter">
            <chart:data-point chart:repeated="100"/>
          </chart:series>
          <chart:series chart:style-name="ch13" chart:values-cell-range-address="losses_summary.I2:losses_summary.I101" chart:label-cell-address="losses_summary.I1:losses_summary.I1" chart:class="chart:scatter">
            <chart:data-point chart:repeated="100"/>
          </chart:series>
          <chart:series chart:style-name="ch14" chart:values-cell-range-address="losses_summary.J2:losses_summary.J101" chart:label-cell-address="losses_summary.J1:losses_summary.J1" chart:class="chart:scatter">
            <chart:data-point chart:repeated="100"/>
          </chart:series>
          <chart:series chart:style-name="ch15" chart:values-cell-range-address="losses_summary.K2:losses_summary.K101" chart:label-cell-address="losses_summary.K1:losses_summary.K1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otal_cap_losses</text:p>
              </table:table-cell>
              <table:table-cell office:value-type="string">
                <text:p>FL1_losses</text:p>
                <draw:g>
                  <svg:desc>losses_summary.G1:losses_summary.G1</svg:desc>
                </draw:g>
              </table:table-cell>
              <table:table-cell office:value-type="string">
                <text:p>HF1_losses</text:p>
                <draw:g>
                  <svg:desc>losses_summary.H1:losses_summary.H1</svg:desc>
                </draw:g>
              </table:table-cell>
              <table:table-cell office:value-type="string">
                <text:p>FL2_losses</text:p>
                <draw:g>
                  <svg:desc>losses_summary.I1:losses_summary.I1</svg:desc>
                </draw:g>
              </table:table-cell>
              <table:table-cell office:value-type="string">
                <text:p>HF2_losses</text:p>
                <draw:g>
                  <svg:desc>losses_summary.J1:losses_summary.J1</svg:desc>
                </draw:g>
              </table:table-cell>
              <table:table-cell office:value-type="string">
                <text:p>Bulkcap_losses</text:p>
                <draw:g>
                  <svg:desc>losses_summary.K1:losses_summar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0.811799962001621">
                <text:p>0.811799962001621</text:p>
                <draw:g>
                  <svg:desc>losses_summary.F2:losses_summary.F101</svg:desc>
                </draw:g>
              </table:table-cell>
              <table:table-cell office:value-type="float" office:value="0.00783610935859498">
                <text:p>0.00783610935859498</text:p>
                <draw:g>
                  <svg:desc>losses_summary.G2:losses_summary.G101</svg:desc>
                </draw:g>
              </table:table-cell>
              <table:table-cell office:value-type="float" office:value="0.000169903057964117">
                <text:p>0.000169903057964117</text:p>
                <draw:g>
                  <svg:desc>losses_summary.H2:losses_summary.H101</svg:desc>
                </draw:g>
              </table:table-cell>
              <table:table-cell office:value-type="float" office:value="0.00351583242437758">
                <text:p>0.00351583242437758</text:p>
                <draw:g>
                  <svg:desc>losses_summary.I2:losses_summary.I101</svg:desc>
                </draw:g>
              </table:table-cell>
              <table:table-cell office:value-type="float" office:value="0.000117442401323734">
                <text:p>0.000117442401323734</text:p>
                <draw:g>
                  <svg:desc>losses_summary.J2:losses_summary.J101</svg:desc>
                </draw:g>
              </table:table-cell>
              <table:table-cell office:value-type="float" office:value="0.80018369264158">
                <text:p>0.80018369264158</text:p>
                <draw:g>
                  <svg:desc>losses_summary.K2:losses_summary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812974857504904">
                <text:p>0.812974857504904</text:p>
              </table:table-cell>
              <table:table-cell office:value-type="float" office:value="0.00827818151178249">
                <text:p>0.00827818151178249</text:p>
              </table:table-cell>
              <table:table-cell office:value-type="float" office:value="0.000206789723360433">
                <text:p>0.000206789723360433</text:p>
              </table:table-cell>
              <table:table-cell office:value-type="float" office:value="0.00413464318099521">
                <text:p>0.00413464318099521</text:p>
              </table:table-cell>
              <table:table-cell office:value-type="float" office:value="0.000160388143422327">
                <text:p>0.000160388143422327</text:p>
              </table:table-cell>
              <table:table-cell office:value-type="float" office:value="0.800191326223486">
                <text:p>0.800191326223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81490935660504">
                <text:p>0.81490935660504</text:p>
              </table:table-cell>
              <table:table-cell office:value-type="float" office:value="0.00908460288306538">
                <text:p>0.00908460288306538</text:p>
              </table:table-cell>
              <table:table-cell office:value-type="float" office:value="0.000262940753158773">
                <text:p>0.000262940753158773</text:p>
              </table:table-cell>
              <table:table-cell office:value-type="float" office:value="0.00513979567338615">
                <text:p>0.00513979567338615</text:p>
              </table:table-cell>
              <table:table-cell office:value-type="float" office:value="0.000215664062028328">
                <text:p>0.000215664062028328</text:p>
              </table:table-cell>
              <table:table-cell office:value-type="float" office:value="0.800202582209526">
                <text:p>0.800202582209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81782278670652">
                <text:p>0.81782278670652</text:p>
              </table:table-cell>
              <table:table-cell office:value-type="float" office:value="0.0102810485421276">
                <text:p>0.0102810485421276</text:p>
              </table:table-cell>
              <table:table-cell office:value-type="float" office:value="0.00033644190615599">
                <text:p>0.00033644190615599</text:p>
              </table:table-cell>
              <table:table-cell office:value-type="float" office:value="0.00668088423121878">
                <text:p>0.00668088423121878</text:p>
              </table:table-cell>
              <table:table-cell office:value-type="float" office:value="0.000298784253105144">
                <text:p>0.000298784253105144</text:p>
              </table:table-cell>
              <table:table-cell office:value-type="float" office:value="0.800214387469486">
                <text:p>0.800214387469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8239494">
                <text:p>0.8239494</text:p>
              </table:table-cell>
              <table:table-cell office:value-type="float" office:value="0.01314764">
                <text:p>0.01314764</text:p>
              </table:table-cell>
              <table:table-cell office:value-type="float" office:value="0.0002500037">
                <text:p>0.0002500037</text:p>
              </table:table-cell>
              <table:table-cell office:value-type="float" office:value="0.01012213">
                <text:p>0.01012213</text:p>
              </table:table-cell>
              <table:table-cell office:value-type="float" office:value="0.0001829531">
                <text:p>0.0001829531</text:p>
              </table:table-cell>
              <table:table-cell office:value-type="float" office:value="0.8002462">
                <text:p>0.8002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825240453951475">
                <text:p>0.825240453951475</text:p>
              </table:table-cell>
              <table:table-cell office:value-type="float" office:value="0.0135875405559949">
                <text:p>0.0135875405559949</text:p>
              </table:table-cell>
              <table:table-cell office:value-type="float" office:value="0.000510625980476833">
                <text:p>0.000510625980476833</text:p>
              </table:table-cell>
              <table:table-cell office:value-type="float" office:value="0.010424527344095">
                <text:p>0.010424527344095</text:p>
              </table:table-cell>
              <table:table-cell office:value-type="float" office:value="0.000478120416624122">
                <text:p>0.000478120416624122</text:p>
              </table:table-cell>
              <table:table-cell office:value-type="float" office:value="0.800241477596166">
                <text:p>0.800241477596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8313001">
                <text:p>0.8313001</text:p>
              </table:table-cell>
              <table:table-cell office:value-type="float" office:value="0.01652826">
                <text:p>0.01652826</text:p>
              </table:table-cell>
              <table:table-cell office:value-type="float" office:value="0.0004227699">
                <text:p>0.0004227699</text:p>
              </table:table-cell>
              <table:table-cell office:value-type="float" office:value="0.01369631">
                <text:p>0.01369631</text:p>
              </table:table-cell>
              <table:table-cell office:value-type="float" office:value="0.0003783201">
                <text:p>0.0003783201</text:p>
              </table:table-cell>
              <table:table-cell office:value-type="float" office:value="0.8002736">
                <text:p>0.8002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8351975">
                <text:p>0.8351975</text:p>
              </table:table-cell>
              <table:table-cell office:value-type="float" office:value="0.01834988">
                <text:p>0.01834988</text:p>
              </table:table-cell>
              <table:table-cell office:value-type="float" office:value="0.0005078211">
                <text:p>0.0005078211</text:p>
              </table:table-cell>
              <table:table-cell office:value-type="float" office:value="0.01558413">
                <text:p>0.01558413</text:p>
              </table:table-cell>
              <table:table-cell office:value-type="float" office:value="0.0004654197">
                <text:p>0.0004654197</text:p>
              </table:table-cell>
              <table:table-cell office:value-type="float" office:value="0.8002899">
                <text:p>0.8002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8383315">
                <text:p>0.8383315</text:p>
              </table:table-cell>
              <table:table-cell office:value-type="float" office:value="0.0198032">
                <text:p>0.0198032</text:p>
              </table:table-cell>
              <table:table-cell office:value-type="float" office:value="0.0005815456">
                <text:p>0.0005815456</text:p>
              </table:table-cell>
              <table:table-cell office:value-type="float" office:value="0.01707909">
                <text:p>0.01707909</text:p>
              </table:table-cell>
              <table:table-cell office:value-type="float" office:value="0.0005618603">
                <text:p>0.0005618603</text:p>
              </table:table-cell>
              <table:table-cell office:value-type="float" office:value="0.8003052">
                <text:p>0.8003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427263">
                <text:p>0.8427263</text:p>
              </table:table-cell>
              <table:table-cell office:value-type="float" office:value="0.02196626">
                <text:p>0.02196626</text:p>
              </table:table-cell>
              <table:table-cell office:value-type="float" office:value="0.0006911697">
                <text:p>0.0006911697</text:p>
              </table:table-cell>
              <table:table-cell office:value-type="float" office:value="0.01908221">
                <text:p>0.01908221</text:p>
              </table:table-cell>
              <table:table-cell office:value-type="float" office:value="0.0006605597">
                <text:p>0.0006605597</text:p>
              </table:table-cell>
              <table:table-cell office:value-type="float" office:value="0.8003258">
                <text:p>0.8003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8480639">
                <text:p>0.8480639</text:p>
              </table:table-cell>
              <table:table-cell office:value-type="float" office:value="0.02450383">
                <text:p>0.02450383</text:p>
              </table:table-cell>
              <table:table-cell office:value-type="float" office:value="0.0007972899">
                <text:p>0.0007972899</text:p>
              </table:table-cell>
              <table:table-cell office:value-type="float" office:value="0.02164226">
                <text:p>0.02164226</text:p>
              </table:table-cell>
              <table:table-cell office:value-type="float" office:value="0.0007705891">
                <text:p>0.0007705891</text:p>
              </table:table-cell>
              <table:table-cell office:value-type="float" office:value="0.8003497">
                <text:p>0.8003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8536427">
                <text:p>0.8536427</text:p>
              </table:table-cell>
              <table:table-cell office:value-type="float" office:value="0.02716005">
                <text:p>0.02716005</text:p>
              </table:table-cell>
              <table:table-cell office:value-type="float" office:value="0.0008969955">
                <text:p>0.0008969955</text:p>
              </table:table-cell>
              <table:table-cell office:value-type="float" office:value="0.02432357">
                <text:p>0.02432357</text:p>
              </table:table-cell>
              <table:table-cell office:value-type="float" office:value="0.0008866369">
                <text:p>0.0008866369</text:p>
              </table:table-cell>
              <table:table-cell office:value-type="float" office:value="0.8003758">
                <text:p>0.8003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8594937">
                <text:p>0.8594937</text:p>
              </table:table-cell>
              <table:table-cell office:value-type="float" office:value="0.02996144">
                <text:p>0.02996144</text:p>
              </table:table-cell>
              <table:table-cell office:value-type="float" office:value="0.0009959776">
                <text:p>0.0009959776</text:p>
              </table:table-cell>
              <table:table-cell office:value-type="float" office:value="0.02712903">
                <text:p>0.02712903</text:p>
              </table:table-cell>
              <table:table-cell office:value-type="float" office:value="0.001002885">
                <text:p>0.001002885</text:p>
              </table:table-cell>
              <table:table-cell office:value-type="float" office:value="0.8004034">
                <text:p>0.8004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8659053">
                <text:p>0.8659053</text:p>
              </table:table-cell>
              <table:table-cell office:value-type="float" office:value="0.03296698">
                <text:p>0.03296698</text:p>
              </table:table-cell>
              <table:table-cell office:value-type="float" office:value="0.001163055">
                <text:p>0.001163055</text:p>
              </table:table-cell>
              <table:table-cell office:value-type="float" office:value="0.03017072">
                <text:p>0.03017072</text:p>
              </table:table-cell>
              <table:table-cell office:value-type="float" office:value="0.001170605">
                <text:p>0.001170605</text:p>
              </table:table-cell>
              <table:table-cell office:value-type="float" office:value="0.8004335">
                <text:p>0.8004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8729021">
                <text:p>0.8729021</text:p>
              </table:table-cell>
              <table:table-cell office:value-type="float" office:value="0.03632093">
                <text:p>0.03632093</text:p>
              </table:table-cell>
              <table:table-cell office:value-type="float" office:value="0.001313594">
                <text:p>0.001313594</text:p>
              </table:table-cell>
              <table:table-cell office:value-type="float" office:value="0.03348325">
                <text:p>0.03348325</text:p>
              </table:table-cell>
              <table:table-cell office:value-type="float" office:value="0.001317542">
                <text:p>0.001317542</text:p>
              </table:table-cell>
              <table:table-cell office:value-type="float" office:value="0.8004663">
                <text:p>0.8004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8805299">
                <text:p>0.8805299</text:p>
              </table:table-cell>
              <table:table-cell office:value-type="float" office:value="0.0399864">
                <text:p>0.0399864</text:p>
              </table:table-cell>
              <table:table-cell office:value-type="float" office:value="0.00145487">
                <text:p>0.00145487</text:p>
              </table:table-cell>
              <table:table-cell office:value-type="float" office:value="0.03713778">
                <text:p>0.03713778</text:p>
              </table:table-cell>
              <table:table-cell office:value-type="float" office:value="0.001448377">
                <text:p>0.001448377</text:p>
              </table:table-cell>
              <table:table-cell office:value-type="float" office:value="0.8005016">
                <text:p>0.8005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8886793">
                <text:p>0.8886793</text:p>
              </table:table-cell>
              <table:table-cell office:value-type="float" office:value="0.04389853">
                <text:p>0.04389853</text:p>
              </table:table-cell>
              <table:table-cell office:value-type="float" office:value="0.001583678">
                <text:p>0.001583678</text:p>
              </table:table-cell>
              <table:table-cell office:value-type="float" office:value="0.04104675">
                <text:p>0.04104675</text:p>
              </table:table-cell>
              <table:table-cell office:value-type="float" office:value="0.001610482">
                <text:p>0.001610482</text:p>
              </table:table-cell>
              <table:table-cell office:value-type="float" office:value="0.8005392">
                <text:p>0.8005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8974331">
                <text:p>0.8974331</text:p>
              </table:table-cell>
              <table:table-cell office:value-type="float" office:value="0.04804562">
                <text:p>0.04804562</text:p>
              </table:table-cell>
              <table:table-cell office:value-type="float" office:value="0.001782118">
                <text:p>0.001782118</text:p>
              </table:table-cell>
              <table:table-cell office:value-type="float" office:value="0.04519994">
                <text:p>0.04519994</text:p>
              </table:table-cell>
              <table:table-cell office:value-type="float" office:value="0.001825659">
                <text:p>0.001825659</text:p>
              </table:table-cell>
              <table:table-cell office:value-type="float" office:value="0.8005791">
                <text:p>0.8005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9065527">
                <text:p>0.9065527</text:p>
              </table:table-cell>
              <table:table-cell office:value-type="float" office:value="0.05242653">
                <text:p>0.05242653</text:p>
              </table:table-cell>
              <table:table-cell office:value-type="float" office:value="0.001931227">
                <text:p>0.001931227</text:p>
              </table:table-cell>
              <table:table-cell office:value-type="float" office:value="0.04957921">
                <text:p>0.04957921</text:p>
              </table:table-cell>
              <table:table-cell office:value-type="float" office:value="0.001994077">
                <text:p>0.001994077</text:p>
              </table:table-cell>
              <table:table-cell office:value-type="float" office:value="0.8006212">
                <text:p>0.8006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9160255">
                <text:p>0.9160255</text:p>
              </table:table-cell>
              <table:table-cell office:value-type="float" office:value="0.05701904">
                <text:p>0.05701904</text:p>
              </table:table-cell>
              <table:table-cell office:value-type="float" office:value="0.002040425">
                <text:p>0.002040425</text:p>
              </table:table-cell>
              <table:table-cell office:value-type="float" office:value="0.05417128">
                <text:p>0.05417128</text:p>
              </table:table-cell>
              <table:table-cell office:value-type="float" office:value="0.002128686">
                <text:p>0.002128686</text:p>
              </table:table-cell>
              <table:table-cell office:value-type="float" office:value="0.8006655">
                <text:p>0.8006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9262307">
                <text:p>0.9262307</text:p>
              </table:table-cell>
              <table:table-cell office:value-type="float" office:value="0.06185319">
                <text:p>0.06185319</text:p>
              </table:table-cell>
              <table:table-cell office:value-type="float" office:value="0.002291572">
                <text:p>0.002291572</text:p>
              </table:table-cell>
              <table:table-cell office:value-type="float" office:value="0.05900812">
                <text:p>0.05900812</text:p>
              </table:table-cell>
              <table:table-cell office:value-type="float" office:value="0.002364686">
                <text:p>0.002364686</text:p>
              </table:table-cell>
              <table:table-cell office:value-type="float" office:value="0.8007121">
                <text:p>0.8007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9367008">
                <text:p>0.9367008</text:p>
              </table:table-cell>
              <table:table-cell office:value-type="float" office:value="0.06690416">
                <text:p>0.06690416</text:p>
              </table:table-cell>
              <table:table-cell office:value-type="float" office:value="0.002449764">
                <text:p>0.002449764</text:p>
              </table:table-cell>
              <table:table-cell office:value-type="float" office:value="0.06405997">
                <text:p>0.06405997</text:p>
              </table:table-cell>
              <table:table-cell office:value-type="float" office:value="0.002525386">
                <text:p>0.002525386</text:p>
              </table:table-cell>
              <table:table-cell office:value-type="float" office:value="0.8007609">
                <text:p>0.8007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9478801">
                <text:p>0.9478801</text:p>
              </table:table-cell>
              <table:table-cell office:value-type="float" office:value="0.07219933">
                <text:p>0.07219933</text:p>
              </table:table-cell>
              <table:table-cell office:value-type="float" office:value="0.002693241">
                <text:p>0.002693241</text:p>
              </table:table-cell>
              <table:table-cell office:value-type="float" office:value="0.06936046">
                <text:p>0.06936046</text:p>
              </table:table-cell>
              <table:table-cell office:value-type="float" office:value="0.002814363">
                <text:p>0.002814363</text:p>
              </table:table-cell>
              <table:table-cell office:value-type="float" office:value="0.8008121">
                <text:p>0.8008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9593018">
                <text:p>0.9593018</text:p>
              </table:table-cell>
              <table:table-cell office:value-type="float" office:value="0.07771788">
                <text:p>0.07771788</text:p>
              </table:table-cell>
              <table:table-cell office:value-type="float" office:value="0.002828504">
                <text:p>0.002828504</text:p>
              </table:table-cell>
              <table:table-cell office:value-type="float" office:value="0.07488109">
                <text:p>0.07488109</text:p>
              </table:table-cell>
              <table:table-cell office:value-type="float" office:value="0.003008364">
                <text:p>0.003008364</text:p>
              </table:table-cell>
              <table:table-cell office:value-type="float" office:value="0.8008655">
                <text:p>0.8008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9712056">
                <text:p>0.9712056</text:p>
              </table:table-cell>
              <table:table-cell office:value-type="float" office:value="0.08347474">
                <text:p>0.08347474</text:p>
              </table:table-cell>
              <table:table-cell office:value-type="float" office:value="0.002988667">
                <text:p>0.002988667</text:p>
              </table:table-cell>
              <table:table-cell office:value-type="float" office:value="0.08062878">
                <text:p>0.08062878</text:p>
              </table:table-cell>
              <table:table-cell office:value-type="float" office:value="0.003191891">
                <text:p>0.003191891</text:p>
              </table:table-cell>
              <table:table-cell office:value-type="float" office:value="0.8009211">
                <text:p>0.8009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983714">
                <text:p>0.983714</text:p>
              </table:table-cell>
              <table:table-cell office:value-type="float" office:value="0.08946511">
                <text:p>0.08946511</text:p>
              </table:table-cell>
              <table:table-cell office:value-type="float" office:value="0.003194893">
                <text:p>0.003194893</text:p>
              </table:table-cell>
              <table:table-cell office:value-type="float" office:value="0.08661894">
                <text:p>0.08661894</text:p>
              </table:table-cell>
              <table:table-cell office:value-type="float" office:value="0.003455443">
                <text:p>0.003455443</text:p>
              </table:table-cell>
              <table:table-cell office:value-type="float" office:value="0.8009791">
                <text:p>0.8009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9968885">
                <text:p>0.9968885</text:p>
              </table:table-cell>
              <table:table-cell office:value-type="float" office:value="0.09568048">
                <text:p>0.09568048</text:p>
              </table:table-cell>
              <table:table-cell office:value-type="float" office:value="0.003502596">
                <text:p>0.003502596</text:p>
              </table:table-cell>
              <table:table-cell office:value-type="float" office:value="0.09284105">
                <text:p>0.09284105</text:p>
              </table:table-cell>
              <table:table-cell office:value-type="float" office:value="0.003824047">
                <text:p>0.003824047</text:p>
              </table:table-cell>
              <table:table-cell office:value-type="float" office:value="0.8010393">
                <text:p>0.8010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1.010276">
                <text:p>1.010276</text:p>
              </table:table-cell>
              <table:table-cell office:value-type="float" office:value="0.1021336">
                <text:p>0.1021336</text:p>
              </table:table-cell>
              <table:table-cell office:value-type="float" office:value="0.00373689">
                <text:p>0.00373689</text:p>
              </table:table-cell>
              <table:table-cell office:value-type="float" office:value="0.09928152">
                <text:p>0.09928152</text:p>
              </table:table-cell>
              <table:table-cell office:value-type="float" office:value="0.004022017">
                <text:p>0.004022017</text:p>
              </table:table-cell>
              <table:table-cell office:value-type="float" office:value="0.8011018">
                <text:p>0.8011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.024059">
                <text:p>1.024059</text:p>
              </table:table-cell>
              <table:table-cell office:value-type="float" office:value="0.1088143">
                <text:p>0.1088143</text:p>
              </table:table-cell>
              <table:table-cell office:value-type="float" office:value="0.003889468">
                <text:p>0.003889468</text:p>
              </table:table-cell>
              <table:table-cell office:value-type="float" office:value="0.1059572">
                <text:p>0.1059572</text:p>
              </table:table-cell>
              <table:table-cell office:value-type="float" office:value="0.004230903">
                <text:p>0.004230903</text:p>
              </table:table-cell>
              <table:table-cell office:value-type="float" office:value="0.8011665">
                <text:p>0.8011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1.03835">
                <text:p>1.03835</text:p>
              </table:table-cell>
              <table:table-cell office:value-type="float" office:value="0.1157318">
                <text:p>0.1157318</text:p>
              </table:table-cell>
              <table:table-cell office:value-type="float" office:value="0.004100443">
                <text:p>0.004100443</text:p>
              </table:table-cell>
              <table:table-cell office:value-type="float" office:value="0.1128674">
                <text:p>0.1128674</text:p>
              </table:table-cell>
              <table:table-cell office:value-type="float" office:value="0.004416862">
                <text:p>0.004416862</text:p>
              </table:table-cell>
              <table:table-cell office:value-type="float" office:value="0.8012336">
                <text:p>0.8012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1.053056">
                <text:p>1.053056</text:p>
              </table:table-cell>
              <table:table-cell office:value-type="float" office:value="0.122877">
                <text:p>0.122877</text:p>
              </table:table-cell>
              <table:table-cell office:value-type="float" office:value="0.004292941">
                <text:p>0.004292941</text:p>
              </table:table-cell>
              <table:table-cell office:value-type="float" office:value="0.1199945">
                <text:p>0.1199945</text:p>
              </table:table-cell>
              <table:table-cell office:value-type="float" office:value="0.004584724">
                <text:p>0.004584724</text:p>
              </table:table-cell>
              <table:table-cell office:value-type="float" office:value="0.8013029">
                <text:p>0.8013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1.068517">
                <text:p>1.068517</text:p>
              </table:table-cell>
              <table:table-cell office:value-type="float" office:value="0.1302714">
                <text:p>0.1302714</text:p>
              </table:table-cell>
              <table:table-cell office:value-type="float" office:value="0.00456159">
                <text:p>0.00456159</text:p>
              </table:table-cell>
              <table:table-cell office:value-type="float" office:value="0.1273839">
                <text:p>0.1273839</text:p>
              </table:table-cell>
              <table:table-cell office:value-type="float" office:value="0.004924044">
                <text:p>0.004924044</text:p>
              </table:table-cell>
              <table:table-cell office:value-type="float" office:value="0.8013745">
                <text:p>0.80137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1.084829">
                <text:p>1.084829</text:p>
              </table:table-cell>
              <table:table-cell office:value-type="float" office:value="0.1378935">
                <text:p>0.1378935</text:p>
              </table:table-cell>
              <table:table-cell office:value-type="float" office:value="0.004993821">
                <text:p>0.004993821</text:p>
              </table:table-cell>
              <table:table-cell office:value-type="float" office:value="0.1350303">
                <text:p>0.1350303</text:p>
              </table:table-cell>
              <table:table-cell office:value-type="float" office:value="0.005462092">
                <text:p>0.005462092</text:p>
              </table:table-cell>
              <table:table-cell office:value-type="float" office:value="0.8014484">
                <text:p>0.8014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1.101162">
                <text:p>1.101162</text:p>
              </table:table-cell>
              <table:table-cell office:value-type="float" office:value="0.145752">
                <text:p>0.145752</text:p>
              </table:table-cell>
              <table:table-cell office:value-type="float" office:value="0.00516854">
                <text:p>0.00516854</text:p>
              </table:table-cell>
              <table:table-cell office:value-type="float" office:value="0.1429159">
                <text:p>0.1429159</text:p>
              </table:table-cell>
              <table:table-cell office:value-type="float" office:value="0.005800723">
                <text:p>0.005800723</text:p>
              </table:table-cell>
              <table:table-cell office:value-type="float" office:value="0.8015246">
                <text:p>0.80152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1.117707">
                <text:p>1.117707</text:p>
              </table:table-cell>
              <table:table-cell office:value-type="float" office:value="0.1538036">
                <text:p>0.1538036</text:p>
              </table:table-cell>
              <table:table-cell office:value-type="float" office:value="0.005310348">
                <text:p>0.005310348</text:p>
              </table:table-cell>
              <table:table-cell office:value-type="float" office:value="0.150948">
                <text:p>0.150948</text:p>
              </table:table-cell>
              <table:table-cell office:value-type="float" office:value="0.006042003">
                <text:p>0.006042003</text:p>
              </table:table-cell>
              <table:table-cell office:value-type="float" office:value="0.8016028">
                <text:p>0.8016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1.134891">
                <text:p>1.134891</text:p>
              </table:table-cell>
              <table:table-cell office:value-type="float" office:value="0.1621325">
                <text:p>0.1621325</text:p>
              </table:table-cell>
              <table:table-cell office:value-type="float" office:value="0.005553292">
                <text:p>0.005553292</text:p>
              </table:table-cell>
              <table:table-cell office:value-type="float" office:value="0.1592683">
                <text:p>0.1592683</text:p>
              </table:table-cell>
              <table:table-cell office:value-type="float" office:value="0.006253104">
                <text:p>0.006253104</text:p>
              </table:table-cell>
              <table:table-cell office:value-type="float" office:value="0.8016836">
                <text:p>0.8016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1.152606">
                <text:p>1.152606</text:p>
              </table:table-cell>
              <table:table-cell office:value-type="float" office:value="0.1706748">
                <text:p>0.1706748</text:p>
              </table:table-cell>
              <table:table-cell office:value-type="float" office:value="0.005701468">
                <text:p>0.005701468</text:p>
              </table:table-cell>
              <table:table-cell office:value-type="float" office:value="0.1679053">
                <text:p>0.1679053</text:p>
              </table:table-cell>
              <table:table-cell office:value-type="float" office:value="0.00655743">
                <text:p>0.00655743</text:p>
              </table:table-cell>
              <table:table-cell office:value-type="float" office:value="0.8017668">
                <text:p>0.8017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1.171216">
                <text:p>1.171216</text:p>
              </table:table-cell>
              <table:table-cell office:value-type="float" office:value="0.1795462">
                <text:p>0.1795462</text:p>
              </table:table-cell>
              <table:table-cell office:value-type="float" office:value="0.006029673">
                <text:p>0.006029673</text:p>
              </table:table-cell>
              <table:table-cell office:value-type="float" office:value="0.176856">
                <text:p>0.176856</text:p>
              </table:table-cell>
              <table:table-cell office:value-type="float" office:value="0.00693097">
                <text:p>0.00693097</text:p>
              </table:table-cell>
              <table:table-cell office:value-type="float" office:value="0.8018525">
                <text:p>0.8018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1.189403">
                <text:p>1.189403</text:p>
              </table:table-cell>
              <table:table-cell office:value-type="float" office:value="0.1885772">
                <text:p>0.1885772</text:p>
              </table:table-cell>
              <table:table-cell office:value-type="float" office:value="0.006003768">
                <text:p>0.006003768</text:p>
              </table:table-cell>
              <table:table-cell office:value-type="float" office:value="0.1859157">
                <text:p>0.1859157</text:p>
              </table:table-cell>
              <table:table-cell office:value-type="float" office:value="0.00696608">
                <text:p>0.00696608</text:p>
              </table:table-cell>
              <table:table-cell office:value-type="float" office:value="0.8019402">
                <text:p>0.8019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1.208562">
                <text:p>1.208562</text:p>
              </table:table-cell>
              <table:table-cell office:value-type="float" office:value="0.1978655">
                <text:p>0.1978655</text:p>
              </table:table-cell>
              <table:table-cell office:value-type="float" office:value="0.006259497">
                <text:p>0.006259497</text:p>
              </table:table-cell>
              <table:table-cell office:value-type="float" office:value="0.1952269">
                <text:p>0.1952269</text:p>
              </table:table-cell>
              <table:table-cell office:value-type="float" office:value="0.007179359">
                <text:p>0.007179359</text:p>
              </table:table-cell>
              <table:table-cell office:value-type="float" office:value="0.8020302">
                <text:p>0.80203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1.228273">
                <text:p>1.228273</text:p>
              </table:table-cell>
              <table:table-cell office:value-type="float" office:value="0.2073808">
                <text:p>0.2073808</text:p>
              </table:table-cell>
              <table:table-cell office:value-type="float" office:value="0.00645594">
                <text:p>0.00645594</text:p>
              </table:table-cell>
              <table:table-cell office:value-type="float" office:value="0.2047851">
                <text:p>0.2047851</text:p>
              </table:table-cell>
              <table:table-cell office:value-type="float" office:value="0.007527976">
                <text:p>0.007527976</text:p>
              </table:table-cell>
              <table:table-cell office:value-type="float" office:value="0.8021225">
                <text:p>0.8021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1.248147">
                <text:p>1.248147</text:p>
              </table:table-cell>
              <table:table-cell office:value-type="float" office:value="0.2171242">
                <text:p>0.2171242</text:p>
              </table:table-cell>
              <table:table-cell office:value-type="float" office:value="0.006720258">
                <text:p>0.006720258</text:p>
              </table:table-cell>
              <table:table-cell office:value-type="float" office:value="0.214509">
                <text:p>0.214509</text:p>
              </table:table-cell>
              <table:table-cell office:value-type="float" office:value="0.007575846">
                <text:p>0.007575846</text:p>
              </table:table-cell>
              <table:table-cell office:value-type="float" office:value="0.8022169">
                <text:p>0.8022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1.268697">
                <text:p>1.268697</text:p>
              </table:table-cell>
              <table:table-cell office:value-type="float" office:value="0.2271034">
                <text:p>0.2271034</text:p>
              </table:table-cell>
              <table:table-cell office:value-type="float" office:value="0.006818119">
                <text:p>0.006818119</text:p>
              </table:table-cell>
              <table:table-cell office:value-type="float" office:value="0.2245007">
                <text:p>0.2245007</text:p>
              </table:table-cell>
              <table:table-cell office:value-type="float" office:value="0.007960608">
                <text:p>0.007960608</text:p>
              </table:table-cell>
              <table:table-cell office:value-type="float" office:value="0.8023137">
                <text:p>0.8023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1.28862">
                <text:p>1.28862</text:p>
              </table:table-cell>
              <table:table-cell office:value-type="float" office:value="0.2372967">
                <text:p>0.2372967</text:p>
              </table:table-cell>
              <table:table-cell office:value-type="float" office:value="0.006554353">
                <text:p>0.006554353</text:p>
              </table:table-cell>
              <table:table-cell office:value-type="float" office:value="0.2346565">
                <text:p>0.2346565</text:p>
              </table:table-cell>
              <table:table-cell office:value-type="float" office:value="0.00769967">
                <text:p>0.00769967</text:p>
              </table:table-cell>
              <table:table-cell office:value-type="float" office:value="0.8024126">
                <text:p>0.8024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1.310059">
                <text:p>1.310059</text:p>
              </table:table-cell>
              <table:table-cell office:value-type="float" office:value="0.2477479">
                <text:p>0.2477479</text:p>
              </table:table-cell>
              <table:table-cell office:value-type="float" office:value="0.00662832">
                <text:p>0.00662832</text:p>
              </table:table-cell>
              <table:table-cell office:value-type="float" office:value="0.2450877">
                <text:p>0.2450877</text:p>
              </table:table-cell>
              <table:table-cell office:value-type="float" office:value="0.008080438">
                <text:p>0.008080438</text:p>
              </table:table-cell>
              <table:table-cell office:value-type="float" office:value="0.8025139">
                <text:p>0.80251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1.33242">
                <text:p>1.33242</text:p>
              </table:table-cell>
              <table:table-cell office:value-type="float" office:value="0.2584677">
                <text:p>0.2584677</text:p>
              </table:table-cell>
              <table:table-cell office:value-type="float" office:value="0.007079729">
                <text:p>0.007079729</text:p>
              </table:table-cell>
              <table:table-cell office:value-type="float" office:value="0.2557565">
                <text:p>0.2557565</text:p>
              </table:table-cell>
              <table:table-cell office:value-type="float" office:value="0.008498155">
                <text:p>0.008498155</text:p>
              </table:table-cell>
              <table:table-cell office:value-type="float" office:value="0.8026174">
                <text:p>0.8026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1.354941">
                <text:p>1.354941</text:p>
              </table:table-cell>
              <table:table-cell office:value-type="float" office:value="0.2694078">
                <text:p>0.2694078</text:p>
              </table:table-cell>
              <table:table-cell office:value-type="float" office:value="0.007367766">
                <text:p>0.007367766</text:p>
              </table:table-cell>
              <table:table-cell office:value-type="float" office:value="0.2666455">
                <text:p>0.2666455</text:p>
              </table:table-cell>
              <table:table-cell office:value-type="float" office:value="0.00879641">
                <text:p>0.00879641</text:p>
              </table:table-cell>
              <table:table-cell office:value-type="float" office:value="0.8027232">
                <text:p>0.8027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1.378211">
                <text:p>1.378211</text:p>
              </table:table-cell>
              <table:table-cell office:value-type="float" office:value="0.2806141">
                <text:p>0.2806141</text:p>
              </table:table-cell>
              <table:table-cell office:value-type="float" office:value="0.008051893">
                <text:p>0.008051893</text:p>
              </table:table-cell>
              <table:table-cell office:value-type="float" office:value="0.2777555">
                <text:p>0.2777555</text:p>
              </table:table-cell>
              <table:table-cell office:value-type="float" office:value="0.008958235">
                <text:p>0.008958235</text:p>
              </table:table-cell>
              <table:table-cell office:value-type="float" office:value="0.8028315">
                <text:p>0.8028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1.401547">
                <text:p>1.401547</text:p>
              </table:table-cell>
              <table:table-cell office:value-type="float" office:value="0.2920517">
                <text:p>0.2920517</text:p>
              </table:table-cell>
              <table:table-cell office:value-type="float" office:value="0.00877821">
                <text:p>0.00877821</text:p>
              </table:table-cell>
              <table:table-cell office:value-type="float" office:value="0.2890571">
                <text:p>0.2890571</text:p>
              </table:table-cell>
              <table:table-cell office:value-type="float" office:value="0.008717588">
                <text:p>0.008717588</text:p>
              </table:table-cell>
              <table:table-cell office:value-type="float" office:value="0.8029418">
                <text:p>0.8029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1.424706">
                <text:p>1.424706</text:p>
              </table:table-cell>
              <table:table-cell office:value-type="float" office:value="0.3036651">
                <text:p>0.3036651</text:p>
              </table:table-cell>
              <table:table-cell office:value-type="float" office:value="0.009031564">
                <text:p>0.009031564</text:p>
              </table:table-cell>
              <table:table-cell office:value-type="float" office:value="0.3005877">
                <text:p>0.3005877</text:p>
              </table:table-cell>
              <table:table-cell office:value-type="float" office:value="0.008366884">
                <text:p>0.008366884</text:p>
              </table:table-cell>
              <table:table-cell office:value-type="float" office:value="0.8030545">
                <text:p>0.8030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1.449158">
                <text:p>1.449158</text:p>
              </table:table-cell>
              <table:table-cell office:value-type="float" office:value="0.3155021">
                <text:p>0.3155021</text:p>
              </table:table-cell>
              <table:table-cell office:value-type="float" office:value="0.009204293">
                <text:p>0.009204293</text:p>
              </table:table-cell>
              <table:table-cell office:value-type="float" office:value="0.3124374">
                <text:p>0.3124374</text:p>
              </table:table-cell>
              <table:table-cell office:value-type="float" office:value="0.008844478">
                <text:p>0.008844478</text:p>
              </table:table-cell>
              <table:table-cell office:value-type="float" office:value="0.8031696">
                <text:p>0.8031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1.473356">
                <text:p>1.473356</text:p>
              </table:table-cell>
              <table:table-cell office:value-type="float" office:value="0.3275703">
                <text:p>0.3275703</text:p>
              </table:table-cell>
              <table:table-cell office:value-type="float" office:value="0.00944577">
                <text:p>0.00944577</text:p>
              </table:table-cell>
              <table:table-cell office:value-type="float" office:value="0.3244596">
                <text:p>0.3244596</text:p>
              </table:table-cell>
              <table:table-cell office:value-type="float" office:value="0.008592856">
                <text:p>0.008592856</text:p>
              </table:table-cell>
              <table:table-cell office:value-type="float" office:value="0.8032868">
                <text:p>0.80328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1.498255">
                <text:p>1.498255</text:p>
              </table:table-cell>
              <table:table-cell office:value-type="float" office:value="0.3398137">
                <text:p>0.3398137</text:p>
              </table:table-cell>
              <table:table-cell office:value-type="float" office:value="0.008896876">
                <text:p>0.008896876</text:p>
              </table:table-cell>
              <table:table-cell office:value-type="float" office:value="0.3367763">
                <text:p>0.3367763</text:p>
              </table:table-cell>
              <table:table-cell office:value-type="float" office:value="0.009361375">
                <text:p>0.009361375</text:p>
              </table:table-cell>
              <table:table-cell office:value-type="float" office:value="0.8034063">
                <text:p>0.8034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1.522437">
                <text:p>1.522437</text:p>
              </table:table-cell>
              <table:table-cell office:value-type="float" office:value="0.3522326">
                <text:p>0.3522326</text:p>
              </table:table-cell>
              <table:table-cell office:value-type="float" office:value="0.007620549">
                <text:p>0.007620549</text:p>
              </table:table-cell>
              <table:table-cell office:value-type="float" office:value="0.3493047">
                <text:p>0.3493047</text:p>
              </table:table-cell>
              <table:table-cell office:value-type="float" office:value="0.009750678">
                <text:p>0.009750678</text:p>
              </table:table-cell>
              <table:table-cell office:value-type="float" office:value="0.803528">
                <text:p>0.803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1.547054">
                <text:p>1.547054</text:p>
              </table:table-cell>
              <table:table-cell office:value-type="float" office:value="0.3649095">
                <text:p>0.3649095</text:p>
              </table:table-cell>
              <table:table-cell office:value-type="float" office:value="0.006504394">
                <text:p>0.006504394</text:p>
              </table:table-cell>
              <table:table-cell office:value-type="float" office:value="0.3620386">
                <text:p>0.3620386</text:p>
              </table:table-cell>
              <table:table-cell office:value-type="float" office:value="0.009948698">
                <text:p>0.009948698</text:p>
              </table:table-cell>
              <table:table-cell office:value-type="float" office:value="0.803652">
                <text:p>0.8036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1.575702">
                <text:p>1.575702</text:p>
              </table:table-cell>
              <table:table-cell office:value-type="float" office:value="0.3781416">
                <text:p>0.3781416</text:p>
              </table:table-cell>
              <table:table-cell office:value-type="float" office:value="0.009726086">
                <text:p>0.009726086</text:p>
              </table:table-cell>
              <table:table-cell office:value-type="float" office:value="0.3749126">
                <text:p>0.3749126</text:p>
              </table:table-cell>
              <table:table-cell office:value-type="float" office:value="0.009143744">
                <text:p>0.009143744</text:p>
              </table:table-cell>
              <table:table-cell office:value-type="float" office:value="0.8037781">
                <text:p>0.803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1.60315">
                <text:p>1.60315</text:p>
              </table:table-cell>
              <table:table-cell office:value-type="float" office:value="0.3914405">
                <text:p>0.3914405</text:p>
              </table:table-cell>
              <table:table-cell office:value-type="float" office:value="0.01079643">
                <text:p>0.01079643</text:p>
              </table:table-cell>
              <table:table-cell office:value-type="float" office:value="0.3880986">
                <text:p>0.3880986</text:p>
              </table:table-cell>
              <table:table-cell office:value-type="float" office:value="0.008907529">
                <text:p>0.008907529</text:p>
              </table:table-cell>
              <table:table-cell office:value-type="float" office:value="0.8039067">
                <text:p>0.8039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1.628568">
                <text:p>1.628568</text:p>
              </table:table-cell>
              <table:table-cell office:value-type="float" office:value="0.4047699">
                <text:p>0.4047699</text:p>
              </table:table-cell>
              <table:table-cell office:value-type="float" office:value="0.009542296">
                <text:p>0.009542296</text:p>
              </table:table-cell>
              <table:table-cell office:value-type="float" office:value="0.4015121">
                <text:p>0.4015121</text:p>
              </table:table-cell>
              <table:table-cell office:value-type="float" office:value="0.008705625">
                <text:p>0.008705625</text:p>
              </table:table-cell>
              <table:table-cell office:value-type="float" office:value="0.8040374">
                <text:p>0.8040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1.657564">
                <text:p>1.657564</text:p>
              </table:table-cell>
              <table:table-cell office:value-type="float" office:value="0.4184928">
                <text:p>0.4184928</text:p>
              </table:table-cell>
              <table:table-cell office:value-type="float" office:value="0.01021282">
                <text:p>0.01021282</text:p>
              </table:table-cell>
              <table:table-cell office:value-type="float" office:value="0.415249">
                <text:p>0.415249</text:p>
              </table:table-cell>
              <table:table-cell office:value-type="float" office:value="0.009439153">
                <text:p>0.009439153</text:p>
              </table:table-cell>
              <table:table-cell office:value-type="float" office:value="0.8041705">
                <text:p>0.8041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1.686935">
                <text:p>1.686935</text:p>
              </table:table-cell>
              <table:table-cell office:value-type="float" office:value="0.4325369">
                <text:p>0.4325369</text:p>
              </table:table-cell>
              <table:table-cell office:value-type="float" office:value="0.01160205">
                <text:p>0.01160205</text:p>
              </table:table-cell>
              <table:table-cell office:value-type="float" office:value="0.429142">
                <text:p>0.429142</text:p>
              </table:table-cell>
              <table:table-cell office:value-type="float" office:value="0.009347661">
                <text:p>0.009347661</text:p>
              </table:table-cell>
              <table:table-cell office:value-type="float" office:value="0.8043058">
                <text:p>0.80430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1.718867">
                <text:p>1.718867</text:p>
              </table:table-cell>
              <table:table-cell office:value-type="float" office:value="0.4468644">
                <text:p>0.4468644</text:p>
              </table:table-cell>
              <table:table-cell office:value-type="float" office:value="0.01340423">
                <text:p>0.01340423</text:p>
              </table:table-cell>
              <table:table-cell office:value-type="float" office:value="0.4433749">
                <text:p>0.4433749</text:p>
              </table:table-cell>
              <table:table-cell office:value-type="float" office:value="0.01077944">
                <text:p>0.01077944</text:p>
              </table:table-cell>
              <table:table-cell office:value-type="float" office:value="0.8044434">
                <text:p>0.80444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1.750798">
                <text:p>1.750798</text:p>
              </table:table-cell>
              <table:table-cell office:value-type="float" office:value="0.4613129">
                <text:p>0.4613129</text:p>
              </table:table-cell>
              <table:table-cell office:value-type="float" office:value="0.01410733">
                <text:p>0.01410733</text:p>
              </table:table-cell>
              <table:table-cell office:value-type="float" office:value="0.4579211">
                <text:p>0.4579211</text:p>
              </table:table-cell>
              <table:table-cell office:value-type="float" office:value="0.01287272">
                <text:p>0.01287272</text:p>
              </table:table-cell>
              <table:table-cell office:value-type="float" office:value="0.8045833">
                <text:p>0.8045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1.781974">
                <text:p>1.781974</text:p>
              </table:table-cell>
              <table:table-cell office:value-type="float" office:value="0.475983">
                <text:p>0.475983</text:p>
              </table:table-cell>
              <table:table-cell office:value-type="float" office:value="0.01466399">
                <text:p>0.01466399</text:p>
              </table:table-cell>
              <table:table-cell office:value-type="float" office:value="0.472618">
                <text:p>0.472618</text:p>
              </table:table-cell>
              <table:table-cell office:value-type="float" office:value="0.01398307">
                <text:p>0.01398307</text:p>
              </table:table-cell>
              <table:table-cell office:value-type="float" office:value="0.8047254">
                <text:p>0.8047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1.812694">
                <text:p>1.812694</text:p>
              </table:table-cell>
              <table:table-cell office:value-type="float" office:value="0.4908415">
                <text:p>0.4908415</text:p>
              </table:table-cell>
              <table:table-cell office:value-type="float" office:value="0.01471656">
                <text:p>0.01471656</text:p>
              </table:table-cell>
              <table:table-cell office:value-type="float" office:value="0.4875134">
                <text:p>0.4875134</text:p>
              </table:table-cell>
              <table:table-cell office:value-type="float" office:value="0.01475227">
                <text:p>0.01475227</text:p>
              </table:table-cell>
              <table:table-cell office:value-type="float" office:value="0.8048697">
                <text:p>0.8048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1.842327">
                <text:p>1.842327</text:p>
              </table:table-cell>
              <table:table-cell office:value-type="float" office:value="0.5058741">
                <text:p>0.5058741</text:p>
              </table:table-cell>
              <table:table-cell office:value-type="float" office:value="0.01408852">
                <text:p>0.01408852</text:p>
              </table:table-cell>
              <table:table-cell office:value-type="float" office:value="0.5025779">
                <text:p>0.5025779</text:p>
              </table:table-cell>
              <table:table-cell office:value-type="float" office:value="0.01477009">
                <text:p>0.01477009</text:p>
              </table:table-cell>
              <table:table-cell office:value-type="float" office:value="0.8050163">
                <text:p>0.8050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1.874173">
                <text:p>1.874173</text:p>
              </table:table-cell>
              <table:table-cell office:value-type="float" office:value="0.5212235">
                <text:p>0.5212235</text:p>
              </table:table-cell>
              <table:table-cell office:value-type="float" office:value="0.01452208">
                <text:p>0.01452208</text:p>
              </table:table-cell>
              <table:table-cell office:value-type="float" office:value="0.5179191">
                <text:p>0.5179191</text:p>
              </table:table-cell>
              <table:table-cell office:value-type="float" office:value="0.01534289">
                <text:p>0.01534289</text:p>
              </table:table-cell>
              <table:table-cell office:value-type="float" office:value="0.8051652">
                <text:p>0.8051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1.906914">
                <text:p>1.906914</text:p>
              </table:table-cell>
              <table:table-cell office:value-type="float" office:value="0.5368344">
                <text:p>0.5368344</text:p>
              </table:table-cell>
              <table:table-cell office:value-type="float" office:value="0.01527512">
                <text:p>0.01527512</text:p>
              </table:table-cell>
              <table:table-cell office:value-type="float" office:value="0.5335011">
                <text:p>0.5335011</text:p>
              </table:table-cell>
              <table:table-cell office:value-type="float" office:value="0.01598667">
                <text:p>0.01598667</text:p>
              </table:table-cell>
              <table:table-cell office:value-type="float" office:value="0.8053164">
                <text:p>0.80531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1.939341">
                <text:p>1.939341</text:p>
              </table:table-cell>
              <table:table-cell office:value-type="float" office:value="0.552615">
                <text:p>0.552615</text:p>
              </table:table-cell>
              <table:table-cell office:value-type="float" office:value="0.01515993">
                <text:p>0.01515993</text:p>
              </table:table-cell>
              <table:table-cell office:value-type="float" office:value="0.5493365">
                <text:p>0.5493365</text:p>
              </table:table-cell>
              <table:table-cell office:value-type="float" office:value="0.01675944">
                <text:p>0.01675944</text:p>
              </table:table-cell>
              <table:table-cell office:value-type="float" office:value="0.8054697">
                <text:p>0.80546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1.972619">
                <text:p>1.972619</text:p>
              </table:table-cell>
              <table:table-cell office:value-type="float" office:value="0.5686116">
                <text:p>0.5686116</text:p>
              </table:table-cell>
              <table:table-cell office:value-type="float" office:value="0.01493836">
                <text:p>0.01493836</text:p>
              </table:table-cell>
              <table:table-cell office:value-type="float" office:value="0.5654504">
                <text:p>0.5654504</text:p>
              </table:table-cell>
              <table:table-cell office:value-type="float" office:value="0.0179926">
                <text:p>0.0179926</text:p>
              </table:table-cell>
              <table:table-cell office:value-type="float" office:value="0.8056254">
                <text:p>0.8056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2.007592">
                <text:p>2.007592</text:p>
              </table:table-cell>
              <table:table-cell office:value-type="float" office:value="0.584943">
                <text:p>0.584943</text:p>
              </table:table-cell>
              <table:table-cell office:value-type="float" office:value="0.01587099">
                <text:p>0.01587099</text:p>
              </table:table-cell>
              <table:table-cell office:value-type="float" office:value="0.5818046">
                <text:p>0.5818046</text:p>
              </table:table-cell>
              <table:table-cell office:value-type="float" office:value="0.01919027">
                <text:p>0.01919027</text:p>
              </table:table-cell>
              <table:table-cell office:value-type="float" office:value="0.8057833">
                <text:p>0.8057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2.042338">
                <text:p>2.042338</text:p>
              </table:table-cell>
              <table:table-cell office:value-type="float" office:value="0.601483">
                <text:p>0.601483</text:p>
              </table:table-cell>
              <table:table-cell office:value-type="float" office:value="0.01638216">
                <text:p>0.01638216</text:p>
              </table:table-cell>
              <table:table-cell office:value-type="float" office:value="0.5983732">
                <text:p>0.5983732</text:p>
              </table:table-cell>
              <table:table-cell office:value-type="float" office:value="0.02015628">
                <text:p>0.02015628</text:p>
              </table:table-cell>
              <table:table-cell office:value-type="float" office:value="0.8059436">
                <text:p>0.8059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2.078119">
                <text:p>2.078119</text:p>
              </table:table-cell>
              <table:table-cell office:value-type="float" office:value="0.6183535">
                <text:p>0.6183535</text:p>
              </table:table-cell>
              <table:table-cell office:value-type="float" office:value="0.01815377">
                <text:p>0.01815377</text:p>
              </table:table-cell>
              <table:table-cell office:value-type="float" office:value="0.6151042">
                <text:p>0.6151042</text:p>
              </table:table-cell>
              <table:table-cell office:value-type="float" office:value="0.02040141">
                <text:p>0.02040141</text:p>
              </table:table-cell>
              <table:table-cell office:value-type="float" office:value="0.8061061">
                <text:p>0.8061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2.116067">
                <text:p>2.116067</text:p>
              </table:table-cell>
              <table:table-cell office:value-type="float" office:value="0.6354669">
                <text:p>0.6354669</text:p>
              </table:table-cell>
              <table:table-cell office:value-type="float" office:value="0.01982119">
                <text:p>0.01982119</text:p>
              </table:table-cell>
              <table:table-cell office:value-type="float" office:value="0.6322288">
                <text:p>0.6322288</text:p>
              </table:table-cell>
              <table:table-cell office:value-type="float" office:value="0.02227895">
                <text:p>0.02227895</text:p>
              </table:table-cell>
              <table:table-cell office:value-type="float" office:value="0.8062709">
                <text:p>0.80627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2.151814">
                <text:p>2.151814</text:p>
              </table:table-cell>
              <table:table-cell office:value-type="float" office:value="0.6527393">
                <text:p>0.6527393</text:p>
              </table:table-cell>
              <table:table-cell office:value-type="float" office:value="0.02063126">
                <text:p>0.02063126</text:p>
              </table:table-cell>
              <table:table-cell office:value-type="float" office:value="0.6494235">
                <text:p>0.6494235</text:p>
              </table:table-cell>
              <table:table-cell office:value-type="float" office:value="0.02258186">
                <text:p>0.02258186</text:p>
              </table:table-cell>
              <table:table-cell office:value-type="float" office:value="0.8064379">
                <text:p>0.8064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2.188743">
                <text:p>2.188743</text:p>
              </table:table-cell>
              <table:table-cell office:value-type="float" office:value="0.6702474">
                <text:p>0.6702474</text:p>
              </table:table-cell>
              <table:table-cell office:value-type="float" office:value="0.02168118">
                <text:p>0.02168118</text:p>
              </table:table-cell>
              <table:table-cell office:value-type="float" office:value="0.6668849">
                <text:p>0.6668849</text:p>
              </table:table-cell>
              <table:table-cell office:value-type="float" office:value="0.02332246">
                <text:p>0.02332246</text:p>
              </table:table-cell>
              <table:table-cell office:value-type="float" office:value="0.8066072">
                <text:p>0.80660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2.225917">
                <text:p>2.225917</text:p>
              </table:table-cell>
              <table:table-cell office:value-type="float" office:value="0.68807">
                <text:p>0.68807</text:p>
              </table:table-cell>
              <table:table-cell office:value-type="float" office:value="0.02324474">
                <text:p>0.02324474</text:p>
              </table:table-cell>
              <table:table-cell office:value-type="float" office:value="0.6845176">
                <text:p>0.6845176</text:p>
              </table:table-cell>
              <table:table-cell office:value-type="float" office:value="0.02330549">
                <text:p>0.02330549</text:p>
              </table:table-cell>
              <table:table-cell office:value-type="float" office:value="0.8067788">
                <text:p>0.8067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2.264289">
                <text:p>2.264289</text:p>
              </table:table-cell>
              <table:table-cell office:value-type="float" office:value="0.7061497">
                <text:p>0.7061497</text:p>
              </table:table-cell>
              <table:table-cell office:value-type="float" office:value="0.02491096">
                <text:p>0.02491096</text:p>
              </table:table-cell>
              <table:table-cell office:value-type="float" office:value="0.7024472">
                <text:p>0.7024472</text:p>
              </table:table-cell>
              <table:table-cell office:value-type="float" office:value="0.02382831">
                <text:p>0.02382831</text:p>
              </table:table-cell>
              <table:table-cell office:value-type="float" office:value="0.8069526">
                <text:p>0.8069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2.305516">
                <text:p>2.305516</text:p>
              </table:table-cell>
              <table:table-cell office:value-type="float" office:value="0.7245522">
                <text:p>0.7245522</text:p>
              </table:table-cell>
              <table:table-cell office:value-type="float" office:value="0.02737218">
                <text:p>0.02737218</text:p>
              </table:table-cell>
              <table:table-cell office:value-type="float" office:value="0.7207499">
                <text:p>0.7207499</text:p>
              </table:table-cell>
              <table:table-cell office:value-type="float" office:value="0.02571263">
                <text:p>0.02571263</text:p>
              </table:table-cell>
              <table:table-cell office:value-type="float" office:value="0.8071288">
                <text:p>0.80712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2.344778">
                <text:p>2.344778</text:p>
              </table:table-cell>
              <table:table-cell office:value-type="float" office:value="0.743095">
                <text:p>0.743095</text:p>
              </table:table-cell>
              <table:table-cell office:value-type="float" office:value="0.02898154">
                <text:p>0.02898154</text:p>
              </table:table-cell>
              <table:table-cell office:value-type="float" office:value="0.7391429">
                <text:p>0.7391429</text:p>
              </table:table-cell>
              <table:table-cell office:value-type="float" office:value="0.02625087">
                <text:p>0.02625087</text:p>
              </table:table-cell>
              <table:table-cell office:value-type="float" office:value="0.8073072">
                <text:p>0.8073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2.383787">
                <text:p>2.383787</text:p>
              </table:table-cell>
              <table:table-cell office:value-type="float" office:value="0.7617257">
                <text:p>0.7617257</text:p>
              </table:table-cell>
              <table:table-cell office:value-type="float" office:value="0.02935">
                <text:p>0.02935</text:p>
              </table:table-cell>
              <table:table-cell office:value-type="float" office:value="0.7578374">
                <text:p>0.7578374</text:p>
              </table:table-cell>
              <table:table-cell office:value-type="float" office:value="0.02738581">
                <text:p>0.02738581</text:p>
              </table:table-cell>
              <table:table-cell office:value-type="float" office:value="0.8074878">
                <text:p>0.80748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2.425494">
                <text:p>2.425494</text:p>
              </table:table-cell>
              <table:table-cell office:value-type="float" office:value="0.7807419">
                <text:p>0.7807419</text:p>
              </table:table-cell>
              <table:table-cell office:value-type="float" office:value="0.03101954">
                <text:p>0.03101954</text:p>
              </table:table-cell>
              <table:table-cell office:value-type="float" office:value="0.7768387">
                <text:p>0.7768387</text:p>
              </table:table-cell>
              <table:table-cell office:value-type="float" office:value="0.02922322">
                <text:p>0.02922322</text:p>
              </table:table-cell>
              <table:table-cell office:value-type="float" office:value="0.8076708">
                <text:p>0.8076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2.464586">
                <text:p>2.464586</text:p>
              </table:table-cell>
              <table:table-cell office:value-type="float" office:value="0.7997123">
                <text:p>0.7997123</text:p>
              </table:table-cell>
              <table:table-cell office:value-type="float" office:value="0.0299974">
                <text:p>0.0299974</text:p>
              </table:table-cell>
              <table:table-cell office:value-type="float" office:value="0.7960679">
                <text:p>0.7960679</text:p>
              </table:table-cell>
              <table:table-cell office:value-type="float" office:value="0.03095257">
                <text:p>0.03095257</text:p>
              </table:table-cell>
              <table:table-cell office:value-type="float" office:value="0.8078557">
                <text:p>0.8078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2.503663">
                <text:p>2.503663</text:p>
              </table:table-cell>
              <table:table-cell office:value-type="float" office:value="0.8189964">
                <text:p>0.8189964</text:p>
              </table:table-cell>
              <table:table-cell office:value-type="float" office:value="0.0296555">
                <text:p>0.0296555</text:p>
              </table:table-cell>
              <table:table-cell office:value-type="float" office:value="0.8154072">
                <text:p>0.8154072</text:p>
              </table:table-cell>
              <table:table-cell office:value-type="float" office:value="0.0315604">
                <text:p>0.0315604</text:p>
              </table:table-cell>
              <table:table-cell office:value-type="float" office:value="0.8080431">
                <text:p>0.8080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2.542201">
                <text:p>2.542201</text:p>
              </table:table-cell>
              <table:table-cell office:value-type="float" office:value="0.8385289">
                <text:p>0.8385289</text:p>
              </table:table-cell>
              <table:table-cell office:value-type="float" office:value="0.02948199">
                <text:p>0.02948199</text:p>
              </table:table-cell>
              <table:table-cell office:value-type="float" office:value="0.8348698">
                <text:p>0.8348698</text:p>
              </table:table-cell>
              <table:table-cell office:value-type="float" office:value="0.03108684">
                <text:p>0.03108684</text:p>
              </table:table-cell>
              <table:table-cell office:value-type="float" office:value="0.808233">
                <text:p>0.8082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2.584481">
                <text:p>2.584481</text:p>
              </table:table-cell>
              <table:table-cell office:value-type="float" office:value="0.8585759">
                <text:p>0.8585759</text:p>
              </table:table-cell>
              <table:table-cell office:value-type="float" office:value="0.03194269">
                <text:p>0.03194269</text:p>
              </table:table-cell>
              <table:table-cell office:value-type="float" office:value="0.8546324">
                <text:p>0.8546324</text:p>
              </table:table-cell>
              <table:table-cell office:value-type="float" office:value="0.03090422">
                <text:p>0.03090422</text:p>
              </table:table-cell>
              <table:table-cell office:value-type="float" office:value="0.8084252">
                <text:p>0.8084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2.623906">
                <text:p>2.623906</text:p>
              </table:table-cell>
              <table:table-cell office:value-type="float" office:value="0.8785502">
                <text:p>0.8785502</text:p>
              </table:table-cell>
              <table:table-cell office:value-type="float" office:value="0.03158983">
                <text:p>0.03158983</text:p>
              </table:table-cell>
              <table:table-cell office:value-type="float" office:value="0.8745933">
                <text:p>0.8745933</text:p>
              </table:table-cell>
              <table:table-cell office:value-type="float" office:value="0.03055257">
                <text:p>0.03055257</text:p>
              </table:table-cell>
              <table:table-cell office:value-type="float" office:value="0.8086196">
                <text:p>0.8086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2.660814">
                <text:p>2.660814</text:p>
              </table:table-cell>
              <table:table-cell office:value-type="float" office:value="0.8985656">
                <text:p>0.8985656</text:p>
              </table:table-cell>
              <table:table-cell office:value-type="float" office:value="0.02932674">
                <text:p>0.02932674</text:p>
              </table:table-cell>
              <table:table-cell office:value-type="float" office:value="0.8947146">
                <text:p>0.8947146</text:p>
              </table:table-cell>
              <table:table-cell office:value-type="float" office:value="0.02939046">
                <text:p>0.02939046</text:p>
              </table:table-cell>
              <table:table-cell office:value-type="float" office:value="0.8088163">
                <text:p>0.8088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2.699673">
                <text:p>2.699673</text:p>
              </table:table-cell>
              <table:table-cell office:value-type="float" office:value="0.9188136">
                <text:p>0.9188136</text:p>
              </table:table-cell>
              <table:table-cell office:value-type="float" office:value="0.02672224">
                <text:p>0.02672224</text:p>
              </table:table-cell>
              <table:table-cell office:value-type="float" office:value="0.915225">
                <text:p>0.915225</text:p>
              </table:table-cell>
              <table:table-cell office:value-type="float" office:value="0.02989704">
                <text:p>0.02989704</text:p>
              </table:table-cell>
              <table:table-cell office:value-type="float" office:value="0.8090152">
                <text:p>0.80901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2.748589">
                <text:p>2.748589</text:p>
              </table:table-cell>
              <table:table-cell office:value-type="float" office:value="0.9401019">
                <text:p>0.9401019</text:p>
              </table:table-cell>
              <table:table-cell office:value-type="float" office:value="0.03198275">
                <text:p>0.03198275</text:p>
              </table:table-cell>
              <table:table-cell office:value-type="float" office:value="0.936065">
                <text:p>0.936065</text:p>
              </table:table-cell>
              <table:table-cell office:value-type="float" office:value="0.03122254">
                <text:p>0.03122254</text:p>
              </table:table-cell>
              <table:table-cell office:value-type="float" office:value="0.8092166">
                <text:p>0.80921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2.800232">
                <text:p>2.800232</text:p>
              </table:table-cell>
              <table:table-cell office:value-type="float" office:value="0.962122">
                <text:p>0.962122</text:p>
              </table:table-cell>
              <table:table-cell office:value-type="float" office:value="0.04040701">
                <text:p>0.04040701</text:p>
              </table:table-cell>
              <table:table-cell office:value-type="float" office:value="0.9570347">
                <text:p>0.9570347</text:p>
              </table:table-cell>
              <table:table-cell office:value-type="float" office:value="0.0312475">
                <text:p>0.0312475</text:p>
              </table:table-cell>
              <table:table-cell office:value-type="float" office:value="0.8094205">
                <text:p>0.8094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2.840636">
                <text:p>2.840636</text:p>
              </table:table-cell>
              <table:table-cell office:value-type="float" office:value="0.9833457">
                <text:p>0.9833457</text:p>
              </table:table-cell>
              <table:table-cell office:value-type="float" office:value="0.04044246">
                <text:p>0.04044246</text:p>
              </table:table-cell>
              <table:table-cell office:value-type="float" office:value="0.9780286">
                <text:p>0.9780286</text:p>
              </table:table-cell>
              <table:table-cell office:value-type="float" office:value="0.02919291">
                <text:p>0.02919291</text:p>
              </table:table-cell>
              <table:table-cell office:value-type="float" office:value="0.8096263">
                <text:p>0.80962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2.895051">
                <text:p>2.895051</text:p>
              </table:table-cell>
              <table:table-cell office:value-type="float" office:value="1.005167">
                <text:p>1.005167</text:p>
              </table:table-cell>
              <table:table-cell office:value-type="float" office:value="0.04350086">
                <text:p>0.04350086</text:p>
              </table:table-cell>
              <table:table-cell office:value-type="float" office:value="1.000208">
                <text:p>1.000208</text:p>
              </table:table-cell>
              <table:table-cell office:value-type="float" office:value="0.03634076">
                <text:p>0.03634076</text:p>
              </table:table-cell>
              <table:table-cell office:value-type="float" office:value="0.8098346">
                <text:p>0.8098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2.951857">
                <text:p>2.951857</text:p>
              </table:table-cell>
              <table:table-cell office:value-type="float" office:value="1.027503">
                <text:p>1.027503</text:p>
              </table:table-cell>
              <table:table-cell office:value-type="float" office:value="0.04860603">
                <text:p>0.04860603</text:p>
              </table:table-cell>
              <table:table-cell office:value-type="float" office:value="1.022671">
                <text:p>1.022671</text:p>
              </table:table-cell>
              <table:table-cell office:value-type="float" office:value="0.04303152">
                <text:p>0.04303152</text:p>
              </table:table-cell>
              <table:table-cell office:value-type="float" office:value="0.8100453">
                <text:p>0.81004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3.006576">
                <text:p>3.006576</text:p>
              </table:table-cell>
              <table:table-cell office:value-type="float" office:value="1.049862">
                <text:p>1.049862</text:p>
              </table:table-cell>
              <table:table-cell office:value-type="float" office:value="0.05177203">
                <text:p>0.05177203</text:p>
              </table:table-cell>
              <table:table-cell office:value-type="float" office:value="1.045385">
                <text:p>1.045385</text:p>
              </table:table-cell>
              <table:table-cell office:value-type="float" office:value="0.04929785">
                <text:p>0.04929785</text:p>
              </table:table-cell>
              <table:table-cell office:value-type="float" office:value="0.8102581">
                <text:p>0.81025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3.062463">
                <text:p>3.062463</text:p>
              </table:table-cell>
              <table:table-cell office:value-type="float" office:value="1.072564">
                <text:p>1.072564</text:p>
              </table:table-cell>
              <table:table-cell office:value-type="float" office:value="0.05569226">
                <text:p>0.05569226</text:p>
              </table:table-cell>
              <table:table-cell office:value-type="float" office:value="1.068399">
                <text:p>1.068399</text:p>
              </table:table-cell>
              <table:table-cell office:value-type="float" office:value="0.05533374">
                <text:p>0.05533374</text:p>
              </table:table-cell>
              <table:table-cell office:value-type="float" office:value="0.8104732">
                <text:p>0.81047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3.109809">
                <text:p>3.109809</text:p>
              </table:table-cell>
              <table:table-cell office:value-type="float" office:value="1.09511">
                <text:p>1.09511</text:p>
              </table:table-cell>
              <table:table-cell office:value-type="float" office:value="0.05693423">
                <text:p>0.05693423</text:p>
              </table:table-cell>
              <table:table-cell office:value-type="float" office:value="1.090866">
                <text:p>1.090866</text:p>
              </table:table-cell>
              <table:table-cell office:value-type="float" office:value="0.0562083">
                <text:p>0.0562083</text:p>
              </table:table-cell>
              <table:table-cell office:value-type="float" office:value="0.8106906">
                <text:p>0.81069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3.157958">
                <text:p>3.157958</text:p>
              </table:table-cell>
              <table:table-cell office:value-type="float" office:value="1.11786">
                <text:p>1.11786</text:p>
              </table:table-cell>
              <table:table-cell office:value-type="float" office:value="0.0580057">
                <text:p>0.0580057</text:p>
              </table:table-cell>
              <table:table-cell office:value-type="float" office:value="1.11362">
                <text:p>1.11362</text:p>
              </table:table-cell>
              <table:table-cell office:value-type="float" office:value="0.057562">
                <text:p>0.057562</text:p>
              </table:table-cell>
              <table:table-cell office:value-type="float" office:value="0.81091">
                <text:p>0.81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3.20845">
                <text:p>3.20845</text:p>
              </table:table-cell>
              <table:table-cell office:value-type="float" office:value="1.140949">
                <text:p>1.140949</text:p>
              </table:table-cell>
              <table:table-cell office:value-type="float" office:value="0.05987937">
                <text:p>0.05987937</text:p>
              </table:table-cell>
              <table:table-cell office:value-type="float" office:value="1.136723">
                <text:p>1.136723</text:p>
              </table:table-cell>
              <table:table-cell office:value-type="float" office:value="0.05976655">
                <text:p>0.05976655</text:p>
              </table:table-cell>
              <table:table-cell office:value-type="float" office:value="0.8111318">
                <text:p>0.81113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3.25826">
                <text:p>3.25826</text:p>
              </table:table-cell>
              <table:table-cell office:value-type="float" office:value="1.164222">
                <text:p>1.164222</text:p>
              </table:table-cell>
              <table:table-cell office:value-type="float" office:value="0.06137617">
                <text:p>0.06137617</text:p>
              </table:table-cell>
              <table:table-cell office:value-type="float" office:value="1.159982">
                <text:p>1.159982</text:p>
              </table:table-cell>
              <table:table-cell office:value-type="float" office:value="0.06132389">
                <text:p>0.06132389</text:p>
              </table:table-cell>
              <table:table-cell office:value-type="float" office:value="0.8113559">
                <text:p>0.8113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3.30999">
                <text:p>3.30999</text:p>
              </table:table-cell>
              <table:table-cell office:value-type="float" office:value="1.187822">
                <text:p>1.187822</text:p>
              </table:table-cell>
              <table:table-cell office:value-type="float" office:value="0.06353862">
                <text:p>0.06353862</text:p>
              </table:table-cell>
              <table:table-cell office:value-type="float" office:value="1.183557">
                <text:p>1.183557</text:p>
              </table:table-cell>
              <table:table-cell office:value-type="float" office:value="0.06349046">
                <text:p>0.06349046</text:p>
              </table:table-cell>
              <table:table-cell office:value-type="float" office:value="0.8115822">
                <text:p>0.81158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711cm" svg:height="20.087cm" xlink:href=".." xlink:type="simple" chart:class="chart:scatter" chart:style-name="ch1">
        <chart:title svg:x="16.305cm" svg:y="0.536cm" chart:style-name="ch2">
          <text:p>GaN Losses</text:p>
        </chart:title>
        <chart:legend chart:legend-position="end" svg:x="30.901cm" svg:y="9.246cm" style:legend-expansion="high" chart:style-name="ch3"/>
        <chart:plot-area chart:style-name="ch4" table:cell-range-address="losses_summary.A2:losses_summary.A101 losses_summary.L1:losses_summary.N101" chart:data-source-has-labels="row" svg:x="2.017cm" svg:y="1.838cm" svg:width="28.17cm" svg:height="16.575cm">
          <chart:coordinate-region svg:x="2.824cm" svg:y="2.037cm" svg:width="27.363cm" svg:height="15.322cm"/>
          <chart:axis chart:dimension="x" chart:name="primary-x" chart:style-name="ch5">
            <chart:title svg:x="14.28cm" svg:y="18.814cm" chart:style-name="ch6">
              <text:p>Load Power(W)</text:p>
            </chart:title>
            <chart:grid chart:style-name="ch7" chart:class="major"/>
          </chart:axis>
          <chart:axis chart:dimension="y" chart:name="primary-y" chart:style-name="ch8">
            <chart:title svg:x="0.451cm" svg:y="11.405cm" chart:style-name="ch9">
              <text:p>Losses(W)</text:p>
            </chart:title>
            <chart:grid chart:style-name="ch7" chart:class="major"/>
          </chart:axis>
          <chart:series chart:style-name="ch10" chart:values-cell-range-address="losses_summary.L2:losses_summary.L101" chart:label-cell-address="losses_summary.L1:losses_summary.L1" chart:class="chart:scatter">
            <chart:domain table:cell-range-address="losses_summary.A2:losses_summary.A101"/>
            <chart:data-point chart:repeated="100"/>
          </chart:series>
          <chart:series chart:style-name="ch11" chart:values-cell-range-address="losses_summary.M2:losses_summary.M101" chart:label-cell-address="losses_summary.M1:losses_summary.M1" chart:class="chart:scatter">
            <chart:data-point chart:repeated="100"/>
          </chart:series>
          <chart:series chart:style-name="ch12" chart:values-cell-range-address="losses_summary.N2:losses_summary.N101" chart:label-cell-address="losses_summary.N1:losses_summary.N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aN_total_losses</text:p>
                <draw:g>
                  <svg:desc>losses_summary.L1:losses_summary.L1</svg:desc>
                </draw:g>
              </table:table-cell>
              <table:table-cell office:value-type="string">
                <text:p>GaN_switching_losses</text:p>
                <draw:g>
                  <svg:desc>losses_summary.M1:losses_summary.M1</svg:desc>
                </draw:g>
              </table:table-cell>
              <table:table-cell office:value-type="string">
                <text:p>GaN_ohmic_losses</text:p>
                <draw:g>
                  <svg:desc>losses_summary.N1:losses_summary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4.91783522941106">
                <text:p>4.91783522941106</text:p>
                <draw:g>
                  <svg:desc>losses_summary.L2:losses_summary.L101</svg:desc>
                </draw:g>
              </table:table-cell>
              <table:table-cell office:value-type="float" office:value="1.73876768288288">
                <text:p>1.73876768288288</text:p>
                <draw:g>
                  <svg:desc>losses_summary.M2:losses_summary.M101</svg:desc>
                </draw:g>
              </table:table-cell>
              <table:table-cell office:value-type="float" office:value="3.1790675465245">
                <text:p>3.1790675465245</text:p>
                <draw:g>
                  <svg:desc>losses_summary.N2:losses_summary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.22988035473526">
                <text:p>5.22988035473526</text:p>
              </table:table-cell>
              <table:table-cell office:value-type="float" office:value="1.74668696022505">
                <text:p>1.74668696022505</text:p>
              </table:table-cell>
              <table:table-cell office:value-type="float" office:value="3.4831933945174">
                <text:p>3.4831933945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6786320952747">
                <text:p>5.6786320952747</text:p>
              </table:table-cell>
              <table:table-cell office:value-type="float" office:value="1.75602988910467">
                <text:p>1.75602988910467</text:p>
              </table:table-cell>
              <table:table-cell office:value-type="float" office:value="3.92260220617264">
                <text:p>3.92260220617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6.19988238047612">
                <text:p>6.19988238047612</text:p>
              </table:table-cell>
              <table:table-cell office:value-type="float" office:value="1.7633197498568">
                <text:p>1.7633197498568</text:p>
              </table:table-cell>
              <table:table-cell office:value-type="float" office:value="4.43656263062189">
                <text:p>4.43656263062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6.857323">
                <text:p>6.857323</text:p>
              </table:table-cell>
              <table:table-cell office:value-type="float" office:value="1.769539">
                <text:p>1.769539</text:p>
              </table:table-cell>
              <table:table-cell office:value-type="float" office:value="5.087785">
                <text:p>5.087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7.32700868348168">
                <text:p>7.32700868348168</text:p>
              </table:table-cell>
              <table:table-cell office:value-type="float" office:value="1.78438537485246">
                <text:p>1.78438537485246</text:p>
              </table:table-cell>
              <table:table-cell office:value-type="float" office:value="5.54262330863705">
                <text:p>5.54262330863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8.096946">
                <text:p>8.096946</text:p>
              </table:table-cell>
              <table:table-cell office:value-type="float" office:value="1.822563">
                <text:p>1.822563</text:p>
              </table:table-cell>
              <table:table-cell office:value-type="float" office:value="6.274383">
                <text:p>6.274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8.825287">
                <text:p>8.825287</text:p>
              </table:table-cell>
              <table:table-cell office:value-type="float" office:value="1.871179">
                <text:p>1.871179</text:p>
              </table:table-cell>
              <table:table-cell office:value-type="float" office:value="6.954108">
                <text:p>6.954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9.61248">
                <text:p>9.61248</text:p>
              </table:table-cell>
              <table:table-cell office:value-type="float" office:value="1.943335">
                <text:p>1.943335</text:p>
              </table:table-cell>
              <table:table-cell office:value-type="float" office:value="7.669144">
                <text:p>7.669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0.42813">
                <text:p>10.42813</text:p>
              </table:table-cell>
              <table:table-cell office:value-type="float" office:value="2.015266">
                <text:p>2.015266</text:p>
              </table:table-cell>
              <table:table-cell office:value-type="float" office:value="8.412867">
                <text:p>8.412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11.26484">
                <text:p>11.26484</text:p>
              </table:table-cell>
              <table:table-cell office:value-type="float" office:value="2.088458">
                <text:p>2.088458</text:p>
              </table:table-cell>
              <table:table-cell office:value-type="float" office:value="9.176385">
                <text:p>9.176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2.10329">
                <text:p>12.10329</text:p>
              </table:table-cell>
              <table:table-cell office:value-type="float" office:value="2.153029">
                <text:p>2.153029</text:p>
              </table:table-cell>
              <table:table-cell office:value-type="float" office:value="9.950258">
                <text:p>9.950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12.96016">
                <text:p>12.96016</text:p>
              </table:table-cell>
              <table:table-cell office:value-type="float" office:value="2.214613">
                <text:p>2.214613</text:p>
              </table:table-cell>
              <table:table-cell office:value-type="float" office:value="10.74554">
                <text:p>10.74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3.8309">
                <text:p>13.8309</text:p>
              </table:table-cell>
              <table:table-cell office:value-type="float" office:value="2.278694">
                <text:p>2.278694</text:p>
              </table:table-cell>
              <table:table-cell office:value-type="float" office:value="11.5522">
                <text:p>11.5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14.7053">
                <text:p>14.7053</text:p>
              </table:table-cell>
              <table:table-cell office:value-type="float" office:value="2.337472">
                <text:p>2.337472</text:p>
              </table:table-cell>
              <table:table-cell office:value-type="float" office:value="12.36783">
                <text:p>12.36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5.58073">
                <text:p>15.58073</text:p>
              </table:table-cell>
              <table:table-cell office:value-type="float" office:value="2.392614">
                <text:p>2.392614</text:p>
              </table:table-cell>
              <table:table-cell office:value-type="float" office:value="13.18812">
                <text:p>13.18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16.45931">
                <text:p>16.45931</text:p>
              </table:table-cell>
              <table:table-cell office:value-type="float" office:value="2.444915">
                <text:p>2.444915</text:p>
              </table:table-cell>
              <table:table-cell office:value-type="float" office:value="14.01439">
                <text:p>14.01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7.3389">
                <text:p>17.3389</text:p>
              </table:table-cell>
              <table:table-cell office:value-type="float" office:value="2.49357">
                <text:p>2.49357</text:p>
              </table:table-cell>
              <table:table-cell office:value-type="float" office:value="14.84533">
                <text:p>14.84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8.21917">
                <text:p>18.21917</text:p>
              </table:table-cell>
              <table:table-cell office:value-type="float" office:value="2.539693">
                <text:p>2.539693</text:p>
              </table:table-cell>
              <table:table-cell office:value-type="float" office:value="15.67948">
                <text:p>15.67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9.10208">
                <text:p>19.10208</text:p>
              </table:table-cell>
              <table:table-cell office:value-type="float" office:value="2.582613">
                <text:p>2.582613</text:p>
              </table:table-cell>
              <table:table-cell office:value-type="float" office:value="16.51947">
                <text:p>16.51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19.98783">
                <text:p>19.98783</text:p>
              </table:table-cell>
              <table:table-cell office:value-type="float" office:value="2.623329">
                <text:p>2.623329</text:p>
              </table:table-cell>
              <table:table-cell office:value-type="float" office:value="17.3645">
                <text:p>17.3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20.87514">
                <text:p>20.87514</text:p>
              </table:table-cell>
              <table:table-cell office:value-type="float" office:value="2.662318">
                <text:p>2.662318</text:p>
              </table:table-cell>
              <table:table-cell office:value-type="float" office:value="18.21283">
                <text:p>18.21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21.76571">
                <text:p>21.76571</text:p>
              </table:table-cell>
              <table:table-cell office:value-type="float" office:value="2.700133">
                <text:p>2.700133</text:p>
              </table:table-cell>
              <table:table-cell office:value-type="float" office:value="19.06558">
                <text:p>19.06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22.65811">
                <text:p>22.65811</text:p>
              </table:table-cell>
              <table:table-cell office:value-type="float" office:value="2.736147">
                <text:p>2.736147</text:p>
              </table:table-cell>
              <table:table-cell office:value-type="float" office:value="19.92197">
                <text:p>19.92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23.55372">
                <text:p>23.55372</text:p>
              </table:table-cell>
              <table:table-cell office:value-type="float" office:value="2.77074">
                <text:p>2.77074</text:p>
              </table:table-cell>
              <table:table-cell office:value-type="float" office:value="20.78298">
                <text:p>20.78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24.45378">
                <text:p>24.45378</text:p>
              </table:table-cell>
              <table:table-cell office:value-type="float" office:value="2.804346">
                <text:p>2.804346</text:p>
              </table:table-cell>
              <table:table-cell office:value-type="float" office:value="21.64943">
                <text:p>21.64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25.35581">
                <text:p>25.35581</text:p>
              </table:table-cell>
              <table:table-cell office:value-type="float" office:value="2.837227">
                <text:p>2.837227</text:p>
              </table:table-cell>
              <table:table-cell office:value-type="float" office:value="22.51859">
                <text:p>22.51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26.25969">
                <text:p>26.25969</text:p>
              </table:table-cell>
              <table:table-cell office:value-type="float" office:value="2.869092">
                <text:p>2.869092</text:p>
              </table:table-cell>
              <table:table-cell office:value-type="float" office:value="23.3906">
                <text:p>23.3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27.16522">
                <text:p>27.16522</text:p>
              </table:table-cell>
              <table:table-cell office:value-type="float" office:value="2.900055">
                <text:p>2.900055</text:p>
              </table:table-cell>
              <table:table-cell office:value-type="float" office:value="24.26517">
                <text:p>24.26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28.07324">
                <text:p>28.07324</text:p>
              </table:table-cell>
              <table:table-cell office:value-type="float" office:value="2.930407">
                <text:p>2.930407</text:p>
              </table:table-cell>
              <table:table-cell office:value-type="float" office:value="25.14283">
                <text:p>25.142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28.98545">
                <text:p>28.98545</text:p>
              </table:table-cell>
              <table:table-cell office:value-type="float" office:value="2.960619">
                <text:p>2.960619</text:p>
              </table:table-cell>
              <table:table-cell office:value-type="float" office:value="26.02483">
                <text:p>26.02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29.90123">
                <text:p>29.90123</text:p>
              </table:table-cell>
              <table:table-cell office:value-type="float" office:value="2.99056">
                <text:p>2.99056</text:p>
              </table:table-cell>
              <table:table-cell office:value-type="float" office:value="26.91067">
                <text:p>26.91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30.82126">
                <text:p>30.82126</text:p>
              </table:table-cell>
              <table:table-cell office:value-type="float" office:value="3.020315">
                <text:p>3.020315</text:p>
              </table:table-cell>
              <table:table-cell office:value-type="float" office:value="27.80095">
                <text:p>27.80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31.74541">
                <text:p>31.74541</text:p>
              </table:table-cell>
              <table:table-cell office:value-type="float" office:value="3.050005">
                <text:p>3.050005</text:p>
              </table:table-cell>
              <table:table-cell office:value-type="float" office:value="28.6954">
                <text:p>28.6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32.67256">
                <text:p>32.67256</text:p>
              </table:table-cell>
              <table:table-cell office:value-type="float" office:value="3.07959">
                <text:p>3.07959</text:p>
              </table:table-cell>
              <table:table-cell office:value-type="float" office:value="29.59297">
                <text:p>29.59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33.60353">
                <text:p>33.60353</text:p>
              </table:table-cell>
              <table:table-cell office:value-type="float" office:value="3.109323">
                <text:p>3.109323</text:p>
              </table:table-cell>
              <table:table-cell office:value-type="float" office:value="30.49421">
                <text:p>30.49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34.5389">
                <text:p>34.5389</text:p>
              </table:table-cell>
              <table:table-cell office:value-type="float" office:value="3.139193">
                <text:p>3.139193</text:p>
              </table:table-cell>
              <table:table-cell office:value-type="float" office:value="31.3997">
                <text:p>31.3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35.47817">
                <text:p>35.47817</text:p>
              </table:table-cell>
              <table:table-cell office:value-type="float" office:value="3.168909">
                <text:p>3.168909</text:p>
              </table:table-cell>
              <table:table-cell office:value-type="float" office:value="32.30927">
                <text:p>32.309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36.42131">
                <text:p>36.42131</text:p>
              </table:table-cell>
              <table:table-cell office:value-type="float" office:value="3.198414">
                <text:p>3.198414</text:p>
              </table:table-cell>
              <table:table-cell office:value-type="float" office:value="33.22289">
                <text:p>33.22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37.36854">
                <text:p>37.36854</text:p>
              </table:table-cell>
              <table:table-cell office:value-type="float" office:value="3.227582">
                <text:p>3.227582</text:p>
              </table:table-cell>
              <table:table-cell office:value-type="float" office:value="34.14095">
                <text:p>34.14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38.31849">
                <text:p>38.31849</text:p>
              </table:table-cell>
              <table:table-cell office:value-type="float" office:value="3.256615">
                <text:p>3.256615</text:p>
              </table:table-cell>
              <table:table-cell office:value-type="float" office:value="35.06188">
                <text:p>35.06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39.27299">
                <text:p>39.27299</text:p>
              </table:table-cell>
              <table:table-cell office:value-type="float" office:value="3.285866">
                <text:p>3.285866</text:p>
              </table:table-cell>
              <table:table-cell office:value-type="float" office:value="35.98712">
                <text:p>35.98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40.23121">
                <text:p>40.23121</text:p>
              </table:table-cell>
              <table:table-cell office:value-type="float" office:value="3.316024">
                <text:p>3.316024</text:p>
              </table:table-cell>
              <table:table-cell office:value-type="float" office:value="36.91519">
                <text:p>36.91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41.19303">
                <text:p>41.19303</text:p>
              </table:table-cell>
              <table:table-cell office:value-type="float" office:value="3.346924">
                <text:p>3.346924</text:p>
              </table:table-cell>
              <table:table-cell office:value-type="float" office:value="37.8461">
                <text:p>37.8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42.15861">
                <text:p>42.15861</text:p>
              </table:table-cell>
              <table:table-cell office:value-type="float" office:value="3.378033">
                <text:p>3.378033</text:p>
              </table:table-cell>
              <table:table-cell office:value-type="float" office:value="38.78057">
                <text:p>38.780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43.12798">
                <text:p>43.12798</text:p>
              </table:table-cell>
              <table:table-cell office:value-type="float" office:value="3.408898">
                <text:p>3.408898</text:p>
              </table:table-cell>
              <table:table-cell office:value-type="float" office:value="39.71908">
                <text:p>39.71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44.10109">
                <text:p>44.10109</text:p>
              </table:table-cell>
              <table:table-cell office:value-type="float" office:value="3.43889">
                <text:p>3.43889</text:p>
              </table:table-cell>
              <table:table-cell office:value-type="float" office:value="40.6622">
                <text:p>40.66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45.0789">
                <text:p>45.0789</text:p>
              </table:table-cell>
              <table:table-cell office:value-type="float" office:value="3.467843">
                <text:p>3.467843</text:p>
              </table:table-cell>
              <table:table-cell office:value-type="float" office:value="41.61105">
                <text:p>41.61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46.07444">
                <text:p>46.07444</text:p>
              </table:table-cell>
              <table:table-cell office:value-type="float" office:value="3.49984">
                <text:p>3.49984</text:p>
              </table:table-cell>
              <table:table-cell office:value-type="float" office:value="42.5746">
                <text:p>42.5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47.05825">
                <text:p>47.05825</text:p>
              </table:table-cell>
              <table:table-cell office:value-type="float" office:value="3.528329">
                <text:p>3.528329</text:p>
              </table:table-cell>
              <table:table-cell office:value-type="float" office:value="43.52992">
                <text:p>43.52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48.04215">
                <text:p>48.04215</text:p>
              </table:table-cell>
              <table:table-cell office:value-type="float" office:value="3.556408">
                <text:p>3.556408</text:p>
              </table:table-cell>
              <table:table-cell office:value-type="float" office:value="44.48574">
                <text:p>44.48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49.03154">
                <text:p>49.03154</text:p>
              </table:table-cell>
              <table:table-cell office:value-type="float" office:value="3.585672">
                <text:p>3.585672</text:p>
              </table:table-cell>
              <table:table-cell office:value-type="float" office:value="45.44587">
                <text:p>45.44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50.02537">
                <text:p>50.02537</text:p>
              </table:table-cell>
              <table:table-cell office:value-type="float" office:value="3.615511">
                <text:p>3.615511</text:p>
              </table:table-cell>
              <table:table-cell office:value-type="float" office:value="46.40986">
                <text:p>46.40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51.0237">
                <text:p>51.0237</text:p>
              </table:table-cell>
              <table:table-cell office:value-type="float" office:value="3.645843">
                <text:p>3.645843</text:p>
              </table:table-cell>
              <table:table-cell office:value-type="float" office:value="47.37786">
                <text:p>47.37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52.02725">
                <text:p>52.02725</text:p>
              </table:table-cell>
              <table:table-cell office:value-type="float" office:value="3.676582">
                <text:p>3.676582</text:p>
              </table:table-cell>
              <table:table-cell office:value-type="float" office:value="48.35066">
                <text:p>48.350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53.04349">
                <text:p>53.04349</text:p>
              </table:table-cell>
              <table:table-cell office:value-type="float" office:value="3.709383">
                <text:p>3.709383</text:p>
              </table:table-cell>
              <table:table-cell office:value-type="float" office:value="49.33411">
                <text:p>49.334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54.0524">
                <text:p>54.0524</text:p>
              </table:table-cell>
              <table:table-cell office:value-type="float" office:value="3.74043">
                <text:p>3.74043</text:p>
              </table:table-cell>
              <table:table-cell office:value-type="float" office:value="50.31197">
                <text:p>50.31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55.06468">
                <text:p>55.06468</text:p>
              </table:table-cell>
              <table:table-cell office:value-type="float" office:value="3.77169">
                <text:p>3.77169</text:p>
              </table:table-cell>
              <table:table-cell office:value-type="float" office:value="51.29299">
                <text:p>51.29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56.08129">
                <text:p>56.08129</text:p>
              </table:table-cell>
              <table:table-cell office:value-type="float" office:value="3.803326">
                <text:p>3.803326</text:p>
              </table:table-cell>
              <table:table-cell office:value-type="float" office:value="52.27796">
                <text:p>52.27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57.10065">
                <text:p>57.10065</text:p>
              </table:table-cell>
              <table:table-cell office:value-type="float" office:value="3.834951">
                <text:p>3.834951</text:p>
              </table:table-cell>
              <table:table-cell office:value-type="float" office:value="53.2657">
                <text:p>53.2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58.12434">
                <text:p>58.12434</text:p>
              </table:table-cell>
              <table:table-cell office:value-type="float" office:value="3.866854">
                <text:p>3.866854</text:p>
              </table:table-cell>
              <table:table-cell office:value-type="float" office:value="54.25749">
                <text:p>54.25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59.15221">
                <text:p>59.15221</text:p>
              </table:table-cell>
              <table:table-cell office:value-type="float" office:value="3.899445">
                <text:p>3.899445</text:p>
              </table:table-cell>
              <table:table-cell office:value-type="float" office:value="55.25277">
                <text:p>55.25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60.18432">
                <text:p>60.18432</text:p>
              </table:table-cell>
              <table:table-cell office:value-type="float" office:value="3.932694">
                <text:p>3.932694</text:p>
              </table:table-cell>
              <table:table-cell office:value-type="float" office:value="56.25163">
                <text:p>56.25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61.22123">
                <text:p>61.22123</text:p>
              </table:table-cell>
              <table:table-cell office:value-type="float" office:value="3.966507">
                <text:p>3.966507</text:p>
              </table:table-cell>
              <table:table-cell office:value-type="float" office:value="57.25473">
                <text:p>57.254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62.26226">
                <text:p>62.26226</text:p>
              </table:table-cell>
              <table:table-cell office:value-type="float" office:value="4.000932">
                <text:p>4.000932</text:p>
              </table:table-cell>
              <table:table-cell office:value-type="float" office:value="58.26133">
                <text:p>58.26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63.30844">
                <text:p>63.30844</text:p>
              </table:table-cell>
              <table:table-cell office:value-type="float" office:value="4.035799">
                <text:p>4.035799</text:p>
              </table:table-cell>
              <table:table-cell office:value-type="float" office:value="59.27264">
                <text:p>59.272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64.35807">
                <text:p>64.35807</text:p>
              </table:table-cell>
              <table:table-cell office:value-type="float" office:value="4.070947">
                <text:p>4.070947</text:p>
              </table:table-cell>
              <table:table-cell office:value-type="float" office:value="60.28712">
                <text:p>60.28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65.41281">
                <text:p>65.41281</text:p>
              </table:table-cell>
              <table:table-cell office:value-type="float" office:value="4.106428">
                <text:p>4.106428</text:p>
              </table:table-cell>
              <table:table-cell office:value-type="float" office:value="61.30638">
                <text:p>61.30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66.47216">
                <text:p>66.47216</text:p>
              </table:table-cell>
              <table:table-cell office:value-type="float" office:value="4.142097">
                <text:p>4.142097</text:p>
              </table:table-cell>
              <table:table-cell office:value-type="float" office:value="62.33006">
                <text:p>62.33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67.53592">
                <text:p>67.53592</text:p>
              </table:table-cell>
              <table:table-cell office:value-type="float" office:value="4.178032">
                <text:p>4.178032</text:p>
              </table:table-cell>
              <table:table-cell office:value-type="float" office:value="63.35789">
                <text:p>63.35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68.60439">
                <text:p>68.60439</text:p>
              </table:table-cell>
              <table:table-cell office:value-type="float" office:value="4.214232">
                <text:p>4.214232</text:p>
              </table:table-cell>
              <table:table-cell office:value-type="float" office:value="64.39016">
                <text:p>64.39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69.6777">
                <text:p>69.6777</text:p>
              </table:table-cell>
              <table:table-cell office:value-type="float" office:value="4.250875">
                <text:p>4.250875</text:p>
              </table:table-cell>
              <table:table-cell office:value-type="float" office:value="65.42682">
                <text:p>65.42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70.75571">
                <text:p>70.75571</text:p>
              </table:table-cell>
              <table:table-cell office:value-type="float" office:value="4.287673">
                <text:p>4.287673</text:p>
              </table:table-cell>
              <table:table-cell office:value-type="float" office:value="66.46804">
                <text:p>66.46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71.83847">
                <text:p>71.83847</text:p>
              </table:table-cell>
              <table:table-cell office:value-type="float" office:value="4.324852">
                <text:p>4.324852</text:p>
              </table:table-cell>
              <table:table-cell office:value-type="float" office:value="67.51362">
                <text:p>67.51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72.92628">
                <text:p>72.92628</text:p>
              </table:table-cell>
              <table:table-cell office:value-type="float" office:value="4.362705">
                <text:p>4.362705</text:p>
              </table:table-cell>
              <table:table-cell office:value-type="float" office:value="68.56358">
                <text:p>68.56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74.01938">
                <text:p>74.01938</text:p>
              </table:table-cell>
              <table:table-cell office:value-type="float" office:value="4.401305">
                <text:p>4.401305</text:p>
              </table:table-cell>
              <table:table-cell office:value-type="float" office:value="69.61808">
                <text:p>69.61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75.11789">
                <text:p>75.11789</text:p>
              </table:table-cell>
              <table:table-cell office:value-type="float" office:value="4.440526">
                <text:p>4.440526</text:p>
              </table:table-cell>
              <table:table-cell office:value-type="float" office:value="70.67736">
                <text:p>70.67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76.22165">
                <text:p>76.22165</text:p>
              </table:table-cell>
              <table:table-cell office:value-type="float" office:value="4.480324">
                <text:p>4.480324</text:p>
              </table:table-cell>
              <table:table-cell office:value-type="float" office:value="71.74132">
                <text:p>71.74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77.33068">
                <text:p>77.33068</text:p>
              </table:table-cell>
              <table:table-cell office:value-type="float" office:value="4.520706">
                <text:p>4.520706</text:p>
              </table:table-cell>
              <table:table-cell office:value-type="float" office:value="72.80998">
                <text:p>72.80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78.44511">
                <text:p>78.44511</text:p>
              </table:table-cell>
              <table:table-cell office:value-type="float" office:value="4.561728">
                <text:p>4.561728</text:p>
              </table:table-cell>
              <table:table-cell office:value-type="float" office:value="73.88338">
                <text:p>73.88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79.56493">
                <text:p>79.56493</text:p>
              </table:table-cell>
              <table:table-cell office:value-type="float" office:value="4.603315">
                <text:p>4.603315</text:p>
              </table:table-cell>
              <table:table-cell office:value-type="float" office:value="74.96162">
                <text:p>74.961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80.68994">
                <text:p>80.68994</text:p>
              </table:table-cell>
              <table:table-cell office:value-type="float" office:value="4.645375">
                <text:p>4.645375</text:p>
              </table:table-cell>
              <table:table-cell office:value-type="float" office:value="76.04456">
                <text:p>76.044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81.82074">
                <text:p>81.82074</text:p>
              </table:table-cell>
              <table:table-cell office:value-type="float" office:value="4.687826">
                <text:p>4.687826</text:p>
              </table:table-cell>
              <table:table-cell office:value-type="float" office:value="77.13292">
                <text:p>77.13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82.95712">
                <text:p>82.95712</text:p>
              </table:table-cell>
              <table:table-cell office:value-type="float" office:value="4.730608">
                <text:p>4.730608</text:p>
              </table:table-cell>
              <table:table-cell office:value-type="float" office:value="78.22652">
                <text:p>78.22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84.09859">
                <text:p>84.09859</text:p>
              </table:table-cell>
              <table:table-cell office:value-type="float" office:value="4.773731">
                <text:p>4.773731</text:p>
              </table:table-cell>
              <table:table-cell office:value-type="float" office:value="79.32486">
                <text:p>79.324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85.24504">
                <text:p>85.24504</text:p>
              </table:table-cell>
              <table:table-cell office:value-type="float" office:value="4.817203">
                <text:p>4.817203</text:p>
              </table:table-cell>
              <table:table-cell office:value-type="float" office:value="80.42784">
                <text:p>80.42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86.39724">
                <text:p>86.39724</text:p>
              </table:table-cell>
              <table:table-cell office:value-type="float" office:value="4.86104">
                <text:p>4.86104</text:p>
              </table:table-cell>
              <table:table-cell office:value-type="float" office:value="81.5362">
                <text:p>81.5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87.55473">
                <text:p>87.55473</text:p>
              </table:table-cell>
              <table:table-cell office:value-type="float" office:value="4.905239">
                <text:p>4.905239</text:p>
              </table:table-cell>
              <table:table-cell office:value-type="float" office:value="82.64949">
                <text:p>82.64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88.71793">
                <text:p>88.71793</text:p>
              </table:table-cell>
              <table:table-cell office:value-type="float" office:value="4.949801">
                <text:p>4.949801</text:p>
              </table:table-cell>
              <table:table-cell office:value-type="float" office:value="83.76813">
                <text:p>83.768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89.88668">
                <text:p>89.88668</text:p>
              </table:table-cell>
              <table:table-cell office:value-type="float" office:value="4.994737">
                <text:p>4.994737</text:p>
              </table:table-cell>
              <table:table-cell office:value-type="float" office:value="84.89194">
                <text:p>84.89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91.06156">
                <text:p>91.06156</text:p>
              </table:table-cell>
              <table:table-cell office:value-type="float" office:value="5.040286">
                <text:p>5.040286</text:p>
              </table:table-cell>
              <table:table-cell office:value-type="float" office:value="86.02128">
                <text:p>86.02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92.24258">
                <text:p>92.24258</text:p>
              </table:table-cell>
              <table:table-cell office:value-type="float" office:value="5.08691">
                <text:p>5.08691</text:p>
              </table:table-cell>
              <table:table-cell office:value-type="float" office:value="87.15567">
                <text:p>87.15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93.43051">
                <text:p>93.43051</text:p>
              </table:table-cell>
              <table:table-cell office:value-type="float" office:value="5.134676">
                <text:p>5.134676</text:p>
              </table:table-cell>
              <table:table-cell office:value-type="float" office:value="88.29583">
                <text:p>88.29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94.62428">
                <text:p>94.62428</text:p>
              </table:table-cell>
              <table:table-cell office:value-type="float" office:value="5.183391">
                <text:p>5.183391</text:p>
              </table:table-cell>
              <table:table-cell office:value-type="float" office:value="89.44089">
                <text:p>89.440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95.82381">
                <text:p>95.82381</text:p>
              </table:table-cell>
              <table:table-cell office:value-type="float" office:value="5.233003">
                <text:p>5.233003</text:p>
              </table:table-cell>
              <table:table-cell office:value-type="float" office:value="90.5908">
                <text:p>90.59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97.02908">
                <text:p>97.02908</text:p>
              </table:table-cell>
              <table:table-cell office:value-type="float" office:value="5.28344">
                <text:p>5.28344</text:p>
              </table:table-cell>
              <table:table-cell office:value-type="float" office:value="91.74564">
                <text:p>91.74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98.24009">
                <text:p>98.24009</text:p>
              </table:table-cell>
              <table:table-cell office:value-type="float" office:value="5.334671">
                <text:p>5.334671</text:p>
              </table:table-cell>
              <table:table-cell office:value-type="float" office:value="92.90542">
                <text:p>92.905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99.45712">
                <text:p>99.45712</text:p>
              </table:table-cell>
              <table:table-cell office:value-type="float" office:value="5.386694">
                <text:p>5.386694</text:p>
              </table:table-cell>
              <table:table-cell office:value-type="float" office:value="94.07042">
                <text:p>94.07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100.6799">
                <text:p>100.6799</text:p>
              </table:table-cell>
              <table:table-cell office:value-type="float" office:value="5.439459">
                <text:p>5.439459</text:p>
              </table:table-cell>
              <table:table-cell office:value-type="float" office:value="95.24045">
                <text:p>95.24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101.9087">
                <text:p>101.9087</text:p>
              </table:table-cell>
              <table:table-cell office:value-type="float" office:value="5.492986">
                <text:p>5.492986</text:p>
              </table:table-cell>
              <table:table-cell office:value-type="float" office:value="96.41575">
                <text:p>96.415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83caff" svg:stroke-linecap="round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052cm" svg:height="20.927cm" xlink:href=".." xlink:type="simple" chart:class="chart:scatter" chart:column-mapping="0 3 1 2" chart:style-name="ch1">
        <chart:title svg:x="17.293cm" svg:y="0.553cm" chart:style-name="ch2">
          <text:p>Si Losses</text:p>
        </chart:title>
        <chart:legend chart:legend-position="end" svg:x="32.765cm" svg:y="9.666cm" style:legend-expansion="high" chart:style-name="ch3"/>
        <chart:plot-area chart:style-name="ch4" table:cell-range-address="losses_summary.A2:losses_summary.A101 losses_summary.Q1:losses_summary.S101" chart:data-source-has-labels="row" svg:x="2.044cm" svg:y="1.872cm" svg:width="29.98cm" svg:height="17.364cm">
          <chart:coordinate-region svg:x="2.956cm" svg:y="2.071cm" svg:width="29.068cm" svg:height="16.111cm"/>
          <chart:axis chart:dimension="x" chart:name="primary-x" chart:style-name="ch5">
            <chart:title svg:x="15.212cm" svg:y="19.654cm" chart:style-name="ch6">
              <text:p>Load Power(W)</text:p>
            </chart:title>
            <chart:grid chart:style-name="ch7" chart:class="major"/>
          </chart:axis>
          <chart:axis chart:dimension="y" chart:name="primary-y" chart:style-name="ch8">
            <chart:title svg:x="0.451cm" svg:y="11.834cm" chart:style-name="ch9">
              <text:p>Losses(W)</text:p>
            </chart:title>
            <chart:grid chart:style-name="ch7" chart:class="major"/>
          </chart:axis>
          <chart:series chart:style-name="ch10" chart:values-cell-range-address="losses_summary.S2:losses_summary.S101" chart:label-cell-address="losses_summary.S1:losses_summary.S1" chart:class="chart:scatter">
            <chart:domain table:cell-range-address="losses_summary.A2:losses_summary.A101"/>
            <chart:data-point chart:repeated="100"/>
          </chart:series>
          <chart:series chart:style-name="ch11" chart:values-cell-range-address="losses_summary.Q2:losses_summary.Q101" chart:label-cell-address="losses_summary.Q1:losses_summary.Q1" chart:class="chart:scatter">
            <chart:data-point chart:repeated="100"/>
          </chart:series>
          <chart:series chart:style-name="ch12" chart:values-cell-range-address="losses_summary.R2:losses_summary.R101" chart:label-cell-address="losses_summary.R1:losses_summary.R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_total</text:p>
                <draw:g>
                  <svg:desc>losses_summary.S1:losses_summary.S1</svg:desc>
                </draw:g>
              </table:table-cell>
              <table:table-cell office:value-type="string">
                <text:p>Si_conduction</text:p>
                <draw:g>
                  <svg:desc>losses_summary.Q1:losses_summary.Q1</svg:desc>
                </draw:g>
              </table:table-cell>
              <table:table-cell office:value-type="string">
                <text:p>Si_switching</text:p>
                <draw:g>
                  <svg:desc>losses_summary.R1:losses_summary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0.353098157078724">
                <text:p>0.353098157078724</text:p>
                <draw:g>
                  <svg:desc>losses_summary.S2:losses_summary.S101</svg:desc>
                </draw:g>
              </table:table-cell>
              <table:table-cell office:value-type="float" office:value="0.351104900816489">
                <text:p>0.351104900816489</text:p>
                <draw:g>
                  <svg:desc>losses_summary.Q2:losses_summary.Q101</svg:desc>
                </draw:g>
              </table:table-cell>
              <table:table-cell office:value-type="float" office:value="0.00199325626238002">
                <text:p>0.00199325626238002</text:p>
                <draw:g>
                  <svg:desc>losses_summary.R2:losses_summary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22711922142738">
                <text:p>0.422711922142738</text:p>
              </table:table-cell>
              <table:table-cell office:value-type="float" office:value="0.42074664241102">
                <text:p>0.42074664241102</text:p>
              </table:table-cell>
              <table:table-cell office:value-type="float" office:value="0.0019652797321663">
                <text:p>0.001965279732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508185963635365">
                <text:p>0.508185963635365</text:p>
              </table:table-cell>
              <table:table-cell office:value-type="float" office:value="0.506256945667527">
                <text:p>0.506256945667527</text:p>
              </table:table-cell>
              <table:table-cell office:value-type="float" office:value="0.00192901796844545">
                <text:p>0.00192901796844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609791985024823">
                <text:p>0.609791985024823</text:p>
              </table:table-cell>
              <table:table-cell office:value-type="float" office:value="0.607896008878813">
                <text:p>0.607896008878813</text:p>
              </table:table-cell>
              <table:table-cell office:value-type="float" office:value="0.00189597614683527">
                <text:p>0.00189597614683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7254062">
                <text:p>0.7254062</text:p>
              </table:table-cell>
              <table:table-cell office:value-type="float" office:value="0.7235861">
                <text:p>0.7235861</text:p>
              </table:table-cell>
              <table:table-cell office:value-type="float" office:value="0.001820053">
                <text:p>0.001820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816504296621965">
                <text:p>0.816504296621965</text:p>
              </table:table-cell>
              <table:table-cell office:value-type="float" office:value="0.814906534325376">
                <text:p>0.814906534325376</text:p>
              </table:table-cell>
              <table:table-cell office:value-type="float" office:value="0.0015977622951063">
                <text:p>0.0015977622951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9388483">
                <text:p>0.9388483</text:p>
              </table:table-cell>
              <table:table-cell office:value-type="float" office:value="0.9372921">
                <text:p>0.9372921</text:p>
              </table:table-cell>
              <table:table-cell office:value-type="float" office:value="0.001556188">
                <text:p>0.001556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054102">
                <text:p>1.054102</text:p>
              </table:table-cell>
              <table:table-cell office:value-type="float" office:value="1.052493">
                <text:p>1.052493</text:p>
              </table:table-cell>
              <table:table-cell office:value-type="float" office:value="0.001609294">
                <text:p>0.001609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.17744">
                <text:p>1.17744</text:p>
              </table:table-cell>
              <table:table-cell office:value-type="float" office:value="1.175841">
                <text:p>1.175841</text:p>
              </table:table-cell>
              <table:table-cell office:value-type="float" office:value="0.001599582">
                <text:p>0.001599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.303756">
                <text:p>1.303756</text:p>
              </table:table-cell>
              <table:table-cell office:value-type="float" office:value="1.302484">
                <text:p>1.302484</text:p>
              </table:table-cell>
              <table:table-cell office:value-type="float" office:value="0.001272077">
                <text:p>0.001272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1.431123">
                <text:p>1.431123</text:p>
              </table:table-cell>
              <table:table-cell office:value-type="float" office:value="1.430377">
                <text:p>1.430377</text:p>
              </table:table-cell>
              <table:table-cell office:value-type="float" office:value="0.0007460934">
                <text:p>0.0007460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.561608">
                <text:p>1.561608</text:p>
              </table:table-cell>
              <table:table-cell office:value-type="float" office:value="1.560483">
                <text:p>1.560483</text:p>
              </table:table-cell>
              <table:table-cell office:value-type="float" office:value="0.001125508">
                <text:p>0.001125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1.694906">
                <text:p>1.694906</text:p>
              </table:table-cell>
              <table:table-cell office:value-type="float" office:value="1.693314">
                <text:p>1.693314</text:p>
              </table:table-cell>
              <table:table-cell office:value-type="float" office:value="0.001592759">
                <text:p>0.001592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.827763">
                <text:p>1.827763</text:p>
              </table:table-cell>
              <table:table-cell office:value-type="float" office:value="1.826416">
                <text:p>1.826416</text:p>
              </table:table-cell>
              <table:table-cell office:value-type="float" office:value="0.001347687">
                <text:p>0.001347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1.960935">
                <text:p>1.960935</text:p>
              </table:table-cell>
              <table:table-cell office:value-type="float" office:value="1.960068">
                <text:p>1.960068</text:p>
              </table:table-cell>
              <table:table-cell office:value-type="float" office:value="0.0008671656">
                <text:p>0.0008671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.094439">
                <text:p>2.094439</text:p>
              </table:table-cell>
              <table:table-cell office:value-type="float" office:value="2.094079">
                <text:p>2.094079</text:p>
              </table:table-cell>
              <table:table-cell office:value-type="float" office:value="0.0003595766">
                <text:p>0.0003595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2.229889">
                <text:p>2.229889</text:p>
              </table:table-cell>
              <table:table-cell office:value-type="float" office:value="2.229539">
                <text:p>2.229539</text:p>
              </table:table-cell>
              <table:table-cell office:value-type="float" office:value="0.0003499901">
                <text:p>0.0003499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2.366241">
                <text:p>2.366241</text:p>
              </table:table-cell>
              <table:table-cell office:value-type="float" office:value="2.36598">
                <text:p>2.36598</text:p>
              </table:table-cell>
              <table:table-cell office:value-type="float" office:value="0.0002603136">
                <text:p>0.000260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2.503392">
                <text:p>2.503392</text:p>
              </table:table-cell>
              <table:table-cell office:value-type="float" office:value="2.503257">
                <text:p>2.503257</text:p>
              </table:table-cell>
              <table:table-cell office:value-type="float" office:value="0.0001353572">
                <text:p>0.0001353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2.641621">
                <text:p>2.641621</text:p>
              </table:table-cell>
              <table:table-cell office:value-type="float" office:value="2.641361">
                <text:p>2.641361</text:p>
              </table:table-cell>
              <table:table-cell office:value-type="float" office:value="0.0002602985">
                <text:p>0.0002602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2.780305">
                <text:p>2.780305</text:p>
              </table:table-cell>
              <table:table-cell office:value-type="float" office:value="2.77995">
                <text:p>2.77995</text:p>
              </table:table-cell>
              <table:table-cell office:value-type="float" office:value="0.0003550987">
                <text:p>0.0003550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2.919601">
                <text:p>2.919601</text:p>
              </table:table-cell>
              <table:table-cell office:value-type="float" office:value="2.919265">
                <text:p>2.919265</text:p>
              </table:table-cell>
              <table:table-cell office:value-type="float" office:value="0.0003364294">
                <text:p>0.0003364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3.060152">
                <text:p>3.060152</text:p>
              </table:table-cell>
              <table:table-cell office:value-type="float" office:value="3.059456">
                <text:p>3.059456</text:p>
              </table:table-cell>
              <table:table-cell office:value-type="float" office:value="0.0006962313">
                <text:p>0.0006962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3.201114">
                <text:p>3.201114</text:p>
              </table:table-cell>
              <table:table-cell office:value-type="float" office:value="3.200276">
                <text:p>3.200276</text:p>
              </table:table-cell>
              <table:table-cell office:value-type="float" office:value="0.0008379703">
                <text:p>0.0008379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3.342572">
                <text:p>3.342572</text:p>
              </table:table-cell>
              <table:table-cell office:value-type="float" office:value="3.342018">
                <text:p>3.342018</text:p>
              </table:table-cell>
              <table:table-cell office:value-type="float" office:value="0.0005540931">
                <text:p>0.0005540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3.484975">
                <text:p>3.484975</text:p>
              </table:table-cell>
              <table:table-cell office:value-type="float" office:value="3.484651">
                <text:p>3.484651</text:p>
              </table:table-cell>
              <table:table-cell office:value-type="float" office:value="0.0003244105">
                <text:p>0.0003244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3.627712">
                <text:p>3.627712</text:p>
              </table:table-cell>
              <table:table-cell office:value-type="float" office:value="3.627587">
                <text:p>3.627587</text:p>
              </table:table-cell>
              <table:table-cell office:value-type="float" office:value="0.0001244322">
                <text:p>0.00012443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3.771196">
                <text:p>3.771196</text:p>
              </table:table-cell>
              <table:table-cell office:value-type="float" office:value="3.77115">
                <text:p>3.77115</text:p>
              </table:table-cell>
              <table:table-cell office:value-type="float" office:value="0.00004676148">
                <text:p>0.00004676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3.914755">
                <text:p>3.914755</text:p>
              </table:table-cell>
              <table:table-cell office:value-type="float" office:value="3.914708">
                <text:p>3.914708</text:p>
              </table:table-cell>
              <table:table-cell office:value-type="float" office:value="0.00004672922">
                <text:p>0.000046729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4.058576">
                <text:p>4.058576</text:p>
              </table:table-cell>
              <table:table-cell office:value-type="float" office:value="4.058529">
                <text:p>4.058529</text:p>
              </table:table-cell>
              <table:table-cell office:value-type="float" office:value="0.00004669884">
                <text:p>0.00004669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4.202861">
                <text:p>4.202861</text:p>
              </table:table-cell>
              <table:table-cell office:value-type="float" office:value="4.202815">
                <text:p>4.202815</text:p>
              </table:table-cell>
              <table:table-cell office:value-type="float" office:value="0.00004667175">
                <text:p>0.00004667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4.347441">
                <text:p>4.347441</text:p>
              </table:table-cell>
              <table:table-cell office:value-type="float" office:value="4.347362">
                <text:p>4.347362</text:p>
              </table:table-cell>
              <table:table-cell office:value-type="float" office:value="0.00007835512">
                <text:p>0.00007835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4.492659">
                <text:p>4.492659</text:p>
              </table:table-cell>
              <table:table-cell office:value-type="float" office:value="4.492395">
                <text:p>4.492395</text:p>
              </table:table-cell>
              <table:table-cell office:value-type="float" office:value="0.0002642587">
                <text:p>0.0002642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4.638021">
                <text:p>4.638021</text:p>
              </table:table-cell>
              <table:table-cell office:value-type="float" office:value="4.637715">
                <text:p>4.637715</text:p>
              </table:table-cell>
              <table:table-cell office:value-type="float" office:value="0.0003059354">
                <text:p>0.0003059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4.783233">
                <text:p>4.783233</text:p>
              </table:table-cell>
              <table:table-cell office:value-type="float" office:value="4.782929">
                <text:p>4.782929</text:p>
              </table:table-cell>
              <table:table-cell office:value-type="float" office:value="0.0003039783">
                <text:p>0.0003039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4.928186">
                <text:p>4.928186</text:p>
              </table:table-cell>
              <table:table-cell office:value-type="float" office:value="4.928054">
                <text:p>4.928054</text:p>
              </table:table-cell>
              <table:table-cell office:value-type="float" office:value="0.0001318261">
                <text:p>0.0001318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5.07313">
                <text:p>5.07313</text:p>
              </table:table-cell>
              <table:table-cell office:value-type="float" office:value="5.073083">
                <text:p>5.073083</text:p>
              </table:table-cell>
              <table:table-cell office:value-type="float" office:value="0.00004654007">
                <text:p>0.00004654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5.218081">
                <text:p>5.218081</text:p>
              </table:table-cell>
              <table:table-cell office:value-type="float" office:value="5.218034">
                <text:p>5.218034</text:p>
              </table:table-cell>
              <table:table-cell office:value-type="float" office:value="0.00004651165">
                <text:p>0.00004651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5.363261">
                <text:p>5.363261</text:p>
              </table:table-cell>
              <table:table-cell office:value-type="float" office:value="5.363215">
                <text:p>5.363215</text:p>
              </table:table-cell>
              <table:table-cell office:value-type="float" office:value="0.00004648469">
                <text:p>0.000046484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5.508669">
                <text:p>5.508669</text:p>
              </table:table-cell>
              <table:table-cell office:value-type="float" office:value="5.508622">
                <text:p>5.508622</text:p>
              </table:table-cell>
              <table:table-cell office:value-type="float" office:value="0.000046459">
                <text:p>0.000046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5.654305">
                <text:p>5.654305</text:p>
              </table:table-cell>
              <table:table-cell office:value-type="float" office:value="5.654258">
                <text:p>5.654258</text:p>
              </table:table-cell>
              <table:table-cell office:value-type="float" office:value="0.00004643795">
                <text:p>0.00004643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5.800081">
                <text:p>5.800081</text:p>
              </table:table-cell>
              <table:table-cell office:value-type="float" office:value="5.800034">
                <text:p>5.800034</text:p>
              </table:table-cell>
              <table:table-cell office:value-type="float" office:value="0.0000464252">
                <text:p>0.0000464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5.946152">
                <text:p>5.946152</text:p>
              </table:table-cell>
              <table:table-cell office:value-type="float" office:value="5.946105">
                <text:p>5.946105</text:p>
              </table:table-cell>
              <table:table-cell office:value-type="float" office:value="0.00004641792">
                <text:p>0.00004641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6.092708">
                <text:p>6.092708</text:p>
              </table:table-cell>
              <table:table-cell office:value-type="float" office:value="6.092662">
                <text:p>6.092662</text:p>
              </table:table-cell>
              <table:table-cell office:value-type="float" office:value="0.00004640906">
                <text:p>0.00004640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6.239606">
                <text:p>6.239606</text:p>
              </table:table-cell>
              <table:table-cell office:value-type="float" office:value="6.23956">
                <text:p>6.23956</text:p>
              </table:table-cell>
              <table:table-cell office:value-type="float" office:value="0.00004639477">
                <text:p>0.00004639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6.386592">
                <text:p>6.386592</text:p>
              </table:table-cell>
              <table:table-cell office:value-type="float" office:value="6.386546">
                <text:p>6.386546</text:p>
              </table:table-cell>
              <table:table-cell office:value-type="float" office:value="0.00004638219">
                <text:p>0.00004638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6.533184">
                <text:p>6.533184</text:p>
              </table:table-cell>
              <table:table-cell office:value-type="float" office:value="6.533138">
                <text:p>6.533138</text:p>
              </table:table-cell>
              <table:table-cell office:value-type="float" office:value="0.00004637523">
                <text:p>0.000046375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6.679446">
                <text:p>6.679446</text:p>
              </table:table-cell>
              <table:table-cell office:value-type="float" office:value="6.6794">
                <text:p>6.6794</text:p>
              </table:table-cell>
              <table:table-cell office:value-type="float" office:value="0.00004637139">
                <text:p>0.00004637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6.826704">
                <text:p>6.826704</text:p>
              </table:table-cell>
              <table:table-cell office:value-type="float" office:value="6.826658">
                <text:p>6.826658</text:p>
              </table:table-cell>
              <table:table-cell office:value-type="float" office:value="0.00004638127">
                <text:p>0.00004638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6.973126">
                <text:p>6.973126</text:p>
              </table:table-cell>
              <table:table-cell office:value-type="float" office:value="6.97308">
                <text:p>6.97308</text:p>
              </table:table-cell>
              <table:table-cell office:value-type="float" office:value="0.00004640011">
                <text:p>0.00004640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7.1194">
                <text:p>7.1194</text:p>
              </table:table-cell>
              <table:table-cell office:value-type="float" office:value="7.119275">
                <text:p>7.119275</text:p>
              </table:table-cell>
              <table:table-cell office:value-type="float" office:value="0.0001242277">
                <text:p>0.0001242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7.265423">
                <text:p>7.265423</text:p>
              </table:table-cell>
              <table:table-cell office:value-type="float" office:value="7.265377">
                <text:p>7.265377</text:p>
              </table:table-cell>
              <table:table-cell office:value-type="float" office:value="0.0000464386">
                <text:p>0.00004643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7.41181">
                <text:p>7.41181</text:p>
              </table:table-cell>
              <table:table-cell office:value-type="float" office:value="7.411764">
                <text:p>7.411764</text:p>
              </table:table-cell>
              <table:table-cell office:value-type="float" office:value="0.0000464394">
                <text:p>0.0000464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7.558595">
                <text:p>7.558595</text:p>
              </table:table-cell>
              <table:table-cell office:value-type="float" office:value="7.558548">
                <text:p>7.558548</text:p>
              </table:table-cell>
              <table:table-cell office:value-type="float" office:value="0.00004644292">
                <text:p>0.00004644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7.705842">
                <text:p>7.705842</text:p>
              </table:table-cell>
              <table:table-cell office:value-type="float" office:value="7.705782">
                <text:p>7.705782</text:p>
              </table:table-cell>
              <table:table-cell office:value-type="float" office:value="0.00005981112">
                <text:p>0.00005981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7.854009">
                <text:p>7.854009</text:p>
              </table:table-cell>
              <table:table-cell office:value-type="float" office:value="7.853962">
                <text:p>7.853962</text:p>
              </table:table-cell>
              <table:table-cell office:value-type="float" office:value="0.00004645942">
                <text:p>0.000046459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8.001748">
                <text:p>8.001748</text:p>
              </table:table-cell>
              <table:table-cell office:value-type="float" office:value="8.001702">
                <text:p>8.001702</text:p>
              </table:table-cell>
              <table:table-cell office:value-type="float" office:value="0.00004647226">
                <text:p>0.00004647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8.14969">
                <text:p>8.14969</text:p>
              </table:table-cell>
              <table:table-cell office:value-type="float" office:value="8.149612">
                <text:p>8.149612</text:p>
              </table:table-cell>
              <table:table-cell office:value-type="float" office:value="0.00007792319">
                <text:p>0.00007792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8.297817">
                <text:p>8.297817</text:p>
              </table:table-cell>
              <table:table-cell office:value-type="float" office:value="8.297771">
                <text:p>8.297771</text:p>
              </table:table-cell>
              <table:table-cell office:value-type="float" office:value="0.00004650965">
                <text:p>0.00004650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8.445956">
                <text:p>8.445956</text:p>
              </table:table-cell>
              <table:table-cell office:value-type="float" office:value="8.445909">
                <text:p>8.445909</text:p>
              </table:table-cell>
              <table:table-cell office:value-type="float" office:value="0.00004650943">
                <text:p>0.00004650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8.594412">
                <text:p>8.594412</text:p>
              </table:table-cell>
              <table:table-cell office:value-type="float" office:value="8.594366">
                <text:p>8.594366</text:p>
              </table:table-cell>
              <table:table-cell office:value-type="float" office:value="0.00004650764">
                <text:p>0.000046507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8.743146">
                <text:p>8.743146</text:p>
              </table:table-cell>
              <table:table-cell office:value-type="float" office:value="8.743099">
                <text:p>8.743099</text:p>
              </table:table-cell>
              <table:table-cell office:value-type="float" office:value="0.00004650486">
                <text:p>0.000046504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8.892171">
                <text:p>8.892171</text:p>
              </table:table-cell>
              <table:table-cell office:value-type="float" office:value="8.892124">
                <text:p>8.892124</text:p>
              </table:table-cell>
              <table:table-cell office:value-type="float" office:value="0.00004650275">
                <text:p>0.00004650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9.041331">
                <text:p>9.041331</text:p>
              </table:table-cell>
              <table:table-cell office:value-type="float" office:value="9.041284">
                <text:p>9.041284</text:p>
              </table:table-cell>
              <table:table-cell office:value-type="float" office:value="0.00004650084">
                <text:p>0.00004650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9.190685">
                <text:p>9.190685</text:p>
              </table:table-cell>
              <table:table-cell office:value-type="float" office:value="9.190639">
                <text:p>9.190639</text:p>
              </table:table-cell>
              <table:table-cell office:value-type="float" office:value="0.00004649899">
                <text:p>0.000046498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9.340294">
                <text:p>9.340294</text:p>
              </table:table-cell>
              <table:table-cell office:value-type="float" office:value="9.340248">
                <text:p>9.340248</text:p>
              </table:table-cell>
              <table:table-cell office:value-type="float" office:value="0.00004649714">
                <text:p>0.00004649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9.490085">
                <text:p>9.490085</text:p>
              </table:table-cell>
              <table:table-cell office:value-type="float" office:value="9.490025">
                <text:p>9.490025</text:p>
              </table:table-cell>
              <table:table-cell office:value-type="float" office:value="0.00005999343">
                <text:p>0.000059993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9.640223">
                <text:p>9.640223</text:p>
              </table:table-cell>
              <table:table-cell office:value-type="float" office:value="9.640176">
                <text:p>9.640176</text:p>
              </table:table-cell>
              <table:table-cell office:value-type="float" office:value="0.00004649325">
                <text:p>0.000046493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9.790638">
                <text:p>9.790638</text:p>
              </table:table-cell>
              <table:table-cell office:value-type="float" office:value="9.790592">
                <text:p>9.790592</text:p>
              </table:table-cell>
              <table:table-cell office:value-type="float" office:value="0.00004649069">
                <text:p>0.000046490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9.94133">
                <text:p>9.94133</text:p>
              </table:table-cell>
              <table:table-cell office:value-type="float" office:value="9.941253">
                <text:p>9.941253</text:p>
              </table:table-cell>
              <table:table-cell office:value-type="float" office:value="0.00007771677">
                <text:p>0.00007771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10.09224">
                <text:p>10.09224</text:p>
              </table:table-cell>
              <table:table-cell office:value-type="float" office:value="10.09219">
                <text:p>10.09219</text:p>
              </table:table-cell>
              <table:table-cell office:value-type="float" office:value="0.00004648359">
                <text:p>0.00004648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10.24346">
                <text:p>10.24346</text:p>
              </table:table-cell>
              <table:table-cell office:value-type="float" office:value="10.24341">
                <text:p>10.24341</text:p>
              </table:table-cell>
              <table:table-cell office:value-type="float" office:value="0.00004646651">
                <text:p>0.00004646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10.39493">
                <text:p>10.39493</text:p>
              </table:table-cell>
              <table:table-cell office:value-type="float" office:value="10.39488">
                <text:p>10.39488</text:p>
              </table:table-cell>
              <table:table-cell office:value-type="float" office:value="0.00004645633">
                <text:p>0.00004645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10.54669">
                <text:p>10.54669</text:p>
              </table:table-cell>
              <table:table-cell office:value-type="float" office:value="10.54665">
                <text:p>10.54665</text:p>
              </table:table-cell>
              <table:table-cell office:value-type="float" office:value="0.00004644544">
                <text:p>0.000046445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10.69879">
                <text:p>10.69879</text:p>
              </table:table-cell>
              <table:table-cell office:value-type="float" office:value="10.69874">
                <text:p>10.69874</text:p>
              </table:table-cell>
              <table:table-cell office:value-type="float" office:value="0.00004643423">
                <text:p>0.00004643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10.85119">
                <text:p>10.85119</text:p>
              </table:table-cell>
              <table:table-cell office:value-type="float" office:value="10.85115">
                <text:p>10.85115</text:p>
              </table:table-cell>
              <table:table-cell office:value-type="float" office:value="0.00004642241">
                <text:p>0.000046422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11.00396">
                <text:p>11.00396</text:p>
              </table:table-cell>
              <table:table-cell office:value-type="float" office:value="11.00392">
                <text:p>11.00392</text:p>
              </table:table-cell>
              <table:table-cell office:value-type="float" office:value="0.00004641059">
                <text:p>0.00004641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11.15705">
                <text:p>11.15705</text:p>
              </table:table-cell>
              <table:table-cell office:value-type="float" office:value="11.15701">
                <text:p>11.15701</text:p>
              </table:table-cell>
              <table:table-cell office:value-type="float" office:value="0.00004639724">
                <text:p>0.00004639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11.31041">
                <text:p>11.31041</text:p>
              </table:table-cell>
              <table:table-cell office:value-type="float" office:value="11.31037">
                <text:p>11.31037</text:p>
              </table:table-cell>
              <table:table-cell office:value-type="float" office:value="0.00004638435">
                <text:p>0.00004638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11.46401">
                <text:p>11.46401</text:p>
              </table:table-cell>
              <table:table-cell office:value-type="float" office:value="11.46397">
                <text:p>11.46397</text:p>
              </table:table-cell>
              <table:table-cell office:value-type="float" office:value="0.00004637051">
                <text:p>0.00004637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11.61786">
                <text:p>11.61786</text:p>
              </table:table-cell>
              <table:table-cell office:value-type="float" office:value="11.61781">
                <text:p>11.61781</text:p>
              </table:table-cell>
              <table:table-cell office:value-type="float" office:value="0.00004635675">
                <text:p>0.000046356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11.7719">
                <text:p>11.7719</text:p>
              </table:table-cell>
              <table:table-cell office:value-type="float" office:value="11.77186">
                <text:p>11.77186</text:p>
              </table:table-cell>
              <table:table-cell office:value-type="float" office:value="0.00004634272">
                <text:p>0.00004634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11.92618">
                <text:p>11.92618</text:p>
              </table:table-cell>
              <table:table-cell office:value-type="float" office:value="11.92613">
                <text:p>11.92613</text:p>
              </table:table-cell>
              <table:table-cell office:value-type="float" office:value="0.00004632838">
                <text:p>0.000046328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12.0807">
                <text:p>12.0807</text:p>
              </table:table-cell>
              <table:table-cell office:value-type="float" office:value="12.08065">
                <text:p>12.08065</text:p>
              </table:table-cell>
              <table:table-cell office:value-type="float" office:value="0.00004631363">
                <text:p>0.000046313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12.2354">
                <text:p>12.2354</text:p>
              </table:table-cell>
              <table:table-cell office:value-type="float" office:value="12.23535">
                <text:p>12.23535</text:p>
              </table:table-cell>
              <table:table-cell office:value-type="float" office:value="0.00004629909">
                <text:p>0.00004629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12.39025">
                <text:p>12.39025</text:p>
              </table:table-cell>
              <table:table-cell office:value-type="float" office:value="12.3902">
                <text:p>12.3902</text:p>
              </table:table-cell>
              <table:table-cell office:value-type="float" office:value="0.00004628407">
                <text:p>0.00004628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12.54531">
                <text:p>12.54531</text:p>
              </table:table-cell>
              <table:table-cell office:value-type="float" office:value="12.54526">
                <text:p>12.54526</text:p>
              </table:table-cell>
              <table:table-cell office:value-type="float" office:value="0.00004626909">
                <text:p>0.000046269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12.70047">
                <text:p>12.70047</text:p>
              </table:table-cell>
              <table:table-cell office:value-type="float" office:value="12.70042">
                <text:p>12.70042</text:p>
              </table:table-cell>
              <table:table-cell office:value-type="float" office:value="0.00004625403">
                <text:p>0.000046254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12.85576">
                <text:p>12.85576</text:p>
              </table:table-cell>
              <table:table-cell office:value-type="float" office:value="12.85571">
                <text:p>12.85571</text:p>
              </table:table-cell>
              <table:table-cell office:value-type="float" office:value="0.00004623825">
                <text:p>0.000046238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13.01111">
                <text:p>13.01111</text:p>
              </table:table-cell>
              <table:table-cell office:value-type="float" office:value="13.01107">
                <text:p>13.01107</text:p>
              </table:table-cell>
              <table:table-cell office:value-type="float" office:value="0.00004622233">
                <text:p>0.00004622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13.16648">
                <text:p>13.16648</text:p>
              </table:table-cell>
              <table:table-cell office:value-type="float" office:value="13.16644">
                <text:p>13.16644</text:p>
              </table:table-cell>
              <table:table-cell office:value-type="float" office:value="0.00004620688">
                <text:p>0.00004620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13.32188">
                <text:p>13.32188</text:p>
              </table:table-cell>
              <table:table-cell office:value-type="float" office:value="13.32183">
                <text:p>13.32183</text:p>
              </table:table-cell>
              <table:table-cell office:value-type="float" office:value="0.00004619067">
                <text:p>0.000046190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13.47734">
                <text:p>13.47734</text:p>
              </table:table-cell>
              <table:table-cell office:value-type="float" office:value="13.4773">
                <text:p>13.4773</text:p>
              </table:table-cell>
              <table:table-cell office:value-type="float" office:value="0.0000461754">
                <text:p>0.00004617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13.63269">
                <text:p>13.63269</text:p>
              </table:table-cell>
              <table:table-cell office:value-type="float" office:value="13.63265">
                <text:p>13.63265</text:p>
              </table:table-cell>
              <table:table-cell office:value-type="float" office:value="0.0000461587">
                <text:p>0.0000461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13.78798">
                <text:p>13.78798</text:p>
              </table:table-cell>
              <table:table-cell office:value-type="float" office:value="13.78794">
                <text:p>13.78794</text:p>
              </table:table-cell>
              <table:table-cell office:value-type="float" office:value="0.00004614258">
                <text:p>0.00004614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13.9432">
                <text:p>13.9432</text:p>
              </table:table-cell>
              <table:table-cell office:value-type="float" office:value="13.94315">
                <text:p>13.94315</text:p>
              </table:table-cell>
              <table:table-cell office:value-type="float" office:value="0.00004612585">
                <text:p>0.000046125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14.09839">
                <text:p>14.09839</text:p>
              </table:table-cell>
              <table:table-cell office:value-type="float" office:value="14.09834">
                <text:p>14.09834</text:p>
              </table:table-cell>
              <table:table-cell office:value-type="float" office:value="0.00004610927">
                <text:p>0.00004610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14.25361">
                <text:p>14.25361</text:p>
              </table:table-cell>
              <table:table-cell office:value-type="float" office:value="14.25356">
                <text:p>14.25356</text:p>
              </table:table-cell>
              <table:table-cell office:value-type="float" office:value="0.00004609301">
                <text:p>0.00004609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14.40881">
                <text:p>14.40881</text:p>
              </table:table-cell>
              <table:table-cell office:value-type="float" office:value="14.40876">
                <text:p>14.40876</text:p>
              </table:table-cell>
              <table:table-cell office:value-type="float" office:value="0.00004607605">
                <text:p>0.00004607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14.56409">
                <text:p>14.56409</text:p>
              </table:table-cell>
              <table:table-cell office:value-type="float" office:value="14.56404">
                <text:p>14.56404</text:p>
              </table:table-cell>
              <table:table-cell office:value-type="float" office:value="0.00004605945">
                <text:p>0.000046059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82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8.612cm" svg:height="23.211cm" xlink:href=".." xlink:type="simple" chart:class="chart:scatter" chart:style-name="ch1">
        <chart:title svg:x="16.777cm" svg:y="0.599cm" chart:style-name="ch2">
          <text:p>Lossess_summary%</text:p>
        </chart:title>
        <chart:legend chart:legend-position="end" svg:x="35.495cm" svg:y="10.31cm" style:legend-expansion="high" chart:style-name="ch3"/>
        <chart:plot-area chart:style-name="ch4" table:cell-range-address="losses_summary.A1:losses_summary.A101 losses_summary.V1:losses_summary.Z101" chart:data-source-has-labels="row" svg:x="2.075cm" svg:y="1.964cm" svg:width="32.648cm" svg:height="19.51cm">
          <chart:coordinate-region svg:x="2.696cm" svg:y="2.163cm" svg:width="32.027cm" svg:height="18.257cm"/>
          <chart:axis chart:dimension="x" chart:name="primary-x" chart:style-name="ch5">
            <chart:title svg:x="16.577cm" svg:y="21.938cm" chart:style-name="ch6">
              <text:p>Load Power(W)</text:p>
            </chart:title>
            <chart:grid chart:style-name="ch7" chart:class="major"/>
          </chart:axis>
          <chart:axis chart:dimension="y" chart:name="primary-y" chart:style-name="ch8">
            <chart:title svg:x="0.451cm" svg:y="13.885cm" chart:style-name="ch9">
              <text:p>Losses (%) of total</text:p>
            </chart:title>
            <chart:grid chart:style-name="ch7" chart:class="major"/>
          </chart:axis>
          <chart:series chart:style-name="ch10" chart:values-cell-range-address="losses_summary.V2:losses_summary.V101" chart:label-cell-address="losses_summary.V1:losses_summary.V1" chart:class="chart:scatter">
            <chart:domain table:cell-range-address="losses_summary.A2:losses_summary.A101"/>
            <chart:data-point chart:repeated="100"/>
          </chart:series>
          <chart:series chart:style-name="ch11" chart:values-cell-range-address="losses_summary.W2:losses_summary.W101" chart:label-cell-address="losses_summary.W1:losses_summary.W1" chart:class="chart:scatter">
            <chart:data-point chart:repeated="100"/>
          </chart:series>
          <chart:series chart:style-name="ch12" chart:values-cell-range-address="losses_summary.X2:losses_summary.X101" chart:label-cell-address="losses_summary.X1:losses_summary.X1" chart:class="chart:scatter">
            <chart:data-point chart:repeated="100"/>
          </chart:series>
          <chart:series chart:style-name="ch13" chart:values-cell-range-address="losses_summary.Y2:losses_summary.Y101" chart:label-cell-address="losses_summary.Y1:losses_summary.Y1" chart:class="chart:scatter">
            <chart:data-point chart:repeated="100"/>
          </chart:series>
          <chart:series chart:style-name="ch14" chart:values-cell-range-address="losses_summary.Z2:losses_summary.Z101" chart:label-cell-address="losses_summary.Z1:losses_summary.Z1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aN%</text:p>
                <draw:g>
                  <svg:desc>losses_summary.V1:losses_summary.V1</svg:desc>
                </draw:g>
              </table:table-cell>
              <table:table-cell office:value-type="string">
                <text:p>L%</text:p>
                <draw:g>
                  <svg:desc>losses_summary.W1:losses_summary.W1</svg:desc>
                </draw:g>
              </table:table-cell>
              <table:table-cell office:value-type="string">
                <text:p>Si%</text:p>
                <draw:g>
                  <svg:desc>losses_summary.X1:losses_summary.X1</svg:desc>
                </draw:g>
              </table:table-cell>
              <table:table-cell office:value-type="string">
                <text:p>Capacitor%</text:p>
                <draw:g>
                  <svg:desc>losses_summary.Y1:losses_summary.Y1</svg:desc>
                </draw:g>
              </table:table-cell>
              <table:table-cell office:value-type="string">
                <text:p>EMI%</text:p>
                <draw:g>
                  <svg:desc>losses_summary.Z1:losses_summary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losses_summary.A2:losses_summary.A101</svg:desc>
                </draw:g>
              </table:table-cell>
              <table:table-cell office:value-type="float" office:value="61.7762367018592">
                <text:p>61.7762367018592</text:p>
                <draw:g>
                  <svg:desc>losses_summary.V2:losses_summary.V101</svg:desc>
                </draw:g>
              </table:table-cell>
              <table:table-cell office:value-type="float" office:value="22.6775466161274">
                <text:p>22.6775466161274</text:p>
                <draw:g>
                  <svg:desc>losses_summary.W2:losses_summary.W101</svg:desc>
                </draw:g>
              </table:table-cell>
              <table:table-cell office:value-type="float" office:value="4.43550349150225">
                <text:p>4.43550349150225</text:p>
                <draw:g>
                  <svg:desc>losses_summary.X2:losses_summary.X101</svg:desc>
                </draw:g>
              </table:table-cell>
              <table:table-cell office:value-type="float" office:value="10.1975654465305">
                <text:p>10.1975654465305</text:p>
                <draw:g>
                  <svg:desc>losses_summary.Y2:losses_summary.Y101</svg:desc>
                </draw:g>
              </table:table-cell>
              <table:table-cell office:value-type="float" office:value="0.913147744011461">
                <text:p>0.913147744011461</text:p>
                <draw:g>
                  <svg:desc>losses_summary.Z2:losses_summary.Z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2.8570152557861">
                <text:p>62.8570152557861</text:p>
              </table:table-cell>
              <table:table-cell office:value-type="float" office:value="21.6919094107704">
                <text:p>21.6919094107704</text:p>
              </table:table-cell>
              <table:table-cell office:value-type="float" office:value="5.0805004965116">
                <text:p>5.0805004965116</text:p>
              </table:table-cell>
              <table:table-cell office:value-type="float" office:value="9.77100230877903">
                <text:p>9.77100230877903</text:p>
              </table:table-cell>
              <table:table-cell office:value-type="float" office:value="0.599572528241086">
                <text:p>0.599572528241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64.1785433575535">
                <text:p>64.1785433575535</text:p>
              </table:table-cell>
              <table:table-cell office:value-type="float" office:value="20.4020527960239">
                <text:p>20.4020527960239</text:p>
              </table:table-cell>
              <table:table-cell office:value-type="float" office:value="5.74339635913579">
                <text:p>5.74339635913579</text:p>
              </table:table-cell>
              <table:table-cell office:value-type="float" office:value="9.20991087252724">
                <text:p>9.20991087252724</text:p>
              </table:table-cell>
              <table:table-cell office:value-type="float" office:value="0.466096614851692">
                <text:p>0.466096614851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65.3944553455118">
                <text:p>65.3944553455118</text:p>
              </table:table-cell>
              <table:table-cell office:value-type="float" office:value="19.0721220768955">
                <text:p>19.0721220768955</text:p>
              </table:table-cell>
              <table:table-cell office:value-type="float" office:value="6.43189858896879">
                <text:p>6.43189858896879</text:p>
              </table:table-cell>
              <table:table-cell office:value-type="float" office:value="8.62614359818138">
                <text:p>8.62614359818138</text:p>
              </table:table-cell>
              <table:table-cell office:value-type="float" office:value="0.47538039035708">
                <text:p>0.47538039035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66.1318408320049">
                <text:p>66.1318408320049</text:p>
              </table:table-cell>
              <table:table-cell office:value-type="float" office:value="17.4698264181222">
                <text:p>17.4698264181222</text:p>
              </table:table-cell>
              <table:table-cell office:value-type="float" office:value="6.99579812077534">
                <text:p>6.99579812077534</text:p>
              </table:table-cell>
              <table:table-cell office:value-type="float" office:value="7.94614612355666">
                <text:p>7.94614612355666</text:p>
              </table:table-cell>
              <table:table-cell office:value-type="float" office:value="1.4563875411436">
                <text:p>1.4563875411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7.4679142817521">
                <text:p>67.4679142817521</text:p>
              </table:table-cell>
              <table:table-cell office:value-type="float" office:value="16.723839657041">
                <text:p>16.723839657041</text:p>
              </table:table-cell>
              <table:table-cell office:value-type="float" office:value="7.51846275538958">
                <text:p>7.51846275538958</text:p>
              </table:table-cell>
              <table:table-cell office:value-type="float" office:value="7.59890626778613">
                <text:p>7.59890626778613</text:p>
              </table:table-cell>
              <table:table-cell office:value-type="float" office:value="0.690877038163991">
                <text:p>0.690877038163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68.3850975742005">
                <text:p>68.3850975742005</text:p>
              </table:table-cell>
              <table:table-cell office:value-type="float" office:value="15.3753308637846">
                <text:p>15.3753308637846</text:p>
              </table:table-cell>
              <table:table-cell office:value-type="float" office:value="7.92931465800467">
                <text:p>7.92931465800467</text:p>
              </table:table-cell>
              <table:table-cell office:value-type="float" office:value="7.02098525196322">
                <text:p>7.02098525196322</text:p>
              </table:table-cell>
              <table:table-cell office:value-type="float" office:value="1.28922942310194">
                <text:p>1.28922942310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69.5232944698283">
                <text:p>69.5232944698283</text:p>
              </table:table-cell>
              <table:table-cell office:value-type="float" office:value="14.3825193004569">
                <text:p>14.3825193004569</text:p>
              </table:table-cell>
              <table:table-cell office:value-type="float" office:value="8.30393886875689">
                <text:p>8.30393886875689</text:p>
              </table:table-cell>
              <table:table-cell office:value-type="float" office:value="6.57946667717032">
                <text:p>6.57946667717032</text:p>
              </table:table-cell>
              <table:table-cell office:value-type="float" office:value="1.21078777375138">
                <text:p>1.21078777375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70.6233455367789">
                <text:p>70.6233455367789</text:p>
              </table:table-cell>
              <table:table-cell office:value-type="float" office:value="13.4561318824384">
                <text:p>13.4561318824384</text:p>
              </table:table-cell>
              <table:table-cell office:value-type="float" office:value="8.65070741045235">
                <text:p>8.65070741045235</text:p>
              </table:table-cell>
              <table:table-cell office:value-type="float" office:value="6.1592612103085">
                <text:p>6.1592612103085</text:p>
              </table:table-cell>
              <table:table-cell office:value-type="float" office:value="1.11056204177384">
                <text:p>1.11056204177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71.6018060897854">
                <text:p>71.6018060897854</text:p>
              </table:table-cell>
              <table:table-cell office:value-type="float" office:value="12.6260122520781">
                <text:p>12.6260122520781</text:p>
              </table:table-cell>
              <table:table-cell office:value-type="float" office:value="8.95187193680883">
                <text:p>8.95187193680883</text:p>
              </table:table-cell>
              <table:table-cell office:value-type="float" office:value="5.78634185797092">
                <text:p>5.78634185797092</text:p>
              </table:table-cell>
              <table:table-cell office:value-type="float" office:value="1.03394657808331">
                <text:p>1.03394657808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72.4772849810006">
                <text:p>72.4772849810006</text:p>
              </table:table-cell>
              <table:table-cell office:value-type="float" office:value="11.8775132571298">
                <text:p>11.8775132571298</text:p>
              </table:table-cell>
              <table:table-cell office:value-type="float" office:value="9.20775701331439">
                <text:p>9.20775701331439</text:p>
              </table:table-cell>
              <table:table-cell office:value-type="float" office:value="5.45639076652654">
                <text:p>5.45639076652654</text:p>
              </table:table-cell>
              <table:table-cell office:value-type="float" office:value="0.981017308580686">
                <text:p>0.981017308580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73.2368926469574">
                <text:p>73.2368926469574</text:p>
              </table:table-cell>
              <table:table-cell office:value-type="float" office:value="11.2182096087309">
                <text:p>11.2182096087309</text:p>
              </table:table-cell>
              <table:table-cell office:value-type="float" office:value="9.44927515184961">
                <text:p>9.44927515184961</text:p>
              </table:table-cell>
              <table:table-cell office:value-type="float" office:value="5.1653838566835">
                <text:p>5.1653838566835</text:p>
              </table:table-cell>
              <table:table-cell office:value-type="float" office:value="0.930291379395893">
                <text:p>0.9302913793958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3.9211130009434">
                <text:p>73.9211130009434</text:p>
              </table:table-cell>
              <table:table-cell office:value-type="float" office:value="10.6249679165797">
                <text:p>10.6249679165797</text:p>
              </table:table-cell>
              <table:table-cell office:value-type="float" office:value="9.66726783866688">
                <text:p>9.66726783866688</text:p>
              </table:table-cell>
              <table:table-cell office:value-type="float" office:value="4.90231069070898">
                <text:p>4.90231069070898</text:p>
              </table:table-cell>
              <table:table-cell office:value-type="float" office:value="0.884358234630473">
                <text:p>0.884358234630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4.5416632757717">
                <text:p>74.5416632757717</text:p>
              </table:table-cell>
              <table:table-cell office:value-type="float" office:value="10.0939929149607">
                <text:p>10.0939929149607</text:p>
              </table:table-cell>
              <table:table-cell office:value-type="float" office:value="9.8507323524799">
                <text:p>9.8507323524799</text:p>
              </table:table-cell>
              <table:table-cell office:value-type="float" office:value="4.66679835016565">
                <text:p>4.66679835016565</text:p>
              </table:table-cell>
              <table:table-cell office:value-type="float" office:value="0.846855683687972">
                <text:p>0.846855683687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75.0958147895649">
                <text:p>75.0958147895649</text:p>
              </table:table-cell>
              <table:table-cell office:value-type="float" office:value="9.61859968695821">
                <text:p>9.61859968695821</text:p>
              </table:table-cell>
              <table:table-cell office:value-type="float" office:value="10.0139413391346">
                <text:p>10.0139413391346</text:p>
              </table:table-cell>
              <table:table-cell office:value-type="float" office:value="4.45766454482549">
                <text:p>4.45766454482549</text:p>
              </table:table-cell>
              <table:table-cell office:value-type="float" office:value="0.813977086157987">
                <text:p>0.813977086157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75.5918985582904">
                <text:p>75.5918985582904</text:p>
              </table:table-cell>
              <table:table-cell office:value-type="float" office:value="9.18981216438866">
                <text:p>9.18981216438866</text:p>
              </table:table-cell>
              <table:table-cell office:value-type="float" office:value="10.1614379059599">
                <text:p>10.1614379059599</text:p>
              </table:table-cell>
              <table:table-cell office:value-type="float" office:value="4.27200310116032">
                <text:p>4.27200310116032</text:p>
              </table:table-cell>
              <table:table-cell office:value-type="float" office:value="0.784852151502743">
                <text:p>0.784852151502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76.0297239718928">
                <text:p>76.0297239718928</text:p>
              </table:table-cell>
              <table:table-cell office:value-type="float" office:value="8.80432472981987">
                <text:p>8.80432472981987</text:p>
              </table:table-cell>
              <table:table-cell office:value-type="float" office:value="10.3004223845325">
                <text:p>10.3004223845325</text:p>
              </table:table-cell>
              <table:table-cell office:value-type="float" office:value="4.10503489384032">
                <text:p>4.10503489384032</text:p>
              </table:table-cell>
              <table:table-cell office:value-type="float" office:value="0.760504182272044">
                <text:p>0.760504182272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76.4196489409433">
                <text:p>76.4196489409433</text:p>
              </table:table-cell>
              <table:table-cell office:value-type="float" office:value="8.45633093658353">
                <text:p>8.45633093658353</text:p>
              </table:table-cell>
              <table:table-cell office:value-type="float" office:value="10.4289952955301">
                <text:p>10.4289952955301</text:p>
              </table:table-cell>
              <table:table-cell office:value-type="float" office:value="3.9553560173934">
                <text:p>3.9553560173934</text:p>
              </table:table-cell>
              <table:table-cell office:value-type="float" office:value="0.739638398417563">
                <text:p>0.739638398417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76.7704786785775">
                <text:p>76.7704786785775</text:p>
              </table:table-cell>
              <table:table-cell office:value-type="float" office:value="8.13990392718692">
                <text:p>8.13990392718692</text:p>
              </table:table-cell>
              <table:table-cell office:value-type="float" office:value="10.5485926175628">
                <text:p>10.5485926175628</text:p>
              </table:table-cell>
              <table:table-cell office:value-type="float" office:value="3.81995912691724">
                <text:p>3.81995912691724</text:p>
              </table:table-cell>
              <table:table-cell office:value-type="float" office:value="0.721063964267656">
                <text:p>0.721063964267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77.090135998828">
                <text:p>77.090135998828</text:p>
              </table:table-cell>
              <table:table-cell office:value-type="float" office:value="7.84908444244274">
                <text:p>7.84908444244274</text:p>
              </table:table-cell>
              <table:table-cell office:value-type="float" office:value="10.6607721330536">
                <text:p>10.6607721330536</text:p>
              </table:table-cell>
              <table:table-cell office:value-type="float" office:value="3.69679795987633">
                <text:p>3.69679795987633</text:p>
              </table:table-cell>
              <table:table-cell office:value-type="float" office:value="0.703180812376987">
                <text:p>0.7031808123769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77.3753401748973">
                <text:p>77.3753401748973</text:p>
              </table:table-cell>
              <table:table-cell office:value-type="float" office:value="7.58716800284915">
                <text:p>7.58716800284915</text:p>
              </table:table-cell>
              <table:table-cell office:value-type="float" office:value="10.7629014838013">
                <text:p>10.7629014838013</text:p>
              </table:table-cell>
              <table:table-cell office:value-type="float" office:value="3.58555258339366">
                <text:p>3.58555258339366</text:p>
              </table:table-cell>
              <table:table-cell office:value-type="float" office:value="0.689020722119207">
                <text:p>0.689020722119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77.6345839948499">
                <text:p>77.6345839948499</text:p>
              </table:table-cell>
              <table:table-cell office:value-type="float" office:value="7.34683031741268">
                <text:p>7.34683031741268</text:p>
              </table:table-cell>
              <table:table-cell office:value-type="float" office:value="10.8579874945005">
                <text:p>10.8579874945005</text:p>
              </table:table-cell>
              <table:table-cell office:value-type="float" office:value="3.48358750818644">
                <text:p>3.48358750818644</text:p>
              </table:table-cell>
              <table:table-cell office:value-type="float" office:value="0.6769853958705">
                <text:p>0.6769853958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77.8684732946502">
                <text:p>77.8684732946502</text:p>
              </table:table-cell>
              <table:table-cell office:value-type="float" office:value="7.12606911375224">
                <text:p>7.12606911375224</text:p>
              </table:table-cell>
              <table:table-cell office:value-type="float" office:value="10.9479251671354">
                <text:p>10.9479251671354</text:p>
              </table:table-cell>
              <table:table-cell office:value-type="float" office:value="3.39111272976532">
                <text:p>3.39111272976532</text:p>
              </table:table-cell>
              <table:table-cell office:value-type="float" office:value="0.666426492090517">
                <text:p>0.666426492090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78.0825448900085">
                <text:p>78.0825448900085</text:p>
              </table:table-cell>
              <table:table-cell office:value-type="float" office:value="6.92269838015173">
                <text:p>6.92269838015173</text:p>
              </table:table-cell>
              <table:table-cell office:value-type="float" office:value="11.0314199905921">
                <text:p>11.0314199905921</text:p>
              </table:table-cell>
              <table:table-cell office:value-type="float" office:value="3.305868223853">
                <text:p>3.305868223853</text:p>
              </table:table-cell>
              <table:table-cell office:value-type="float" office:value="0.657454730918408">
                <text:p>0.657454730918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78.277775414491">
                <text:p>78.277775414491</text:p>
              </table:table-cell>
              <table:table-cell office:value-type="float" office:value="6.73486004615499">
                <text:p>6.73486004615499</text:p>
              </table:table-cell>
              <table:table-cell office:value-type="float" office:value="11.1086104582531">
                <text:p>11.1086104582531</text:p>
              </table:table-cell>
              <table:table-cell office:value-type="float" office:value="3.22767757441695">
                <text:p>3.22767757441695</text:p>
              </table:table-cell>
              <table:table-cell office:value-type="float" office:value="0.651070192277015">
                <text:p>0.651070192277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78.4568873055204">
                <text:p>78.4568873055204</text:p>
              </table:table-cell>
              <table:table-cell office:value-type="float" office:value="6.56115178082438">
                <text:p>6.56115178082438</text:p>
              </table:table-cell>
              <table:table-cell office:value-type="float" office:value="11.181105368477">
                <text:p>11.181105368477</text:p>
              </table:table-cell>
              <table:table-cell office:value-type="float" office:value="3.15612303860028">
                <text:p>3.15612303860028</text:p>
              </table:table-cell>
              <table:table-cell office:value-type="float" office:value="0.64474405672663">
                <text:p>0.64474405672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78.6194487543456">
                <text:p>78.6194487543456</text:p>
              </table:table-cell>
              <table:table-cell office:value-type="float" office:value="6.40169146565164">
                <text:p>6.40169146565164</text:p>
              </table:table-cell>
              <table:table-cell office:value-type="float" office:value="11.2482589859888">
                <text:p>11.2482589859888</text:p>
              </table:table-cell>
              <table:table-cell office:value-type="float" office:value="3.09100061640888">
                <text:p>3.09100061640888</text:p>
              </table:table-cell>
              <table:table-cell office:value-type="float" office:value="0.639581263650604">
                <text:p>0.639581263650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78.7684205095471">
                <text:p>78.7684205095471</text:p>
              </table:table-cell>
              <table:table-cell office:value-type="float" office:value="6.25389647319682">
                <text:p>6.25389647319682</text:p>
              </table:table-cell>
              <table:table-cell office:value-type="float" office:value="11.312058609676">
                <text:p>11.312058609676</text:p>
              </table:table-cell>
              <table:table-cell office:value-type="float" office:value="3.03041828744754">
                <text:p>3.03041828744754</text:p>
              </table:table-cell>
              <table:table-cell office:value-type="float" office:value="0.635214818956477">
                <text:p>0.6352148189564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78.9054925213942">
                <text:p>78.9054925213942</text:p>
              </table:table-cell>
              <table:table-cell office:value-type="float" office:value="6.11689072178843">
                <text:p>6.11689072178843</text:p>
              </table:table-cell>
              <table:table-cell office:value-type="float" office:value="11.3709983344729">
                <text:p>11.3709983344729</text:p>
              </table:table-cell>
              <table:table-cell office:value-type="float" office:value="2.97453434082133">
                <text:p>2.97453434082133</text:p>
              </table:table-cell>
              <table:table-cell office:value-type="float" office:value="0.632087857569841">
                <text:p>0.632087857569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79.0311288154441">
                <text:p>79.0311288154441</text:p>
              </table:table-cell>
              <table:table-cell office:value-type="float" office:value="5.99013843631015">
                <text:p>5.99013843631015</text:p>
              </table:table-cell>
              <table:table-cell office:value-type="float" office:value="11.4256082540978">
                <text:p>11.4256082540978</text:p>
              </table:table-cell>
              <table:table-cell office:value-type="float" office:value="2.92313864041045">
                <text:p>2.92313864041045</text:p>
              </table:table-cell>
              <table:table-cell office:value-type="float" office:value="0.629988668914116">
                <text:p>0.629988668914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79.1477083291806">
                <text:p>79.1477083291806</text:p>
              </table:table-cell>
              <table:table-cell office:value-type="float" office:value="5.87188783126631">
                <text:p>5.87188783126631</text:p>
              </table:table-cell>
              <table:table-cell office:value-type="float" office:value="11.4763378376423">
                <text:p>11.4763378376423</text:p>
              </table:table-cell>
              <table:table-cell office:value-type="float" office:value="2.87547611447445">
                <text:p>2.87547611447445</text:p>
              </table:table-cell>
              <table:table-cell office:value-type="float" office:value="0.628594802518816">
                <text:p>0.628594802518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79.2543453582056">
                <text:p>79.2543453582056</text:p>
              </table:table-cell>
              <table:table-cell office:value-type="float" office:value="5.76207074868951">
                <text:p>5.76207074868951</text:p>
              </table:table-cell>
              <table:table-cell office:value-type="float" office:value="11.5230574273507">
                <text:p>11.5230574273507</text:p>
              </table:table-cell>
              <table:table-cell office:value-type="float" office:value="2.83214487628482">
                <text:p>2.83214487628482</text:p>
              </table:table-cell>
              <table:table-cell office:value-type="float" office:value="0.6283821195769">
                <text:p>0.62838211957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79.3506079908099">
                <text:p>79.3506079908099</text:p>
              </table:table-cell>
              <table:table-cell office:value-type="float" office:value="5.66125935749231">
                <text:p>5.66125935749231</text:p>
              </table:table-cell>
              <table:table-cell office:value-type="float" office:value="11.5665363176387">
                <text:p>11.5665363176387</text:p>
              </table:table-cell>
              <table:table-cell office:value-type="float" office:value="2.79293710627218">
                <text:p>2.79293710627218</text:p>
              </table:table-cell>
              <table:table-cell office:value-type="float" office:value="0.628653306341842">
                <text:p>0.628653306341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79.44173538849">
                <text:p>79.44173538849</text:p>
              </table:table-cell>
              <table:table-cell office:value-type="float" office:value="5.56667539192335">
                <text:p>5.56667539192335</text:p>
              </table:table-cell>
              <table:table-cell office:value-type="float" office:value="11.6064790786529">
                <text:p>11.6064790786529</text:p>
              </table:table-cell>
              <table:table-cell office:value-type="float" office:value="2.75561790582829">
                <text:p>2.75561790582829</text:p>
              </table:table-cell>
              <table:table-cell office:value-type="float" office:value="0.629511504075763">
                <text:p>0.629511504075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79.5280972391527">
                <text:p>79.5280972391527</text:p>
              </table:table-cell>
              <table:table-cell office:value-type="float" office:value="5.4784334362793">
                <text:p>5.4784334362793</text:p>
              </table:table-cell>
              <table:table-cell office:value-type="float" office:value="11.6428409387426">
                <text:p>11.6428409387426</text:p>
              </table:table-cell>
              <table:table-cell office:value-type="float" office:value="2.72060441486317">
                <text:p>2.72060441486317</text:p>
              </table:table-cell>
              <table:table-cell office:value-type="float" office:value="0.630030056198373">
                <text:p>0.630030056198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79.6088253222338">
                <text:p>79.6088253222338</text:p>
              </table:table-cell>
              <table:table-cell office:value-type="float" office:value="5.39552545899972">
                <text:p>5.39552545899972</text:p>
              </table:table-cell>
              <table:table-cell office:value-type="float" office:value="11.6751751506308">
                <text:p>11.6751751506308</text:p>
              </table:table-cell>
              <table:table-cell office:value-type="float" office:value="2.68862644426866">
                <text:p>2.68862644426866</text:p>
              </table:table-cell>
              <table:table-cell office:value-type="float" office:value="0.631834120217072">
                <text:p>0.631834120217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79.6831306547352">
                <text:p>79.6831306547352</text:p>
              </table:table-cell>
              <table:table-cell office:value-type="float" office:value="5.31897683970884">
                <text:p>5.31897683970884</text:p>
              </table:table-cell>
              <table:table-cell office:value-type="float" office:value="11.7039882746253">
                <text:p>11.7039882746253</text:p>
              </table:table-cell>
              <table:table-cell office:value-type="float" office:value="2.65912505874338">
                <text:p>2.65912505874338</text:p>
              </table:table-cell>
              <table:table-cell office:value-type="float" office:value="0.634788631111417">
                <text:p>0.634788631111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79.7504724470159">
                <text:p>79.7504724470159</text:p>
              </table:table-cell>
              <table:table-cell office:value-type="float" office:value="5.24844295355419">
                <text:p>5.24844295355419</text:p>
              </table:table-cell>
              <table:table-cell office:value-type="float" office:value="11.7295910419505">
                <text:p>11.7295910419505</text:p>
              </table:table-cell>
              <table:table-cell office:value-type="float" office:value="2.63274654068979">
                <text:p>2.63274654068979</text:p>
              </table:table-cell>
              <table:table-cell office:value-type="float" office:value="0.638739598803861">
                <text:p>0.638739598803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79.815772887807">
                <text:p>79.815772887807</text:p>
              </table:table-cell>
              <table:table-cell office:value-type="float" office:value="5.18206633455851">
                <text:p>5.18206633455851</text:p>
              </table:table-cell>
              <table:table-cell office:value-type="float" office:value="11.7533614774985">
                <text:p>11.7533614774985</text:p>
              </table:table-cell>
              <table:table-cell office:value-type="float" office:value="2.60652677567271">
                <text:p>2.60652677567271</text:p>
              </table:table-cell>
              <table:table-cell office:value-type="float" office:value="0.64228479662831">
                <text:p>0.64228479662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79.8756567234653">
                <text:p>79.8756567234653</text:p>
              </table:table-cell>
              <table:table-cell office:value-type="float" office:value="5.12006504872777">
                <text:p>5.12006504872777</text:p>
              </table:table-cell>
              <table:table-cell office:value-type="float" office:value="11.7748393179716">
                <text:p>11.7748393179716</text:p>
              </table:table-cell>
              <table:table-cell office:value-type="float" office:value="2.58331429167489">
                <text:p>2.58331429167489</text:p>
              </table:table-cell>
              <table:table-cell office:value-type="float" office:value="0.64614193199766">
                <text:p>0.64614193199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79.9306670093196">
                <text:p>79.9306670093196</text:p>
              </table:table-cell>
              <table:table-cell office:value-type="float" office:value="5.06202171646607">
                <text:p>5.06202171646607</text:p>
              </table:table-cell>
              <table:table-cell office:value-type="float" office:value="11.7946289147649">
                <text:p>11.7946289147649</text:p>
              </table:table-cell>
              <table:table-cell office:value-type="float" office:value="2.56212288531041">
                <text:p>2.56212288531041</text:p>
              </table:table-cell>
              <table:table-cell office:value-type="float" office:value="0.650564689027832">
                <text:p>0.650564689027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79.9830351933184">
                <text:p>79.9830351933184</text:p>
              </table:table-cell>
              <table:table-cell office:value-type="float" office:value="5.00762805323243">
                <text:p>5.00762805323243</text:p>
              </table:table-cell>
              <table:table-cell office:value-type="float" office:value="11.8123953064714">
                <text:p>11.8123953064714</text:p>
              </table:table-cell>
              <table:table-cell office:value-type="float" office:value="2.54196549403126">
                <text:p>2.54196549403126</text:p>
              </table:table-cell>
              <table:table-cell office:value-type="float" office:value="0.654972898059434">
                <text:p>0.654972898059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80.0307819804665">
                <text:p>80.0307819804665</text:p>
              </table:table-cell>
              <table:table-cell office:value-type="float" office:value="4.95723763454186">
                <text:p>4.95723763454186</text:p>
              </table:table-cell>
              <table:table-cell office:value-type="float" office:value="11.8285081242825">
                <text:p>11.8285081242825</text:p>
              </table:table-cell>
              <table:table-cell office:value-type="float" office:value="2.52378223290505">
                <text:p>2.52378223290505</text:p>
              </table:table-cell>
              <table:table-cell office:value-type="float" office:value="0.659682269646887">
                <text:p>0.659682269646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80.0761824412983">
                <text:p>80.0761824412983</text:p>
              </table:table-cell>
              <table:table-cell office:value-type="float" office:value="4.91040641650937">
                <text:p>4.91040641650937</text:p>
              </table:table-cell>
              <table:table-cell office:value-type="float" office:value="11.843770593461">
                <text:p>11.843770593461</text:p>
              </table:table-cell>
              <table:table-cell office:value-type="float" office:value="2.50498130915608">
                <text:p>2.50498130915608</text:p>
              </table:table-cell>
              <table:table-cell office:value-type="float" office:value="0.664670319950702">
                <text:p>0.6646703199507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80.115452910476">
                <text:p>80.115452910476</text:p>
              </table:table-cell>
              <table:table-cell office:value-type="float" office:value="4.86804648673795">
                <text:p>4.86804648673795</text:p>
              </table:table-cell>
              <table:table-cell office:value-type="float" office:value="11.8573373427853">
                <text:p>11.8573373427853</text:p>
              </table:table-cell>
              <table:table-cell office:value-type="float" office:value="2.48955006164685">
                <text:p>2.48955006164685</text:p>
              </table:table-cell>
              <table:table-cell office:value-type="float" office:value="0.669628971128601">
                <text:p>0.669628971128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80.150808774964">
                <text:p>80.150808774964</text:p>
              </table:table-cell>
              <table:table-cell office:value-type="float" office:value="4.82910333564152">
                <text:p>4.82910333564152</text:p>
              </table:table-cell>
              <table:table-cell office:value-type="float" office:value="11.8691047926593">
                <text:p>11.8691047926593</text:p>
              </table:table-cell>
              <table:table-cell office:value-type="float" office:value="2.47622403432615">
                <text:p>2.47622403432615</text:p>
              </table:table-cell>
              <table:table-cell office:value-type="float" office:value="0.674767425393813">
                <text:p>0.674767425393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80.1849809060824">
                <text:p>80.1849809060824</text:p>
              </table:table-cell>
              <table:table-cell office:value-type="float" office:value="4.79254876299087">
                <text:p>4.79254876299087</text:p>
              </table:table-cell>
              <table:table-cell office:value-type="float" office:value="11.8786913043628">
                <text:p>11.8786913043628</text:p>
              </table:table-cell>
              <table:table-cell office:value-type="float" office:value="2.46356537250821">
                <text:p>2.46356537250821</text:p>
              </table:table-cell>
              <table:table-cell office:value-type="float" office:value="0.680224381486346">
                <text:p>0.680224381486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80.2180889086532">
                <text:p>80.2180889086532</text:p>
              </table:table-cell>
              <table:table-cell office:value-type="float" office:value="4.75755590801601">
                <text:p>4.75755590801601</text:p>
              </table:table-cell>
              <table:table-cell office:value-type="float" office:value="11.8861017701973">
                <text:p>11.8861017701973</text:p>
              </table:table-cell>
              <table:table-cell office:value-type="float" office:value="2.45253217210012">
                <text:p>2.45253217210012</text:p>
              </table:table-cell>
              <table:table-cell office:value-type="float" office:value="0.685731384206865">
                <text:p>0.685731384206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80.252966696051">
                <text:p>80.252966696051</text:p>
              </table:table-cell>
              <table:table-cell office:value-type="float" office:value="4.72354062800299">
                <text:p>4.72354062800299</text:p>
              </table:table-cell>
              <table:table-cell office:value-type="float" office:value="11.8908281632028">
                <text:p>11.8908281632028</text:p>
              </table:table-cell>
              <table:table-cell office:value-type="float" office:value="2.44122999029289">
                <text:p>2.44122999029289</text:p>
              </table:table-cell>
              <table:table-cell office:value-type="float" office:value="0.691436264261295">
                <text:p>0.691436264261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80.2823019050952">
                <text:p>80.2823019050952</text:p>
              </table:table-cell>
              <table:table-cell office:value-type="float" office:value="4.69349052826389">
                <text:p>4.69349052826389</text:p>
              </table:table-cell>
              <table:table-cell office:value-type="float" office:value="11.8962903795672">
                <text:p>11.8962903795672</text:p>
              </table:table-cell>
              <table:table-cell office:value-type="float" office:value="2.43057651353377">
                <text:p>2.43057651353377</text:p>
              </table:table-cell>
              <table:table-cell office:value-type="float" office:value="0.697344767987291">
                <text:p>0.697344767987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80.3071024140532">
                <text:p>80.3071024140532</text:p>
              </table:table-cell>
              <table:table-cell office:value-type="float" office:value="4.66639609087067">
                <text:p>4.66639609087067</text:p>
              </table:table-cell>
              <table:table-cell office:value-type="float" office:value="11.9007659925005">
                <text:p>11.9007659925005</text:p>
              </table:table-cell>
              <table:table-cell office:value-type="float" office:value="2.42240782146812">
                <text:p>2.42240782146812</text:p>
              </table:table-cell>
              <table:table-cell office:value-type="float" office:value="0.703336373410646">
                <text:p>0.703336373410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80.3290323235971">
                <text:p>80.3290323235971</text:p>
              </table:table-cell>
              <table:table-cell office:value-type="float" office:value="4.64472844790442">
                <text:p>4.64472844790442</text:p>
              </table:table-cell>
              <table:table-cell office:value-type="float" office:value="11.9030403493671">
                <text:p>11.9030403493671</text:p>
              </table:table-cell>
              <table:table-cell office:value-type="float" office:value="2.41381897750235">
                <text:p>2.41381897750235</text:p>
              </table:table-cell>
              <table:table-cell office:value-type="float" office:value="0.70937613350813">
                <text:p>0.70937613350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80.3514815241949">
                <text:p>80.3514815241949</text:p>
              </table:table-cell>
              <table:table-cell office:value-type="float" office:value="4.62164811113977">
                <text:p>4.62164811113977</text:p>
              </table:table-cell>
              <table:table-cell office:value-type="float" office:value="11.9049577099748">
                <text:p>11.9049577099748</text:p>
              </table:table-cell>
              <table:table-cell office:value-type="float" office:value="2.40651911122362">
                <text:p>2.40651911122362</text:p>
              </table:table-cell>
              <table:table-cell office:value-type="float" office:value="0.715392579738116">
                <text:p>0.715392579738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80.3734463625698">
                <text:p>80.3734463625698</text:p>
              </table:table-cell>
              <table:table-cell office:value-type="float" office:value="4.60031838304511">
                <text:p>4.60031838304511</text:p>
              </table:table-cell>
              <table:table-cell office:value-type="float" office:value="11.9064342611157">
                <text:p>11.9064342611157</text:p>
              </table:table-cell>
              <table:table-cell office:value-type="float" office:value="2.39817003784304">
                <text:p>2.39817003784304</text:p>
              </table:table-cell>
              <table:table-cell office:value-type="float" office:value="0.721628435077709">
                <text:p>0.721628435077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80.3931670076694">
                <text:p>80.3931670076694</text:p>
              </table:table-cell>
              <table:table-cell office:value-type="float" office:value="4.58110133798422">
                <text:p>4.58110133798422</text:p>
              </table:table-cell>
              <table:table-cell office:value-type="float" office:value="11.9071648576604">
                <text:p>11.9071648576604</text:p>
              </table:table-cell>
              <table:table-cell office:value-type="float" office:value="2.39052747534961">
                <text:p>2.39052747534961</text:p>
              </table:table-cell>
              <table:table-cell office:value-type="float" office:value="0.728050910431592">
                <text:p>0.7280509104315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80.4084705902327">
                <text:p>80.4084705902327</text:p>
              </table:table-cell>
              <table:table-cell office:value-type="float" office:value="4.56264550716913">
                <text:p>4.56264550716913</text:p>
              </table:table-cell>
              <table:table-cell office:value-type="float" office:value="11.9058691592865">
                <text:p>11.9058691592865</text:p>
              </table:table-cell>
              <table:table-cell office:value-type="float" office:value="2.38860203063507">
                <text:p>2.38860203063507</text:p>
              </table:table-cell>
              <table:table-cell office:value-type="float" office:value="0.734411348369213">
                <text:p>0.734411348369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80.4213086026596">
                <text:p>80.4213086026596</text:p>
              </table:table-cell>
              <table:table-cell office:value-type="float" office:value="4.5471715125111">
                <text:p>4.5471715125111</text:p>
              </table:table-cell>
              <table:table-cell office:value-type="float" office:value="11.9053186402216">
                <text:p>11.9053186402216</text:p>
              </table:table-cell>
              <table:table-cell office:value-type="float" office:value="2.38523027444394">
                <text:p>2.38523027444394</text:p>
              </table:table-cell>
              <table:table-cell office:value-type="float" office:value="0.740977814226545">
                <text:p>0.740977814226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80.4355596625266">
                <text:p>80.4355596625266</text:p>
              </table:table-cell>
              <table:table-cell office:value-type="float" office:value="4.53329648355864">
                <text:p>4.53329648355864</text:p>
              </table:table-cell>
              <table:table-cell office:value-type="float" office:value="11.9046342633081">
                <text:p>11.9046342633081</text:p>
              </table:table-cell>
              <table:table-cell office:value-type="float" office:value="2.37892562943218">
                <text:p>2.37892562943218</text:p>
              </table:table-cell>
              <table:table-cell office:value-type="float" office:value="0.747588489489853">
                <text:p>0.7475884894898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80.44209141758">
                <text:p>80.44209141758</text:p>
              </table:table-cell>
              <table:table-cell office:value-type="float" office:value="4.5237437129167">
                <text:p>4.5237437129167</text:p>
              </table:table-cell>
              <table:table-cell office:value-type="float" office:value="11.9022539189157">
                <text:p>11.9022539189157</text:p>
              </table:table-cell>
              <table:table-cell office:value-type="float" office:value="2.37758287690047">
                <text:p>2.37758287690047</text:p>
              </table:table-cell>
              <table:table-cell office:value-type="float" office:value="0.754333380907061">
                <text:p>0.754333380907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80.4497498407578">
                <text:p>80.4497498407578</text:p>
              </table:table-cell>
              <table:table-cell office:value-type="float" office:value="4.51283863358712">
                <text:p>4.51283863358712</text:p>
              </table:table-cell>
              <table:table-cell office:value-type="float" office:value="11.8996026729301">
                <text:p>11.8996026729301</text:p>
              </table:table-cell>
              <table:table-cell office:value-type="float" office:value="2.37674174895765">
                <text:p>2.37674174895765</text:p>
              </table:table-cell>
              <table:table-cell office:value-type="float" office:value="0.761071894065652">
                <text:p>0.761071894065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80.4536237900157">
                <text:p>80.4536237900157</text:p>
              </table:table-cell>
              <table:table-cell office:value-type="float" office:value="4.50326572752979">
                <text:p>4.50326572752979</text:p>
              </table:table-cell>
              <table:table-cell office:value-type="float" office:value="11.8960764069647">
                <text:p>11.8960764069647</text:p>
              </table:table-cell>
              <table:table-cell office:value-type="float" office:value="2.37919396526606">
                <text:p>2.37919396526606</text:p>
              </table:table-cell>
              <table:table-cell office:value-type="float" office:value="0.767839971807346">
                <text:p>0.767839971807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80.4566694114764">
                <text:p>80.4566694114764</text:p>
              </table:table-cell>
              <table:table-cell office:value-type="float" office:value="4.49511687747839">
                <text:p>4.49511687747839</text:p>
              </table:table-cell>
              <table:table-cell office:value-type="float" office:value="11.8921069447493">
                <text:p>11.8921069447493</text:p>
              </table:table-cell>
              <table:table-cell office:value-type="float" office:value="2.38137131127094">
                <text:p>2.38137131127094</text:p>
              </table:table-cell>
              <table:table-cell office:value-type="float" office:value="0.774741439743811">
                <text:p>0.774741439743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80.4601272349879">
                <text:p>80.4601272349879</text:p>
              </table:table-cell>
              <table:table-cell office:value-type="float" office:value="4.48801460103438">
                <text:p>4.48801460103438</text:p>
              </table:table-cell>
              <table:table-cell office:value-type="float" office:value="11.8879005371377">
                <text:p>11.8879005371377</text:p>
              </table:table-cell>
              <table:table-cell office:value-type="float" office:value="2.38231244898074">
                <text:p>2.38231244898074</text:p>
              </table:table-cell>
              <table:table-cell office:value-type="float" office:value="0.781649723302805">
                <text:p>0.781649723302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80.4638340601482">
                <text:p>80.4638340601482</text:p>
              </table:table-cell>
              <table:table-cell office:value-type="float" office:value="4.48196105954625">
                <text:p>4.48196105954625</text:p>
              </table:table-cell>
              <table:table-cell office:value-type="float" office:value="11.8831352664243">
                <text:p>11.8831352664243</text:p>
              </table:table-cell>
              <table:table-cell office:value-type="float" office:value="2.38244656662119">
                <text:p>2.38244656662119</text:p>
              </table:table-cell>
              <table:table-cell office:value-type="float" office:value="0.788622652966272">
                <text:p>0.788622652966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80.4682081985676">
                <text:p>80.4682081985676</text:p>
              </table:table-cell>
              <table:table-cell office:value-type="float" office:value="4.47702215884256">
                <text:p>4.47702215884256</text:p>
              </table:table-cell>
              <table:table-cell office:value-type="float" office:value="11.8781096938571">
                <text:p>11.8781096938571</text:p>
              </table:table-cell>
              <table:table-cell office:value-type="float" office:value="2.38103712595467">
                <text:p>2.38103712595467</text:p>
              </table:table-cell>
              <table:table-cell office:value-type="float" office:value="0.795617394666855">
                <text:p>0.7956173946668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80.4699019135302">
                <text:p>80.4699019135302</text:p>
              </table:table-cell>
              <table:table-cell office:value-type="float" office:value="4.47307757230394">
                <text:p>4.47307757230394</text:p>
              </table:table-cell>
              <table:table-cell office:value-type="float" office:value="11.8722328653736">
                <text:p>11.8722328653736</text:p>
              </table:table-cell>
              <table:table-cell office:value-type="float" office:value="2.38221819206075">
                <text:p>2.38221819206075</text:p>
              </table:table-cell>
              <table:table-cell office:value-type="float" office:value="0.802568566977623">
                <text:p>0.802568566977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80.4700386407808">
                <text:p>80.4700386407808</text:p>
              </table:table-cell>
              <table:table-cell office:value-type="float" office:value="4.47016342559574">
                <text:p>4.47016342559574</text:p>
              </table:table-cell>
              <table:table-cell office:value-type="float" office:value="11.8659168407986">
                <text:p>11.8659168407986</text:p>
              </table:table-cell>
              <table:table-cell office:value-type="float" office:value="2.3843077218544">
                <text:p>2.3843077218544</text:p>
              </table:table-cell>
              <table:table-cell office:value-type="float" office:value="0.809574371249579">
                <text:p>0.809574371249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80.4703295475808">
                <text:p>80.4703295475808</text:p>
              </table:table-cell>
              <table:table-cell office:value-type="float" office:value="4.46798430914435">
                <text:p>4.46798430914435</text:p>
              </table:table-cell>
              <table:table-cell office:value-type="float" office:value="11.8593272743086">
                <text:p>11.8593272743086</text:p>
              </table:table-cell>
              <table:table-cell office:value-type="float" office:value="2.38576219818618">
                <text:p>2.38576219818618</text:p>
              </table:table-cell>
              <table:table-cell office:value-type="float" office:value="0.816597408895348">
                <text:p>0.816597408895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80.4691585671508">
                <text:p>80.4691585671508</text:p>
              </table:table-cell>
              <table:table-cell office:value-type="float" office:value="4.46691247680549">
                <text:p>4.46691247680549</text:p>
              </table:table-cell>
              <table:table-cell office:value-type="float" office:value="11.852246138768">
                <text:p>11.852246138768</text:p>
              </table:table-cell>
              <table:table-cell office:value-type="float" office:value="2.38799207222354">
                <text:p>2.38799207222354</text:p>
              </table:table-cell>
              <table:table-cell office:value-type="float" office:value="0.823688566027357">
                <text:p>0.823688566027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80.4658484405553">
                <text:p>80.4658484405553</text:p>
              </table:table-cell>
              <table:table-cell office:value-type="float" office:value="4.46677253120295">
                <text:p>4.46677253120295</text:p>
              </table:table-cell>
              <table:table-cell office:value-type="float" office:value="11.8446236177363">
                <text:p>11.8446236177363</text:p>
              </table:table-cell>
              <table:table-cell office:value-type="float" office:value="2.39195073677047">
                <text:p>2.39195073677047</text:p>
              </table:table-cell>
              <table:table-cell office:value-type="float" office:value="0.830795618695131">
                <text:p>0.830795618695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80.4624370606443">
                <text:p>80.4624370606443</text:p>
              </table:table-cell>
              <table:table-cell office:value-type="float" office:value="4.46766303127173">
                <text:p>4.46766303127173</text:p>
              </table:table-cell>
              <table:table-cell office:value-type="float" office:value="11.8366510627223">
                <text:p>11.8366510627223</text:p>
              </table:table-cell>
              <table:table-cell office:value-type="float" office:value="2.39534952182451">
                <text:p>2.39534952182451</text:p>
              </table:table-cell>
              <table:table-cell office:value-type="float" office:value="0.83789603956622">
                <text:p>0.837896039566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80.4569430871891">
                <text:p>80.4569430871891</text:p>
              </table:table-cell>
              <table:table-cell office:value-type="float" office:value="4.47034940227456">
                <text:p>4.47034940227456</text:p>
              </table:table-cell>
              <table:table-cell office:value-type="float" office:value="11.8281383891245">
                <text:p>11.8281383891245</text:p>
              </table:table-cell>
              <table:table-cell office:value-type="float" office:value="2.39960707818149">
                <text:p>2.39960707818149</text:p>
              </table:table-cell>
              <table:table-cell office:value-type="float" office:value="0.844975437767537">
                <text:p>0.844975437767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80.4502462488481">
                <text:p>80.4502462488481</text:p>
              </table:table-cell>
              <table:table-cell office:value-type="float" office:value="4.47248965743468">
                <text:p>4.47248965743468</text:p>
              </table:table-cell>
              <table:table-cell office:value-type="float" office:value="11.8191829074931">
                <text:p>11.8191829074931</text:p>
              </table:table-cell>
              <table:table-cell office:value-type="float" office:value="2.4059982046546">
                <text:p>2.4059982046546</text:p>
              </table:table-cell>
              <table:table-cell office:value-type="float" office:value="0.852084573389434">
                <text:p>0.852084573389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80.4456654887352">
                <text:p>80.4456654887352</text:p>
              </table:table-cell>
              <table:table-cell office:value-type="float" office:value="4.47515420107433">
                <text:p>4.47515420107433</text:p>
              </table:table-cell>
              <table:table-cell office:value-type="float" office:value="11.8103224602833">
                <text:p>11.8103224602833</text:p>
              </table:table-cell>
              <table:table-cell office:value-type="float" office:value="2.40962967666178">
                <text:p>2.40962967666178</text:p>
              </table:table-cell>
              <table:table-cell office:value-type="float" office:value="0.859221678328961">
                <text:p>0.8592216783289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80.4399594216896">
                <text:p>80.4399594216896</text:p>
              </table:table-cell>
              <table:table-cell office:value-type="float" office:value="4.47838593891171">
                <text:p>4.47838593891171</text:p>
              </table:table-cell>
              <table:table-cell office:value-type="float" office:value="11.8010987734624">
                <text:p>11.8010987734624</text:p>
              </table:table-cell>
              <table:table-cell office:value-type="float" office:value="2.41425173619863">
                <text:p>2.41425173619863</text:p>
              </table:table-cell>
              <table:table-cell office:value-type="float" office:value="0.866307328528015">
                <text:p>0.866307328528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80.4339033589749">
                <text:p>80.4339033589749</text:p>
              </table:table-cell>
              <table:table-cell office:value-type="float" office:value="4.48228907113385">
                <text:p>4.48228907113385</text:p>
              </table:table-cell>
              <table:table-cell office:value-type="float" office:value="11.7915546954038">
                <text:p>11.7915546954038</text:p>
              </table:table-cell>
              <table:table-cell office:value-type="float" office:value="2.41881508414552">
                <text:p>2.41881508414552</text:p>
              </table:table-cell>
              <table:table-cell office:value-type="float" office:value="0.873429423059578">
                <text:p>0.8734294230595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80.4267469700471">
                <text:p>80.4267469700471</text:p>
              </table:table-cell>
              <table:table-cell office:value-type="float" office:value="4.48674688011046">
                <text:p>4.48674688011046</text:p>
              </table:table-cell>
              <table:table-cell office:value-type="float" office:value="11.781650237893">
                <text:p>11.781650237893</text:p>
              </table:table-cell>
              <table:table-cell office:value-type="float" office:value="2.42431461360351">
                <text:p>2.42431461360351</text:p>
              </table:table-cell>
              <table:table-cell office:value-type="float" office:value="0.880542690221773">
                <text:p>0.880542690221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80.4170475808149">
                <text:p>80.4170475808149</text:p>
              </table:table-cell>
              <table:table-cell office:value-type="float" office:value="4.4917551099644">
                <text:p>4.4917551099644</text:p>
              </table:table-cell>
              <table:table-cell office:value-type="float" office:value="11.7711571543194">
                <text:p>11.7711571543194</text:p>
              </table:table-cell>
              <table:table-cell office:value-type="float" office:value="2.43241637868414">
                <text:p>2.43241637868414</text:p>
              </table:table-cell>
              <table:table-cell office:value-type="float" office:value="0.887620927603541">
                <text:p>0.8876209276035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80.4092694965808">
                <text:p>80.4092694965808</text:p>
              </table:table-cell>
              <table:table-cell office:value-type="float" office:value="4.49725827910287">
                <text:p>4.49725827910287</text:p>
              </table:table-cell>
              <table:table-cell office:value-type="float" office:value="11.7606854848143">
                <text:p>11.7606854848143</text:p>
              </table:table-cell>
              <table:table-cell office:value-type="float" office:value="2.43812528367336">
                <text:p>2.43812528367336</text:p>
              </table:table-cell>
              <table:table-cell office:value-type="float" office:value="0.894656464737159">
                <text:p>0.8946564647371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80.4018086153679">
                <text:p>80.4018086153679</text:p>
              </table:table-cell>
              <table:table-cell office:value-type="float" office:value="4.50325342702684">
                <text:p>4.50325342702684</text:p>
              </table:table-cell>
              <table:table-cell office:value-type="float" office:value="11.7499629739147">
                <text:p>11.7499629739147</text:p>
              </table:table-cell>
              <table:table-cell office:value-type="float" office:value="2.44324708262634">
                <text:p>2.44324708262634</text:p>
              </table:table-cell>
              <table:table-cell office:value-type="float" office:value="0.901726158660235">
                <text:p>0.901726158660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80.3920354171862">
                <text:p>80.3920354171862</text:p>
              </table:table-cell>
              <table:table-cell office:value-type="float" office:value="4.5098218511332">
                <text:p>4.5098218511332</text:p>
              </table:table-cell>
              <table:table-cell office:value-type="float" office:value="11.7386317387813">
                <text:p>11.7386317387813</text:p>
              </table:table-cell>
              <table:table-cell office:value-type="float" office:value="2.45070786277538">
                <text:p>2.45070786277538</text:p>
              </table:table-cell>
              <table:table-cell office:value-type="float" office:value="0.908795754237901">
                <text:p>0.908795754237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80.3850395450058">
                <text:p>80.3850395450058</text:p>
              </table:table-cell>
              <table:table-cell office:value-type="float" office:value="4.5164939384913">
                <text:p>4.5164939384913</text:p>
              </table:table-cell>
              <table:table-cell office:value-type="float" office:value="11.7274179038905">
                <text:p>11.7274179038905</text:p>
              </table:table-cell>
              <table:table-cell office:value-type="float" office:value="2.45527314894605">
                <text:p>2.45527314894605</text:p>
              </table:table-cell>
              <table:table-cell office:value-type="float" office:value="0.915803457485757">
                <text:p>0.9158034574857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80.3779556952699">
                <text:p>80.3779556952699</text:p>
              </table:table-cell>
              <table:table-cell office:value-type="float" office:value="4.52362198536274">
                <text:p>4.52362198536274</text:p>
              </table:table-cell>
              <table:table-cell office:value-type="float" office:value="11.7158799548111">
                <text:p>11.7158799548111</text:p>
              </table:table-cell>
              <table:table-cell office:value-type="float" office:value="2.45951471093865">
                <text:p>2.45951471093865</text:p>
              </table:table-cell>
              <table:table-cell office:value-type="float" office:value="0.922998182621936">
                <text:p>0.922998182621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80.3711773681789">
                <text:p>80.3711773681789</text:p>
              </table:table-cell>
              <table:table-cell office:value-type="float" office:value="4.53149029961005">
                <text:p>4.53149029961005</text:p>
              </table:table-cell>
              <table:table-cell office:value-type="float" office:value="11.7041199409015">
                <text:p>11.7041199409015</text:p>
              </table:table-cell>
              <table:table-cell office:value-type="float" office:value="2.46295540969312">
                <text:p>2.46295540969312</text:p>
              </table:table-cell>
              <table:table-cell office:value-type="float" office:value="0.930233148448664">
                <text:p>0.9302331484486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80.3616910065065">
                <text:p>80.3616910065065</text:p>
              </table:table-cell>
              <table:table-cell office:value-type="float" office:value="4.53973288128726">
                <text:p>4.53973288128726</text:p>
              </table:table-cell>
              <table:table-cell office:value-type="float" office:value="11.6917231803887">
                <text:p>11.6917231803887</text:p>
              </table:table-cell>
              <table:table-cell office:value-type="float" office:value="2.46964025834662">
                <text:p>2.46964025834662</text:p>
              </table:table-cell>
              <table:table-cell office:value-type="float" office:value="0.937253762777102">
                <text:p>0.937253762777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80.3548828918507">
                <text:p>80.3548828918507</text:p>
              </table:table-cell>
              <table:table-cell office:value-type="float" office:value="4.54810686077388">
                <text:p>4.54810686077388</text:p>
              </table:table-cell>
              <table:table-cell office:value-type="float" office:value="11.6794723511274">
                <text:p>11.6794723511274</text:p>
              </table:table-cell>
              <table:table-cell office:value-type="float" office:value="2.47338331179414">
                <text:p>2.47338331179414</text:p>
              </table:table-cell>
              <table:table-cell office:value-type="float" office:value="0.944177207672665">
                <text:p>0.944177207672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80.350092070755">
                <text:p>80.350092070755</text:p>
              </table:table-cell>
              <table:table-cell office:value-type="float" office:value="4.55697691721072">
                <text:p>4.55697691721072</text:p>
              </table:table-cell>
              <table:table-cell office:value-type="float" office:value="11.6672339713186">
                <text:p>11.6672339713186</text:p>
              </table:table-cell>
              <table:table-cell office:value-type="float" office:value="2.47457731153395">
                <text:p>2.47457731153395</text:p>
              </table:table-cell>
              <table:table-cell office:value-type="float" office:value="0.951102059036884">
                <text:p>0.951102059036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80.3440153136321">
                <text:p>80.3440153136321</text:p>
              </table:table-cell>
              <table:table-cell office:value-type="float" office:value="4.56614464995577">
                <text:p>4.56614464995577</text:p>
              </table:table-cell>
              <table:table-cell office:value-type="float" office:value="11.6545017747222">
                <text:p>11.6545017747222</text:p>
              </table:table-cell>
              <table:table-cell office:value-type="float" office:value="2.47733696230688">
                <text:p>2.47733696230688</text:p>
              </table:table-cell>
              <table:table-cell office:value-type="float" office:value="0.95804167569016">
                <text:p>0.958041675690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80.330174499464">
                <text:p>80.330174499464</text:p>
              </table:table-cell>
              <table:table-cell office:value-type="float" office:value="4.57573776547967">
                <text:p>4.57573776547967</text:p>
              </table:table-cell>
              <table:table-cell office:value-type="float" office:value="11.6403239359082">
                <text:p>11.6403239359082</text:p>
              </table:table-cell>
              <table:table-cell office:value-type="float" office:value="2.48872616840031">
                <text:p>2.48872616840031</text:p>
              </table:table-cell>
              <table:table-cell office:value-type="float" office:value="0.965011372526295">
                <text:p>0.9650113725262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80.3146944059987">
                <text:p>80.3146944059987</text:p>
              </table:table-cell>
              <table:table-cell office:value-type="float" office:value="4.5856532589456">
                <text:p>4.5856532589456</text:p>
              </table:table-cell>
              <table:table-cell office:value-type="float" office:value="11.6255636934508">
                <text:p>11.6255636934508</text:p>
              </table:table-cell>
              <table:table-cell office:value-type="float" office:value="2.50203675723587">
                <text:p>2.50203675723587</text:p>
              </table:table-cell>
              <table:table-cell office:value-type="float" office:value="0.972020611500731">
                <text:p>0.9720206115007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80.3086352792807">
                <text:p>80.3086352792807</text:p>
              </table:table-cell>
              <table:table-cell office:value-type="float" office:value="4.59554015142496">
                <text:p>4.59554015142496</text:p>
              </table:table-cell>
              <table:table-cell office:value-type="float" office:value="11.611727717293">
                <text:p>11.611727717293</text:p>
              </table:table-cell>
              <table:table-cell office:value-type="float" office:value="2.50520198078305">
                <text:p>2.50520198078305</text:p>
              </table:table-cell>
              <table:table-cell office:value-type="float" office:value="0.978866649910265">
                <text:p>0.978866649910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80.2922088096125">
                <text:p>80.2922088096125</text:p>
              </table:table-cell>
              <table:table-cell office:value-type="float" office:value="4.60607345173724">
                <text:p>4.60607345173724</text:p>
              </table:table-cell>
              <table:table-cell office:value-type="float" office:value="11.595980627348">
                <text:p>11.595980627348</text:p>
              </table:table-cell>
              <table:table-cell office:value-type="float" office:value="2.51998631658479">
                <text:p>2.51998631658479</text:p>
              </table:table-cell>
              <table:table-cell office:value-type="float" office:value="0.985789964799153">
                <text:p>0.985789964799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80.2746920872767">
                <text:p>80.2746920872767</text:p>
              </table:table-cell>
              <table:table-cell office:value-type="float" office:value="4.61679461458821">
                <text:p>4.61679461458821</text:p>
              </table:table-cell>
              <table:table-cell office:value-type="float" office:value="11.5796148244887">
                <text:p>11.5796148244887</text:p>
              </table:table-cell>
              <table:table-cell office:value-type="float" office:value="2.53621019258776">
                <text:p>2.53621019258776</text:p>
              </table:table-cell>
              <table:table-cell office:value-type="float" office:value="0.992671097230397">
                <text:p>0.992671097230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80.2594446046583">
                <text:p>80.2594446046583</text:p>
              </table:table-cell>
              <table:table-cell office:value-type="float" office:value="4.62777824899489">
                <text:p>4.62777824899489</text:p>
              </table:table-cell>
              <table:table-cell office:value-type="float" office:value="11.5631223600061">
                <text:p>11.5631223600061</text:p>
              </table:table-cell>
              <table:table-cell office:value-type="float" office:value="2.55015012977319">
                <text:p>2.55015012977319</text:p>
              </table:table-cell>
              <table:table-cell office:value-type="float" office:value="0.999527557719385">
                <text:p>0.999527557719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80.243895903135">
                <text:p>80.243895903135</text:p>
              </table:table-cell>
              <table:table-cell office:value-type="float" office:value="4.63901731514365">
                <text:p>4.63901731514365</text:p>
              </table:table-cell>
              <table:table-cell office:value-type="float" office:value="11.546203723631">
                <text:p>11.546203723631</text:p>
              </table:table-cell>
              <table:table-cell office:value-type="float" office:value="2.56453967108178">
                <text:p>2.56453967108178</text:p>
              </table:table-cell>
              <table:table-cell office:value-type="float" office:value="1.00637353379832">
                <text:p>1.00637353379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80.2352752444168">
                <text:p>80.2352752444168</text:p>
              </table:table-cell>
              <table:table-cell office:value-type="float" office:value="4.65019717904552">
                <text:p>4.65019717904552</text:p>
              </table:table-cell>
              <table:table-cell office:value-type="float" office:value="11.5299092786199">
                <text:p>11.5299092786199</text:p>
              </table:table-cell>
              <table:table-cell office:value-type="float" office:value="2.57156288684346">
                <text:p>2.57156288684346</text:p>
              </table:table-cell>
              <table:table-cell office:value-type="float" office:value="1.01309593014842">
                <text:p>1.013095930148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80.2264451404002">
                <text:p>80.2264451404002</text:p>
              </table:table-cell>
              <table:table-cell office:value-type="float" office:value="4.66150987926029">
                <text:p>4.66150987926029</text:p>
              </table:table-cell>
              <table:table-cell office:value-type="float" office:value="11.51326013548">
                <text:p>11.51326013548</text:p>
              </table:table-cell>
              <table:table-cell office:value-type="float" office:value="2.57890382880032">
                <text:p>2.57890382880032</text:p>
              </table:table-cell>
              <table:table-cell office:value-type="float" office:value="1.01984835059839">
                <text:p>1.01984835059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80.2164762283453">
                <text:p>80.2164762283453</text:p>
              </table:table-cell>
              <table:table-cell office:value-type="float" office:value="4.6730958923555">
                <text:p>4.6730958923555</text:p>
              </table:table-cell>
              <table:table-cell office:value-type="float" office:value="11.4961539981562">
                <text:p>11.4961539981562</text:p>
              </table:table-cell>
              <table:table-cell office:value-type="float" office:value="2.58775393008399">
                <text:p>2.58775393008399</text:p>
              </table:table-cell>
              <table:table-cell office:value-type="float" office:value="1.02651591834233">
                <text:p>1.02651591834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80.207433773832">
                <text:p>80.207433773832</text:p>
              </table:table-cell>
              <table:table-cell office:value-type="float" office:value="4.68484215021143">
                <text:p>4.68484215021143</text:p>
              </table:table-cell>
              <table:table-cell office:value-type="float" office:value="11.4788917533165">
                <text:p>11.4788917533165</text:p>
              </table:table-cell>
              <table:table-cell office:value-type="float" office:value="2.59571844199215">
                <text:p>2.59571844199215</text:p>
              </table:table-cell>
              <table:table-cell office:value-type="float" office:value="1.0331425603309">
                <text:p>1.03314256033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80.1974151723074">
                <text:p>80.1974151723074</text:p>
              </table:table-cell>
              <table:table-cell office:value-type="float" office:value="4.69677892034692">
                <text:p>4.69677892034692</text:p>
              </table:table-cell>
              <table:table-cell office:value-type="float" office:value="11.4612626040451">
                <text:p>11.4612626040451</text:p>
              </table:table-cell>
              <table:table-cell office:value-type="float" office:value="2.60480844369701">
                <text:p>2.60480844369701</text:p>
              </table:table-cell>
              <table:table-cell office:value-type="float" office:value="1.03973407264998">
                <text:p>1.039734072649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