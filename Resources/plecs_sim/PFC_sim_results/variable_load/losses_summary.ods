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3.849cm"/>
    </style:style>
    <style:style style:name="co5" style:family="table-column">
      <style:table-column-properties fo:break-before="auto" style:column-width="4.039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3.903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3.65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es_summary" table:style-name="ta1">
        <table:shapes>
          <draw:frame draw:z-index="0" draw:style-name="gr1" draw:text-style-name="P1" svg:width="40.904cm" svg:height="20.613cm" svg:x="72.971cm" svg:y="0.113cm">
            <draw:object draw:notify-on-update-of-ranges="losses_summary.A2:losses_summary.A101 losses_summary.E2:losses_summary.E101 losses_summary.A112:losses_summary.A184 losses_summary.A110:losses_summary.A110 losses_summary.E112:losses_summary.E184 losses_summary.A255:losses_summary.A333 losses_summary.A254:losses_summary.A254 losses_summary.E255:losses_summary.E333 losses_summary.A336:losses_summary.A386 losses_summary.A335:losses_summary.A335 losses_summary.E336:losses_summary.E3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9.83cm" svg:height="22.484cm" svg:x="125.898cm" svg:y="1.354cm">
            <draw:object draw:notify-on-update-of-ranges="losses_summary.A1:losses_summary.A1 losses_summary.A2:losses_summary.A101 losses_summary.P2:losses_summary.P101 losses_summary.A390:losses_summary.A390 losses_summary.P391:losses_summary.P467 losses_summary.A391:losses_summary.A467 losses_summary.A471:losses_summary.A471 losses_summary.P472:losses_summary.P543 losses_summary.A472:losses_summary.A5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9.926cm" svg:height="22.326cm" svg:x="72.932cm" svg:y="22.929cm">
            <draw:object draw:notify-on-update-of-ranges="losses_summary.D112:losses_summary.D184 losses_summary.A112:losses_summary.A184 losses_summary.A1:losses_summary.A1 losses_summary.A2:losses_summary.A101 losses_summary.D2:losses_summary.D101 losses_summary.A1:losses_summary.A1 losses_summary.A2:losses_summary.A101 losses_summary.F1:losses_summary.F1 losses_summary.F2:losses_summary.F101 losses_summary.A1:losses_summary.A1 losses_summary.A2:losses_summary.A101 losses_summary.L1:losses_summary.L1 losses_summary.L2:losses_summary.L101 losses_summary.A1:losses_summary.A1 losses_summary.A2:losses_summary.A101 losses_summary.O1:losses_summary.O1 losses_summary.O2:losses_summary.O101 losses_summary.A1:losses_summary.A1 losses_summary.A2:losses_summary.A101 losses_summary.S1:losses_summary.S1 losses_summary.S2:losses_summary.S101 losses_summary.A1:losses_summary.A1 losses_summary.A2:losses_summary.A101 losses_summary.T1:losses_summary.T1 losses_summary.T2:losses_summary.T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Input_power</text:p>
          </table:table-cell>
          <table:table-cell office:value-type="string" calcext:value-type="string">
            <text:p>Output_power</text:p>
          </table:table-cell>
          <table:table-cell office:value-type="string" calcext:value-type="string">
            <text:p>Losses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Caps_losses</text:p>
          </table:table-cell>
          <table:table-cell office:value-type="string" calcext:value-type="string">
            <text:p>FL1_losses</text:p>
          </table:table-cell>
          <table:table-cell office:value-type="string" calcext:value-type="string">
            <text:p>HF1_losses</text:p>
          </table:table-cell>
          <table:table-cell office:value-type="string" calcext:value-type="string">
            <text:p>FL2_losses</text:p>
          </table:table-cell>
          <table:table-cell office:value-type="string" calcext:value-type="string">
            <text:p>HF2_losses</text:p>
          </table:table-cell>
          <table:table-cell office:value-type="string" calcext:value-type="string">
            <text:p>Bulkcap_losses</text:p>
          </table:table-cell>
          <table:table-cell office:value-type="string" calcext:value-type="string">
            <text:p>GaN_total_losses</text:p>
          </table:table-cell>
          <table:table-cell office:value-type="string" calcext:value-type="string">
            <text:p>GaN_switching_losses</text:p>
          </table:table-cell>
          <table:table-cell office:value-type="string" calcext:value-type="string">
            <text:p>GaN_ohmic_losses</text:p>
          </table:table-cell>
          <table:table-cell office:value-type="string" calcext:value-type="string">
            <text:p>L_losses</text:p>
          </table:table-cell>
          <table:table-cell office:value-type="string" calcext:value-type="string">
            <text:p>iTHD_percentage</text:p>
          </table:table-cell>
          <table:table-cell office:value-type="string" calcext:value-type="string">
            <text:p>Si_conduction</text:p>
          </table:table-cell>
          <table:table-cell office:value-type="string" calcext:value-type="string">
            <text:p>Si_switching</text:p>
          </table:table-cell>
          <table:table-cell office:value-type="string" calcext:value-type="string">
            <text:p>Si_total</text:p>
          </table:table-cell>
          <table:table-cell office:value-type="string" calcext:value-type="string">
            <text:p>EMI_losse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.6662489378114" calcext:value-type="float">
            <text:p>52,6662489378114</text:p>
          </table:table-cell>
          <table:table-cell office:value-type="float" office:value="49.9984532403385" calcext:value-type="float">
            <text:p>49,9984532403385</text:p>
          </table:table-cell>
          <table:table-cell office:value-type="float" office:value="7.96072323593492" calcext:value-type="float">
            <text:p>7,96072323593492</text:p>
          </table:table-cell>
          <table:table-cell office:value-type="float" office:value="84.0780614357687" calcext:value-type="float">
            <text:p>84,0780614357687</text:p>
          </table:table-cell>
          <table:table-cell office:value-type="float" office:value="0.811799962001621" calcext:value-type="float">
            <text:p>0,811799962001621</text:p>
          </table:table-cell>
          <table:table-cell office:value-type="float" office:value="0.00783610935859498" calcext:value-type="float">
            <text:p>0,00783610935859498</text:p>
          </table:table-cell>
          <table:table-cell office:value-type="float" office:value="0.000169903057964117" calcext:value-type="float">
            <text:p>0,000169903057964117</text:p>
          </table:table-cell>
          <table:table-cell office:value-type="float" office:value="0.00351583242437758" calcext:value-type="float">
            <text:p>0,00351583242437758</text:p>
          </table:table-cell>
          <table:table-cell office:value-type="float" office:value="0.000117442401323734" calcext:value-type="float">
            <text:p>0,000117442401323734</text:p>
          </table:table-cell>
          <table:table-cell office:value-type="float" office:value="0.80018369264158" calcext:value-type="float">
            <text:p>0,80018369264158</text:p>
          </table:table-cell>
          <table:table-cell office:value-type="float" office:value="4.91783522941106" calcext:value-type="float">
            <text:p>4,91783522941106</text:p>
          </table:table-cell>
          <table:table-cell office:value-type="float" office:value="1.73876768288288" calcext:value-type="float">
            <text:p>1,73876768288288</text:p>
          </table:table-cell>
          <table:table-cell office:value-type="float" office:value="3.1790675465245" calcext:value-type="float">
            <text:p>3,1790675465245</text:p>
          </table:table-cell>
          <table:table-cell office:value-type="float" office:value="1.80529672281003" calcext:value-type="float">
            <text:p>1,80529672281003</text:p>
          </table:table-cell>
          <table:table-cell office:value-type="float" office:value="224.47134331826" calcext:value-type="float">
            <text:p>224,47134331826</text:p>
          </table:table-cell>
          <table:table-cell office:value-type="float" office:value="0.351104900816489" calcext:value-type="float">
            <text:p>0,351104900816489</text:p>
          </table:table-cell>
          <table:table-cell office:value-type="float" office:value="0.00199325626238002" calcext:value-type="float">
            <text:p>0,00199325626238002</text:p>
          </table:table-cell>
          <table:table-cell office:value-type="float" office:value="0.353098157078724" calcext:value-type="float">
            <text:p>0,353098157078724</text:p>
          </table:table-cell>
          <table:table-cell office:value-type="float" office:value="0.0726931646359359" calcext:value-type="float">
            <text:p>0,07269316463593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.475155546198" calcext:value-type="float">
            <text:p>102,475155546198</text:p>
          </table:table-cell>
          <table:table-cell office:value-type="float" office:value="99.9993002456102" calcext:value-type="float">
            <text:p>99,9993002456102</text:p>
          </table:table-cell>
          <table:table-cell office:value-type="float" office:value="8.32028109106539" calcext:value-type="float">
            <text:p>8,32028109106539</text:p>
          </table:table-cell>
          <table:table-cell office:value-type="float" office:value="91.6796606842046" calcext:value-type="float">
            <text:p>91,6796606842046</text:p>
          </table:table-cell>
          <table:table-cell office:value-type="float" office:value="0.812974857504904" calcext:value-type="float">
            <text:p>0,812974857504904</text:p>
          </table:table-cell>
          <table:table-cell office:value-type="float" office:value="0.00827818151178249" calcext:value-type="float">
            <text:p>0,00827818151178249</text:p>
          </table:table-cell>
          <table:table-cell office:value-type="float" office:value="0.000206789723360433" calcext:value-type="float">
            <text:p>0,000206789723360433</text:p>
          </table:table-cell>
          <table:table-cell office:value-type="float" office:value="0.00413464318099521" calcext:value-type="float">
            <text:p>0,00413464318099521</text:p>
          </table:table-cell>
          <table:table-cell office:value-type="float" office:value="0.000160388143422327" calcext:value-type="float">
            <text:p>0,000160388143422327</text:p>
          </table:table-cell>
          <table:table-cell office:value-type="float" office:value="0.800191326223486" calcext:value-type="float">
            <text:p>0,800191326223486</text:p>
          </table:table-cell>
          <table:table-cell office:value-type="float" office:value="5.22988035473526" calcext:value-type="float">
            <text:p>5,22988035473526</text:p>
          </table:table-cell>
          <table:table-cell office:value-type="float" office:value="1.74668696022505" calcext:value-type="float">
            <text:p>1,74668696022505</text:p>
          </table:table-cell>
          <table:table-cell office:value-type="float" office:value="3.4831933945174" calcext:value-type="float">
            <text:p>3,4831933945174</text:p>
          </table:table-cell>
          <table:table-cell office:value-type="float" office:value="1.80482783699536" calcext:value-type="float">
            <text:p>1,80482783699536</text:p>
          </table:table-cell>
          <table:table-cell office:value-type="float" office:value="142.751988602735" calcext:value-type="float">
            <text:p>142,751988602735</text:p>
          </table:table-cell>
          <table:table-cell office:value-type="float" office:value="0.42074664241102" calcext:value-type="float">
            <text:p>0,42074664241102</text:p>
          </table:table-cell>
          <table:table-cell office:value-type="float" office:value="0.0019652797321663" calcext:value-type="float">
            <text:p>0,0019652797321663</text:p>
          </table:table-cell>
          <table:table-cell office:value-type="float" office:value="0.422711922142738" calcext:value-type="float">
            <text:p>0,422711922142738</text:p>
          </table:table-cell>
          <table:table-cell office:value-type="float" office:value="0.0498861196944658" calcext:value-type="float">
            <text:p>0,04988611969446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2.475104150698" calcext:value-type="float">
            <text:p>152,475104150698</text:p>
          </table:table-cell>
          <table:table-cell office:value-type="float" office:value="150.000083195606" calcext:value-type="float">
            <text:p>150,000083195606</text:p>
          </table:table-cell>
          <table:table-cell office:value-type="float" office:value="8.84817853162813" calcext:value-type="float">
            <text:p>8,84817853162813</text:p>
          </table:table-cell>
          <table:table-cell office:value-type="float" office:value="94.1012175660788" calcext:value-type="float">
            <text:p>94,1012175660788</text:p>
          </table:table-cell>
          <table:table-cell office:value-type="float" office:value="0.81490935660504" calcext:value-type="float">
            <text:p>0,81490935660504</text:p>
          </table:table-cell>
          <table:table-cell office:value-type="float" office:value="0.00908460288306538" calcext:value-type="float">
            <text:p>0,00908460288306538</text:p>
          </table:table-cell>
          <table:table-cell office:value-type="float" office:value="0.000262940753158773" calcext:value-type="float">
            <text:p>0,000262940753158773</text:p>
          </table:table-cell>
          <table:table-cell office:value-type="float" office:value="0.00513979567338615" calcext:value-type="float">
            <text:p>0,00513979567338615</text:p>
          </table:table-cell>
          <table:table-cell office:value-type="float" office:value="0.000215664062028328" calcext:value-type="float">
            <text:p>0,000215664062028328</text:p>
          </table:table-cell>
          <table:table-cell office:value-type="float" office:value="0.800202582209526" calcext:value-type="float">
            <text:p>0,800202582209526</text:p>
          </table:table-cell>
          <table:table-cell office:value-type="float" office:value="5.6786320952747" calcext:value-type="float">
            <text:p>5,6786320952747</text:p>
          </table:table-cell>
          <table:table-cell office:value-type="float" office:value="1.75602988910467" calcext:value-type="float">
            <text:p>1,75602988910467</text:p>
          </table:table-cell>
          <table:table-cell office:value-type="float" office:value="3.92260220617264" calcext:value-type="float">
            <text:p>3,92260220617264</text:p>
          </table:table-cell>
          <table:table-cell office:value-type="float" office:value="1.80521005550922" calcext:value-type="float">
            <text:p>1,80521005550922</text:p>
          </table:table-cell>
          <table:table-cell office:value-type="float" office:value="100.900581416217" calcext:value-type="float">
            <text:p>100,900581416217</text:p>
          </table:table-cell>
          <table:table-cell office:value-type="float" office:value="0.506256945667527" calcext:value-type="float">
            <text:p>0,506256945667527</text:p>
          </table:table-cell>
          <table:table-cell office:value-type="float" office:value="0.00192901796844545" calcext:value-type="float">
            <text:p>0,00192901796844545</text:p>
          </table:table-cell>
          <table:table-cell office:value-type="float" office:value="0.508185963635365" calcext:value-type="float">
            <text:p>0,508185963635365</text:p>
          </table:table-cell>
          <table:table-cell office:value-type="float" office:value="0.0412410606119529" calcext:value-type="float">
            <text:p>0,04124106061195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2.548231639019" calcext:value-type="float">
            <text:p>202,548231639019</text:p>
          </table:table-cell>
          <table:table-cell office:value-type="float" office:value="200.000032188732" calcext:value-type="float">
            <text:p>200,000032188732</text:p>
          </table:table-cell>
          <table:table-cell office:value-type="float" office:value="9.48074626161961" calcext:value-type="float">
            <text:p>9,48074626161961</text:p>
          </table:table-cell>
          <table:table-cell office:value-type="float" office:value="95.259627624515" calcext:value-type="float">
            <text:p>95,259627624515</text:p>
          </table:table-cell>
          <table:table-cell office:value-type="float" office:value="0.81782278670652" calcext:value-type="float">
            <text:p>0,81782278670652</text:p>
          </table:table-cell>
          <table:table-cell office:value-type="float" office:value="0.0102810485421276" calcext:value-type="float">
            <text:p>0,0102810485421276</text:p>
          </table:table-cell>
          <table:table-cell office:value-type="float" office:value="0.00033644190615599" calcext:value-type="float">
            <text:p>0,00033644190615599</text:p>
          </table:table-cell>
          <table:table-cell office:value-type="float" office:value="0.00668088423121878" calcext:value-type="float">
            <text:p>0,00668088423121878</text:p>
          </table:table-cell>
          <table:table-cell office:value-type="float" office:value="0.000298784253105144" calcext:value-type="float">
            <text:p>0,000298784253105144</text:p>
          </table:table-cell>
          <table:table-cell office:value-type="float" office:value="0.800214387469486" calcext:value-type="float">
            <text:p>0,800214387469486</text:p>
          </table:table-cell>
          <table:table-cell office:value-type="float" office:value="6.19988238047612" calcext:value-type="float">
            <text:p>6,19988238047612</text:p>
          </table:table-cell>
          <table:table-cell office:value-type="float" office:value="1.7633197498568" calcext:value-type="float">
            <text:p>1,7633197498568</text:p>
          </table:table-cell>
          <table:table-cell office:value-type="float" office:value="4.43656263062189" calcext:value-type="float">
            <text:p>4,43656263062189</text:p>
          </table:table-cell>
          <table:table-cell office:value-type="float" office:value="1.8081795008168" calcext:value-type="float">
            <text:p>1,8081795008168</text:p>
          </table:table-cell>
          <table:table-cell office:value-type="float" office:value="77.6098511805879" calcext:value-type="float">
            <text:p>77,6098511805879</text:p>
          </table:table-cell>
          <table:table-cell office:value-type="float" office:value="0.607896008878813" calcext:value-type="float">
            <text:p>0,607896008878813</text:p>
          </table:table-cell>
          <table:table-cell office:value-type="float" office:value="0.00189597614683527" calcext:value-type="float">
            <text:p>0,00189597614683527</text:p>
          </table:table-cell>
          <table:table-cell office:value-type="float" office:value="0.609791985024823" calcext:value-type="float">
            <text:p>0,609791985024823</text:p>
          </table:table-cell>
          <table:table-cell office:value-type="float" office:value="0.0450696085872516" calcext:value-type="float">
            <text:p>0,04506960858725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2.5304" calcext:value-type="float">
            <text:p>252,5304</text:p>
          </table:table-cell>
          <table:table-cell office:value-type="float" office:value="250.0004" calcext:value-type="float">
            <text:p>250,0004</text:p>
          </table:table-cell>
          <table:table-cell office:value-type="float" office:value="10.36917" calcext:value-type="float">
            <text:p>10,36917</text:p>
          </table:table-cell>
          <table:table-cell office:value-type="float" office:value="95.85234" calcext:value-type="float">
            <text:p>95,85234</text:p>
          </table:table-cell>
          <table:table-cell office:value-type="float" office:value="0.8239494" calcext:value-type="float">
            <text:p>0,8239494</text:p>
          </table:table-cell>
          <table:table-cell office:value-type="float" office:value="0.01314764" calcext:value-type="float">
            <text:p>0,01314764</text:p>
          </table:table-cell>
          <table:table-cell office:value-type="float" office:value="0.0002500037" calcext:value-type="float">
            <text:p>0,0002500037</text:p>
          </table:table-cell>
          <table:table-cell office:value-type="float" office:value="0.01012213" calcext:value-type="float">
            <text:p>0,01012213</text:p>
          </table:table-cell>
          <table:table-cell office:value-type="float" office:value="0.0001829531" calcext:value-type="float">
            <text:p>0,0001829531</text:p>
          </table:table-cell>
          <table:table-cell office:value-type="float" office:value="0.8002462" calcext:value-type="float">
            <text:p>0,8002462</text:p>
          </table:table-cell>
          <table:table-cell office:value-type="float" office:value="6.857323" calcext:value-type="float">
            <text:p>6,857323</text:p>
          </table:table-cell>
          <table:table-cell office:value-type="float" office:value="1.769539" calcext:value-type="float">
            <text:p>1,769539</text:p>
          </table:table-cell>
          <table:table-cell office:value-type="float" office:value="5.087785" calcext:value-type="float">
            <text:p>5,087785</text:p>
          </table:table-cell>
          <table:table-cell office:value-type="float" office:value="1.811476" calcext:value-type="float">
            <text:p>1,811476</text:p>
          </table:table-cell>
          <table:table-cell office:value-type="float" office:value="52.92027" calcext:value-type="float">
            <text:p>52,92027</text:p>
          </table:table-cell>
          <table:table-cell office:value-type="float" office:value="0.7235861" calcext:value-type="float">
            <text:p>0,7235861</text:p>
          </table:table-cell>
          <table:table-cell office:value-type="float" office:value="0.001820053" calcext:value-type="float">
            <text:p>0,001820053</text:p>
          </table:table-cell>
          <table:table-cell office:value-type="float" office:value="0.7254062" calcext:value-type="float">
            <text:p>0,7254062</text:p>
          </table:table-cell>
          <table:table-cell office:value-type="float" office:value="0.1510153" calcext:value-type="float">
            <text:p>0,15101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2.529246895854" calcext:value-type="float">
            <text:p>302,529246895854</text:p>
          </table:table-cell>
          <table:table-cell office:value-type="float" office:value="300.00058194966" calcext:value-type="float">
            <text:p>300,00058194966</text:p>
          </table:table-cell>
          <table:table-cell office:value-type="float" office:value="10.859989909994" calcext:value-type="float">
            <text:p>10,859989909994</text:p>
          </table:table-cell>
          <table:table-cell office:value-type="float" office:value="96.3800103875685" calcext:value-type="float">
            <text:p>96,3800103875685</text:p>
          </table:table-cell>
          <table:table-cell office:value-type="float" office:value="0.825240453951475" calcext:value-type="float">
            <text:p>0,825240453951475</text:p>
          </table:table-cell>
          <table:table-cell office:value-type="float" office:value="0.0135875405559949" calcext:value-type="float">
            <text:p>0,0135875405559949</text:p>
          </table:table-cell>
          <table:table-cell office:value-type="float" office:value="0.000510625980476833" calcext:value-type="float">
            <text:p>0,000510625980476833</text:p>
          </table:table-cell>
          <table:table-cell office:value-type="float" office:value="0.010424527344095" calcext:value-type="float">
            <text:p>0,010424527344095</text:p>
          </table:table-cell>
          <table:table-cell office:value-type="float" office:value="0.000478120416624122" calcext:value-type="float">
            <text:p>0,000478120416624122</text:p>
          </table:table-cell>
          <table:table-cell office:value-type="float" office:value="0.800241477596166" calcext:value-type="float">
            <text:p>0,800241477596166</text:p>
          </table:table-cell>
          <table:table-cell office:value-type="float" office:value="7.32700868348168" calcext:value-type="float">
            <text:p>7,32700868348168</text:p>
          </table:table-cell>
          <table:table-cell office:value-type="float" office:value="1.78438537485246" calcext:value-type="float">
            <text:p>1,78438537485246</text:p>
          </table:table-cell>
          <table:table-cell office:value-type="float" office:value="5.54262330863705" calcext:value-type="float">
            <text:p>5,54262330863705</text:p>
          </table:table-cell>
          <table:table-cell office:value-type="float" office:value="1.81620729931823" calcext:value-type="float">
            <text:p>1,81620729931823</text:p>
          </table:table-cell>
          <table:table-cell office:value-type="float" office:value="53.0558012574158" calcext:value-type="float">
            <text:p>53,0558012574158</text:p>
          </table:table-cell>
          <table:table-cell office:value-type="float" office:value="0.814906534325376" calcext:value-type="float">
            <text:p>0,814906534325376</text:p>
          </table:table-cell>
          <table:table-cell office:value-type="float" office:value="0.0015977622951063" calcext:value-type="float">
            <text:p>0,0015977622951063</text:p>
          </table:table-cell>
          <table:table-cell office:value-type="float" office:value="0.816504296621965" calcext:value-type="float">
            <text:p>0,816504296621965</text:p>
          </table:table-cell>
          <table:table-cell office:value-type="float" office:value="0.0750291766350748" calcext:value-type="float">
            <text:p>0,075029176635074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2.5568" calcext:value-type="float">
            <text:p>352,5568</text:p>
          </table:table-cell>
          <table:table-cell office:value-type="float" office:value="350.0009" calcext:value-type="float">
            <text:p>350,0009</text:p>
          </table:table-cell>
          <table:table-cell office:value-type="float" office:value="11.84022" calcext:value-type="float">
            <text:p>11,84022</text:p>
          </table:table-cell>
          <table:table-cell office:value-type="float" office:value="96.61709" calcext:value-type="float">
            <text:p>96,61709</text:p>
          </table:table-cell>
          <table:table-cell office:value-type="float" office:value="0.8313001" calcext:value-type="float">
            <text:p>0,8313001</text:p>
          </table:table-cell>
          <table:table-cell office:value-type="float" office:value="0.01652826" calcext:value-type="float">
            <text:p>0,01652826</text:p>
          </table:table-cell>
          <table:table-cell office:value-type="float" office:value="0.0004227699" calcext:value-type="float">
            <text:p>0,0004227699</text:p>
          </table:table-cell>
          <table:table-cell office:value-type="float" office:value="0.01369631" calcext:value-type="float">
            <text:p>0,01369631</text:p>
          </table:table-cell>
          <table:table-cell office:value-type="float" office:value="0.0003783201" calcext:value-type="float">
            <text:p>0,0003783201</text:p>
          </table:table-cell>
          <table:table-cell office:value-type="float" office:value="0.8002736" calcext:value-type="float">
            <text:p>0,8002736</text:p>
          </table:table-cell>
          <table:table-cell office:value-type="float" office:value="8.096946" calcext:value-type="float">
            <text:p>8,096946</text:p>
          </table:table-cell>
          <table:table-cell office:value-type="float" office:value="1.822563" calcext:value-type="float">
            <text:p>1,822563</text:p>
          </table:table-cell>
          <table:table-cell office:value-type="float" office:value="6.274383" calcext:value-type="float">
            <text:p>6,274383</text:p>
          </table:table-cell>
          <table:table-cell office:value-type="float" office:value="1.820473" calcext:value-type="float">
            <text:p>1,820473</text:p>
          </table:table-cell>
          <table:table-cell office:value-type="float" office:value="41.15312" calcext:value-type="float">
            <text:p>41,15312</text:p>
          </table:table-cell>
          <table:table-cell office:value-type="float" office:value="0.9372921" calcext:value-type="float">
            <text:p>0,9372921</text:p>
          </table:table-cell>
          <table:table-cell office:value-type="float" office:value="0.001556188" calcext:value-type="float">
            <text:p>0,001556188</text:p>
          </table:table-cell>
          <table:table-cell office:value-type="float" office:value="0.9388483" calcext:value-type="float">
            <text:p>0,9388483</text:p>
          </table:table-cell>
          <table:table-cell office:value-type="float" office:value="0.1526476" calcext:value-type="float">
            <text:p>0,152647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2.5768" calcext:value-type="float">
            <text:p>402,5768</text:p>
          </table:table-cell>
          <table:table-cell office:value-type="float" office:value="400.0012" calcext:value-type="float">
            <text:p>400,0012</text:p>
          </table:table-cell>
          <table:table-cell office:value-type="float" office:value="12.694" calcext:value-type="float">
            <text:p>12,694</text:p>
          </table:table-cell>
          <table:table-cell office:value-type="float" office:value="96.82651" calcext:value-type="float">
            <text:p>96,82651</text:p>
          </table:table-cell>
          <table:table-cell office:value-type="float" office:value="0.8351975" calcext:value-type="float">
            <text:p>0,8351975</text:p>
          </table:table-cell>
          <table:table-cell office:value-type="float" office:value="0.01834988" calcext:value-type="float">
            <text:p>0,01834988</text:p>
          </table:table-cell>
          <table:table-cell office:value-type="float" office:value="0.0005078211" calcext:value-type="float">
            <text:p>0,0005078211</text:p>
          </table:table-cell>
          <table:table-cell office:value-type="float" office:value="0.01558413" calcext:value-type="float">
            <text:p>0,01558413</text:p>
          </table:table-cell>
          <table:table-cell office:value-type="float" office:value="0.0004654197" calcext:value-type="float">
            <text:p>0,0004654197</text:p>
          </table:table-cell>
          <table:table-cell office:value-type="float" office:value="0.8002899" calcext:value-type="float">
            <text:p>0,8002899</text:p>
          </table:table-cell>
          <table:table-cell office:value-type="float" office:value="8.825287" calcext:value-type="float">
            <text:p>8,825287</text:p>
          </table:table-cell>
          <table:table-cell office:value-type="float" office:value="1.871179" calcext:value-type="float">
            <text:p>1,871179</text:p>
          </table:table-cell>
          <table:table-cell office:value-type="float" office:value="6.954108" calcext:value-type="float">
            <text:p>6,954108</text:p>
          </table:table-cell>
          <table:table-cell office:value-type="float" office:value="1.825717" calcext:value-type="float">
            <text:p>1,825717</text:p>
          </table:table-cell>
          <table:table-cell office:value-type="float" office:value="37.8047" calcext:value-type="float">
            <text:p>37,8047</text:p>
          </table:table-cell>
          <table:table-cell office:value-type="float" office:value="1.052493" calcext:value-type="float">
            <text:p>1,052493</text:p>
          </table:table-cell>
          <table:table-cell office:value-type="float" office:value="0.001609294" calcext:value-type="float">
            <text:p>0,001609294</text:p>
          </table:table-cell>
          <table:table-cell office:value-type="float" office:value="1.054102" calcext:value-type="float">
            <text:p>1,054102</text:p>
          </table:table-cell>
          <table:table-cell office:value-type="float" office:value="0.1536974" calcext:value-type="float">
            <text:p>0,153697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2.5978" calcext:value-type="float">
            <text:p>452,5978</text:p>
          </table:table-cell>
          <table:table-cell office:value-type="float" office:value="450.0016" calcext:value-type="float">
            <text:p>450,0016</text:p>
          </table:table-cell>
          <table:table-cell office:value-type="float" office:value="13.61091" calcext:value-type="float">
            <text:p>13,61091</text:p>
          </table:table-cell>
          <table:table-cell office:value-type="float" office:value="96.97536" calcext:value-type="float">
            <text:p>96,97536</text:p>
          </table:table-cell>
          <table:table-cell office:value-type="float" office:value="0.8383315" calcext:value-type="float">
            <text:p>0,8383315</text:p>
          </table:table-cell>
          <table:table-cell office:value-type="float" office:value="0.0198032" calcext:value-type="float">
            <text:p>0,0198032</text:p>
          </table:table-cell>
          <table:table-cell office:value-type="float" office:value="0.0005815456" calcext:value-type="float">
            <text:p>0,0005815456</text:p>
          </table:table-cell>
          <table:table-cell office:value-type="float" office:value="0.01707909" calcext:value-type="float">
            <text:p>0,01707909</text:p>
          </table:table-cell>
          <table:table-cell office:value-type="float" office:value="0.0005618603" calcext:value-type="float">
            <text:p>0,0005618603</text:p>
          </table:table-cell>
          <table:table-cell office:value-type="float" office:value="0.8003052" calcext:value-type="float">
            <text:p>0,8003052</text:p>
          </table:table-cell>
          <table:table-cell office:value-type="float" office:value="9.61248" calcext:value-type="float">
            <text:p>9,61248</text:p>
          </table:table-cell>
          <table:table-cell office:value-type="float" office:value="1.943335" calcext:value-type="float">
            <text:p>1,943335</text:p>
          </table:table-cell>
          <table:table-cell office:value-type="float" office:value="7.669144" calcext:value-type="float">
            <text:p>7,669144</text:p>
          </table:table-cell>
          <table:table-cell office:value-type="float" office:value="1.831502" calcext:value-type="float">
            <text:p>1,831502</text:p>
          </table:table-cell>
          <table:table-cell office:value-type="float" office:value="33.53494" calcext:value-type="float">
            <text:p>33,53494</text:p>
          </table:table-cell>
          <table:table-cell office:value-type="float" office:value="1.175841" calcext:value-type="float">
            <text:p>1,175841</text:p>
          </table:table-cell>
          <table:table-cell office:value-type="float" office:value="0.001599582" calcext:value-type="float">
            <text:p>0,001599582</text:p>
          </table:table-cell>
          <table:table-cell office:value-type="float" office:value="1.17744" calcext:value-type="float">
            <text:p>1,17744</text:p>
          </table:table-cell>
          <table:table-cell office:value-type="float" office:value="0.1511576" calcext:value-type="float">
            <text:p>0,15115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2.6239" calcext:value-type="float">
            <text:p>502,6239</text:p>
          </table:table-cell>
          <table:table-cell office:value-type="float" office:value="500.0023" calcext:value-type="float">
            <text:p>500,0023</text:p>
          </table:table-cell>
          <table:table-cell office:value-type="float" office:value="14.56406" calcext:value-type="float">
            <text:p>14,56406</text:p>
          </table:table-cell>
          <table:table-cell office:value-type="float" office:value="97.0872" calcext:value-type="float">
            <text:p>97,0872</text:p>
          </table:table-cell>
          <table:table-cell office:value-type="float" office:value="0.8427263" calcext:value-type="float">
            <text:p>0,8427263</text:p>
          </table:table-cell>
          <table:table-cell office:value-type="float" office:value="0.02196626" calcext:value-type="float">
            <text:p>0,02196626</text:p>
          </table:table-cell>
          <table:table-cell office:value-type="float" office:value="0.0006911697" calcext:value-type="float">
            <text:p>0,0006911697</text:p>
          </table:table-cell>
          <table:table-cell office:value-type="float" office:value="0.01908221" calcext:value-type="float">
            <text:p>0,01908221</text:p>
          </table:table-cell>
          <table:table-cell office:value-type="float" office:value="0.0006605597" calcext:value-type="float">
            <text:p>0,0006605597</text:p>
          </table:table-cell>
          <table:table-cell office:value-type="float" office:value="0.8003258" calcext:value-type="float">
            <text:p>0,8003258</text:p>
          </table:table-cell>
          <table:table-cell office:value-type="float" office:value="10.42813" calcext:value-type="float">
            <text:p>10,42813</text:p>
          </table:table-cell>
          <table:table-cell office:value-type="float" office:value="2.015266" calcext:value-type="float">
            <text:p>2,015266</text:p>
          </table:table-cell>
          <table:table-cell office:value-type="float" office:value="8.412867" calcext:value-type="float">
            <text:p>8,412867</text:p>
          </table:table-cell>
          <table:table-cell office:value-type="float" office:value="1.83886" calcext:value-type="float">
            <text:p>1,83886</text:p>
          </table:table-cell>
          <table:table-cell office:value-type="float" office:value="30.74423" calcext:value-type="float">
            <text:p>30,74423</text:p>
          </table:table-cell>
          <table:table-cell office:value-type="float" office:value="1.302484" calcext:value-type="float">
            <text:p>1,302484</text:p>
          </table:table-cell>
          <table:table-cell office:value-type="float" office:value="0.001272077" calcext:value-type="float">
            <text:p>0,001272077</text:p>
          </table:table-cell>
          <table:table-cell office:value-type="float" office:value="1.303756" calcext:value-type="float">
            <text:p>1,303756</text:p>
          </table:table-cell>
          <table:table-cell office:value-type="float" office:value="0.1505846" calcext:value-type="float">
            <text:p>0,150584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2.6508" calcext:value-type="float">
            <text:p>552,6508</text:p>
          </table:table-cell>
          <table:table-cell office:value-type="float" office:value="550.0031" calcext:value-type="float">
            <text:p>550,0031</text:p>
          </table:table-cell>
          <table:table-cell office:value-type="float" office:value="15.54258" calcext:value-type="float">
            <text:p>15,54258</text:p>
          </table:table-cell>
          <table:table-cell office:value-type="float" office:value="97.17409" calcext:value-type="float">
            <text:p>97,17409</text:p>
          </table:table-cell>
          <table:table-cell office:value-type="float" office:value="0.8480639" calcext:value-type="float">
            <text:p>0,8480639</text:p>
          </table:table-cell>
          <table:table-cell office:value-type="float" office:value="0.02450383" calcext:value-type="float">
            <text:p>0,02450383</text:p>
          </table:table-cell>
          <table:table-cell office:value-type="float" office:value="0.0007972899" calcext:value-type="float">
            <text:p>0,0007972899</text:p>
          </table:table-cell>
          <table:table-cell office:value-type="float" office:value="0.02164226" calcext:value-type="float">
            <text:p>0,02164226</text:p>
          </table:table-cell>
          <table:table-cell office:value-type="float" office:value="0.0007705891" calcext:value-type="float">
            <text:p>0,0007705891</text:p>
          </table:table-cell>
          <table:table-cell office:value-type="float" office:value="0.8003497" calcext:value-type="float">
            <text:p>0,8003497</text:p>
          </table:table-cell>
          <table:table-cell office:value-type="float" office:value="11.26484" calcext:value-type="float">
            <text:p>11,26484</text:p>
          </table:table-cell>
          <table:table-cell office:value-type="float" office:value="2.088458" calcext:value-type="float">
            <text:p>2,088458</text:p>
          </table:table-cell>
          <table:table-cell office:value-type="float" office:value="9.176385" calcext:value-type="float">
            <text:p>9,176385</text:p>
          </table:table-cell>
          <table:table-cell office:value-type="float" office:value="1.846072" calcext:value-type="float">
            <text:p>1,846072</text:p>
          </table:table-cell>
          <table:table-cell office:value-type="float" office:value="28.71033" calcext:value-type="float">
            <text:p>28,71033</text:p>
          </table:table-cell>
          <table:table-cell office:value-type="float" office:value="1.430377" calcext:value-type="float">
            <text:p>1,430377</text:p>
          </table:table-cell>
          <table:table-cell office:value-type="float" office:value="0.0007460934" calcext:value-type="float">
            <text:p>0,0007460934</text:p>
          </table:table-cell>
          <table:table-cell office:value-type="float" office:value="1.431123" calcext:value-type="float">
            <text:p>1,431123</text:p>
          </table:table-cell>
          <table:table-cell office:value-type="float" office:value="0.1524754" calcext:value-type="float">
            <text:p>0,152475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02.6796" calcext:value-type="float">
            <text:p>602,6796</text:p>
          </table:table-cell>
          <table:table-cell office:value-type="float" office:value="600.004" calcext:value-type="float">
            <text:p>600,004</text:p>
          </table:table-cell>
          <table:table-cell office:value-type="float" office:value="16.52622" calcext:value-type="float">
            <text:p>16,52622</text:p>
          </table:table-cell>
          <table:table-cell office:value-type="float" office:value="97.24565" calcext:value-type="float">
            <text:p>97,24565</text:p>
          </table:table-cell>
          <table:table-cell office:value-type="float" office:value="0.8536427" calcext:value-type="float">
            <text:p>0,8536427</text:p>
          </table:table-cell>
          <table:table-cell office:value-type="float" office:value="0.02716005" calcext:value-type="float">
            <text:p>0,02716005</text:p>
          </table:table-cell>
          <table:table-cell office:value-type="float" office:value="0.0008969955" calcext:value-type="float">
            <text:p>0,0008969955</text:p>
          </table:table-cell>
          <table:table-cell office:value-type="float" office:value="0.02432357" calcext:value-type="float">
            <text:p>0,02432357</text:p>
          </table:table-cell>
          <table:table-cell office:value-type="float" office:value="0.0008866369" calcext:value-type="float">
            <text:p>0,0008866369</text:p>
          </table:table-cell>
          <table:table-cell office:value-type="float" office:value="0.8003758" calcext:value-type="float">
            <text:p>0,8003758</text:p>
          </table:table-cell>
          <table:table-cell office:value-type="float" office:value="12.10329" calcext:value-type="float">
            <text:p>12,10329</text:p>
          </table:table-cell>
          <table:table-cell office:value-type="float" office:value="2.153029" calcext:value-type="float">
            <text:p>2,153029</text:p>
          </table:table-cell>
          <table:table-cell office:value-type="float" office:value="9.950258" calcext:value-type="float">
            <text:p>9,950258</text:p>
          </table:table-cell>
          <table:table-cell office:value-type="float" office:value="1.853946" calcext:value-type="float">
            <text:p>1,853946</text:p>
          </table:table-cell>
          <table:table-cell office:value-type="float" office:value="26.64918" calcext:value-type="float">
            <text:p>26,64918</text:p>
          </table:table-cell>
          <table:table-cell office:value-type="float" office:value="1.560483" calcext:value-type="float">
            <text:p>1,560483</text:p>
          </table:table-cell>
          <table:table-cell office:value-type="float" office:value="0.001125508" calcext:value-type="float">
            <text:p>0,001125508</text:p>
          </table:table-cell>
          <table:table-cell office:value-type="float" office:value="1.561608" calcext:value-type="float">
            <text:p>1,561608</text:p>
          </table:table-cell>
          <table:table-cell office:value-type="float" office:value="0.153742" calcext:value-type="float">
            <text:p>0,15374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52.7107" calcext:value-type="float">
            <text:p>652,7107</text:p>
          </table:table-cell>
          <table:table-cell office:value-type="float" office:value="650.0051" calcext:value-type="float">
            <text:p>650,0051</text:p>
          </table:table-cell>
          <table:table-cell office:value-type="float" office:value="17.53242" calcext:value-type="float">
            <text:p>17,53242</text:p>
          </table:table-cell>
          <table:table-cell office:value-type="float" office:value="97.30273" calcext:value-type="float">
            <text:p>97,30273</text:p>
          </table:table-cell>
          <table:table-cell office:value-type="float" office:value="0.8594937" calcext:value-type="float">
            <text:p>0,8594937</text:p>
          </table:table-cell>
          <table:table-cell office:value-type="float" office:value="0.02996144" calcext:value-type="float">
            <text:p>0,02996144</text:p>
          </table:table-cell>
          <table:table-cell office:value-type="float" office:value="0.0009959776" calcext:value-type="float">
            <text:p>0,0009959776</text:p>
          </table:table-cell>
          <table:table-cell office:value-type="float" office:value="0.02712903" calcext:value-type="float">
            <text:p>0,02712903</text:p>
          </table:table-cell>
          <table:table-cell office:value-type="float" office:value="0.001002885" calcext:value-type="float">
            <text:p>0,001002885</text:p>
          </table:table-cell>
          <table:table-cell office:value-type="float" office:value="0.8004034" calcext:value-type="float">
            <text:p>0,8004034</text:p>
          </table:table-cell>
          <table:table-cell office:value-type="float" office:value="12.96016" calcext:value-type="float">
            <text:p>12,96016</text:p>
          </table:table-cell>
          <table:table-cell office:value-type="float" office:value="2.214613" calcext:value-type="float">
            <text:p>2,214613</text:p>
          </table:table-cell>
          <table:table-cell office:value-type="float" office:value="10.74554" calcext:value-type="float">
            <text:p>10,74554</text:p>
          </table:table-cell>
          <table:table-cell office:value-type="float" office:value="1.862814" calcext:value-type="float">
            <text:p>1,862814</text:p>
          </table:table-cell>
          <table:table-cell office:value-type="float" office:value="24.23697" calcext:value-type="float">
            <text:p>24,23697</text:p>
          </table:table-cell>
          <table:table-cell office:value-type="float" office:value="1.693314" calcext:value-type="float">
            <text:p>1,693314</text:p>
          </table:table-cell>
          <table:table-cell office:value-type="float" office:value="0.001592759" calcext:value-type="float">
            <text:p>0,001592759</text:p>
          </table:table-cell>
          <table:table-cell office:value-type="float" office:value="1.694906" calcext:value-type="float">
            <text:p>1,694906</text:p>
          </table:table-cell>
          <table:table-cell office:value-type="float" office:value="0.1550494" calcext:value-type="float">
            <text:p>0,155049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2.7445" calcext:value-type="float">
            <text:p>702,7445</text:p>
          </table:table-cell>
          <table:table-cell office:value-type="float" office:value="700.0064" calcext:value-type="float">
            <text:p>700,0064</text:p>
          </table:table-cell>
          <table:table-cell office:value-type="float" office:value="18.55459" calcext:value-type="float">
            <text:p>18,55459</text:p>
          </table:table-cell>
          <table:table-cell office:value-type="float" office:value="97.34937" calcext:value-type="float">
            <text:p>97,34937</text:p>
          </table:table-cell>
          <table:table-cell office:value-type="float" office:value="0.8659053" calcext:value-type="float">
            <text:p>0,8659053</text:p>
          </table:table-cell>
          <table:table-cell office:value-type="float" office:value="0.03296698" calcext:value-type="float">
            <text:p>0,03296698</text:p>
          </table:table-cell>
          <table:table-cell office:value-type="float" office:value="0.001163055" calcext:value-type="float">
            <text:p>0,001163055</text:p>
          </table:table-cell>
          <table:table-cell office:value-type="float" office:value="0.03017072" calcext:value-type="float">
            <text:p>0,03017072</text:p>
          </table:table-cell>
          <table:table-cell office:value-type="float" office:value="0.001170605" calcext:value-type="float">
            <text:p>0,001170605</text:p>
          </table:table-cell>
          <table:table-cell office:value-type="float" office:value="0.8004335" calcext:value-type="float">
            <text:p>0,8004335</text:p>
          </table:table-cell>
          <table:table-cell office:value-type="float" office:value="13.8309" calcext:value-type="float">
            <text:p>13,8309</text:p>
          </table:table-cell>
          <table:table-cell office:value-type="float" office:value="2.278694" calcext:value-type="float">
            <text:p>2,278694</text:p>
          </table:table-cell>
          <table:table-cell office:value-type="float" office:value="11.5522" calcext:value-type="float">
            <text:p>11,5522</text:p>
          </table:table-cell>
          <table:table-cell office:value-type="float" office:value="1.872899" calcext:value-type="float">
            <text:p>1,872899</text:p>
          </table:table-cell>
          <table:table-cell office:value-type="float" office:value="22.39759" calcext:value-type="float">
            <text:p>22,39759</text:p>
          </table:table-cell>
          <table:table-cell office:value-type="float" office:value="1.826416" calcext:value-type="float">
            <text:p>1,826416</text:p>
          </table:table-cell>
          <table:table-cell office:value-type="float" office:value="0.001347687" calcext:value-type="float">
            <text:p>0,001347687</text:p>
          </table:table-cell>
          <table:table-cell office:value-type="float" office:value="1.827763" calcext:value-type="float">
            <text:p>1,827763</text:p>
          </table:table-cell>
          <table:table-cell office:value-type="float" office:value="0.1571306" calcext:value-type="float">
            <text:p>0,157130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52.7812" calcext:value-type="float">
            <text:p>752,7812</text:p>
          </table:table-cell>
          <table:table-cell office:value-type="float" office:value="750.0079" calcext:value-type="float">
            <text:p>750,0079</text:p>
          </table:table-cell>
          <table:table-cell office:value-type="float" office:value="19.58205" calcext:value-type="float">
            <text:p>19,58205</text:p>
          </table:table-cell>
          <table:table-cell office:value-type="float" office:value="97.38909" calcext:value-type="float">
            <text:p>97,38909</text:p>
          </table:table-cell>
          <table:table-cell office:value-type="float" office:value="0.8729021" calcext:value-type="float">
            <text:p>0,8729021</text:p>
          </table:table-cell>
          <table:table-cell office:value-type="float" office:value="0.03632093" calcext:value-type="float">
            <text:p>0,03632093</text:p>
          </table:table-cell>
          <table:table-cell office:value-type="float" office:value="0.001313594" calcext:value-type="float">
            <text:p>0,001313594</text:p>
          </table:table-cell>
          <table:table-cell office:value-type="float" office:value="0.03348325" calcext:value-type="float">
            <text:p>0,03348325</text:p>
          </table:table-cell>
          <table:table-cell office:value-type="float" office:value="0.001317542" calcext:value-type="float">
            <text:p>0,001317542</text:p>
          </table:table-cell>
          <table:table-cell office:value-type="float" office:value="0.8004663" calcext:value-type="float">
            <text:p>0,8004663</text:p>
          </table:table-cell>
          <table:table-cell office:value-type="float" office:value="14.7053" calcext:value-type="float">
            <text:p>14,7053</text:p>
          </table:table-cell>
          <table:table-cell office:value-type="float" office:value="2.337472" calcext:value-type="float">
            <text:p>2,337472</text:p>
          </table:table-cell>
          <table:table-cell office:value-type="float" office:value="12.36783" calcext:value-type="float">
            <text:p>12,36783</text:p>
          </table:table-cell>
          <table:table-cell office:value-type="float" office:value="1.883519" calcext:value-type="float">
            <text:p>1,883519</text:p>
          </table:table-cell>
          <table:table-cell office:value-type="float" office:value="20.87613" calcext:value-type="float">
            <text:p>20,87613</text:p>
          </table:table-cell>
          <table:table-cell office:value-type="float" office:value="1.960068" calcext:value-type="float">
            <text:p>1,960068</text:p>
          </table:table-cell>
          <table:table-cell office:value-type="float" office:value="0.0008671656" calcext:value-type="float">
            <text:p>0,0008671656</text:p>
          </table:table-cell>
          <table:table-cell office:value-type="float" office:value="1.960935" calcext:value-type="float">
            <text:p>1,960935</text:p>
          </table:table-cell>
          <table:table-cell office:value-type="float" office:value="0.1593934" calcext:value-type="float">
            <text:p>0,159393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02.8204" calcext:value-type="float">
            <text:p>802,8204</text:p>
          </table:table-cell>
          <table:table-cell office:value-type="float" office:value="800.0096" calcext:value-type="float">
            <text:p>800,0096</text:p>
          </table:table-cell>
          <table:table-cell office:value-type="float" office:value="20.61164" calcext:value-type="float">
            <text:p>20,61164</text:p>
          </table:table-cell>
          <table:table-cell office:value-type="float" office:value="97.42358" calcext:value-type="float">
            <text:p>97,42358</text:p>
          </table:table-cell>
          <table:table-cell office:value-type="float" office:value="0.8805299" calcext:value-type="float">
            <text:p>0,8805299</text:p>
          </table:table-cell>
          <table:table-cell office:value-type="float" office:value="0.0399864" calcext:value-type="float">
            <text:p>0,0399864</text:p>
          </table:table-cell>
          <table:table-cell office:value-type="float" office:value="0.00145487" calcext:value-type="float">
            <text:p>0,00145487</text:p>
          </table:table-cell>
          <table:table-cell office:value-type="float" office:value="0.03713778" calcext:value-type="float">
            <text:p>0,03713778</text:p>
          </table:table-cell>
          <table:table-cell office:value-type="float" office:value="0.001448377" calcext:value-type="float">
            <text:p>0,001448377</text:p>
          </table:table-cell>
          <table:table-cell office:value-type="float" office:value="0.8005016" calcext:value-type="float">
            <text:p>0,8005016</text:p>
          </table:table-cell>
          <table:table-cell office:value-type="float" office:value="15.58073" calcext:value-type="float">
            <text:p>15,58073</text:p>
          </table:table-cell>
          <table:table-cell office:value-type="float" office:value="2.392614" calcext:value-type="float">
            <text:p>2,392614</text:p>
          </table:table-cell>
          <table:table-cell office:value-type="float" office:value="13.18812" calcext:value-type="float">
            <text:p>13,18812</text:p>
          </table:table-cell>
          <table:table-cell office:value-type="float" office:value="1.894171" calcext:value-type="float">
            <text:p>1,894171</text:p>
          </table:table-cell>
          <table:table-cell office:value-type="float" office:value="19.5318" calcext:value-type="float">
            <text:p>19,5318</text:p>
          </table:table-cell>
          <table:table-cell office:value-type="float" office:value="2.094079" calcext:value-type="float">
            <text:p>2,094079</text:p>
          </table:table-cell>
          <table:table-cell office:value-type="float" office:value="0.0003595766" calcext:value-type="float">
            <text:p>0,0003595766</text:p>
          </table:table-cell>
          <table:table-cell office:value-type="float" office:value="2.094439" calcext:value-type="float">
            <text:p>2,094439</text:p>
          </table:table-cell>
          <table:table-cell office:value-type="float" office:value="0.1617709" calcext:value-type="float">
            <text:p>0,161770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52.8624" calcext:value-type="float">
            <text:p>852,8624</text:p>
          </table:table-cell>
          <table:table-cell office:value-type="float" office:value="850.0115" calcext:value-type="float">
            <text:p>850,0115</text:p>
          </table:table-cell>
          <table:table-cell office:value-type="float" office:value="21.64852" calcext:value-type="float">
            <text:p>21,64852</text:p>
          </table:table-cell>
          <table:table-cell office:value-type="float" office:value="97.45315" calcext:value-type="float">
            <text:p>97,45315</text:p>
          </table:table-cell>
          <table:table-cell office:value-type="float" office:value="0.8886793" calcext:value-type="float">
            <text:p>0,8886793</text:p>
          </table:table-cell>
          <table:table-cell office:value-type="float" office:value="0.04389853" calcext:value-type="float">
            <text:p>0,04389853</text:p>
          </table:table-cell>
          <table:table-cell office:value-type="float" office:value="0.001583678" calcext:value-type="float">
            <text:p>0,001583678</text:p>
          </table:table-cell>
          <table:table-cell office:value-type="float" office:value="0.04104675" calcext:value-type="float">
            <text:p>0,04104675</text:p>
          </table:table-cell>
          <table:table-cell office:value-type="float" office:value="0.001610482" calcext:value-type="float">
            <text:p>0,001610482</text:p>
          </table:table-cell>
          <table:table-cell office:value-type="float" office:value="0.8005392" calcext:value-type="float">
            <text:p>0,8005392</text:p>
          </table:table-cell>
          <table:table-cell office:value-type="float" office:value="16.45931" calcext:value-type="float">
            <text:p>16,45931</text:p>
          </table:table-cell>
          <table:table-cell office:value-type="float" office:value="2.444915" calcext:value-type="float">
            <text:p>2,444915</text:p>
          </table:table-cell>
          <table:table-cell office:value-type="float" office:value="14.01439" calcext:value-type="float">
            <text:p>14,01439</text:p>
          </table:table-cell>
          <table:table-cell office:value-type="float" office:value="1.906006" calcext:value-type="float">
            <text:p>1,906006</text:p>
          </table:table-cell>
          <table:table-cell office:value-type="float" office:value="18.44495" calcext:value-type="float">
            <text:p>18,44495</text:p>
          </table:table-cell>
          <table:table-cell office:value-type="float" office:value="2.229539" calcext:value-type="float">
            <text:p>2,229539</text:p>
          </table:table-cell>
          <table:table-cell office:value-type="float" office:value="0.0003499901" calcext:value-type="float">
            <text:p>0,0003499901</text:p>
          </table:table-cell>
          <table:table-cell office:value-type="float" office:value="2.229889" calcext:value-type="float">
            <text:p>2,229889</text:p>
          </table:table-cell>
          <table:table-cell office:value-type="float" office:value="0.1646379" calcext:value-type="float">
            <text:p>0,164637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02.9071" calcext:value-type="float">
            <text:p>902,9071</text:p>
          </table:table-cell>
          <table:table-cell office:value-type="float" office:value="900.0137" calcext:value-type="float">
            <text:p>900,0137</text:p>
          </table:table-cell>
          <table:table-cell office:value-type="float" office:value="22.68906" calcext:value-type="float">
            <text:p>22,68906</text:p>
          </table:table-cell>
          <table:table-cell office:value-type="float" office:value="97.47903" calcext:value-type="float">
            <text:p>97,47903</text:p>
          </table:table-cell>
          <table:table-cell office:value-type="float" office:value="0.8974331" calcext:value-type="float">
            <text:p>0,8974331</text:p>
          </table:table-cell>
          <table:table-cell office:value-type="float" office:value="0.04804562" calcext:value-type="float">
            <text:p>0,04804562</text:p>
          </table:table-cell>
          <table:table-cell office:value-type="float" office:value="0.001782118" calcext:value-type="float">
            <text:p>0,001782118</text:p>
          </table:table-cell>
          <table:table-cell office:value-type="float" office:value="0.04519994" calcext:value-type="float">
            <text:p>0,04519994</text:p>
          </table:table-cell>
          <table:table-cell office:value-type="float" office:value="0.001825659" calcext:value-type="float">
            <text:p>0,001825659</text:p>
          </table:table-cell>
          <table:table-cell office:value-type="float" office:value="0.8005791" calcext:value-type="float">
            <text:p>0,8005791</text:p>
          </table:table-cell>
          <table:table-cell office:value-type="float" office:value="17.3389" calcext:value-type="float">
            <text:p>17,3389</text:p>
          </table:table-cell>
          <table:table-cell office:value-type="float" office:value="2.49357" calcext:value-type="float">
            <text:p>2,49357</text:p>
          </table:table-cell>
          <table:table-cell office:value-type="float" office:value="14.84533" calcext:value-type="float">
            <text:p>14,84533</text:p>
          </table:table-cell>
          <table:table-cell office:value-type="float" office:value="1.918662" calcext:value-type="float">
            <text:p>1,918662</text:p>
          </table:table-cell>
          <table:table-cell office:value-type="float" office:value="17.55746" calcext:value-type="float">
            <text:p>17,55746</text:p>
          </table:table-cell>
          <table:table-cell office:value-type="float" office:value="2.36598" calcext:value-type="float">
            <text:p>2,36598</text:p>
          </table:table-cell>
          <table:table-cell office:value-type="float" office:value="0.0002603136" calcext:value-type="float">
            <text:p>0,0002603136</text:p>
          </table:table-cell>
          <table:table-cell office:value-type="float" office:value="2.366241" calcext:value-type="float">
            <text:p>2,366241</text:p>
          </table:table-cell>
          <table:table-cell office:value-type="float" office:value="0.167817" calcext:value-type="float">
            <text:p>0,16781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52.9543" calcext:value-type="float">
            <text:p>952,9543</text:p>
          </table:table-cell>
          <table:table-cell office:value-type="float" office:value="950.016" calcext:value-type="float">
            <text:p>950,016</text:p>
          </table:table-cell>
          <table:table-cell office:value-type="float" office:value="23.732" calcext:value-type="float">
            <text:p>23,732</text:p>
          </table:table-cell>
          <table:table-cell office:value-type="float" office:value="97.50194" calcext:value-type="float">
            <text:p>97,50194</text:p>
          </table:table-cell>
          <table:table-cell office:value-type="float" office:value="0.9065527" calcext:value-type="float">
            <text:p>0,9065527</text:p>
          </table:table-cell>
          <table:table-cell office:value-type="float" office:value="0.05242653" calcext:value-type="float">
            <text:p>0,05242653</text:p>
          </table:table-cell>
          <table:table-cell office:value-type="float" office:value="0.001931227" calcext:value-type="float">
            <text:p>0,001931227</text:p>
          </table:table-cell>
          <table:table-cell office:value-type="float" office:value="0.04957921" calcext:value-type="float">
            <text:p>0,04957921</text:p>
          </table:table-cell>
          <table:table-cell office:value-type="float" office:value="0.001994077" calcext:value-type="float">
            <text:p>0,001994077</text:p>
          </table:table-cell>
          <table:table-cell office:value-type="float" office:value="0.8006212" calcext:value-type="float">
            <text:p>0,8006212</text:p>
          </table:table-cell>
          <table:table-cell office:value-type="float" office:value="18.21917" calcext:value-type="float">
            <text:p>18,21917</text:p>
          </table:table-cell>
          <table:table-cell office:value-type="float" office:value="2.539693" calcext:value-type="float">
            <text:p>2,539693</text:p>
          </table:table-cell>
          <table:table-cell office:value-type="float" office:value="15.67948" calcext:value-type="float">
            <text:p>15,67948</text:p>
          </table:table-cell>
          <table:table-cell office:value-type="float" office:value="1.931762" calcext:value-type="float">
            <text:p>1,931762</text:p>
          </table:table-cell>
          <table:table-cell office:value-type="float" office:value="16.67848" calcext:value-type="float">
            <text:p>16,67848</text:p>
          </table:table-cell>
          <table:table-cell office:value-type="float" office:value="2.503257" calcext:value-type="float">
            <text:p>2,503257</text:p>
          </table:table-cell>
          <table:table-cell office:value-type="float" office:value="0.0001353572" calcext:value-type="float">
            <text:p>0,0001353572</text:p>
          </table:table-cell>
          <table:table-cell office:value-type="float" office:value="2.503392" calcext:value-type="float">
            <text:p>2,503392</text:p>
          </table:table-cell>
          <table:table-cell office:value-type="float" office:value="0.1711229" calcext:value-type="float">
            <text:p>0,17112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3.004" calcext:value-type="float">
            <text:p>1003,004</text:p>
          </table:table-cell>
          <table:table-cell office:value-type="float" office:value="1000.019" calcext:value-type="float">
            <text:p>1000,019</text:p>
          </table:table-cell>
          <table:table-cell office:value-type="float" office:value="24.77889" calcext:value-type="float">
            <text:p>24,77889</text:p>
          </table:table-cell>
          <table:table-cell office:value-type="float" office:value="97.52216" calcext:value-type="float">
            <text:p>97,52216</text:p>
          </table:table-cell>
          <table:table-cell office:value-type="float" office:value="0.9160255" calcext:value-type="float">
            <text:p>0,9160255</text:p>
          </table:table-cell>
          <table:table-cell office:value-type="float" office:value="0.05701904" calcext:value-type="float">
            <text:p>0,05701904</text:p>
          </table:table-cell>
          <table:table-cell office:value-type="float" office:value="0.002040425" calcext:value-type="float">
            <text:p>0,002040425</text:p>
          </table:table-cell>
          <table:table-cell office:value-type="float" office:value="0.05417128" calcext:value-type="float">
            <text:p>0,05417128</text:p>
          </table:table-cell>
          <table:table-cell office:value-type="float" office:value="0.002128686" calcext:value-type="float">
            <text:p>0,002128686</text:p>
          </table:table-cell>
          <table:table-cell office:value-type="float" office:value="0.8006655" calcext:value-type="float">
            <text:p>0,8006655</text:p>
          </table:table-cell>
          <table:table-cell office:value-type="float" office:value="19.10208" calcext:value-type="float">
            <text:p>19,10208</text:p>
          </table:table-cell>
          <table:table-cell office:value-type="float" office:value="2.582613" calcext:value-type="float">
            <text:p>2,582613</text:p>
          </table:table-cell>
          <table:table-cell office:value-type="float" office:value="16.51947" calcext:value-type="float">
            <text:p>16,51947</text:p>
          </table:table-cell>
          <table:table-cell office:value-type="float" office:value="1.944916" calcext:value-type="float">
            <text:p>1,944916</text:p>
          </table:table-cell>
          <table:table-cell office:value-type="float" office:value="15.8156" calcext:value-type="float">
            <text:p>15,8156</text:p>
          </table:table-cell>
          <table:table-cell office:value-type="float" office:value="2.641361" calcext:value-type="float">
            <text:p>2,641361</text:p>
          </table:table-cell>
          <table:table-cell office:value-type="float" office:value="0.0002602985" calcext:value-type="float">
            <text:p>0,0002602985</text:p>
          </table:table-cell>
          <table:table-cell office:value-type="float" office:value="2.641621" calcext:value-type="float">
            <text:p>2,641621</text:p>
          </table:table-cell>
          <table:table-cell office:value-type="float" office:value="0.1742404" calcext:value-type="float">
            <text:p>0,174240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53.057" calcext:value-type="float">
            <text:p>1053,057</text:p>
          </table:table-cell>
          <table:table-cell office:value-type="float" office:value="1050.022" calcext:value-type="float">
            <text:p>1050,022</text:p>
          </table:table-cell>
          <table:table-cell office:value-type="float" office:value="25.8323" calcext:value-type="float">
            <text:p>25,8323</text:p>
          </table:table-cell>
          <table:table-cell office:value-type="float" office:value="97.53983" calcext:value-type="float">
            <text:p>97,53983</text:p>
          </table:table-cell>
          <table:table-cell office:value-type="float" office:value="0.9262307" calcext:value-type="float">
            <text:p>0,9262307</text:p>
          </table:table-cell>
          <table:table-cell office:value-type="float" office:value="0.06185319" calcext:value-type="float">
            <text:p>0,06185319</text:p>
          </table:table-cell>
          <table:table-cell office:value-type="float" office:value="0.002291572" calcext:value-type="float">
            <text:p>0,002291572</text:p>
          </table:table-cell>
          <table:table-cell office:value-type="float" office:value="0.05900812" calcext:value-type="float">
            <text:p>0,05900812</text:p>
          </table:table-cell>
          <table:table-cell office:value-type="float" office:value="0.002364686" calcext:value-type="float">
            <text:p>0,002364686</text:p>
          </table:table-cell>
          <table:table-cell office:value-type="float" office:value="0.8007121" calcext:value-type="float">
            <text:p>0,8007121</text:p>
          </table:table-cell>
          <table:table-cell office:value-type="float" office:value="19.98783" calcext:value-type="float">
            <text:p>19,98783</text:p>
          </table:table-cell>
          <table:table-cell office:value-type="float" office:value="2.623329" calcext:value-type="float">
            <text:p>2,623329</text:p>
          </table:table-cell>
          <table:table-cell office:value-type="float" office:value="17.3645" calcext:value-type="float">
            <text:p>17,3645</text:p>
          </table:table-cell>
          <table:table-cell office:value-type="float" office:value="1.95994" calcext:value-type="float">
            <text:p>1,95994</text:p>
          </table:table-cell>
          <table:table-cell office:value-type="float" office:value="15.08548" calcext:value-type="float">
            <text:p>15,08548</text:p>
          </table:table-cell>
          <table:table-cell office:value-type="float" office:value="2.77995" calcext:value-type="float">
            <text:p>2,77995</text:p>
          </table:table-cell>
          <table:table-cell office:value-type="float" office:value="0.0003550987" calcext:value-type="float">
            <text:p>0,0003550987</text:p>
          </table:table-cell>
          <table:table-cell office:value-type="float" office:value="2.780305" calcext:value-type="float">
            <text:p>2,780305</text:p>
          </table:table-cell>
          <table:table-cell office:value-type="float" office:value="0.1779899" calcext:value-type="float">
            <text:p>0,177989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03.112" calcext:value-type="float">
            <text:p>1103,112</text:p>
          </table:table-cell>
          <table:table-cell office:value-type="float" office:value="1100.025" calcext:value-type="float">
            <text:p>1100,025</text:p>
          </table:table-cell>
          <table:table-cell office:value-type="float" office:value="26.88897" calcext:value-type="float">
            <text:p>26,88897</text:p>
          </table:table-cell>
          <table:table-cell office:value-type="float" office:value="97.5556" calcext:value-type="float">
            <text:p>97,5556</text:p>
          </table:table-cell>
          <table:table-cell office:value-type="float" office:value="0.9367008" calcext:value-type="float">
            <text:p>0,9367008</text:p>
          </table:table-cell>
          <table:table-cell office:value-type="float" office:value="0.06690416" calcext:value-type="float">
            <text:p>0,06690416</text:p>
          </table:table-cell>
          <table:table-cell office:value-type="float" office:value="0.002449764" calcext:value-type="float">
            <text:p>0,002449764</text:p>
          </table:table-cell>
          <table:table-cell office:value-type="float" office:value="0.06405997" calcext:value-type="float">
            <text:p>0,06405997</text:p>
          </table:table-cell>
          <table:table-cell office:value-type="float" office:value="0.002525386" calcext:value-type="float">
            <text:p>0,002525386</text:p>
          </table:table-cell>
          <table:table-cell office:value-type="float" office:value="0.8007609" calcext:value-type="float">
            <text:p>0,8007609</text:p>
          </table:table-cell>
          <table:table-cell office:value-type="float" office:value="20.87514" calcext:value-type="float">
            <text:p>20,87514</text:p>
          </table:table-cell>
          <table:table-cell office:value-type="float" office:value="2.662318" calcext:value-type="float">
            <text:p>2,662318</text:p>
          </table:table-cell>
          <table:table-cell office:value-type="float" office:value="18.21283" calcext:value-type="float">
            <text:p>18,21283</text:p>
          </table:table-cell>
          <table:table-cell office:value-type="float" office:value="1.975487" calcext:value-type="float">
            <text:p>1,975487</text:p>
          </table:table-cell>
          <table:table-cell office:value-type="float" office:value="14.50796" calcext:value-type="float">
            <text:p>14,50796</text:p>
          </table:table-cell>
          <table:table-cell office:value-type="float" office:value="2.919265" calcext:value-type="float">
            <text:p>2,919265</text:p>
          </table:table-cell>
          <table:table-cell office:value-type="float" office:value="0.0003364294" calcext:value-type="float">
            <text:p>0,0003364294</text:p>
          </table:table-cell>
          <table:table-cell office:value-type="float" office:value="2.919601" calcext:value-type="float">
            <text:p>2,919601</text:p>
          </table:table-cell>
          <table:table-cell office:value-type="float" office:value="0.1820344" calcext:value-type="float">
            <text:p>0,182034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153.17" calcext:value-type="float">
            <text:p>1153,17</text:p>
          </table:table-cell>
          <table:table-cell office:value-type="float" office:value="1150.028" calcext:value-type="float">
            <text:p>1150,028</text:p>
          </table:table-cell>
          <table:table-cell office:value-type="float" office:value="27.95189" calcext:value-type="float">
            <text:p>27,95189</text:p>
          </table:table-cell>
          <table:table-cell office:value-type="float" office:value="97.56946" calcext:value-type="float">
            <text:p>97,56946</text:p>
          </table:table-cell>
          <table:table-cell office:value-type="float" office:value="0.9478801" calcext:value-type="float">
            <text:p>0,9478801</text:p>
          </table:table-cell>
          <table:table-cell office:value-type="float" office:value="0.07219933" calcext:value-type="float">
            <text:p>0,07219933</text:p>
          </table:table-cell>
          <table:table-cell office:value-type="float" office:value="0.002693241" calcext:value-type="float">
            <text:p>0,002693241</text:p>
          </table:table-cell>
          <table:table-cell office:value-type="float" office:value="0.06936046" calcext:value-type="float">
            <text:p>0,06936046</text:p>
          </table:table-cell>
          <table:table-cell office:value-type="float" office:value="0.002814363" calcext:value-type="float">
            <text:p>0,002814363</text:p>
          </table:table-cell>
          <table:table-cell office:value-type="float" office:value="0.8008121" calcext:value-type="float">
            <text:p>0,8008121</text:p>
          </table:table-cell>
          <table:table-cell office:value-type="float" office:value="21.76571" calcext:value-type="float">
            <text:p>21,76571</text:p>
          </table:table-cell>
          <table:table-cell office:value-type="float" office:value="2.700133" calcext:value-type="float">
            <text:p>2,700133</text:p>
          </table:table-cell>
          <table:table-cell office:value-type="float" office:value="19.06558" calcext:value-type="float">
            <text:p>19,06558</text:p>
          </table:table-cell>
          <table:table-cell office:value-type="float" office:value="1.991871" calcext:value-type="float">
            <text:p>1,991871</text:p>
          </table:table-cell>
          <table:table-cell office:value-type="float" office:value="13.96622" calcext:value-type="float">
            <text:p>13,96622</text:p>
          </table:table-cell>
          <table:table-cell office:value-type="float" office:value="3.059456" calcext:value-type="float">
            <text:p>3,059456</text:p>
          </table:table-cell>
          <table:table-cell office:value-type="float" office:value="0.0006962313" calcext:value-type="float">
            <text:p>0,0006962313</text:p>
          </table:table-cell>
          <table:table-cell office:value-type="float" office:value="3.060152" calcext:value-type="float">
            <text:p>3,060152</text:p>
          </table:table-cell>
          <table:table-cell office:value-type="float" office:value="0.1862788" calcext:value-type="float">
            <text:p>0,186278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3.231" calcext:value-type="float">
            <text:p>1203,231</text:p>
          </table:table-cell>
          <table:table-cell office:value-type="float" office:value="1200.032" calcext:value-type="float">
            <text:p>1200,032</text:p>
          </table:table-cell>
          <table:table-cell office:value-type="float" office:value="29.01815" calcext:value-type="float">
            <text:p>29,01815</text:p>
          </table:table-cell>
          <table:table-cell office:value-type="float" office:value="97.58189" calcext:value-type="float">
            <text:p>97,58189</text:p>
          </table:table-cell>
          <table:table-cell office:value-type="float" office:value="0.9593018" calcext:value-type="float">
            <text:p>0,9593018</text:p>
          </table:table-cell>
          <table:table-cell office:value-type="float" office:value="0.07771788" calcext:value-type="float">
            <text:p>0,07771788</text:p>
          </table:table-cell>
          <table:table-cell office:value-type="float" office:value="0.002828504" calcext:value-type="float">
            <text:p>0,002828504</text:p>
          </table:table-cell>
          <table:table-cell office:value-type="float" office:value="0.07488109" calcext:value-type="float">
            <text:p>0,07488109</text:p>
          </table:table-cell>
          <table:table-cell office:value-type="float" office:value="0.003008364" calcext:value-type="float">
            <text:p>0,003008364</text:p>
          </table:table-cell>
          <table:table-cell office:value-type="float" office:value="0.8008655" calcext:value-type="float">
            <text:p>0,8008655</text:p>
          </table:table-cell>
          <table:table-cell office:value-type="float" office:value="22.65811" calcext:value-type="float">
            <text:p>22,65811</text:p>
          </table:table-cell>
          <table:table-cell office:value-type="float" office:value="2.736147" calcext:value-type="float">
            <text:p>2,736147</text:p>
          </table:table-cell>
          <table:table-cell office:value-type="float" office:value="19.92197" calcext:value-type="float">
            <text:p>19,92197</text:p>
          </table:table-cell>
          <table:table-cell office:value-type="float" office:value="2.008839" calcext:value-type="float">
            <text:p>2,008839</text:p>
          </table:table-cell>
          <table:table-cell office:value-type="float" office:value="13.37075" calcext:value-type="float">
            <text:p>13,37075</text:p>
          </table:table-cell>
          <table:table-cell office:value-type="float" office:value="3.200276" calcext:value-type="float">
            <text:p>3,200276</text:p>
          </table:table-cell>
          <table:table-cell office:value-type="float" office:value="0.0008379703" calcext:value-type="float">
            <text:p>0,0008379703</text:p>
          </table:table-cell>
          <table:table-cell office:value-type="float" office:value="3.201114" calcext:value-type="float">
            <text:p>3,201114</text:p>
          </table:table-cell>
          <table:table-cell office:value-type="float" office:value="0.1907812" calcext:value-type="float">
            <text:p>0,190781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53.295" calcext:value-type="float">
            <text:p>1253,295</text:p>
          </table:table-cell>
          <table:table-cell office:value-type="float" office:value="1250.036" calcext:value-type="float">
            <text:p>1250,036</text:p>
          </table:table-cell>
          <table:table-cell office:value-type="float" office:value="30.08992" calcext:value-type="float">
            <text:p>30,08992</text:p>
          </table:table-cell>
          <table:table-cell office:value-type="float" office:value="97.59288" calcext:value-type="float">
            <text:p>97,59288</text:p>
          </table:table-cell>
          <table:table-cell office:value-type="float" office:value="0.9712056" calcext:value-type="float">
            <text:p>0,9712056</text:p>
          </table:table-cell>
          <table:table-cell office:value-type="float" office:value="0.08347474" calcext:value-type="float">
            <text:p>0,08347474</text:p>
          </table:table-cell>
          <table:table-cell office:value-type="float" office:value="0.002988667" calcext:value-type="float">
            <text:p>0,002988667</text:p>
          </table:table-cell>
          <table:table-cell office:value-type="float" office:value="0.08062878" calcext:value-type="float">
            <text:p>0,08062878</text:p>
          </table:table-cell>
          <table:table-cell office:value-type="float" office:value="0.003191891" calcext:value-type="float">
            <text:p>0,003191891</text:p>
          </table:table-cell>
          <table:table-cell office:value-type="float" office:value="0.8009211" calcext:value-type="float">
            <text:p>0,8009211</text:p>
          </table:table-cell>
          <table:table-cell office:value-type="float" office:value="23.55372" calcext:value-type="float">
            <text:p>23,55372</text:p>
          </table:table-cell>
          <table:table-cell office:value-type="float" office:value="2.77074" calcext:value-type="float">
            <text:p>2,77074</text:p>
          </table:table-cell>
          <table:table-cell office:value-type="float" office:value="20.78298" calcext:value-type="float">
            <text:p>20,78298</text:p>
          </table:table-cell>
          <table:table-cell office:value-type="float" office:value="2.026514" calcext:value-type="float">
            <text:p>2,026514</text:p>
          </table:table-cell>
          <table:table-cell office:value-type="float" office:value="13.02337" calcext:value-type="float">
            <text:p>13,02337</text:p>
          </table:table-cell>
          <table:table-cell office:value-type="float" office:value="3.342018" calcext:value-type="float">
            <text:p>3,342018</text:p>
          </table:table-cell>
          <table:table-cell office:value-type="float" office:value="0.0005540931" calcext:value-type="float">
            <text:p>0,0005540931</text:p>
          </table:table-cell>
          <table:table-cell office:value-type="float" office:value="3.342572" calcext:value-type="float">
            <text:p>3,342572</text:p>
          </table:table-cell>
          <table:table-cell office:value-type="float" office:value="0.1959065" calcext:value-type="float">
            <text:p>0,195906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03.361" calcext:value-type="float">
            <text:p>1303,361</text:p>
          </table:table-cell>
          <table:table-cell office:value-type="float" office:value="1300.041" calcext:value-type="float">
            <text:p>1300,041</text:p>
          </table:table-cell>
          <table:table-cell office:value-type="float" office:value="31.16843" calcext:value-type="float">
            <text:p>31,16843</text:p>
          </table:table-cell>
          <table:table-cell office:value-type="float" office:value="97.6025" calcext:value-type="float">
            <text:p>97,6025</text:p>
          </table:table-cell>
          <table:table-cell office:value-type="float" office:value="0.983714" calcext:value-type="float">
            <text:p>0,983714</text:p>
          </table:table-cell>
          <table:table-cell office:value-type="float" office:value="0.08946511" calcext:value-type="float">
            <text:p>0,08946511</text:p>
          </table:table-cell>
          <table:table-cell office:value-type="float" office:value="0.003194893" calcext:value-type="float">
            <text:p>0,003194893</text:p>
          </table:table-cell>
          <table:table-cell office:value-type="float" office:value="0.08661894" calcext:value-type="float">
            <text:p>0,08661894</text:p>
          </table:table-cell>
          <table:table-cell office:value-type="float" office:value="0.003455443" calcext:value-type="float">
            <text:p>0,003455443</text:p>
          </table:table-cell>
          <table:table-cell office:value-type="float" office:value="0.8009791" calcext:value-type="float">
            <text:p>0,8009791</text:p>
          </table:table-cell>
          <table:table-cell office:value-type="float" office:value="24.45378" calcext:value-type="float">
            <text:p>24,45378</text:p>
          </table:table-cell>
          <table:table-cell office:value-type="float" office:value="2.804346" calcext:value-type="float">
            <text:p>2,804346</text:p>
          </table:table-cell>
          <table:table-cell office:value-type="float" office:value="21.64943" calcext:value-type="float">
            <text:p>21,64943</text:p>
          </table:table-cell>
          <table:table-cell office:value-type="float" office:value="2.045008" calcext:value-type="float">
            <text:p>2,045008</text:p>
          </table:table-cell>
          <table:table-cell office:value-type="float" office:value="12.50268" calcext:value-type="float">
            <text:p>12,50268</text:p>
          </table:table-cell>
          <table:table-cell office:value-type="float" office:value="3.484651" calcext:value-type="float">
            <text:p>3,484651</text:p>
          </table:table-cell>
          <table:table-cell office:value-type="float" office:value="0.0003244105" calcext:value-type="float">
            <text:p>0,0003244105</text:p>
          </table:table-cell>
          <table:table-cell office:value-type="float" office:value="3.484975" calcext:value-type="float">
            <text:p>3,484975</text:p>
          </table:table-cell>
          <table:table-cell office:value-type="float" office:value="0.2009566" calcext:value-type="float">
            <text:p>0,200956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353.43" calcext:value-type="float">
            <text:p>1353,43</text:p>
          </table:table-cell>
          <table:table-cell office:value-type="float" office:value="1350.046" calcext:value-type="float">
            <text:p>1350,046</text:p>
          </table:table-cell>
          <table:table-cell office:value-type="float" office:value="32.25132" calcext:value-type="float">
            <text:p>32,25132</text:p>
          </table:table-cell>
          <table:table-cell office:value-type="float" office:value="97.61109" calcext:value-type="float">
            <text:p>97,61109</text:p>
          </table:table-cell>
          <table:table-cell office:value-type="float" office:value="0.9968885" calcext:value-type="float">
            <text:p>0,9968885</text:p>
          </table:table-cell>
          <table:table-cell office:value-type="float" office:value="0.09568048" calcext:value-type="float">
            <text:p>0,09568048</text:p>
          </table:table-cell>
          <table:table-cell office:value-type="float" office:value="0.003502596" calcext:value-type="float">
            <text:p>0,003502596</text:p>
          </table:table-cell>
          <table:table-cell office:value-type="float" office:value="0.09284105" calcext:value-type="float">
            <text:p>0,09284105</text:p>
          </table:table-cell>
          <table:table-cell office:value-type="float" office:value="0.003824047" calcext:value-type="float">
            <text:p>0,003824047</text:p>
          </table:table-cell>
          <table:table-cell office:value-type="float" office:value="0.8010393" calcext:value-type="float">
            <text:p>0,8010393</text:p>
          </table:table-cell>
          <table:table-cell office:value-type="float" office:value="25.35581" calcext:value-type="float">
            <text:p>25,35581</text:p>
          </table:table-cell>
          <table:table-cell office:value-type="float" office:value="2.837227" calcext:value-type="float">
            <text:p>2,837227</text:p>
          </table:table-cell>
          <table:table-cell office:value-type="float" office:value="22.51859" calcext:value-type="float">
            <text:p>22,51859</text:p>
          </table:table-cell>
          <table:table-cell office:value-type="float" office:value="2.06463" calcext:value-type="float">
            <text:p>2,06463</text:p>
          </table:table-cell>
          <table:table-cell office:value-type="float" office:value="12.06279" calcext:value-type="float">
            <text:p>12,06279</text:p>
          </table:table-cell>
          <table:table-cell office:value-type="float" office:value="3.627587" calcext:value-type="float">
            <text:p>3,627587</text:p>
          </table:table-cell>
          <table:table-cell office:value-type="float" office:value="0.0001244322" calcext:value-type="float">
            <text:p>0,0001244322</text:p>
          </table:table-cell>
          <table:table-cell office:value-type="float" office:value="3.627712" calcext:value-type="float">
            <text:p>3,627712</text:p>
          </table:table-cell>
          <table:table-cell office:value-type="float" office:value="0.2062734" calcext:value-type="float">
            <text:p>0,206273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03.502" calcext:value-type="float">
            <text:p>1403,502</text:p>
          </table:table-cell>
          <table:table-cell office:value-type="float" office:value="1400.051" calcext:value-type="float">
            <text:p>1400,051</text:p>
          </table:table-cell>
          <table:table-cell office:value-type="float" office:value="33.33784" calcext:value-type="float">
            <text:p>33,33784</text:p>
          </table:table-cell>
          <table:table-cell office:value-type="float" office:value="97.61881" calcext:value-type="float">
            <text:p>97,61881</text:p>
          </table:table-cell>
          <table:table-cell office:value-type="float" office:value="1.010276" calcext:value-type="float">
            <text:p>1,010276</text:p>
          </table:table-cell>
          <table:table-cell office:value-type="float" office:value="0.1021336" calcext:value-type="float">
            <text:p>0,1021336</text:p>
          </table:table-cell>
          <table:table-cell office:value-type="float" office:value="0.00373689" calcext:value-type="float">
            <text:p>0,00373689</text:p>
          </table:table-cell>
          <table:table-cell office:value-type="float" office:value="0.09928152" calcext:value-type="float">
            <text:p>0,09928152</text:p>
          </table:table-cell>
          <table:table-cell office:value-type="float" office:value="0.004022017" calcext:value-type="float">
            <text:p>0,004022017</text:p>
          </table:table-cell>
          <table:table-cell office:value-type="float" office:value="0.8011018" calcext:value-type="float">
            <text:p>0,8011018</text:p>
          </table:table-cell>
          <table:table-cell office:value-type="float" office:value="26.25969" calcext:value-type="float">
            <text:p>26,25969</text:p>
          </table:table-cell>
          <table:table-cell office:value-type="float" office:value="2.869092" calcext:value-type="float">
            <text:p>2,869092</text:p>
          </table:table-cell>
          <table:table-cell office:value-type="float" office:value="23.3906" calcext:value-type="float">
            <text:p>23,3906</text:p>
          </table:table-cell>
          <table:table-cell office:value-type="float" office:value="2.084914" calcext:value-type="float">
            <text:p>2,084914</text:p>
          </table:table-cell>
          <table:table-cell office:value-type="float" office:value="11.59471" calcext:value-type="float">
            <text:p>11,59471</text:p>
          </table:table-cell>
          <table:table-cell office:value-type="float" office:value="3.77115" calcext:value-type="float">
            <text:p>3,77115</text:p>
          </table:table-cell>
          <table:table-cell office:value-type="float" office:value="0.00004676148" calcext:value-type="float">
            <text:p>0,00004676148</text:p>
          </table:table-cell>
          <table:table-cell office:value-type="float" office:value="3.771196" calcext:value-type="float">
            <text:p>3,771196</text:p>
          </table:table-cell>
          <table:table-cell office:value-type="float" office:value="0.2117669" calcext:value-type="float">
            <text:p>0,211766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53.576" calcext:value-type="float">
            <text:p>1453,576</text:p>
          </table:table-cell>
          <table:table-cell office:value-type="float" office:value="1450.056" calcext:value-type="float">
            <text:p>1450,056</text:p>
          </table:table-cell>
          <table:table-cell office:value-type="float" office:value="34.42754" calcext:value-type="float">
            <text:p>34,42754</text:p>
          </table:table-cell>
          <table:table-cell office:value-type="float" office:value="97.62578" calcext:value-type="float">
            <text:p>97,62578</text:p>
          </table:table-cell>
          <table:table-cell office:value-type="float" office:value="1.024059" calcext:value-type="float">
            <text:p>1,024059</text:p>
          </table:table-cell>
          <table:table-cell office:value-type="float" office:value="0.1088143" calcext:value-type="float">
            <text:p>0,1088143</text:p>
          </table:table-cell>
          <table:table-cell office:value-type="float" office:value="0.003889468" calcext:value-type="float">
            <text:p>0,003889468</text:p>
          </table:table-cell>
          <table:table-cell office:value-type="float" office:value="0.1059572" calcext:value-type="float">
            <text:p>0,1059572</text:p>
          </table:table-cell>
          <table:table-cell office:value-type="float" office:value="0.004230903" calcext:value-type="float">
            <text:p>0,004230903</text:p>
          </table:table-cell>
          <table:table-cell office:value-type="float" office:value="0.8011665" calcext:value-type="float">
            <text:p>0,8011665</text:p>
          </table:table-cell>
          <table:table-cell office:value-type="float" office:value="27.16522" calcext:value-type="float">
            <text:p>27,16522</text:p>
          </table:table-cell>
          <table:table-cell office:value-type="float" office:value="2.900055" calcext:value-type="float">
            <text:p>2,900055</text:p>
          </table:table-cell>
          <table:table-cell office:value-type="float" office:value="24.26517" calcext:value-type="float">
            <text:p>24,26517</text:p>
          </table:table-cell>
          <table:table-cell office:value-type="float" office:value="2.105895" calcext:value-type="float">
            <text:p>2,105895</text:p>
          </table:table-cell>
          <table:table-cell office:value-type="float" office:value="11.20085" calcext:value-type="float">
            <text:p>11,20085</text:p>
          </table:table-cell>
          <table:table-cell office:value-type="float" office:value="3.914708" calcext:value-type="float">
            <text:p>3,914708</text:p>
          </table:table-cell>
          <table:table-cell office:value-type="float" office:value="0.00004672922" calcext:value-type="float">
            <text:p>0,00004672922</text:p>
          </table:table-cell>
          <table:table-cell office:value-type="float" office:value="3.914755" calcext:value-type="float">
            <text:p>3,914755</text:p>
          </table:table-cell>
          <table:table-cell office:value-type="float" office:value="0.2176123" calcext:value-type="float">
            <text:p>0,217612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3.654" calcext:value-type="float">
            <text:p>1503,654</text:p>
          </table:table-cell>
          <table:table-cell office:value-type="float" office:value="1500.062" calcext:value-type="float">
            <text:p>1500,062</text:p>
          </table:table-cell>
          <table:table-cell office:value-type="float" office:value="35.52175" calcext:value-type="float">
            <text:p>35,52175</text:p>
          </table:table-cell>
          <table:table-cell office:value-type="float" office:value="97.63198" calcext:value-type="float">
            <text:p>97,63198</text:p>
          </table:table-cell>
          <table:table-cell office:value-type="float" office:value="1.03835" calcext:value-type="float">
            <text:p>1,03835</text:p>
          </table:table-cell>
          <table:table-cell office:value-type="float" office:value="0.1157318" calcext:value-type="float">
            <text:p>0,1157318</text:p>
          </table:table-cell>
          <table:table-cell office:value-type="float" office:value="0.004100443" calcext:value-type="float">
            <text:p>0,004100443</text:p>
          </table:table-cell>
          <table:table-cell office:value-type="float" office:value="0.1128674" calcext:value-type="float">
            <text:p>0,1128674</text:p>
          </table:table-cell>
          <table:table-cell office:value-type="float" office:value="0.004416862" calcext:value-type="float">
            <text:p>0,004416862</text:p>
          </table:table-cell>
          <table:table-cell office:value-type="float" office:value="0.8012336" calcext:value-type="float">
            <text:p>0,8012336</text:p>
          </table:table-cell>
          <table:table-cell office:value-type="float" office:value="28.07324" calcext:value-type="float">
            <text:p>28,07324</text:p>
          </table:table-cell>
          <table:table-cell office:value-type="float" office:value="2.930407" calcext:value-type="float">
            <text:p>2,930407</text:p>
          </table:table-cell>
          <table:table-cell office:value-type="float" office:value="25.14283" calcext:value-type="float">
            <text:p>25,14283</text:p>
          </table:table-cell>
          <table:table-cell office:value-type="float" office:value="2.127802" calcext:value-type="float">
            <text:p>2,127802</text:p>
          </table:table-cell>
          <table:table-cell office:value-type="float" office:value="10.83844" calcext:value-type="float">
            <text:p>10,83844</text:p>
          </table:table-cell>
          <table:table-cell office:value-type="float" office:value="4.058529" calcext:value-type="float">
            <text:p>4,058529</text:p>
          </table:table-cell>
          <table:table-cell office:value-type="float" office:value="0.00004669884" calcext:value-type="float">
            <text:p>0,00004669884</text:p>
          </table:table-cell>
          <table:table-cell office:value-type="float" office:value="4.058576" calcext:value-type="float">
            <text:p>4,058576</text:p>
          </table:table-cell>
          <table:table-cell office:value-type="float" office:value="0.223783" calcext:value-type="float">
            <text:p>0,22378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553.734" calcext:value-type="float">
            <text:p>1553,734</text:p>
          </table:table-cell>
          <table:table-cell office:value-type="float" office:value="1550.069" calcext:value-type="float">
            <text:p>1550,069</text:p>
          </table:table-cell>
          <table:table-cell office:value-type="float" office:value="36.62197" calcext:value-type="float">
            <text:p>36,62197</text:p>
          </table:table-cell>
          <table:table-cell office:value-type="float" office:value="97.6374" calcext:value-type="float">
            <text:p>97,6374</text:p>
          </table:table-cell>
          <table:table-cell office:value-type="float" office:value="1.053056" calcext:value-type="float">
            <text:p>1,053056</text:p>
          </table:table-cell>
          <table:table-cell office:value-type="float" office:value="0.122877" calcext:value-type="float">
            <text:p>0,122877</text:p>
          </table:table-cell>
          <table:table-cell office:value-type="float" office:value="0.004292941" calcext:value-type="float">
            <text:p>0,004292941</text:p>
          </table:table-cell>
          <table:table-cell office:value-type="float" office:value="0.1199945" calcext:value-type="float">
            <text:p>0,1199945</text:p>
          </table:table-cell>
          <table:table-cell office:value-type="float" office:value="0.004584724" calcext:value-type="float">
            <text:p>0,004584724</text:p>
          </table:table-cell>
          <table:table-cell office:value-type="float" office:value="0.8013029" calcext:value-type="float">
            <text:p>0,8013029</text:p>
          </table:table-cell>
          <table:table-cell office:value-type="float" office:value="28.98545" calcext:value-type="float">
            <text:p>28,98545</text:p>
          </table:table-cell>
          <table:table-cell office:value-type="float" office:value="2.960619" calcext:value-type="float">
            <text:p>2,960619</text:p>
          </table:table-cell>
          <table:table-cell office:value-type="float" office:value="26.02483" calcext:value-type="float">
            <text:p>26,02483</text:p>
          </table:table-cell>
          <table:table-cell office:value-type="float" office:value="2.150401" calcext:value-type="float">
            <text:p>2,150401</text:p>
          </table:table-cell>
          <table:table-cell office:value-type="float" office:value="10.50916" calcext:value-type="float">
            <text:p>10,50916</text:p>
          </table:table-cell>
          <table:table-cell office:value-type="float" office:value="4.202815" calcext:value-type="float">
            <text:p>4,202815</text:p>
          </table:table-cell>
          <table:table-cell office:value-type="float" office:value="0.00004667175" calcext:value-type="float">
            <text:p>0,00004667175</text:p>
          </table:table-cell>
          <table:table-cell office:value-type="float" office:value="4.202861" calcext:value-type="float">
            <text:p>4,202861</text:p>
          </table:table-cell>
          <table:table-cell office:value-type="float" office:value="0.2302038" calcext:value-type="float">
            <text:p>0,230203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3.817" calcext:value-type="float">
            <text:p>1603,817</text:p>
          </table:table-cell>
          <table:table-cell office:value-type="float" office:value="1600.076" calcext:value-type="float">
            <text:p>1600,076</text:p>
          </table:table-cell>
          <table:table-cell office:value-type="float" office:value="37.72819" calcext:value-type="float">
            <text:p>37,72819</text:p>
          </table:table-cell>
          <table:table-cell office:value-type="float" office:value="97.6421" calcext:value-type="float">
            <text:p>97,6421</text:p>
          </table:table-cell>
          <table:table-cell office:value-type="float" office:value="1.068517" calcext:value-type="float">
            <text:p>1,068517</text:p>
          </table:table-cell>
          <table:table-cell office:value-type="float" office:value="0.1302714" calcext:value-type="float">
            <text:p>0,1302714</text:p>
          </table:table-cell>
          <table:table-cell office:value-type="float" office:value="0.00456159" calcext:value-type="float">
            <text:p>0,00456159</text:p>
          </table:table-cell>
          <table:table-cell office:value-type="float" office:value="0.1273839" calcext:value-type="float">
            <text:p>0,1273839</text:p>
          </table:table-cell>
          <table:table-cell office:value-type="float" office:value="0.004924044" calcext:value-type="float">
            <text:p>0,004924044</text:p>
          </table:table-cell>
          <table:table-cell office:value-type="float" office:value="0.8013745" calcext:value-type="float">
            <text:p>0,8013745</text:p>
          </table:table-cell>
          <table:table-cell office:value-type="float" office:value="29.90123" calcext:value-type="float">
            <text:p>29,90123</text:p>
          </table:table-cell>
          <table:table-cell office:value-type="float" office:value="2.99056" calcext:value-type="float">
            <text:p>2,99056</text:p>
          </table:table-cell>
          <table:table-cell office:value-type="float" office:value="26.91067" calcext:value-type="float">
            <text:p>26,91067</text:p>
          </table:table-cell>
          <table:table-cell office:value-type="float" office:value="2.173925" calcext:value-type="float">
            <text:p>2,173925</text:p>
          </table:table-cell>
          <table:table-cell office:value-type="float" office:value="10.23655" calcext:value-type="float">
            <text:p>10,23655</text:p>
          </table:table-cell>
          <table:table-cell office:value-type="float" office:value="4.347362" calcext:value-type="float">
            <text:p>4,347362</text:p>
          </table:table-cell>
          <table:table-cell office:value-type="float" office:value="0.00007835512" calcext:value-type="float">
            <text:p>0,00007835512</text:p>
          </table:table-cell>
          <table:table-cell office:value-type="float" office:value="4.347441" calcext:value-type="float">
            <text:p>4,347441</text:p>
          </table:table-cell>
          <table:table-cell office:value-type="float" office:value="0.2370772" calcext:value-type="float">
            <text:p>0,237077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653.903" calcext:value-type="float">
            <text:p>1653,903</text:p>
          </table:table-cell>
          <table:table-cell office:value-type="float" office:value="1650.083" calcext:value-type="float">
            <text:p>1650,083</text:p>
          </table:table-cell>
          <table:table-cell office:value-type="float" office:value="38.84187" calcext:value-type="float">
            <text:p>38,84187</text:p>
          </table:table-cell>
          <table:table-cell office:value-type="float" office:value="97.64607" calcext:value-type="float">
            <text:p>97,64607</text:p>
          </table:table-cell>
          <table:table-cell office:value-type="float" office:value="1.084829" calcext:value-type="float">
            <text:p>1,084829</text:p>
          </table:table-cell>
          <table:table-cell office:value-type="float" office:value="0.1378935" calcext:value-type="float">
            <text:p>0,1378935</text:p>
          </table:table-cell>
          <table:table-cell office:value-type="float" office:value="0.004993821" calcext:value-type="float">
            <text:p>0,004993821</text:p>
          </table:table-cell>
          <table:table-cell office:value-type="float" office:value="0.1350303" calcext:value-type="float">
            <text:p>0,1350303</text:p>
          </table:table-cell>
          <table:table-cell office:value-type="float" office:value="0.005462092" calcext:value-type="float">
            <text:p>0,005462092</text:p>
          </table:table-cell>
          <table:table-cell office:value-type="float" office:value="0.8014484" calcext:value-type="float">
            <text:p>0,8014484</text:p>
          </table:table-cell>
          <table:table-cell office:value-type="float" office:value="30.82126" calcext:value-type="float">
            <text:p>30,82126</text:p>
          </table:table-cell>
          <table:table-cell office:value-type="float" office:value="3.020315" calcext:value-type="float">
            <text:p>3,020315</text:p>
          </table:table-cell>
          <table:table-cell office:value-type="float" office:value="27.80095" calcext:value-type="float">
            <text:p>27,80095</text:p>
          </table:table-cell>
          <table:table-cell office:value-type="float" office:value="2.198939" calcext:value-type="float">
            <text:p>2,198939</text:p>
          </table:table-cell>
          <table:table-cell office:value-type="float" office:value="9.937587" calcext:value-type="float">
            <text:p>9,937587</text:p>
          </table:table-cell>
          <table:table-cell office:value-type="float" office:value="4.492395" calcext:value-type="float">
            <text:p>4,492395</text:p>
          </table:table-cell>
          <table:table-cell office:value-type="float" office:value="0.0002642587" calcext:value-type="float">
            <text:p>0,0002642587</text:p>
          </table:table-cell>
          <table:table-cell office:value-type="float" office:value="4.492659" calcext:value-type="float">
            <text:p>4,492659</text:p>
          </table:table-cell>
          <table:table-cell office:value-type="float" office:value="0.2441807" calcext:value-type="float">
            <text:p>0,244180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703.992" calcext:value-type="float">
            <text:p>1703,992</text:p>
          </table:table-cell>
          <table:table-cell office:value-type="float" office:value="1700.091" calcext:value-type="float">
            <text:p>1700,091</text:p>
          </table:table-cell>
          <table:table-cell office:value-type="float" office:value="39.96062" calcext:value-type="float">
            <text:p>39,96062</text:p>
          </table:table-cell>
          <table:table-cell office:value-type="float" office:value="97.6495" calcext:value-type="float">
            <text:p>97,6495</text:p>
          </table:table-cell>
          <table:table-cell office:value-type="float" office:value="1.101162" calcext:value-type="float">
            <text:p>1,101162</text:p>
          </table:table-cell>
          <table:table-cell office:value-type="float" office:value="0.145752" calcext:value-type="float">
            <text:p>0,145752</text:p>
          </table:table-cell>
          <table:table-cell office:value-type="float" office:value="0.00516854" calcext:value-type="float">
            <text:p>0,00516854</text:p>
          </table:table-cell>
          <table:table-cell office:value-type="float" office:value="0.1429159" calcext:value-type="float">
            <text:p>0,1429159</text:p>
          </table:table-cell>
          <table:table-cell office:value-type="float" office:value="0.005800723" calcext:value-type="float">
            <text:p>0,005800723</text:p>
          </table:table-cell>
          <table:table-cell office:value-type="float" office:value="0.8015246" calcext:value-type="float">
            <text:p>0,8015246</text:p>
          </table:table-cell>
          <table:table-cell office:value-type="float" office:value="31.74541" calcext:value-type="float">
            <text:p>31,74541</text:p>
          </table:table-cell>
          <table:table-cell office:value-type="float" office:value="3.050005" calcext:value-type="float">
            <text:p>3,050005</text:p>
          </table:table-cell>
          <table:table-cell office:value-type="float" office:value="28.6954" calcext:value-type="float">
            <text:p>28,6954</text:p>
          </table:table-cell>
          <table:table-cell office:value-type="float" office:value="2.224478" calcext:value-type="float">
            <text:p>2,224478</text:p>
          </table:table-cell>
          <table:table-cell office:value-type="float" office:value="9.627526" calcext:value-type="float">
            <text:p>9,627526</text:p>
          </table:table-cell>
          <table:table-cell office:value-type="float" office:value="4.637715" calcext:value-type="float">
            <text:p>4,637715</text:p>
          </table:table-cell>
          <table:table-cell office:value-type="float" office:value="0.0003059354" calcext:value-type="float">
            <text:p>0,0003059354</text:p>
          </table:table-cell>
          <table:table-cell office:value-type="float" office:value="4.638021" calcext:value-type="float">
            <text:p>4,638021</text:p>
          </table:table-cell>
          <table:table-cell office:value-type="float" office:value="0.2515567" calcext:value-type="float">
            <text:p>0,2515567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754.084" calcext:value-type="float">
            <text:p>1754,084</text:p>
          </table:table-cell>
          <table:table-cell office:value-type="float" office:value="1750.099" calcext:value-type="float">
            <text:p>1750,099</text:p>
          </table:table-cell>
          <table:table-cell office:value-type="float" office:value="41.08304" calcext:value-type="float">
            <text:p>41,08304</text:p>
          </table:table-cell>
          <table:table-cell office:value-type="float" office:value="97.65253" calcext:value-type="float">
            <text:p>97,65253</text:p>
          </table:table-cell>
          <table:table-cell office:value-type="float" office:value="1.117707" calcext:value-type="float">
            <text:p>1,117707</text:p>
          </table:table-cell>
          <table:table-cell office:value-type="float" office:value="0.1538036" calcext:value-type="float">
            <text:p>0,1538036</text:p>
          </table:table-cell>
          <table:table-cell office:value-type="float" office:value="0.005310348" calcext:value-type="float">
            <text:p>0,005310348</text:p>
          </table:table-cell>
          <table:table-cell office:value-type="float" office:value="0.150948" calcext:value-type="float">
            <text:p>0,150948</text:p>
          </table:table-cell>
          <table:table-cell office:value-type="float" office:value="0.006042003" calcext:value-type="float">
            <text:p>0,006042003</text:p>
          </table:table-cell>
          <table:table-cell office:value-type="float" office:value="0.8016028" calcext:value-type="float">
            <text:p>0,8016028</text:p>
          </table:table-cell>
          <table:table-cell office:value-type="float" office:value="32.67256" calcext:value-type="float">
            <text:p>32,67256</text:p>
          </table:table-cell>
          <table:table-cell office:value-type="float" office:value="3.07959" calcext:value-type="float">
            <text:p>3,07959</text:p>
          </table:table-cell>
          <table:table-cell office:value-type="float" office:value="29.59297" calcext:value-type="float">
            <text:p>29,59297</text:p>
          </table:table-cell>
          <table:table-cell office:value-type="float" office:value="2.250707" calcext:value-type="float">
            <text:p>2,250707</text:p>
          </table:table-cell>
          <table:table-cell office:value-type="float" office:value="9.322042" calcext:value-type="float">
            <text:p>9,322042</text:p>
          </table:table-cell>
          <table:table-cell office:value-type="float" office:value="4.782929" calcext:value-type="float">
            <text:p>4,782929</text:p>
          </table:table-cell>
          <table:table-cell office:value-type="float" office:value="0.0003039783" calcext:value-type="float">
            <text:p>0,0003039783</text:p>
          </table:table-cell>
          <table:table-cell office:value-type="float" office:value="4.783233" calcext:value-type="float">
            <text:p>4,783233</text:p>
          </table:table-cell>
          <table:table-cell office:value-type="float" office:value="0.2588355" calcext:value-type="float">
            <text:p>0,258835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04.179" calcext:value-type="float">
            <text:p>1804,179</text:p>
          </table:table-cell>
          <table:table-cell office:value-type="float" office:value="1800.108" calcext:value-type="float">
            <text:p>1800,108</text:p>
          </table:table-cell>
          <table:table-cell office:value-type="float" office:value="42.21081" calcext:value-type="float">
            <text:p>42,21081</text:p>
          </table:table-cell>
          <table:table-cell office:value-type="float" office:value="97.6551" calcext:value-type="float">
            <text:p>97,6551</text:p>
          </table:table-cell>
          <table:table-cell office:value-type="float" office:value="1.134891" calcext:value-type="float">
            <text:p>1,134891</text:p>
          </table:table-cell>
          <table:table-cell office:value-type="float" office:value="0.1621325" calcext:value-type="float">
            <text:p>0,1621325</text:p>
          </table:table-cell>
          <table:table-cell office:value-type="float" office:value="0.005553292" calcext:value-type="float">
            <text:p>0,005553292</text:p>
          </table:table-cell>
          <table:table-cell office:value-type="float" office:value="0.1592683" calcext:value-type="float">
            <text:p>0,1592683</text:p>
          </table:table-cell>
          <table:table-cell office:value-type="float" office:value="0.006253104" calcext:value-type="float">
            <text:p>0,006253104</text:p>
          </table:table-cell>
          <table:table-cell office:value-type="float" office:value="0.8016836" calcext:value-type="float">
            <text:p>0,8016836</text:p>
          </table:table-cell>
          <table:table-cell office:value-type="float" office:value="33.60353" calcext:value-type="float">
            <text:p>33,60353</text:p>
          </table:table-cell>
          <table:table-cell office:value-type="float" office:value="3.109323" calcext:value-type="float">
            <text:p>3,109323</text:p>
          </table:table-cell>
          <table:table-cell office:value-type="float" office:value="30.49421" calcext:value-type="float">
            <text:p>30,49421</text:p>
          </table:table-cell>
          <table:table-cell office:value-type="float" office:value="2.277495" calcext:value-type="float">
            <text:p>2,277495</text:p>
          </table:table-cell>
          <table:table-cell office:value-type="float" office:value="9.063236" calcext:value-type="float">
            <text:p>9,063236</text:p>
          </table:table-cell>
          <table:table-cell office:value-type="float" office:value="4.928054" calcext:value-type="float">
            <text:p>4,928054</text:p>
          </table:table-cell>
          <table:table-cell office:value-type="float" office:value="0.0001318261" calcext:value-type="float">
            <text:p>0,0001318261</text:p>
          </table:table-cell>
          <table:table-cell office:value-type="float" office:value="4.928186" calcext:value-type="float">
            <text:p>4,928186</text:p>
          </table:table-cell>
          <table:table-cell office:value-type="float" office:value="0.2667023" calcext:value-type="float">
            <text:p>0,266702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854.276" calcext:value-type="float">
            <text:p>1854,276</text:p>
          </table:table-cell>
          <table:table-cell office:value-type="float" office:value="1850.117" calcext:value-type="float">
            <text:p>1850,117</text:p>
          </table:table-cell>
          <table:table-cell office:value-type="float" office:value="43.34531" calcext:value-type="float">
            <text:p>43,34531</text:p>
          </table:table-cell>
          <table:table-cell office:value-type="float" office:value="97.65716" calcext:value-type="float">
            <text:p>97,65716</text:p>
          </table:table-cell>
          <table:table-cell office:value-type="float" office:value="1.152606" calcext:value-type="float">
            <text:p>1,152606</text:p>
          </table:table-cell>
          <table:table-cell office:value-type="float" office:value="0.1706748" calcext:value-type="float">
            <text:p>0,1706748</text:p>
          </table:table-cell>
          <table:table-cell office:value-type="float" office:value="0.005701468" calcext:value-type="float">
            <text:p>0,005701468</text:p>
          </table:table-cell>
          <table:table-cell office:value-type="float" office:value="0.1679053" calcext:value-type="float">
            <text:p>0,1679053</text:p>
          </table:table-cell>
          <table:table-cell office:value-type="float" office:value="0.00655743" calcext:value-type="float">
            <text:p>0,00655743</text:p>
          </table:table-cell>
          <table:table-cell office:value-type="float" office:value="0.8017668" calcext:value-type="float">
            <text:p>0,8017668</text:p>
          </table:table-cell>
          <table:table-cell office:value-type="float" office:value="34.5389" calcext:value-type="float">
            <text:p>34,5389</text:p>
          </table:table-cell>
          <table:table-cell office:value-type="float" office:value="3.139193" calcext:value-type="float">
            <text:p>3,139193</text:p>
          </table:table-cell>
          <table:table-cell office:value-type="float" office:value="31.3997" calcext:value-type="float">
            <text:p>31,3997</text:p>
          </table:table-cell>
          <table:table-cell office:value-type="float" office:value="2.305527" calcext:value-type="float">
            <text:p>2,305527</text:p>
          </table:table-cell>
          <table:table-cell office:value-type="float" office:value="8.79719" calcext:value-type="float">
            <text:p>8,79719</text:p>
          </table:table-cell>
          <table:table-cell office:value-type="float" office:value="5.073083" calcext:value-type="float">
            <text:p>5,073083</text:p>
          </table:table-cell>
          <table:table-cell office:value-type="float" office:value="0.00004654007" calcext:value-type="float">
            <text:p>0,00004654007</text:p>
          </table:table-cell>
          <table:table-cell office:value-type="float" office:value="5.07313" calcext:value-type="float">
            <text:p>5,07313</text:p>
          </table:table-cell>
          <table:table-cell office:value-type="float" office:value="0.2751511" calcext:value-type="float">
            <text:p>0,275151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04.377" calcext:value-type="float">
            <text:p>1904,377</text:p>
          </table:table-cell>
          <table:table-cell office:value-type="float" office:value="1900.126" calcext:value-type="float">
            <text:p>1900,126</text:p>
          </table:table-cell>
          <table:table-cell office:value-type="float" office:value="44.48647" calcext:value-type="float">
            <text:p>44,48647</text:p>
          </table:table-cell>
          <table:table-cell office:value-type="float" office:value="97.65876" calcext:value-type="float">
            <text:p>97,65876</text:p>
          </table:table-cell>
          <table:table-cell office:value-type="float" office:value="1.171216" calcext:value-type="float">
            <text:p>1,171216</text:p>
          </table:table-cell>
          <table:table-cell office:value-type="float" office:value="0.1795462" calcext:value-type="float">
            <text:p>0,1795462</text:p>
          </table:table-cell>
          <table:table-cell office:value-type="float" office:value="0.006029673" calcext:value-type="float">
            <text:p>0,006029673</text:p>
          </table:table-cell>
          <table:table-cell office:value-type="float" office:value="0.176856" calcext:value-type="float">
            <text:p>0,176856</text:p>
          </table:table-cell>
          <table:table-cell office:value-type="float" office:value="0.00693097" calcext:value-type="float">
            <text:p>0,00693097</text:p>
          </table:table-cell>
          <table:table-cell office:value-type="float" office:value="0.8018525" calcext:value-type="float">
            <text:p>0,8018525</text:p>
          </table:table-cell>
          <table:table-cell office:value-type="float" office:value="35.47817" calcext:value-type="float">
            <text:p>35,47817</text:p>
          </table:table-cell>
          <table:table-cell office:value-type="float" office:value="3.168909" calcext:value-type="float">
            <text:p>3,168909</text:p>
          </table:table-cell>
          <table:table-cell office:value-type="float" office:value="32.30927" calcext:value-type="float">
            <text:p>32,30927</text:p>
          </table:table-cell>
          <table:table-cell office:value-type="float" office:value="2.334847" calcext:value-type="float">
            <text:p>2,334847</text:p>
          </table:table-cell>
          <table:table-cell office:value-type="float" office:value="8.481279" calcext:value-type="float">
            <text:p>8,481279</text:p>
          </table:table-cell>
          <table:table-cell office:value-type="float" office:value="5.218034" calcext:value-type="float">
            <text:p>5,218034</text:p>
          </table:table-cell>
          <table:table-cell office:value-type="float" office:value="0.00004651165" calcext:value-type="float">
            <text:p>0,00004651165</text:p>
          </table:table-cell>
          <table:table-cell office:value-type="float" office:value="5.218081" calcext:value-type="float">
            <text:p>5,218081</text:p>
          </table:table-cell>
          <table:table-cell office:value-type="float" office:value="0.2841527" calcext:value-type="float">
            <text:p>0,2841527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954.48" calcext:value-type="float">
            <text:p>1954,48</text:p>
          </table:table-cell>
          <table:table-cell office:value-type="float" office:value="1950.137" calcext:value-type="float">
            <text:p>1950,137</text:p>
          </table:table-cell>
          <table:table-cell office:value-type="float" office:value="45.63172" calcext:value-type="float">
            <text:p>45,63172</text:p>
          </table:table-cell>
          <table:table-cell office:value-type="float" office:value="97.66008" calcext:value-type="float">
            <text:p>97,66008</text:p>
          </table:table-cell>
          <table:table-cell office:value-type="float" office:value="1.189403" calcext:value-type="float">
            <text:p>1,189403</text:p>
          </table:table-cell>
          <table:table-cell office:value-type="float" office:value="0.1885772" calcext:value-type="float">
            <text:p>0,1885772</text:p>
          </table:table-cell>
          <table:table-cell office:value-type="float" office:value="0.006003768" calcext:value-type="float">
            <text:p>0,006003768</text:p>
          </table:table-cell>
          <table:table-cell office:value-type="float" office:value="0.1859157" calcext:value-type="float">
            <text:p>0,1859157</text:p>
          </table:table-cell>
          <table:table-cell office:value-type="float" office:value="0.00696608" calcext:value-type="float">
            <text:p>0,00696608</text:p>
          </table:table-cell>
          <table:table-cell office:value-type="float" office:value="0.8019402" calcext:value-type="float">
            <text:p>0,8019402</text:p>
          </table:table-cell>
          <table:table-cell office:value-type="float" office:value="36.42131" calcext:value-type="float">
            <text:p>36,42131</text:p>
          </table:table-cell>
          <table:table-cell office:value-type="float" office:value="3.198414" calcext:value-type="float">
            <text:p>3,198414</text:p>
          </table:table-cell>
          <table:table-cell office:value-type="float" office:value="33.22289" calcext:value-type="float">
            <text:p>33,22289</text:p>
          </table:table-cell>
          <table:table-cell office:value-type="float" office:value="2.364666" calcext:value-type="float">
            <text:p>2,364666</text:p>
          </table:table-cell>
          <table:table-cell office:value-type="float" office:value="8.215373" calcext:value-type="float">
            <text:p>8,215373</text:p>
          </table:table-cell>
          <table:table-cell office:value-type="float" office:value="5.363215" calcext:value-type="float">
            <text:p>5,363215</text:p>
          </table:table-cell>
          <table:table-cell office:value-type="float" office:value="0.00004648469" calcext:value-type="float">
            <text:p>0,00004648469</text:p>
          </table:table-cell>
          <table:table-cell office:value-type="float" office:value="5.363261" calcext:value-type="float">
            <text:p>5,363261</text:p>
          </table:table-cell>
          <table:table-cell office:value-type="float" office:value="0.2930856" calcext:value-type="float">
            <text:p>0,29308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4.586" calcext:value-type="float">
            <text:p>2004,586</text:p>
          </table:table-cell>
          <table:table-cell office:value-type="float" office:value="2000.147" calcext:value-type="float">
            <text:p>2000,147</text:p>
          </table:table-cell>
          <table:table-cell office:value-type="float" office:value="46.78339" calcext:value-type="float">
            <text:p>46,78339</text:p>
          </table:table-cell>
          <table:table-cell office:value-type="float" office:value="97.661" calcext:value-type="float">
            <text:p>97,661</text:p>
          </table:table-cell>
          <table:table-cell office:value-type="float" office:value="1.208562" calcext:value-type="float">
            <text:p>1,208562</text:p>
          </table:table-cell>
          <table:table-cell office:value-type="float" office:value="0.1978655" calcext:value-type="float">
            <text:p>0,1978655</text:p>
          </table:table-cell>
          <table:table-cell office:value-type="float" office:value="0.006259497" calcext:value-type="float">
            <text:p>0,006259497</text:p>
          </table:table-cell>
          <table:table-cell office:value-type="float" office:value="0.1952269" calcext:value-type="float">
            <text:p>0,1952269</text:p>
          </table:table-cell>
          <table:table-cell office:value-type="float" office:value="0.007179359" calcext:value-type="float">
            <text:p>0,007179359</text:p>
          </table:table-cell>
          <table:table-cell office:value-type="float" office:value="0.8020302" calcext:value-type="float">
            <text:p>0,8020302</text:p>
          </table:table-cell>
          <table:table-cell office:value-type="float" office:value="37.36854" calcext:value-type="float">
            <text:p>37,36854</text:p>
          </table:table-cell>
          <table:table-cell office:value-type="float" office:value="3.227582" calcext:value-type="float">
            <text:p>3,227582</text:p>
          </table:table-cell>
          <table:table-cell office:value-type="float" office:value="34.14095" calcext:value-type="float">
            <text:p>34,14095</text:p>
          </table:table-cell>
          <table:table-cell office:value-type="float" office:value="2.39534" calcext:value-type="float">
            <text:p>2,39534</text:p>
          </table:table-cell>
          <table:table-cell office:value-type="float" office:value="7.992791" calcext:value-type="float">
            <text:p>7,992791</text:p>
          </table:table-cell>
          <table:table-cell office:value-type="float" office:value="5.508622" calcext:value-type="float">
            <text:p>5,508622</text:p>
          </table:table-cell>
          <table:table-cell office:value-type="float" office:value="0.000046459" calcext:value-type="float">
            <text:p>0,000046459</text:p>
          </table:table-cell>
          <table:table-cell office:value-type="float" office:value="5.508669" calcext:value-type="float">
            <text:p>5,508669</text:p>
          </table:table-cell>
          <table:table-cell office:value-type="float" office:value="0.3022871" calcext:value-type="float">
            <text:p>0,302287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054.696" calcext:value-type="float">
            <text:p>2054,696</text:p>
          </table:table-cell>
          <table:table-cell office:value-type="float" office:value="2050.159" calcext:value-type="float">
            <text:p>2050,159</text:p>
          </table:table-cell>
          <table:table-cell office:value-type="float" office:value="47.93966" calcext:value-type="float">
            <text:p>47,93966</text:p>
          </table:table-cell>
          <table:table-cell office:value-type="float" office:value="97.66166" calcext:value-type="float">
            <text:p>97,66166</text:p>
          </table:table-cell>
          <table:table-cell office:value-type="float" office:value="1.228273" calcext:value-type="float">
            <text:p>1,228273</text:p>
          </table:table-cell>
          <table:table-cell office:value-type="float" office:value="0.2073808" calcext:value-type="float">
            <text:p>0,2073808</text:p>
          </table:table-cell>
          <table:table-cell office:value-type="float" office:value="0.00645594" calcext:value-type="float">
            <text:p>0,00645594</text:p>
          </table:table-cell>
          <table:table-cell office:value-type="float" office:value="0.2047851" calcext:value-type="float">
            <text:p>0,2047851</text:p>
          </table:table-cell>
          <table:table-cell office:value-type="float" office:value="0.007527976" calcext:value-type="float">
            <text:p>0,007527976</text:p>
          </table:table-cell>
          <table:table-cell office:value-type="float" office:value="0.8021225" calcext:value-type="float">
            <text:p>0,8021225</text:p>
          </table:table-cell>
          <table:table-cell office:value-type="float" office:value="38.31849" calcext:value-type="float">
            <text:p>38,31849</text:p>
          </table:table-cell>
          <table:table-cell office:value-type="float" office:value="3.256615" calcext:value-type="float">
            <text:p>3,256615</text:p>
          </table:table-cell>
          <table:table-cell office:value-type="float" office:value="35.06188" calcext:value-type="float">
            <text:p>35,06188</text:p>
          </table:table-cell>
          <table:table-cell office:value-type="float" office:value="2.426716" calcext:value-type="float">
            <text:p>2,426716</text:p>
          </table:table-cell>
          <table:table-cell office:value-type="float" office:value="7.831628" calcext:value-type="float">
            <text:p>7,831628</text:p>
          </table:table-cell>
          <table:table-cell office:value-type="float" office:value="5.654258" calcext:value-type="float">
            <text:p>5,654258</text:p>
          </table:table-cell>
          <table:table-cell office:value-type="float" office:value="0.00004643795" calcext:value-type="float">
            <text:p>0,00004643795</text:p>
          </table:table-cell>
          <table:table-cell office:value-type="float" office:value="5.654305" calcext:value-type="float">
            <text:p>5,654305</text:p>
          </table:table-cell>
          <table:table-cell office:value-type="float" office:value="0.3118785" calcext:value-type="float">
            <text:p>0,311878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104.808" calcext:value-type="float">
            <text:p>2104,808</text:p>
          </table:table-cell>
          <table:table-cell office:value-type="float" office:value="2100.17" calcext:value-type="float">
            <text:p>2100,17</text:p>
          </table:table-cell>
          <table:table-cell office:value-type="float" office:value="49.10165" calcext:value-type="float">
            <text:p>49,10165</text:p>
          </table:table-cell>
          <table:table-cell office:value-type="float" office:value="97.66202" calcext:value-type="float">
            <text:p>97,66202</text:p>
          </table:table-cell>
          <table:table-cell office:value-type="float" office:value="1.248147" calcext:value-type="float">
            <text:p>1,248147</text:p>
          </table:table-cell>
          <table:table-cell office:value-type="float" office:value="0.2171242" calcext:value-type="float">
            <text:p>0,2171242</text:p>
          </table:table-cell>
          <table:table-cell office:value-type="float" office:value="0.006720258" calcext:value-type="float">
            <text:p>0,006720258</text:p>
          </table:table-cell>
          <table:table-cell office:value-type="float" office:value="0.214509" calcext:value-type="float">
            <text:p>0,214509</text:p>
          </table:table-cell>
          <table:table-cell office:value-type="float" office:value="0.007575846" calcext:value-type="float">
            <text:p>0,007575846</text:p>
          </table:table-cell>
          <table:table-cell office:value-type="float" office:value="0.8022169" calcext:value-type="float">
            <text:p>0,8022169</text:p>
          </table:table-cell>
          <table:table-cell office:value-type="float" office:value="39.27299" calcext:value-type="float">
            <text:p>39,27299</text:p>
          </table:table-cell>
          <table:table-cell office:value-type="float" office:value="3.285866" calcext:value-type="float">
            <text:p>3,285866</text:p>
          </table:table-cell>
          <table:table-cell office:value-type="float" office:value="35.98712" calcext:value-type="float">
            <text:p>35,98712</text:p>
          </table:table-cell>
          <table:table-cell office:value-type="float" office:value="2.458828" calcext:value-type="float">
            <text:p>2,458828</text:p>
          </table:table-cell>
          <table:table-cell office:value-type="float" office:value="7.678129" calcext:value-type="float">
            <text:p>7,678129</text:p>
          </table:table-cell>
          <table:table-cell office:value-type="float" office:value="5.800034" calcext:value-type="float">
            <text:p>5,800034</text:p>
          </table:table-cell>
          <table:table-cell office:value-type="float" office:value="0.0000464252" calcext:value-type="float">
            <text:p>0,0000464252</text:p>
          </table:table-cell>
          <table:table-cell office:value-type="float" office:value="5.800081" calcext:value-type="float">
            <text:p>5,800081</text:p>
          </table:table-cell>
          <table:table-cell office:value-type="float" office:value="0.3216025" calcext:value-type="float">
            <text:p>0,3216025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154.924" calcext:value-type="float">
            <text:p>2154,924</text:p>
          </table:table-cell>
          <table:table-cell office:value-type="float" office:value="2150.183" calcext:value-type="float">
            <text:p>2150,183</text:p>
          </table:table-cell>
          <table:table-cell office:value-type="float" office:value="50.26967" calcext:value-type="float">
            <text:p>50,26967</text:p>
          </table:table-cell>
          <table:table-cell office:value-type="float" office:value="97.66207" calcext:value-type="float">
            <text:p>97,66207</text:p>
          </table:table-cell>
          <table:table-cell office:value-type="float" office:value="1.268697" calcext:value-type="float">
            <text:p>1,268697</text:p>
          </table:table-cell>
          <table:table-cell office:value-type="float" office:value="0.2271034" calcext:value-type="float">
            <text:p>0,2271034</text:p>
          </table:table-cell>
          <table:table-cell office:value-type="float" office:value="0.006818119" calcext:value-type="float">
            <text:p>0,006818119</text:p>
          </table:table-cell>
          <table:table-cell office:value-type="float" office:value="0.2245007" calcext:value-type="float">
            <text:p>0,2245007</text:p>
          </table:table-cell>
          <table:table-cell office:value-type="float" office:value="0.007960608" calcext:value-type="float">
            <text:p>0,007960608</text:p>
          </table:table-cell>
          <table:table-cell office:value-type="float" office:value="0.8023137" calcext:value-type="float">
            <text:p>0,8023137</text:p>
          </table:table-cell>
          <table:table-cell office:value-type="float" office:value="40.23121" calcext:value-type="float">
            <text:p>40,23121</text:p>
          </table:table-cell>
          <table:table-cell office:value-type="float" office:value="3.316024" calcext:value-type="float">
            <text:p>3,316024</text:p>
          </table:table-cell>
          <table:table-cell office:value-type="float" office:value="36.91519" calcext:value-type="float">
            <text:p>36,91519</text:p>
          </table:table-cell>
          <table:table-cell office:value-type="float" office:value="2.491987" calcext:value-type="float">
            <text:p>2,491987</text:p>
          </table:table-cell>
          <table:table-cell office:value-type="float" office:value="7.493235" calcext:value-type="float">
            <text:p>7,493235</text:p>
          </table:table-cell>
          <table:table-cell office:value-type="float" office:value="5.946105" calcext:value-type="float">
            <text:p>5,946105</text:p>
          </table:table-cell>
          <table:table-cell office:value-type="float" office:value="0.00004641792" calcext:value-type="float">
            <text:p>0,00004641792</text:p>
          </table:table-cell>
          <table:table-cell office:value-type="float" office:value="5.946152" calcext:value-type="float">
            <text:p>5,946152</text:p>
          </table:table-cell>
          <table:table-cell office:value-type="float" office:value="0.3316201" calcext:value-type="float">
            <text:p>0,331620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205.042" calcext:value-type="float">
            <text:p>2205,042</text:p>
          </table:table-cell>
          <table:table-cell office:value-type="float" office:value="2200.196" calcext:value-type="float">
            <text:p>2200,196</text:p>
          </table:table-cell>
          <table:table-cell office:value-type="float" office:value="51.4423" calcext:value-type="float">
            <text:p>51,4423</text:p>
          </table:table-cell>
          <table:table-cell office:value-type="float" office:value="97.66192" calcext:value-type="float">
            <text:p>97,66192</text:p>
          </table:table-cell>
          <table:table-cell office:value-type="float" office:value="1.28862" calcext:value-type="float">
            <text:p>1,28862</text:p>
          </table:table-cell>
          <table:table-cell office:value-type="float" office:value="0.2372967" calcext:value-type="float">
            <text:p>0,2372967</text:p>
          </table:table-cell>
          <table:table-cell office:value-type="float" office:value="0.006554353" calcext:value-type="float">
            <text:p>0,006554353</text:p>
          </table:table-cell>
          <table:table-cell office:value-type="float" office:value="0.2346565" calcext:value-type="float">
            <text:p>0,2346565</text:p>
          </table:table-cell>
          <table:table-cell office:value-type="float" office:value="0.00769967" calcext:value-type="float">
            <text:p>0,00769967</text:p>
          </table:table-cell>
          <table:table-cell office:value-type="float" office:value="0.8024126" calcext:value-type="float">
            <text:p>0,8024126</text:p>
          </table:table-cell>
          <table:table-cell office:value-type="float" office:value="41.19303" calcext:value-type="float">
            <text:p>41,19303</text:p>
          </table:table-cell>
          <table:table-cell office:value-type="float" office:value="3.346924" calcext:value-type="float">
            <text:p>3,346924</text:p>
          </table:table-cell>
          <table:table-cell office:value-type="float" office:value="37.8461" calcext:value-type="float">
            <text:p>37,8461</text:p>
          </table:table-cell>
          <table:table-cell office:value-type="float" office:value="2.526026" calcext:value-type="float">
            <text:p>2,526026</text:p>
          </table:table-cell>
          <table:table-cell office:value-type="float" office:value="7.315907" calcext:value-type="float">
            <text:p>7,315907</text:p>
          </table:table-cell>
          <table:table-cell office:value-type="float" office:value="6.092662" calcext:value-type="float">
            <text:p>6,092662</text:p>
          </table:table-cell>
          <table:table-cell office:value-type="float" office:value="0.00004640906" calcext:value-type="float">
            <text:p>0,00004640906</text:p>
          </table:table-cell>
          <table:table-cell office:value-type="float" office:value="6.092708" calcext:value-type="float">
            <text:p>6,092708</text:p>
          </table:table-cell>
          <table:table-cell office:value-type="float" office:value="0.3419217" calcext:value-type="float">
            <text:p>0,3419217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255.164" calcext:value-type="float">
            <text:p>2255,164</text:p>
          </table:table-cell>
          <table:table-cell office:value-type="float" office:value="2250.21" calcext:value-type="float">
            <text:p>2250,21</text:p>
          </table:table-cell>
          <table:table-cell office:value-type="float" office:value="52.62232" calcext:value-type="float">
            <text:p>52,62232</text:p>
          </table:table-cell>
          <table:table-cell office:value-type="float" office:value="97.66145" calcext:value-type="float">
            <text:p>97,66145</text:p>
          </table:table-cell>
          <table:table-cell office:value-type="float" office:value="1.310059" calcext:value-type="float">
            <text:p>1,310059</text:p>
          </table:table-cell>
          <table:table-cell office:value-type="float" office:value="0.2477479" calcext:value-type="float">
            <text:p>0,2477479</text:p>
          </table:table-cell>
          <table:table-cell office:value-type="float" office:value="0.00662832" calcext:value-type="float">
            <text:p>0,00662832</text:p>
          </table:table-cell>
          <table:table-cell office:value-type="float" office:value="0.2450877" calcext:value-type="float">
            <text:p>0,2450877</text:p>
          </table:table-cell>
          <table:table-cell office:value-type="float" office:value="0.008080438" calcext:value-type="float">
            <text:p>0,008080438</text:p>
          </table:table-cell>
          <table:table-cell office:value-type="float" office:value="0.8025139" calcext:value-type="float">
            <text:p>0,8025139</text:p>
          </table:table-cell>
          <table:table-cell office:value-type="float" office:value="42.15861" calcext:value-type="float">
            <text:p>42,15861</text:p>
          </table:table-cell>
          <table:table-cell office:value-type="float" office:value="3.378033" calcext:value-type="float">
            <text:p>3,378033</text:p>
          </table:table-cell>
          <table:table-cell office:value-type="float" office:value="38.78057" calcext:value-type="float">
            <text:p>38,78057</text:p>
          </table:table-cell>
          <table:table-cell office:value-type="float" office:value="2.561679" calcext:value-type="float">
            <text:p>2,561679</text:p>
          </table:table-cell>
          <table:table-cell office:value-type="float" office:value="7.12301" calcext:value-type="float">
            <text:p>7,12301</text:p>
          </table:table-cell>
          <table:table-cell office:value-type="float" office:value="6.23956" calcext:value-type="float">
            <text:p>6,23956</text:p>
          </table:table-cell>
          <table:table-cell office:value-type="float" office:value="0.00004639477" calcext:value-type="float">
            <text:p>0,00004639477</text:p>
          </table:table-cell>
          <table:table-cell office:value-type="float" office:value="6.239606" calcext:value-type="float">
            <text:p>6,239606</text:p>
          </table:table-cell>
          <table:table-cell office:value-type="float" office:value="0.3523743" calcext:value-type="float">
            <text:p>0,352374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305.288" calcext:value-type="float">
            <text:p>2305,288</text:p>
          </table:table-cell>
          <table:table-cell office:value-type="float" office:value="2300.224" calcext:value-type="float">
            <text:p>2300,224</text:p>
          </table:table-cell>
          <table:table-cell office:value-type="float" office:value="53.80854" calcext:value-type="float">
            <text:p>53,80854</text:p>
          </table:table-cell>
          <table:table-cell office:value-type="float" office:value="97.66073" calcext:value-type="float">
            <text:p>97,66073</text:p>
          </table:table-cell>
          <table:table-cell office:value-type="float" office:value="1.33242" calcext:value-type="float">
            <text:p>1,33242</text:p>
          </table:table-cell>
          <table:table-cell office:value-type="float" office:value="0.2584677" calcext:value-type="float">
            <text:p>0,2584677</text:p>
          </table:table-cell>
          <table:table-cell office:value-type="float" office:value="0.007079729" calcext:value-type="float">
            <text:p>0,007079729</text:p>
          </table:table-cell>
          <table:table-cell office:value-type="float" office:value="0.2557565" calcext:value-type="float">
            <text:p>0,2557565</text:p>
          </table:table-cell>
          <table:table-cell office:value-type="float" office:value="0.008498155" calcext:value-type="float">
            <text:p>0,008498155</text:p>
          </table:table-cell>
          <table:table-cell office:value-type="float" office:value="0.8026174" calcext:value-type="float">
            <text:p>0,8026174</text:p>
          </table:table-cell>
          <table:table-cell office:value-type="float" office:value="43.12798" calcext:value-type="float">
            <text:p>43,12798</text:p>
          </table:table-cell>
          <table:table-cell office:value-type="float" office:value="3.408898" calcext:value-type="float">
            <text:p>3,408898</text:p>
          </table:table-cell>
          <table:table-cell office:value-type="float" office:value="39.71908" calcext:value-type="float">
            <text:p>39,71908</text:p>
          </table:table-cell>
          <table:table-cell office:value-type="float" office:value="2.59847" calcext:value-type="float">
            <text:p>2,59847</text:p>
          </table:table-cell>
          <table:table-cell office:value-type="float" office:value="6.878308" calcext:value-type="float">
            <text:p>6,878308</text:p>
          </table:table-cell>
          <table:table-cell office:value-type="float" office:value="6.386546" calcext:value-type="float">
            <text:p>6,386546</text:p>
          </table:table-cell>
          <table:table-cell office:value-type="float" office:value="0.00004638219" calcext:value-type="float">
            <text:p>0,00004638219</text:p>
          </table:table-cell>
          <table:table-cell office:value-type="float" office:value="6.386592" calcext:value-type="float">
            <text:p>6,386592</text:p>
          </table:table-cell>
          <table:table-cell office:value-type="float" office:value="0.3630825" calcext:value-type="float">
            <text:p>0,3630825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355.416" calcext:value-type="float">
            <text:p>2355,416</text:p>
          </table:table-cell>
          <table:table-cell office:value-type="float" office:value="2350.239" calcext:value-type="float">
            <text:p>2350,239</text:p>
          </table:table-cell>
          <table:table-cell office:value-type="float" office:value="54.99919" calcext:value-type="float">
            <text:p>54,99919</text:p>
          </table:table-cell>
          <table:table-cell office:value-type="float" office:value="97.65985" calcext:value-type="float">
            <text:p>97,65985</text:p>
          </table:table-cell>
          <table:table-cell office:value-type="float" office:value="1.354941" calcext:value-type="float">
            <text:p>1,354941</text:p>
          </table:table-cell>
          <table:table-cell office:value-type="float" office:value="0.2694078" calcext:value-type="float">
            <text:p>0,2694078</text:p>
          </table:table-cell>
          <table:table-cell office:value-type="float" office:value="0.007367766" calcext:value-type="float">
            <text:p>0,007367766</text:p>
          </table:table-cell>
          <table:table-cell office:value-type="float" office:value="0.2666455" calcext:value-type="float">
            <text:p>0,2666455</text:p>
          </table:table-cell>
          <table:table-cell office:value-type="float" office:value="0.00879641" calcext:value-type="float">
            <text:p>0,00879641</text:p>
          </table:table-cell>
          <table:table-cell office:value-type="float" office:value="0.8027232" calcext:value-type="float">
            <text:p>0,8027232</text:p>
          </table:table-cell>
          <table:table-cell office:value-type="float" office:value="44.10109" calcext:value-type="float">
            <text:p>44,10109</text:p>
          </table:table-cell>
          <table:table-cell office:value-type="float" office:value="3.43889" calcext:value-type="float">
            <text:p>3,43889</text:p>
          </table:table-cell>
          <table:table-cell office:value-type="float" office:value="40.6622" calcext:value-type="float">
            <text:p>40,6622</text:p>
          </table:table-cell>
          <table:table-cell office:value-type="float" office:value="2.635863" calcext:value-type="float">
            <text:p>2,635863</text:p>
          </table:table-cell>
          <table:table-cell office:value-type="float" office:value="6.728102" calcext:value-type="float">
            <text:p>6,728102</text:p>
          </table:table-cell>
          <table:table-cell office:value-type="float" office:value="6.533138" calcext:value-type="float">
            <text:p>6,533138</text:p>
          </table:table-cell>
          <table:table-cell office:value-type="float" office:value="0.00004637523" calcext:value-type="float">
            <text:p>0,00004637523</text:p>
          </table:table-cell>
          <table:table-cell office:value-type="float" office:value="6.533184" calcext:value-type="float">
            <text:p>6,533184</text:p>
          </table:table-cell>
          <table:table-cell office:value-type="float" office:value="0.3741179" calcext:value-type="float">
            <text:p>0,374117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5.547" calcext:value-type="float">
            <text:p>2405,547</text:p>
          </table:table-cell>
          <table:table-cell office:value-type="float" office:value="2400.254" calcext:value-type="float">
            <text:p>2400,254</text:p>
          </table:table-cell>
          <table:table-cell office:value-type="float" office:value="56.19543" calcext:value-type="float">
            <text:p>56,19543</text:p>
          </table:table-cell>
          <table:table-cell office:value-type="float" office:value="97.65877" calcext:value-type="float">
            <text:p>97,65877</text:p>
          </table:table-cell>
          <table:table-cell office:value-type="float" office:value="1.378211" calcext:value-type="float">
            <text:p>1,378211</text:p>
          </table:table-cell>
          <table:table-cell office:value-type="float" office:value="0.2806141" calcext:value-type="float">
            <text:p>0,2806141</text:p>
          </table:table-cell>
          <table:table-cell office:value-type="float" office:value="0.008051893" calcext:value-type="float">
            <text:p>0,008051893</text:p>
          </table:table-cell>
          <table:table-cell office:value-type="float" office:value="0.2777555" calcext:value-type="float">
            <text:p>0,2777555</text:p>
          </table:table-cell>
          <table:table-cell office:value-type="float" office:value="0.008958235" calcext:value-type="float">
            <text:p>0,008958235</text:p>
          </table:table-cell>
          <table:table-cell office:value-type="float" office:value="0.8028315" calcext:value-type="float">
            <text:p>0,8028315</text:p>
          </table:table-cell>
          <table:table-cell office:value-type="float" office:value="45.0789" calcext:value-type="float">
            <text:p>45,0789</text:p>
          </table:table-cell>
          <table:table-cell office:value-type="float" office:value="3.467843" calcext:value-type="float">
            <text:p>3,467843</text:p>
          </table:table-cell>
          <table:table-cell office:value-type="float" office:value="41.61105" calcext:value-type="float">
            <text:p>41,61105</text:p>
          </table:table-cell>
          <table:table-cell office:value-type="float" office:value="2.673529" calcext:value-type="float">
            <text:p>2,673529</text:p>
          </table:table-cell>
          <table:table-cell office:value-type="float" office:value="6.577839" calcext:value-type="float">
            <text:p>6,577839</text:p>
          </table:table-cell>
          <table:table-cell office:value-type="float" office:value="6.6794" calcext:value-type="float">
            <text:p>6,6794</text:p>
          </table:table-cell>
          <table:table-cell office:value-type="float" office:value="0.00004637139" calcext:value-type="float">
            <text:p>0,00004637139</text:p>
          </table:table-cell>
          <table:table-cell office:value-type="float" office:value="6.679446" calcext:value-type="float">
            <text:p>6,679446</text:p>
          </table:table-cell>
          <table:table-cell office:value-type="float" office:value="0.3853497" calcext:value-type="float">
            <text:p>0,3853497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455.681" calcext:value-type="float">
            <text:p>2455,681</text:p>
          </table:table-cell>
          <table:table-cell office:value-type="float" office:value="2450.27" calcext:value-type="float">
            <text:p>2450,27</text:p>
          </table:table-cell>
          <table:table-cell office:value-type="float" office:value="57.41151" calcext:value-type="float">
            <text:p>57,41151</text:p>
          </table:table-cell>
          <table:table-cell office:value-type="float" office:value="97.65693" calcext:value-type="float">
            <text:p>97,65693</text:p>
          </table:table-cell>
          <table:table-cell office:value-type="float" office:value="1.401547" calcext:value-type="float">
            <text:p>1,401547</text:p>
          </table:table-cell>
          <table:table-cell office:value-type="float" office:value="0.2920517" calcext:value-type="float">
            <text:p>0,2920517</text:p>
          </table:table-cell>
          <table:table-cell office:value-type="float" office:value="0.00877821" calcext:value-type="float">
            <text:p>0,00877821</text:p>
          </table:table-cell>
          <table:table-cell office:value-type="float" office:value="0.2890571" calcext:value-type="float">
            <text:p>0,2890571</text:p>
          </table:table-cell>
          <table:table-cell office:value-type="float" office:value="0.008717588" calcext:value-type="float">
            <text:p>0,008717588</text:p>
          </table:table-cell>
          <table:table-cell office:value-type="float" office:value="0.8029418" calcext:value-type="float">
            <text:p>0,8029418</text:p>
          </table:table-cell>
          <table:table-cell office:value-type="float" office:value="46.07444" calcext:value-type="float">
            <text:p>46,07444</text:p>
          </table:table-cell>
          <table:table-cell office:value-type="float" office:value="3.49984" calcext:value-type="float">
            <text:p>3,49984</text:p>
          </table:table-cell>
          <table:table-cell office:value-type="float" office:value="42.5746" calcext:value-type="float">
            <text:p>42,5746</text:p>
          </table:table-cell>
          <table:table-cell office:value-type="float" office:value="2.711856" calcext:value-type="float">
            <text:p>2,711856</text:p>
          </table:table-cell>
          <table:table-cell office:value-type="float" office:value="6.555424" calcext:value-type="float">
            <text:p>6,555424</text:p>
          </table:table-cell>
          <table:table-cell office:value-type="float" office:value="6.826658" calcext:value-type="float">
            <text:p>6,826658</text:p>
          </table:table-cell>
          <table:table-cell office:value-type="float" office:value="0.00004638127" calcext:value-type="float">
            <text:p>0,00004638127</text:p>
          </table:table-cell>
          <table:table-cell office:value-type="float" office:value="6.826704" calcext:value-type="float">
            <text:p>6,826704</text:p>
          </table:table-cell>
          <table:table-cell office:value-type="float" office:value="0.396964" calcext:value-type="float">
            <text:p>0,39696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05.818" calcext:value-type="float">
            <text:p>2505,818</text:p>
          </table:table-cell>
          <table:table-cell office:value-type="float" office:value="2500.287" calcext:value-type="float">
            <text:p>2500,287</text:p>
          </table:table-cell>
          <table:table-cell office:value-type="float" office:value="58.61597" calcext:value-type="float">
            <text:p>58,61597</text:p>
          </table:table-cell>
          <table:table-cell office:value-type="float" office:value="97.65563" calcext:value-type="float">
            <text:p>97,65563</text:p>
          </table:table-cell>
          <table:table-cell office:value-type="float" office:value="1.424706" calcext:value-type="float">
            <text:p>1,424706</text:p>
          </table:table-cell>
          <table:table-cell office:value-type="float" office:value="0.3036651" calcext:value-type="float">
            <text:p>0,3036651</text:p>
          </table:table-cell>
          <table:table-cell office:value-type="float" office:value="0.009031564" calcext:value-type="float">
            <text:p>0,009031564</text:p>
          </table:table-cell>
          <table:table-cell office:value-type="float" office:value="0.3005877" calcext:value-type="float">
            <text:p>0,3005877</text:p>
          </table:table-cell>
          <table:table-cell office:value-type="float" office:value="0.008366884" calcext:value-type="float">
            <text:p>0,008366884</text:p>
          </table:table-cell>
          <table:table-cell office:value-type="float" office:value="0.8030545" calcext:value-type="float">
            <text:p>0,8030545</text:p>
          </table:table-cell>
          <table:table-cell office:value-type="float" office:value="47.05825" calcext:value-type="float">
            <text:p>47,05825</text:p>
          </table:table-cell>
          <table:table-cell office:value-type="float" office:value="3.528329" calcext:value-type="float">
            <text:p>3,528329</text:p>
          </table:table-cell>
          <table:table-cell office:value-type="float" office:value="43.52992" calcext:value-type="float">
            <text:p>43,52992</text:p>
          </table:table-cell>
          <table:table-cell office:value-type="float" office:value="2.751135" calcext:value-type="float">
            <text:p>2,751135</text:p>
          </table:table-cell>
          <table:table-cell office:value-type="float" office:value="6.472648" calcext:value-type="float">
            <text:p>6,472648</text:p>
          </table:table-cell>
          <table:table-cell office:value-type="float" office:value="6.97308" calcext:value-type="float">
            <text:p>6,97308</text:p>
          </table:table-cell>
          <table:table-cell office:value-type="float" office:value="0.00004640011" calcext:value-type="float">
            <text:p>0,00004640011</text:p>
          </table:table-cell>
          <table:table-cell office:value-type="float" office:value="6.973126" calcext:value-type="float">
            <text:p>6,973126</text:p>
          </table:table-cell>
          <table:table-cell office:value-type="float" office:value="0.4087554" calcext:value-type="float">
            <text:p>0,4087554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55.958" calcext:value-type="float">
            <text:p>2555,958</text:p>
          </table:table-cell>
          <table:table-cell office:value-type="float" office:value="2550.305" calcext:value-type="float">
            <text:p>2550,305</text:p>
          </table:table-cell>
          <table:table-cell office:value-type="float" office:value="59.82304" calcext:value-type="float">
            <text:p>59,82304</text:p>
          </table:table-cell>
          <table:table-cell office:value-type="float" office:value="97.65428" calcext:value-type="float">
            <text:p>97,65428</text:p>
          </table:table-cell>
          <table:table-cell office:value-type="float" office:value="1.449158" calcext:value-type="float">
            <text:p>1,449158</text:p>
          </table:table-cell>
          <table:table-cell office:value-type="float" office:value="0.3155021" calcext:value-type="float">
            <text:p>0,3155021</text:p>
          </table:table-cell>
          <table:table-cell office:value-type="float" office:value="0.009204293" calcext:value-type="float">
            <text:p>0,009204293</text:p>
          </table:table-cell>
          <table:table-cell office:value-type="float" office:value="0.3124374" calcext:value-type="float">
            <text:p>0,3124374</text:p>
          </table:table-cell>
          <table:table-cell office:value-type="float" office:value="0.008844478" calcext:value-type="float">
            <text:p>0,008844478</text:p>
          </table:table-cell>
          <table:table-cell office:value-type="float" office:value="0.8031696" calcext:value-type="float">
            <text:p>0,8031696</text:p>
          </table:table-cell>
          <table:table-cell office:value-type="float" office:value="48.04215" calcext:value-type="float">
            <text:p>48,04215</text:p>
          </table:table-cell>
          <table:table-cell office:value-type="float" office:value="3.556408" calcext:value-type="float">
            <text:p>3,556408</text:p>
          </table:table-cell>
          <table:table-cell office:value-type="float" office:value="44.48574" calcext:value-type="float">
            <text:p>44,48574</text:p>
          </table:table-cell>
          <table:table-cell office:value-type="float" office:value="2.79158" calcext:value-type="float">
            <text:p>2,79158</text:p>
          </table:table-cell>
          <table:table-cell office:value-type="float" office:value="6.323946" calcext:value-type="float">
            <text:p>6,323946</text:p>
          </table:table-cell>
          <table:table-cell office:value-type="float" office:value="7.119275" calcext:value-type="float">
            <text:p>7,119275</text:p>
          </table:table-cell>
          <table:table-cell office:value-type="float" office:value="0.0001242277" calcext:value-type="float">
            <text:p>0,0001242277</text:p>
          </table:table-cell>
          <table:table-cell office:value-type="float" office:value="7.1194" calcext:value-type="float">
            <text:p>7,1194</text:p>
          </table:table-cell>
          <table:table-cell office:value-type="float" office:value="0.4207572" calcext:value-type="float">
            <text:p>0,420757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606.101" calcext:value-type="float">
            <text:p>2606,101</text:p>
          </table:table-cell>
          <table:table-cell office:value-type="float" office:value="2600.323" calcext:value-type="float">
            <text:p>2600,323</text:p>
          </table:table-cell>
          <table:table-cell office:value-type="float" office:value="61.03838" calcext:value-type="float">
            <text:p>61,03838</text:p>
          </table:table-cell>
          <table:table-cell office:value-type="float" office:value="97.65266" calcext:value-type="float">
            <text:p>97,65266</text:p>
          </table:table-cell>
          <table:table-cell office:value-type="float" office:value="1.473356" calcext:value-type="float">
            <text:p>1,473356</text:p>
          </table:table-cell>
          <table:table-cell office:value-type="float" office:value="0.3275703" calcext:value-type="float">
            <text:p>0,3275703</text:p>
          </table:table-cell>
          <table:table-cell office:value-type="float" office:value="0.00944577" calcext:value-type="float">
            <text:p>0,00944577</text:p>
          </table:table-cell>
          <table:table-cell office:value-type="float" office:value="0.3244596" calcext:value-type="float">
            <text:p>0,3244596</text:p>
          </table:table-cell>
          <table:table-cell office:value-type="float" office:value="0.008592856" calcext:value-type="float">
            <text:p>0,008592856</text:p>
          </table:table-cell>
          <table:table-cell office:value-type="float" office:value="0.8032868" calcext:value-type="float">
            <text:p>0,8032868</text:p>
          </table:table-cell>
          <table:table-cell office:value-type="float" office:value="49.03154" calcext:value-type="float">
            <text:p>49,03154</text:p>
          </table:table-cell>
          <table:table-cell office:value-type="float" office:value="3.585672" calcext:value-type="float">
            <text:p>3,585672</text:p>
          </table:table-cell>
          <table:table-cell office:value-type="float" office:value="45.44587" calcext:value-type="float">
            <text:p>45,44587</text:p>
          </table:table-cell>
          <table:table-cell office:value-type="float" office:value="2.835067" calcext:value-type="float">
            <text:p>2,835067</text:p>
          </table:table-cell>
          <table:table-cell office:value-type="float" office:value="6.194813" calcext:value-type="float">
            <text:p>6,194813</text:p>
          </table:table-cell>
          <table:table-cell office:value-type="float" office:value="7.265377" calcext:value-type="float">
            <text:p>7,265377</text:p>
          </table:table-cell>
          <table:table-cell office:value-type="float" office:value="0.0000464386" calcext:value-type="float">
            <text:p>0,0000464386</text:p>
          </table:table-cell>
          <table:table-cell office:value-type="float" office:value="7.265423" calcext:value-type="float">
            <text:p>7,265423</text:p>
          </table:table-cell>
          <table:table-cell office:value-type="float" office:value="0.4329917" calcext:value-type="float">
            <text:p>0,4329917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656.247" calcext:value-type="float">
            <text:p>2656,247</text:p>
          </table:table-cell>
          <table:table-cell office:value-type="float" office:value="2650.342" calcext:value-type="float">
            <text:p>2650,342</text:p>
          </table:table-cell>
          <table:table-cell office:value-type="float" office:value="62.25818" calcext:value-type="float">
            <text:p>62,25818</text:p>
          </table:table-cell>
          <table:table-cell office:value-type="float" office:value="97.65094" calcext:value-type="float">
            <text:p>97,65094</text:p>
          </table:table-cell>
          <table:table-cell office:value-type="float" office:value="1.498255" calcext:value-type="float">
            <text:p>1,498255</text:p>
          </table:table-cell>
          <table:table-cell office:value-type="float" office:value="0.3398137" calcext:value-type="float">
            <text:p>0,3398137</text:p>
          </table:table-cell>
          <table:table-cell office:value-type="float" office:value="0.008896876" calcext:value-type="float">
            <text:p>0,008896876</text:p>
          </table:table-cell>
          <table:table-cell office:value-type="float" office:value="0.3367763" calcext:value-type="float">
            <text:p>0,3367763</text:p>
          </table:table-cell>
          <table:table-cell office:value-type="float" office:value="0.009361375" calcext:value-type="float">
            <text:p>0,009361375</text:p>
          </table:table-cell>
          <table:table-cell office:value-type="float" office:value="0.8034063" calcext:value-type="float">
            <text:p>0,8034063</text:p>
          </table:table-cell>
          <table:table-cell office:value-type="float" office:value="50.02537" calcext:value-type="float">
            <text:p>50,02537</text:p>
          </table:table-cell>
          <table:table-cell office:value-type="float" office:value="3.615511" calcext:value-type="float">
            <text:p>3,615511</text:p>
          </table:table-cell>
          <table:table-cell office:value-type="float" office:value="46.40986" calcext:value-type="float">
            <text:p>46,40986</text:p>
          </table:table-cell>
          <table:table-cell office:value-type="float" office:value="2.877354" calcext:value-type="float">
            <text:p>2,877354</text:p>
          </table:table-cell>
          <table:table-cell office:value-type="float" office:value="6.028892" calcext:value-type="float">
            <text:p>6,028892</text:p>
          </table:table-cell>
          <table:table-cell office:value-type="float" office:value="7.411764" calcext:value-type="float">
            <text:p>7,411764</text:p>
          </table:table-cell>
          <table:table-cell office:value-type="float" office:value="0.0000464394" calcext:value-type="float">
            <text:p>0,0000464394</text:p>
          </table:table-cell>
          <table:table-cell office:value-type="float" office:value="7.41181" calcext:value-type="float">
            <text:p>7,41181</text:p>
          </table:table-cell>
          <table:table-cell office:value-type="float" office:value="0.4453904" calcext:value-type="float">
            <text:p>0,445390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06.397" calcext:value-type="float">
            <text:p>2706,397</text:p>
          </table:table-cell>
          <table:table-cell office:value-type="float" office:value="2700.362" calcext:value-type="float">
            <text:p>2700,362</text:p>
          </table:table-cell>
          <table:table-cell office:value-type="float" office:value="63.48328" calcext:value-type="float">
            <text:p>63,48328</text:p>
          </table:table-cell>
          <table:table-cell office:value-type="float" office:value="97.64908" calcext:value-type="float">
            <text:p>97,64908</text:p>
          </table:table-cell>
          <table:table-cell office:value-type="float" office:value="1.522437" calcext:value-type="float">
            <text:p>1,522437</text:p>
          </table:table-cell>
          <table:table-cell office:value-type="float" office:value="0.3522326" calcext:value-type="float">
            <text:p>0,3522326</text:p>
          </table:table-cell>
          <table:table-cell office:value-type="float" office:value="0.007620549" calcext:value-type="float">
            <text:p>0,007620549</text:p>
          </table:table-cell>
          <table:table-cell office:value-type="float" office:value="0.3493047" calcext:value-type="float">
            <text:p>0,3493047</text:p>
          </table:table-cell>
          <table:table-cell office:value-type="float" office:value="0.009750678" calcext:value-type="float">
            <text:p>0,009750678</text:p>
          </table:table-cell>
          <table:table-cell office:value-type="float" office:value="0.803528" calcext:value-type="float">
            <text:p>0,803528</text:p>
          </table:table-cell>
          <table:table-cell office:value-type="float" office:value="51.0237" calcext:value-type="float">
            <text:p>51,0237</text:p>
          </table:table-cell>
          <table:table-cell office:value-type="float" office:value="3.645843" calcext:value-type="float">
            <text:p>3,645843</text:p>
          </table:table-cell>
          <table:table-cell office:value-type="float" office:value="47.37786" calcext:value-type="float">
            <text:p>47,37786</text:p>
          </table:table-cell>
          <table:table-cell office:value-type="float" office:value="2.920433" calcext:value-type="float">
            <text:p>2,920433</text:p>
          </table:table-cell>
          <table:table-cell office:value-type="float" office:value="5.937532" calcext:value-type="float">
            <text:p>5,937532</text:p>
          </table:table-cell>
          <table:table-cell office:value-type="float" office:value="7.558548" calcext:value-type="float">
            <text:p>7,558548</text:p>
          </table:table-cell>
          <table:table-cell office:value-type="float" office:value="0.00004644292" calcext:value-type="float">
            <text:p>0,00004644292</text:p>
          </table:table-cell>
          <table:table-cell office:value-type="float" office:value="7.558595" calcext:value-type="float">
            <text:p>7,558595</text:p>
          </table:table-cell>
          <table:table-cell office:value-type="float" office:value="0.4581134" calcext:value-type="float">
            <text:p>0,4581134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756.55" calcext:value-type="float">
            <text:p>2756,55</text:p>
          </table:table-cell>
          <table:table-cell office:value-type="float" office:value="2750.382" calcext:value-type="float">
            <text:p>2750,382</text:p>
          </table:table-cell>
          <table:table-cell office:value-type="float" office:value="64.71601" calcext:value-type="float">
            <text:p>64,71601</text:p>
          </table:table-cell>
          <table:table-cell office:value-type="float" office:value="97.64702" calcext:value-type="float">
            <text:p>97,64702</text:p>
          </table:table-cell>
          <table:table-cell office:value-type="float" office:value="1.547054" calcext:value-type="float">
            <text:p>1,547054</text:p>
          </table:table-cell>
          <table:table-cell office:value-type="float" office:value="0.3649095" calcext:value-type="float">
            <text:p>0,3649095</text:p>
          </table:table-cell>
          <table:table-cell office:value-type="float" office:value="0.006504394" calcext:value-type="float">
            <text:p>0,006504394</text:p>
          </table:table-cell>
          <table:table-cell office:value-type="float" office:value="0.3620386" calcext:value-type="float">
            <text:p>0,3620386</text:p>
          </table:table-cell>
          <table:table-cell office:value-type="float" office:value="0.009948698" calcext:value-type="float">
            <text:p>0,009948698</text:p>
          </table:table-cell>
          <table:table-cell office:value-type="float" office:value="0.803652" calcext:value-type="float">
            <text:p>0,803652</text:p>
          </table:table-cell>
          <table:table-cell office:value-type="float" office:value="52.02725" calcext:value-type="float">
            <text:p>52,02725</text:p>
          </table:table-cell>
          <table:table-cell office:value-type="float" office:value="3.676582" calcext:value-type="float">
            <text:p>3,676582</text:p>
          </table:table-cell>
          <table:table-cell office:value-type="float" office:value="48.35066" calcext:value-type="float">
            <text:p>48,35066</text:p>
          </table:table-cell>
          <table:table-cell office:value-type="float" office:value="2.964706" calcext:value-type="float">
            <text:p>2,964706</text:p>
          </table:table-cell>
          <table:table-cell office:value-type="float" office:value="5.881345" calcext:value-type="float">
            <text:p>5,881345</text:p>
          </table:table-cell>
          <table:table-cell office:value-type="float" office:value="7.705782" calcext:value-type="float">
            <text:p>7,705782</text:p>
          </table:table-cell>
          <table:table-cell office:value-type="float" office:value="0.00005981112" calcext:value-type="float">
            <text:p>0,00005981112</text:p>
          </table:table-cell>
          <table:table-cell office:value-type="float" office:value="7.705842" calcext:value-type="float">
            <text:p>7,705842</text:p>
          </table:table-cell>
          <table:table-cell office:value-type="float" office:value="0.4711655" calcext:value-type="float">
            <text:p>0,471165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806.706" calcext:value-type="float">
            <text:p>2806,706</text:p>
          </table:table-cell>
          <table:table-cell office:value-type="float" office:value="2800.403" calcext:value-type="float">
            <text:p>2800,403</text:p>
          </table:table-cell>
          <table:table-cell office:value-type="float" office:value="65.96754" calcext:value-type="float">
            <text:p>65,96754</text:p>
          </table:table-cell>
          <table:table-cell office:value-type="float" office:value="97.64436" calcext:value-type="float">
            <text:p>97,64436</text:p>
          </table:table-cell>
          <table:table-cell office:value-type="float" office:value="1.575702" calcext:value-type="float">
            <text:p>1,575702</text:p>
          </table:table-cell>
          <table:table-cell office:value-type="float" office:value="0.3781416" calcext:value-type="float">
            <text:p>0,3781416</text:p>
          </table:table-cell>
          <table:table-cell office:value-type="float" office:value="0.009726086" calcext:value-type="float">
            <text:p>0,009726086</text:p>
          </table:table-cell>
          <table:table-cell office:value-type="float" office:value="0.3749126" calcext:value-type="float">
            <text:p>0,3749126</text:p>
          </table:table-cell>
          <table:table-cell office:value-type="float" office:value="0.009143744" calcext:value-type="float">
            <text:p>0,009143744</text:p>
          </table:table-cell>
          <table:table-cell office:value-type="float" office:value="0.8037781" calcext:value-type="float">
            <text:p>0,8037781</text:p>
          </table:table-cell>
          <table:table-cell office:value-type="float" office:value="53.04349" calcext:value-type="float">
            <text:p>53,04349</text:p>
          </table:table-cell>
          <table:table-cell office:value-type="float" office:value="3.709383" calcext:value-type="float">
            <text:p>3,709383</text:p>
          </table:table-cell>
          <table:table-cell office:value-type="float" office:value="49.33411" calcext:value-type="float">
            <text:p>49,33411</text:p>
          </table:table-cell>
          <table:table-cell office:value-type="float" office:value="3.009865" calcext:value-type="float">
            <text:p>3,009865</text:p>
          </table:table-cell>
          <table:table-cell office:value-type="float" office:value="5.85351" calcext:value-type="float">
            <text:p>5,85351</text:p>
          </table:table-cell>
          <table:table-cell office:value-type="float" office:value="7.853962" calcext:value-type="float">
            <text:p>7,853962</text:p>
          </table:table-cell>
          <table:table-cell office:value-type="float" office:value="0.00004645942" calcext:value-type="float">
            <text:p>0,00004645942</text:p>
          </table:table-cell>
          <table:table-cell office:value-type="float" office:value="7.854009" calcext:value-type="float">
            <text:p>7,854009</text:p>
          </table:table-cell>
          <table:table-cell office:value-type="float" office:value="0.4844731" calcext:value-type="float">
            <text:p>0,4844731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856.865" calcext:value-type="float">
            <text:p>2856,865</text:p>
          </table:table-cell>
          <table:table-cell office:value-type="float" office:value="2850.425" calcext:value-type="float">
            <text:p>2850,425</text:p>
          </table:table-cell>
          <table:table-cell office:value-type="float" office:value="67.21154" calcext:value-type="float">
            <text:p>67,21154</text:p>
          </table:table-cell>
          <table:table-cell office:value-type="float" office:value="97.64205" calcext:value-type="float">
            <text:p>97,64205</text:p>
          </table:table-cell>
          <table:table-cell office:value-type="float" office:value="1.60315" calcext:value-type="float">
            <text:p>1,60315</text:p>
          </table:table-cell>
          <table:table-cell office:value-type="float" office:value="0.3914405" calcext:value-type="float">
            <text:p>0,3914405</text:p>
          </table:table-cell>
          <table:table-cell office:value-type="float" office:value="0.01079643" calcext:value-type="float">
            <text:p>0,01079643</text:p>
          </table:table-cell>
          <table:table-cell office:value-type="float" office:value="0.3880986" calcext:value-type="float">
            <text:p>0,3880986</text:p>
          </table:table-cell>
          <table:table-cell office:value-type="float" office:value="0.008907529" calcext:value-type="float">
            <text:p>0,008907529</text:p>
          </table:table-cell>
          <table:table-cell office:value-type="float" office:value="0.8039067" calcext:value-type="float">
            <text:p>0,8039067</text:p>
          </table:table-cell>
          <table:table-cell office:value-type="float" office:value="54.0524" calcext:value-type="float">
            <text:p>54,0524</text:p>
          </table:table-cell>
          <table:table-cell office:value-type="float" office:value="3.74043" calcext:value-type="float">
            <text:p>3,74043</text:p>
          </table:table-cell>
          <table:table-cell office:value-type="float" office:value="50.31197" calcext:value-type="float">
            <text:p>50,31197</text:p>
          </table:table-cell>
          <table:table-cell office:value-type="float" office:value="3.056224" calcext:value-type="float">
            <text:p>3,056224</text:p>
          </table:table-cell>
          <table:table-cell office:value-type="float" office:value="5.764213" calcext:value-type="float">
            <text:p>5,764213</text:p>
          </table:table-cell>
          <table:table-cell office:value-type="float" office:value="8.001702" calcext:value-type="float">
            <text:p>8,001702</text:p>
          </table:table-cell>
          <table:table-cell office:value-type="float" office:value="0.00004647226" calcext:value-type="float">
            <text:p>0,00004647226</text:p>
          </table:table-cell>
          <table:table-cell office:value-type="float" office:value="8.001748" calcext:value-type="float">
            <text:p>8,001748</text:p>
          </table:table-cell>
          <table:table-cell office:value-type="float" office:value="0.4980226" calcext:value-type="float">
            <text:p>0,498022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907.028" calcext:value-type="float">
            <text:p>2907,028</text:p>
          </table:table-cell>
          <table:table-cell office:value-type="float" office:value="2900.448" calcext:value-type="float">
            <text:p>2900,448</text:p>
          </table:table-cell>
          <table:table-cell office:value-type="float" office:value="68.45813" calcext:value-type="float">
            <text:p>68,45813</text:p>
          </table:table-cell>
          <table:table-cell office:value-type="float" office:value="97.63974" calcext:value-type="float">
            <text:p>97,63974</text:p>
          </table:table-cell>
          <table:table-cell office:value-type="float" office:value="1.628568" calcext:value-type="float">
            <text:p>1,628568</text:p>
          </table:table-cell>
          <table:table-cell office:value-type="float" office:value="0.4047699" calcext:value-type="float">
            <text:p>0,4047699</text:p>
          </table:table-cell>
          <table:table-cell office:value-type="float" office:value="0.009542296" calcext:value-type="float">
            <text:p>0,009542296</text:p>
          </table:table-cell>
          <table:table-cell office:value-type="float" office:value="0.4015121" calcext:value-type="float">
            <text:p>0,4015121</text:p>
          </table:table-cell>
          <table:table-cell office:value-type="float" office:value="0.008705625" calcext:value-type="float">
            <text:p>0,008705625</text:p>
          </table:table-cell>
          <table:table-cell office:value-type="float" office:value="0.8040374" calcext:value-type="float">
            <text:p>0,8040374</text:p>
          </table:table-cell>
          <table:table-cell office:value-type="float" office:value="55.06468" calcext:value-type="float">
            <text:p>55,06468</text:p>
          </table:table-cell>
          <table:table-cell office:value-type="float" office:value="3.77169" calcext:value-type="float">
            <text:p>3,77169</text:p>
          </table:table-cell>
          <table:table-cell office:value-type="float" office:value="51.29299" calcext:value-type="float">
            <text:p>51,29299</text:p>
          </table:table-cell>
          <table:table-cell office:value-type="float" office:value="3.10341" calcext:value-type="float">
            <text:p>3,10341</text:p>
          </table:table-cell>
          <table:table-cell office:value-type="float" office:value="5.675325" calcext:value-type="float">
            <text:p>5,675325</text:p>
          </table:table-cell>
          <table:table-cell office:value-type="float" office:value="8.149612" calcext:value-type="float">
            <text:p>8,149612</text:p>
          </table:table-cell>
          <table:table-cell office:value-type="float" office:value="0.00007792319" calcext:value-type="float">
            <text:p>0,00007792319</text:p>
          </table:table-cell>
          <table:table-cell office:value-type="float" office:value="8.14969" calcext:value-type="float">
            <text:p>8,14969</text:p>
          </table:table-cell>
          <table:table-cell office:value-type="float" office:value="0.5117851" calcext:value-type="float">
            <text:p>0,5117851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2957.193" calcext:value-type="float">
            <text:p>2957,193</text:p>
          </table:table-cell>
          <table:table-cell office:value-type="float" office:value="2950.471" calcext:value-type="float">
            <text:p>2950,471</text:p>
          </table:table-cell>
          <table:table-cell office:value-type="float" office:value="69.71635" calcext:value-type="float">
            <text:p>69,71635</text:p>
          </table:table-cell>
          <table:table-cell office:value-type="float" office:value="97.63711" calcext:value-type="float">
            <text:p>97,63711</text:p>
          </table:table-cell>
          <table:table-cell office:value-type="float" office:value="1.657564" calcext:value-type="float">
            <text:p>1,657564</text:p>
          </table:table-cell>
          <table:table-cell office:value-type="float" office:value="0.4184928" calcext:value-type="float">
            <text:p>0,4184928</text:p>
          </table:table-cell>
          <table:table-cell office:value-type="float" office:value="0.01021282" calcext:value-type="float">
            <text:p>0,01021282</text:p>
          </table:table-cell>
          <table:table-cell office:value-type="float" office:value="0.415249" calcext:value-type="float">
            <text:p>0,415249</text:p>
          </table:table-cell>
          <table:table-cell office:value-type="float" office:value="0.009439153" calcext:value-type="float">
            <text:p>0,009439153</text:p>
          </table:table-cell>
          <table:table-cell office:value-type="float" office:value="0.8041705" calcext:value-type="float">
            <text:p>0,8041705</text:p>
          </table:table-cell>
          <table:table-cell office:value-type="float" office:value="56.08129" calcext:value-type="float">
            <text:p>56,08129</text:p>
          </table:table-cell>
          <table:table-cell office:value-type="float" office:value="3.803326" calcext:value-type="float">
            <text:p>3,803326</text:p>
          </table:table-cell>
          <table:table-cell office:value-type="float" office:value="52.27796" calcext:value-type="float">
            <text:p>52,27796</text:p>
          </table:table-cell>
          <table:table-cell office:value-type="float" office:value="3.153789" calcext:value-type="float">
            <text:p>3,153789</text:p>
          </table:table-cell>
          <table:table-cell office:value-type="float" office:value="5.595998" calcext:value-type="float">
            <text:p>5,595998</text:p>
          </table:table-cell>
          <table:table-cell office:value-type="float" office:value="8.297771" calcext:value-type="float">
            <text:p>8,297771</text:p>
          </table:table-cell>
          <table:table-cell office:value-type="float" office:value="0.00004650965" calcext:value-type="float">
            <text:p>0,00004650965</text:p>
          </table:table-cell>
          <table:table-cell office:value-type="float" office:value="8.297817" calcext:value-type="float">
            <text:p>8,297817</text:p>
          </table:table-cell>
          <table:table-cell office:value-type="float" office:value="0.5258937" calcext:value-type="float">
            <text:p>0,525893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7.362" calcext:value-type="float">
            <text:p>3007,362</text:p>
          </table:table-cell>
          <table:table-cell office:value-type="float" office:value="3000.495" calcext:value-type="float">
            <text:p>3000,495</text:p>
          </table:table-cell>
          <table:table-cell office:value-type="float" office:value="70.97679" calcext:value-type="float">
            <text:p>70,97679</text:p>
          </table:table-cell>
          <table:table-cell office:value-type="float" office:value="97.6345" calcext:value-type="float">
            <text:p>97,6345</text:p>
          </table:table-cell>
          <table:table-cell office:value-type="float" office:value="1.686935" calcext:value-type="float">
            <text:p>1,686935</text:p>
          </table:table-cell>
          <table:table-cell office:value-type="float" office:value="0.4325369" calcext:value-type="float">
            <text:p>0,4325369</text:p>
          </table:table-cell>
          <table:table-cell office:value-type="float" office:value="0.01160205" calcext:value-type="float">
            <text:p>0,01160205</text:p>
          </table:table-cell>
          <table:table-cell office:value-type="float" office:value="0.429142" calcext:value-type="float">
            <text:p>0,429142</text:p>
          </table:table-cell>
          <table:table-cell office:value-type="float" office:value="0.009347661" calcext:value-type="float">
            <text:p>0,009347661</text:p>
          </table:table-cell>
          <table:table-cell office:value-type="float" office:value="0.8043058" calcext:value-type="float">
            <text:p>0,8043058</text:p>
          </table:table-cell>
          <table:table-cell office:value-type="float" office:value="57.10065" calcext:value-type="float">
            <text:p>57,10065</text:p>
          </table:table-cell>
          <table:table-cell office:value-type="float" office:value="3.834951" calcext:value-type="float">
            <text:p>3,834951</text:p>
          </table:table-cell>
          <table:table-cell office:value-type="float" office:value="53.2657" calcext:value-type="float">
            <text:p>53,2657</text:p>
          </table:table-cell>
          <table:table-cell office:value-type="float" office:value="3.203068" calcext:value-type="float">
            <text:p>3,203068</text:p>
          </table:table-cell>
          <table:table-cell office:value-type="float" office:value="5.496038" calcext:value-type="float">
            <text:p>5,496038</text:p>
          </table:table-cell>
          <table:table-cell office:value-type="float" office:value="8.445909" calcext:value-type="float">
            <text:p>8,445909</text:p>
          </table:table-cell>
          <table:table-cell office:value-type="float" office:value="0.00004650943" calcext:value-type="float">
            <text:p>0,00004650943</text:p>
          </table:table-cell>
          <table:table-cell office:value-type="float" office:value="8.445956" calcext:value-type="float">
            <text:p>8,445956</text:p>
          </table:table-cell>
          <table:table-cell office:value-type="float" office:value="0.5401844" calcext:value-type="float">
            <text:p>0,5401844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3057.534" calcext:value-type="float">
            <text:p>3057,534</text:p>
          </table:table-cell>
          <table:table-cell office:value-type="float" office:value="3050.52" calcext:value-type="float">
            <text:p>3050,52</text:p>
          </table:table-cell>
          <table:table-cell office:value-type="float" office:value="72.24577" calcext:value-type="float">
            <text:p>72,24577</text:p>
          </table:table-cell>
          <table:table-cell office:value-type="float" office:value="97.63169" calcext:value-type="float">
            <text:p>97,63169</text:p>
          </table:table-cell>
          <table:table-cell office:value-type="float" office:value="1.718867" calcext:value-type="float">
            <text:p>1,718867</text:p>
          </table:table-cell>
          <table:table-cell office:value-type="float" office:value="0.4468644" calcext:value-type="float">
            <text:p>0,4468644</text:p>
          </table:table-cell>
          <table:table-cell office:value-type="float" office:value="0.01340423" calcext:value-type="float">
            <text:p>0,01340423</text:p>
          </table:table-cell>
          <table:table-cell office:value-type="float" office:value="0.4433749" calcext:value-type="float">
            <text:p>0,4433749</text:p>
          </table:table-cell>
          <table:table-cell office:value-type="float" office:value="0.01077944" calcext:value-type="float">
            <text:p>0,01077944</text:p>
          </table:table-cell>
          <table:table-cell office:value-type="float" office:value="0.8044434" calcext:value-type="float">
            <text:p>0,8044434</text:p>
          </table:table-cell>
          <table:table-cell office:value-type="float" office:value="58.12434" calcext:value-type="float">
            <text:p>58,12434</text:p>
          </table:table-cell>
          <table:table-cell office:value-type="float" office:value="3.866854" calcext:value-type="float">
            <text:p>3,866854</text:p>
          </table:table-cell>
          <table:table-cell office:value-type="float" office:value="54.25749" calcext:value-type="float">
            <text:p>54,25749</text:p>
          </table:table-cell>
          <table:table-cell office:value-type="float" office:value="3.253419" calcext:value-type="float">
            <text:p>3,253419</text:p>
          </table:table-cell>
          <table:table-cell office:value-type="float" office:value="5.378618" calcext:value-type="float">
            <text:p>5,378618</text:p>
          </table:table-cell>
          <table:table-cell office:value-type="float" office:value="8.594366" calcext:value-type="float">
            <text:p>8,594366</text:p>
          </table:table-cell>
          <table:table-cell office:value-type="float" office:value="0.00004650764" calcext:value-type="float">
            <text:p>0,00004650764</text:p>
          </table:table-cell>
          <table:table-cell office:value-type="float" office:value="8.594412" calcext:value-type="float">
            <text:p>8,594412</text:p>
          </table:table-cell>
          <table:table-cell office:value-type="float" office:value="0.5547319" calcext:value-type="float">
            <text:p>0,554731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107.71" calcext:value-type="float">
            <text:p>3107,71</text:p>
          </table:table-cell>
          <table:table-cell office:value-type="float" office:value="3100.546" calcext:value-type="float">
            <text:p>3100,546</text:p>
          </table:table-cell>
          <table:table-cell office:value-type="float" office:value="73.52058" calcext:value-type="float">
            <text:p>73,52058</text:p>
          </table:table-cell>
          <table:table-cell office:value-type="float" office:value="97.62879" calcext:value-type="float">
            <text:p>97,62879</text:p>
          </table:table-cell>
          <table:table-cell office:value-type="float" office:value="1.750798" calcext:value-type="float">
            <text:p>1,750798</text:p>
          </table:table-cell>
          <table:table-cell office:value-type="float" office:value="0.4613129" calcext:value-type="float">
            <text:p>0,4613129</text:p>
          </table:table-cell>
          <table:table-cell office:value-type="float" office:value="0.01410733" calcext:value-type="float">
            <text:p>0,01410733</text:p>
          </table:table-cell>
          <table:table-cell office:value-type="float" office:value="0.4579211" calcext:value-type="float">
            <text:p>0,4579211</text:p>
          </table:table-cell>
          <table:table-cell office:value-type="float" office:value="0.01287272" calcext:value-type="float">
            <text:p>0,01287272</text:p>
          </table:table-cell>
          <table:table-cell office:value-type="float" office:value="0.8045833" calcext:value-type="float">
            <text:p>0,8045833</text:p>
          </table:table-cell>
          <table:table-cell office:value-type="float" office:value="59.15221" calcext:value-type="float">
            <text:p>59,15221</text:p>
          </table:table-cell>
          <table:table-cell office:value-type="float" office:value="3.899445" calcext:value-type="float">
            <text:p>3,899445</text:p>
          </table:table-cell>
          <table:table-cell office:value-type="float" office:value="55.25277" calcext:value-type="float">
            <text:p>55,25277</text:p>
          </table:table-cell>
          <table:table-cell office:value-type="float" office:value="3.304836" calcext:value-type="float">
            <text:p>3,304836</text:p>
          </table:table-cell>
          <table:table-cell office:value-type="float" office:value="5.294364" calcext:value-type="float">
            <text:p>5,294364</text:p>
          </table:table-cell>
          <table:table-cell office:value-type="float" office:value="8.743099" calcext:value-type="float">
            <text:p>8,743099</text:p>
          </table:table-cell>
          <table:table-cell office:value-type="float" office:value="0.00004650486" calcext:value-type="float">
            <text:p>0,00004650486</text:p>
          </table:table-cell>
          <table:table-cell office:value-type="float" office:value="8.743146" calcext:value-type="float">
            <text:p>8,743146</text:p>
          </table:table-cell>
          <table:table-cell office:value-type="float" office:value="0.5695944" calcext:value-type="float">
            <text:p>0,569594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157.888" calcext:value-type="float">
            <text:p>3157,888</text:p>
          </table:table-cell>
          <table:table-cell office:value-type="float" office:value="3150.573" calcext:value-type="float">
            <text:p>3150,573</text:p>
          </table:table-cell>
          <table:table-cell office:value-type="float" office:value="74.80018" calcext:value-type="float">
            <text:p>74,80018</text:p>
          </table:table-cell>
          <table:table-cell office:value-type="float" office:value="97.62582" calcext:value-type="float">
            <text:p>97,62582</text:p>
          </table:table-cell>
          <table:table-cell office:value-type="float" office:value="1.781974" calcext:value-type="float">
            <text:p>1,781974</text:p>
          </table:table-cell>
          <table:table-cell office:value-type="float" office:value="0.475983" calcext:value-type="float">
            <text:p>0,475983</text:p>
          </table:table-cell>
          <table:table-cell office:value-type="float" office:value="0.01466399" calcext:value-type="float">
            <text:p>0,01466399</text:p>
          </table:table-cell>
          <table:table-cell office:value-type="float" office:value="0.472618" calcext:value-type="float">
            <text:p>0,472618</text:p>
          </table:table-cell>
          <table:table-cell office:value-type="float" office:value="0.01398307" calcext:value-type="float">
            <text:p>0,01398307</text:p>
          </table:table-cell>
          <table:table-cell office:value-type="float" office:value="0.8047254" calcext:value-type="float">
            <text:p>0,8047254</text:p>
          </table:table-cell>
          <table:table-cell office:value-type="float" office:value="60.18432" calcext:value-type="float">
            <text:p>60,18432</text:p>
          </table:table-cell>
          <table:table-cell office:value-type="float" office:value="3.932694" calcext:value-type="float">
            <text:p>3,932694</text:p>
          </table:table-cell>
          <table:table-cell office:value-type="float" office:value="56.25163" calcext:value-type="float">
            <text:p>56,25163</text:p>
          </table:table-cell>
          <table:table-cell office:value-type="float" office:value="3.357043" calcext:value-type="float">
            <text:p>3,357043</text:p>
          </table:table-cell>
          <table:table-cell office:value-type="float" office:value="5.217234" calcext:value-type="float">
            <text:p>5,217234</text:p>
          </table:table-cell>
          <table:table-cell office:value-type="float" office:value="8.892124" calcext:value-type="float">
            <text:p>8,892124</text:p>
          </table:table-cell>
          <table:table-cell office:value-type="float" office:value="0.00004650275" calcext:value-type="float">
            <text:p>0,00004650275</text:p>
          </table:table-cell>
          <table:table-cell office:value-type="float" office:value="8.892171" calcext:value-type="float">
            <text:p>8,892171</text:p>
          </table:table-cell>
          <table:table-cell office:value-type="float" office:value="0.5846754" calcext:value-type="float">
            <text:p>0,584675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208.07" calcext:value-type="float">
            <text:p>3208,07</text:p>
          </table:table-cell>
          <table:table-cell office:value-type="float" office:value="3200.601" calcext:value-type="float">
            <text:p>3200,601</text:p>
          </table:table-cell>
          <table:table-cell office:value-type="float" office:value="76.0854" calcext:value-type="float">
            <text:p>76,0854</text:p>
          </table:table-cell>
          <table:table-cell office:value-type="float" office:value="97.62278" calcext:value-type="float">
            <text:p>97,62278</text:p>
          </table:table-cell>
          <table:table-cell office:value-type="float" office:value="1.812694" calcext:value-type="float">
            <text:p>1,812694</text:p>
          </table:table-cell>
          <table:table-cell office:value-type="float" office:value="0.4908415" calcext:value-type="float">
            <text:p>0,4908415</text:p>
          </table:table-cell>
          <table:table-cell office:value-type="float" office:value="0.01471656" calcext:value-type="float">
            <text:p>0,01471656</text:p>
          </table:table-cell>
          <table:table-cell office:value-type="float" office:value="0.4875134" calcext:value-type="float">
            <text:p>0,4875134</text:p>
          </table:table-cell>
          <table:table-cell office:value-type="float" office:value="0.01475227" calcext:value-type="float">
            <text:p>0,01475227</text:p>
          </table:table-cell>
          <table:table-cell office:value-type="float" office:value="0.8048697" calcext:value-type="float">
            <text:p>0,8048697</text:p>
          </table:table-cell>
          <table:table-cell office:value-type="float" office:value="61.22123" calcext:value-type="float">
            <text:p>61,22123</text:p>
          </table:table-cell>
          <table:table-cell office:value-type="float" office:value="3.966507" calcext:value-type="float">
            <text:p>3,966507</text:p>
          </table:table-cell>
          <table:table-cell office:value-type="float" office:value="57.25473" calcext:value-type="float">
            <text:p>57,25473</text:p>
          </table:table-cell>
          <table:table-cell office:value-type="float" office:value="3.410118" calcext:value-type="float">
            <text:p>3,410118</text:p>
          </table:table-cell>
          <table:table-cell office:value-type="float" office:value="5.168372" calcext:value-type="float">
            <text:p>5,168372</text:p>
          </table:table-cell>
          <table:table-cell office:value-type="float" office:value="9.041284" calcext:value-type="float">
            <text:p>9,041284</text:p>
          </table:table-cell>
          <table:table-cell office:value-type="float" office:value="0.00004650084" calcext:value-type="float">
            <text:p>0,00004650084</text:p>
          </table:table-cell>
          <table:table-cell office:value-type="float" office:value="9.041331" calcext:value-type="float">
            <text:p>9,041331</text:p>
          </table:table-cell>
          <table:table-cell office:value-type="float" office:value="0.6000267" calcext:value-type="float">
            <text:p>0,6000267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3258.256" calcext:value-type="float">
            <text:p>3258,256</text:p>
          </table:table-cell>
          <table:table-cell office:value-type="float" office:value="3250.629" calcext:value-type="float">
            <text:p>3250,629</text:p>
          </table:table-cell>
          <table:table-cell office:value-type="float" office:value="77.37498" calcext:value-type="float">
            <text:p>77,37498</text:p>
          </table:table-cell>
          <table:table-cell office:value-type="float" office:value="97.61969" calcext:value-type="float">
            <text:p>97,61969</text:p>
          </table:table-cell>
          <table:table-cell office:value-type="float" office:value="1.842327" calcext:value-type="float">
            <text:p>1,842327</text:p>
          </table:table-cell>
          <table:table-cell office:value-type="float" office:value="0.5058741" calcext:value-type="float">
            <text:p>0,5058741</text:p>
          </table:table-cell>
          <table:table-cell office:value-type="float" office:value="0.01408852" calcext:value-type="float">
            <text:p>0,01408852</text:p>
          </table:table-cell>
          <table:table-cell office:value-type="float" office:value="0.5025779" calcext:value-type="float">
            <text:p>0,5025779</text:p>
          </table:table-cell>
          <table:table-cell office:value-type="float" office:value="0.01477009" calcext:value-type="float">
            <text:p>0,01477009</text:p>
          </table:table-cell>
          <table:table-cell office:value-type="float" office:value="0.8050163" calcext:value-type="float">
            <text:p>0,8050163</text:p>
          </table:table-cell>
          <table:table-cell office:value-type="float" office:value="62.26226" calcext:value-type="float">
            <text:p>62,26226</text:p>
          </table:table-cell>
          <table:table-cell office:value-type="float" office:value="4.000932" calcext:value-type="float">
            <text:p>4,000932</text:p>
          </table:table-cell>
          <table:table-cell office:value-type="float" office:value="58.26133" calcext:value-type="float">
            <text:p>58,26133</text:p>
          </table:table-cell>
          <table:table-cell office:value-type="float" office:value="3.464095" calcext:value-type="float">
            <text:p>3,464095</text:p>
          </table:table-cell>
          <table:table-cell office:value-type="float" office:value="5.107139" calcext:value-type="float">
            <text:p>5,107139</text:p>
          </table:table-cell>
          <table:table-cell office:value-type="float" office:value="9.190639" calcext:value-type="float">
            <text:p>9,190639</text:p>
          </table:table-cell>
          <table:table-cell office:value-type="float" office:value="0.00004649899" calcext:value-type="float">
            <text:p>0,00004649899</text:p>
          </table:table-cell>
          <table:table-cell office:value-type="float" office:value="9.190685" calcext:value-type="float">
            <text:p>9,190685</text:p>
          </table:table-cell>
          <table:table-cell office:value-type="float" office:value="0.6156088" calcext:value-type="float">
            <text:p>0,615608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308.444" calcext:value-type="float">
            <text:p>3308,444</text:p>
          </table:table-cell>
          <table:table-cell office:value-type="float" office:value="3300.658" calcext:value-type="float">
            <text:p>3300,658</text:p>
          </table:table-cell>
          <table:table-cell office:value-type="float" office:value="78.67344" calcext:value-type="float">
            <text:p>78,67344</text:p>
          </table:table-cell>
          <table:table-cell office:value-type="float" office:value="97.61643" calcext:value-type="float">
            <text:p>97,61643</text:p>
          </table:table-cell>
          <table:table-cell office:value-type="float" office:value="1.874173" calcext:value-type="float">
            <text:p>1,874173</text:p>
          </table:table-cell>
          <table:table-cell office:value-type="float" office:value="0.5212235" calcext:value-type="float">
            <text:p>0,5212235</text:p>
          </table:table-cell>
          <table:table-cell office:value-type="float" office:value="0.01452208" calcext:value-type="float">
            <text:p>0,01452208</text:p>
          </table:table-cell>
          <table:table-cell office:value-type="float" office:value="0.5179191" calcext:value-type="float">
            <text:p>0,5179191</text:p>
          </table:table-cell>
          <table:table-cell office:value-type="float" office:value="0.01534289" calcext:value-type="float">
            <text:p>0,01534289</text:p>
          </table:table-cell>
          <table:table-cell office:value-type="float" office:value="0.8051652" calcext:value-type="float">
            <text:p>0,8051652</text:p>
          </table:table-cell>
          <table:table-cell office:value-type="float" office:value="63.30844" calcext:value-type="float">
            <text:p>63,30844</text:p>
          </table:table-cell>
          <table:table-cell office:value-type="float" office:value="4.035799" calcext:value-type="float">
            <text:p>4,035799</text:p>
          </table:table-cell>
          <table:table-cell office:value-type="float" office:value="59.27264" calcext:value-type="float">
            <text:p>59,27264</text:p>
          </table:table-cell>
          <table:table-cell office:value-type="float" office:value="3.519124" calcext:value-type="float">
            <text:p>3,519124</text:p>
          </table:table-cell>
          <table:table-cell office:value-type="float" office:value="5.032189" calcext:value-type="float">
            <text:p>5,032189</text:p>
          </table:table-cell>
          <table:table-cell office:value-type="float" office:value="9.340248" calcext:value-type="float">
            <text:p>9,340248</text:p>
          </table:table-cell>
          <table:table-cell office:value-type="float" office:value="0.00004649714" calcext:value-type="float">
            <text:p>0,00004649714</text:p>
          </table:table-cell>
          <table:table-cell office:value-type="float" office:value="9.340294" calcext:value-type="float">
            <text:p>9,340294</text:p>
          </table:table-cell>
          <table:table-cell office:value-type="float" office:value="0.6314083" calcext:value-type="float">
            <text:p>0,6314083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3358.636" calcext:value-type="float">
            <text:p>3358,636</text:p>
          </table:table-cell>
          <table:table-cell office:value-type="float" office:value="3350.689" calcext:value-type="float">
            <text:p>3350,689</text:p>
          </table:table-cell>
          <table:table-cell office:value-type="float" office:value="79.97768" calcext:value-type="float">
            <text:p>79,97768</text:p>
          </table:table-cell>
          <table:table-cell office:value-type="float" office:value="97.6131" calcext:value-type="float">
            <text:p>97,6131</text:p>
          </table:table-cell>
          <table:table-cell office:value-type="float" office:value="1.906914" calcext:value-type="float">
            <text:p>1,906914</text:p>
          </table:table-cell>
          <table:table-cell office:value-type="float" office:value="0.5368344" calcext:value-type="float">
            <text:p>0,5368344</text:p>
          </table:table-cell>
          <table:table-cell office:value-type="float" office:value="0.01527512" calcext:value-type="float">
            <text:p>0,01527512</text:p>
          </table:table-cell>
          <table:table-cell office:value-type="float" office:value="0.5335011" calcext:value-type="float">
            <text:p>0,5335011</text:p>
          </table:table-cell>
          <table:table-cell office:value-type="float" office:value="0.01598667" calcext:value-type="float">
            <text:p>0,01598667</text:p>
          </table:table-cell>
          <table:table-cell office:value-type="float" office:value="0.8053164" calcext:value-type="float">
            <text:p>0,8053164</text:p>
          </table:table-cell>
          <table:table-cell office:value-type="float" office:value="64.35807" calcext:value-type="float">
            <text:p>64,35807</text:p>
          </table:table-cell>
          <table:table-cell office:value-type="float" office:value="4.070947" calcext:value-type="float">
            <text:p>4,070947</text:p>
          </table:table-cell>
          <table:table-cell office:value-type="float" office:value="60.28712" calcext:value-type="float">
            <text:p>60,28712</text:p>
          </table:table-cell>
          <table:table-cell office:value-type="float" office:value="3.575133" calcext:value-type="float">
            <text:p>3,575133</text:p>
          </table:table-cell>
          <table:table-cell office:value-type="float" office:value="4.955383" calcext:value-type="float">
            <text:p>4,955383</text:p>
          </table:table-cell>
          <table:table-cell office:value-type="float" office:value="9.490025" calcext:value-type="float">
            <text:p>9,490025</text:p>
          </table:table-cell>
          <table:table-cell office:value-type="float" office:value="0.00005999343" calcext:value-type="float">
            <text:p>0,00005999343</text:p>
          </table:table-cell>
          <table:table-cell office:value-type="float" office:value="9.490085" calcext:value-type="float">
            <text:p>9,490085</text:p>
          </table:table-cell>
          <table:table-cell office:value-type="float" office:value="0.6474788" calcext:value-type="float">
            <text:p>0,647478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408.831" calcext:value-type="float">
            <text:p>3408,831</text:p>
          </table:table-cell>
          <table:table-cell office:value-type="float" office:value="3400.72" calcext:value-type="float">
            <text:p>3400,72</text:p>
          </table:table-cell>
          <table:table-cell office:value-type="float" office:value="81.28811" calcext:value-type="float">
            <text:p>81,28811</text:p>
          </table:table-cell>
          <table:table-cell office:value-type="float" office:value="97.60968" calcext:value-type="float">
            <text:p>97,60968</text:p>
          </table:table-cell>
          <table:table-cell office:value-type="float" office:value="1.939341" calcext:value-type="float">
            <text:p>1,939341</text:p>
          </table:table-cell>
          <table:table-cell office:value-type="float" office:value="0.552615" calcext:value-type="float">
            <text:p>0,552615</text:p>
          </table:table-cell>
          <table:table-cell office:value-type="float" office:value="0.01515993" calcext:value-type="float">
            <text:p>0,01515993</text:p>
          </table:table-cell>
          <table:table-cell office:value-type="float" office:value="0.5493365" calcext:value-type="float">
            <text:p>0,5493365</text:p>
          </table:table-cell>
          <table:table-cell office:value-type="float" office:value="0.01675944" calcext:value-type="float">
            <text:p>0,01675944</text:p>
          </table:table-cell>
          <table:table-cell office:value-type="float" office:value="0.8054697" calcext:value-type="float">
            <text:p>0,8054697</text:p>
          </table:table-cell>
          <table:table-cell office:value-type="float" office:value="65.41281" calcext:value-type="float">
            <text:p>65,41281</text:p>
          </table:table-cell>
          <table:table-cell office:value-type="float" office:value="4.106428" calcext:value-type="float">
            <text:p>4,106428</text:p>
          </table:table-cell>
          <table:table-cell office:value-type="float" office:value="61.30638" calcext:value-type="float">
            <text:p>61,30638</text:p>
          </table:table-cell>
          <table:table-cell office:value-type="float" office:value="3.63194" calcext:value-type="float">
            <text:p>3,63194</text:p>
          </table:table-cell>
          <table:table-cell office:value-type="float" office:value="4.884972" calcext:value-type="float">
            <text:p>4,884972</text:p>
          </table:table-cell>
          <table:table-cell office:value-type="float" office:value="9.640176" calcext:value-type="float">
            <text:p>9,640176</text:p>
          </table:table-cell>
          <table:table-cell office:value-type="float" office:value="0.00004649325" calcext:value-type="float">
            <text:p>0,00004649325</text:p>
          </table:table-cell>
          <table:table-cell office:value-type="float" office:value="9.640223" calcext:value-type="float">
            <text:p>9,640223</text:p>
          </table:table-cell>
          <table:table-cell office:value-type="float" office:value="0.6637966" calcext:value-type="float">
            <text:p>0,6637966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3459.03" calcext:value-type="float">
            <text:p>3459,03</text:p>
          </table:table-cell>
          <table:table-cell office:value-type="float" office:value="3450.752" calcext:value-type="float">
            <text:p>3450,752</text:p>
          </table:table-cell>
          <table:table-cell office:value-type="float" office:value="82.60576" calcext:value-type="float">
            <text:p>82,60576</text:p>
          </table:table-cell>
          <table:table-cell office:value-type="float" office:value="97.60615" calcext:value-type="float">
            <text:p>97,60615</text:p>
          </table:table-cell>
          <table:table-cell office:value-type="float" office:value="1.972619" calcext:value-type="float">
            <text:p>1,972619</text:p>
          </table:table-cell>
          <table:table-cell office:value-type="float" office:value="0.5686116" calcext:value-type="float">
            <text:p>0,5686116</text:p>
          </table:table-cell>
          <table:table-cell office:value-type="float" office:value="0.01493836" calcext:value-type="float">
            <text:p>0,01493836</text:p>
          </table:table-cell>
          <table:table-cell office:value-type="float" office:value="0.5654504" calcext:value-type="float">
            <text:p>0,5654504</text:p>
          </table:table-cell>
          <table:table-cell office:value-type="float" office:value="0.0179926" calcext:value-type="float">
            <text:p>0,0179926</text:p>
          </table:table-cell>
          <table:table-cell office:value-type="float" office:value="0.8056254" calcext:value-type="float">
            <text:p>0,8056254</text:p>
          </table:table-cell>
          <table:table-cell office:value-type="float" office:value="66.47216" calcext:value-type="float">
            <text:p>66,47216</text:p>
          </table:table-cell>
          <table:table-cell office:value-type="float" office:value="4.142097" calcext:value-type="float">
            <text:p>4,142097</text:p>
          </table:table-cell>
          <table:table-cell office:value-type="float" office:value="62.33006" calcext:value-type="float">
            <text:p>62,33006</text:p>
          </table:table-cell>
          <table:table-cell office:value-type="float" office:value="3.689927" calcext:value-type="float">
            <text:p>3,689927</text:p>
          </table:table-cell>
          <table:table-cell office:value-type="float" office:value="4.836078" calcext:value-type="float">
            <text:p>4,836078</text:p>
          </table:table-cell>
          <table:table-cell office:value-type="float" office:value="9.790592" calcext:value-type="float">
            <text:p>9,790592</text:p>
          </table:table-cell>
          <table:table-cell office:value-type="float" office:value="0.00004649069" calcext:value-type="float">
            <text:p>0,00004649069</text:p>
          </table:table-cell>
          <table:table-cell office:value-type="float" office:value="9.790638" calcext:value-type="float">
            <text:p>9,790638</text:p>
          </table:table-cell>
          <table:table-cell office:value-type="float" office:value="0.6804142" calcext:value-type="float">
            <text:p>0,680414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509.232" calcext:value-type="float">
            <text:p>3509,232</text:p>
          </table:table-cell>
          <table:table-cell office:value-type="float" office:value="3500.785" calcext:value-type="float">
            <text:p>3500,785</text:p>
          </table:table-cell>
          <table:table-cell office:value-type="float" office:value="83.93116" calcext:value-type="float">
            <text:p>83,93116</text:p>
          </table:table-cell>
          <table:table-cell office:value-type="float" office:value="97.6025" calcext:value-type="float">
            <text:p>97,6025</text:p>
          </table:table-cell>
          <table:table-cell office:value-type="float" office:value="2.007592" calcext:value-type="float">
            <text:p>2,007592</text:p>
          </table:table-cell>
          <table:table-cell office:value-type="float" office:value="0.584943" calcext:value-type="float">
            <text:p>0,584943</text:p>
          </table:table-cell>
          <table:table-cell office:value-type="float" office:value="0.01587099" calcext:value-type="float">
            <text:p>0,01587099</text:p>
          </table:table-cell>
          <table:table-cell office:value-type="float" office:value="0.5818046" calcext:value-type="float">
            <text:p>0,5818046</text:p>
          </table:table-cell>
          <table:table-cell office:value-type="float" office:value="0.01919027" calcext:value-type="float">
            <text:p>0,01919027</text:p>
          </table:table-cell>
          <table:table-cell office:value-type="float" office:value="0.8057833" calcext:value-type="float">
            <text:p>0,8057833</text:p>
          </table:table-cell>
          <table:table-cell office:value-type="float" office:value="67.53592" calcext:value-type="float">
            <text:p>67,53592</text:p>
          </table:table-cell>
          <table:table-cell office:value-type="float" office:value="4.178032" calcext:value-type="float">
            <text:p>4,178032</text:p>
          </table:table-cell>
          <table:table-cell office:value-type="float" office:value="63.35789" calcext:value-type="float">
            <text:p>63,35789</text:p>
          </table:table-cell>
          <table:table-cell office:value-type="float" office:value="3.749014" calcext:value-type="float">
            <text:p>3,749014</text:p>
          </table:table-cell>
          <table:table-cell office:value-type="float" office:value="4.773309" calcext:value-type="float">
            <text:p>4,773309</text:p>
          </table:table-cell>
          <table:table-cell office:value-type="float" office:value="9.941253" calcext:value-type="float">
            <text:p>9,941253</text:p>
          </table:table-cell>
          <table:table-cell office:value-type="float" office:value="0.00007771677" calcext:value-type="float">
            <text:p>0,00007771677</text:p>
          </table:table-cell>
          <table:table-cell office:value-type="float" office:value="9.94133" calcext:value-type="float">
            <text:p>9,94133</text:p>
          </table:table-cell>
          <table:table-cell office:value-type="float" office:value="0.6972964" calcext:value-type="float">
            <text:p>0,6972964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3559.438" calcext:value-type="float">
            <text:p>3559,438</text:p>
          </table:table-cell>
          <table:table-cell office:value-type="float" office:value="3550.819" calcext:value-type="float">
            <text:p>3550,819</text:p>
          </table:table-cell>
          <table:table-cell office:value-type="float" office:value="85.26263" calcext:value-type="float">
            <text:p>85,26263</text:p>
          </table:table-cell>
          <table:table-cell office:value-type="float" office:value="97.59879" calcext:value-type="float">
            <text:p>97,59879</text:p>
          </table:table-cell>
          <table:table-cell office:value-type="float" office:value="2.042338" calcext:value-type="float">
            <text:p>2,042338</text:p>
          </table:table-cell>
          <table:table-cell office:value-type="float" office:value="0.601483" calcext:value-type="float">
            <text:p>0,601483</text:p>
          </table:table-cell>
          <table:table-cell office:value-type="float" office:value="0.01638216" calcext:value-type="float">
            <text:p>0,01638216</text:p>
          </table:table-cell>
          <table:table-cell office:value-type="float" office:value="0.5983732" calcext:value-type="float">
            <text:p>0,5983732</text:p>
          </table:table-cell>
          <table:table-cell office:value-type="float" office:value="0.02015628" calcext:value-type="float">
            <text:p>0,02015628</text:p>
          </table:table-cell>
          <table:table-cell office:value-type="float" office:value="0.8059436" calcext:value-type="float">
            <text:p>0,8059436</text:p>
          </table:table-cell>
          <table:table-cell office:value-type="float" office:value="68.60439" calcext:value-type="float">
            <text:p>68,60439</text:p>
          </table:table-cell>
          <table:table-cell office:value-type="float" office:value="4.214232" calcext:value-type="float">
            <text:p>4,214232</text:p>
          </table:table-cell>
          <table:table-cell office:value-type="float" office:value="64.39016" calcext:value-type="float">
            <text:p>64,39016</text:p>
          </table:table-cell>
          <table:table-cell office:value-type="float" office:value="3.809247" calcext:value-type="float">
            <text:p>3,809247</text:p>
          </table:table-cell>
          <table:table-cell office:value-type="float" office:value="4.708873" calcext:value-type="float">
            <text:p>4,708873</text:p>
          </table:table-cell>
          <table:table-cell office:value-type="float" office:value="10.09219" calcext:value-type="float">
            <text:p>10,09219</text:p>
          </table:table-cell>
          <table:table-cell office:value-type="float" office:value="0.00004648359" calcext:value-type="float">
            <text:p>0,00004648359</text:p>
          </table:table-cell>
          <table:table-cell office:value-type="float" office:value="10.09224" calcext:value-type="float">
            <text:p>10,09224</text:p>
          </table:table-cell>
          <table:table-cell office:value-type="float" office:value="0.7144122" calcext:value-type="float">
            <text:p>0,714412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609.647" calcext:value-type="float">
            <text:p>3609,647</text:p>
          </table:table-cell>
          <table:table-cell office:value-type="float" office:value="3600.854" calcext:value-type="float">
            <text:p>3600,854</text:p>
          </table:table-cell>
          <table:table-cell office:value-type="float" office:value="86.60247" calcext:value-type="float">
            <text:p>86,60247</text:p>
          </table:table-cell>
          <table:table-cell office:value-type="float" office:value="97.59495" calcext:value-type="float">
            <text:p>97,59495</text:p>
          </table:table-cell>
          <table:table-cell office:value-type="float" office:value="2.078119" calcext:value-type="float">
            <text:p>2,078119</text:p>
          </table:table-cell>
          <table:table-cell office:value-type="float" office:value="0.6183535" calcext:value-type="float">
            <text:p>0,6183535</text:p>
          </table:table-cell>
          <table:table-cell office:value-type="float" office:value="0.01815377" calcext:value-type="float">
            <text:p>0,01815377</text:p>
          </table:table-cell>
          <table:table-cell office:value-type="float" office:value="0.6151042" calcext:value-type="float">
            <text:p>0,6151042</text:p>
          </table:table-cell>
          <table:table-cell office:value-type="float" office:value="0.02040141" calcext:value-type="float">
            <text:p>0,02040141</text:p>
          </table:table-cell>
          <table:table-cell office:value-type="float" office:value="0.8061061" calcext:value-type="float">
            <text:p>0,8061061</text:p>
          </table:table-cell>
          <table:table-cell office:value-type="float" office:value="69.6777" calcext:value-type="float">
            <text:p>69,6777</text:p>
          </table:table-cell>
          <table:table-cell office:value-type="float" office:value="4.250875" calcext:value-type="float">
            <text:p>4,250875</text:p>
          </table:table-cell>
          <table:table-cell office:value-type="float" office:value="65.42682" calcext:value-type="float">
            <text:p>65,42682</text:p>
          </table:table-cell>
          <table:table-cell office:value-type="float" office:value="3.871433" calcext:value-type="float">
            <text:p>3,871433</text:p>
          </table:table-cell>
          <table:table-cell office:value-type="float" office:value="4.639505" calcext:value-type="float">
            <text:p>4,639505</text:p>
          </table:table-cell>
          <table:table-cell office:value-type="float" office:value="10.24341" calcext:value-type="float">
            <text:p>10,24341</text:p>
          </table:table-cell>
          <table:table-cell office:value-type="float" office:value="0.00004646651" calcext:value-type="float">
            <text:p>0,00004646651</text:p>
          </table:table-cell>
          <table:table-cell office:value-type="float" office:value="10.24346" calcext:value-type="float">
            <text:p>10,24346</text:p>
          </table:table-cell>
          <table:table-cell office:value-type="float" office:value="0.7317696" calcext:value-type="float">
            <text:p>0,7317696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3659.859" calcext:value-type="float">
            <text:p>3659,859</text:p>
          </table:table-cell>
          <table:table-cell office:value-type="float" office:value="3650.89" calcext:value-type="float">
            <text:p>3650,89</text:p>
          </table:table-cell>
          <table:table-cell office:value-type="float" office:value="87.94965" calcext:value-type="float">
            <text:p>87,94965</text:p>
          </table:table-cell>
          <table:table-cell office:value-type="float" office:value="97.59101" calcext:value-type="float">
            <text:p>97,59101</text:p>
          </table:table-cell>
          <table:table-cell office:value-type="float" office:value="2.116067" calcext:value-type="float">
            <text:p>2,116067</text:p>
          </table:table-cell>
          <table:table-cell office:value-type="float" office:value="0.6354669" calcext:value-type="float">
            <text:p>0,6354669</text:p>
          </table:table-cell>
          <table:table-cell office:value-type="float" office:value="0.01982119" calcext:value-type="float">
            <text:p>0,01982119</text:p>
          </table:table-cell>
          <table:table-cell office:value-type="float" office:value="0.6322288" calcext:value-type="float">
            <text:p>0,6322288</text:p>
          </table:table-cell>
          <table:table-cell office:value-type="float" office:value="0.02227895" calcext:value-type="float">
            <text:p>0,02227895</text:p>
          </table:table-cell>
          <table:table-cell office:value-type="float" office:value="0.8062709" calcext:value-type="float">
            <text:p>0,8062709</text:p>
          </table:table-cell>
          <table:table-cell office:value-type="float" office:value="70.75571" calcext:value-type="float">
            <text:p>70,75571</text:p>
          </table:table-cell>
          <table:table-cell office:value-type="float" office:value="4.287673" calcext:value-type="float">
            <text:p>4,287673</text:p>
          </table:table-cell>
          <table:table-cell office:value-type="float" office:value="66.46804" calcext:value-type="float">
            <text:p>66,46804</text:p>
          </table:table-cell>
          <table:table-cell office:value-type="float" office:value="3.933539" calcext:value-type="float">
            <text:p>3,933539</text:p>
          </table:table-cell>
          <table:table-cell office:value-type="float" office:value="4.583518" calcext:value-type="float">
            <text:p>4,583518</text:p>
          </table:table-cell>
          <table:table-cell office:value-type="float" office:value="10.39488" calcext:value-type="float">
            <text:p>10,39488</text:p>
          </table:table-cell>
          <table:table-cell office:value-type="float" office:value="0.00004645633" calcext:value-type="float">
            <text:p>0,00004645633</text:p>
          </table:table-cell>
          <table:table-cell office:value-type="float" office:value="10.39493" calcext:value-type="float">
            <text:p>10,39493</text:p>
          </table:table-cell>
          <table:table-cell office:value-type="float" office:value="0.7494054" calcext:value-type="float">
            <text:p>0,749405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710.075" calcext:value-type="float">
            <text:p>3710,075</text:p>
          </table:table-cell>
          <table:table-cell office:value-type="float" office:value="3700.927" calcext:value-type="float">
            <text:p>3700,927</text:p>
          </table:table-cell>
          <table:table-cell office:value-type="float" office:value="89.30061" calcext:value-type="float">
            <text:p>89,30061</text:p>
          </table:table-cell>
          <table:table-cell office:value-type="float" office:value="97.58707" calcext:value-type="float">
            <text:p>97,58707</text:p>
          </table:table-cell>
          <table:table-cell office:value-type="float" office:value="2.151814" calcext:value-type="float">
            <text:p>2,151814</text:p>
          </table:table-cell>
          <table:table-cell office:value-type="float" office:value="0.6527393" calcext:value-type="float">
            <text:p>0,6527393</text:p>
          </table:table-cell>
          <table:table-cell office:value-type="float" office:value="0.02063126" calcext:value-type="float">
            <text:p>0,02063126</text:p>
          </table:table-cell>
          <table:table-cell office:value-type="float" office:value="0.6494235" calcext:value-type="float">
            <text:p>0,6494235</text:p>
          </table:table-cell>
          <table:table-cell office:value-type="float" office:value="0.02258186" calcext:value-type="float">
            <text:p>0,02258186</text:p>
          </table:table-cell>
          <table:table-cell office:value-type="float" office:value="0.8064379" calcext:value-type="float">
            <text:p>0,8064379</text:p>
          </table:table-cell>
          <table:table-cell office:value-type="float" office:value="71.83847" calcext:value-type="float">
            <text:p>71,83847</text:p>
          </table:table-cell>
          <table:table-cell office:value-type="float" office:value="4.324852" calcext:value-type="float">
            <text:p>4,324852</text:p>
          </table:table-cell>
          <table:table-cell office:value-type="float" office:value="67.51362" calcext:value-type="float">
            <text:p>67,51362</text:p>
          </table:table-cell>
          <table:table-cell office:value-type="float" office:value="3.99634" calcext:value-type="float">
            <text:p>3,99634</text:p>
          </table:table-cell>
          <table:table-cell office:value-type="float" office:value="4.544998" calcext:value-type="float">
            <text:p>4,544998</text:p>
          </table:table-cell>
          <table:table-cell office:value-type="float" office:value="10.54665" calcext:value-type="float">
            <text:p>10,54665</text:p>
          </table:table-cell>
          <table:table-cell office:value-type="float" office:value="0.00004644544" calcext:value-type="float">
            <text:p>0,00004644544</text:p>
          </table:table-cell>
          <table:table-cell office:value-type="float" office:value="10.54669" calcext:value-type="float">
            <text:p>10,54669</text:p>
          </table:table-cell>
          <table:table-cell office:value-type="float" office:value="0.7672902" calcext:value-type="float">
            <text:p>0,7672902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3760.294" calcext:value-type="float">
            <text:p>3760,294</text:p>
          </table:table-cell>
          <table:table-cell office:value-type="float" office:value="3750.965" calcext:value-type="float">
            <text:p>3750,965</text:p>
          </table:table-cell>
          <table:table-cell office:value-type="float" office:value="90.65927" calcext:value-type="float">
            <text:p>90,65927</text:p>
          </table:table-cell>
          <table:table-cell office:value-type="float" office:value="97.58304" calcext:value-type="float">
            <text:p>97,58304</text:p>
          </table:table-cell>
          <table:table-cell office:value-type="float" office:value="2.188743" calcext:value-type="float">
            <text:p>2,188743</text:p>
          </table:table-cell>
          <table:table-cell office:value-type="float" office:value="0.6702474" calcext:value-type="float">
            <text:p>0,6702474</text:p>
          </table:table-cell>
          <table:table-cell office:value-type="float" office:value="0.02168118" calcext:value-type="float">
            <text:p>0,02168118</text:p>
          </table:table-cell>
          <table:table-cell office:value-type="float" office:value="0.6668849" calcext:value-type="float">
            <text:p>0,6668849</text:p>
          </table:table-cell>
          <table:table-cell office:value-type="float" office:value="0.02332246" calcext:value-type="float">
            <text:p>0,02332246</text:p>
          </table:table-cell>
          <table:table-cell office:value-type="float" office:value="0.8066072" calcext:value-type="float">
            <text:p>0,8066072</text:p>
          </table:table-cell>
          <table:table-cell office:value-type="float" office:value="72.92628" calcext:value-type="float">
            <text:p>72,92628</text:p>
          </table:table-cell>
          <table:table-cell office:value-type="float" office:value="4.362705" calcext:value-type="float">
            <text:p>4,362705</text:p>
          </table:table-cell>
          <table:table-cell office:value-type="float" office:value="68.56358" calcext:value-type="float">
            <text:p>68,56358</text:p>
          </table:table-cell>
          <table:table-cell office:value-type="float" office:value="4.060072" calcext:value-type="float">
            <text:p>4,060072</text:p>
          </table:table-cell>
          <table:table-cell office:value-type="float" office:value="4.499962" calcext:value-type="float">
            <text:p>4,499962</text:p>
          </table:table-cell>
          <table:table-cell office:value-type="float" office:value="10.69874" calcext:value-type="float">
            <text:p>10,69874</text:p>
          </table:table-cell>
          <table:table-cell office:value-type="float" office:value="0.00004643423" calcext:value-type="float">
            <text:p>0,00004643423</text:p>
          </table:table-cell>
          <table:table-cell office:value-type="float" office:value="10.69879" calcext:value-type="float">
            <text:p>10,69879</text:p>
          </table:table-cell>
          <table:table-cell office:value-type="float" office:value="0.7853879" calcext:value-type="float">
            <text:p>0,785387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810.517" calcext:value-type="float">
            <text:p>3810,517</text:p>
          </table:table-cell>
          <table:table-cell office:value-type="float" office:value="3801.003" calcext:value-type="float">
            <text:p>3801,003</text:p>
          </table:table-cell>
          <table:table-cell office:value-type="float" office:value="92.0251" calcext:value-type="float">
            <text:p>92,0251</text:p>
          </table:table-cell>
          <table:table-cell office:value-type="float" office:value="97.57893" calcext:value-type="float">
            <text:p>97,57893</text:p>
          </table:table-cell>
          <table:table-cell office:value-type="float" office:value="2.225917" calcext:value-type="float">
            <text:p>2,225917</text:p>
          </table:table-cell>
          <table:table-cell office:value-type="float" office:value="0.68807" calcext:value-type="float">
            <text:p>0,68807</text:p>
          </table:table-cell>
          <table:table-cell office:value-type="float" office:value="0.02324474" calcext:value-type="float">
            <text:p>0,02324474</text:p>
          </table:table-cell>
          <table:table-cell office:value-type="float" office:value="0.6845176" calcext:value-type="float">
            <text:p>0,6845176</text:p>
          </table:table-cell>
          <table:table-cell office:value-type="float" office:value="0.02330549" calcext:value-type="float">
            <text:p>0,02330549</text:p>
          </table:table-cell>
          <table:table-cell office:value-type="float" office:value="0.8067788" calcext:value-type="float">
            <text:p>0,8067788</text:p>
          </table:table-cell>
          <table:table-cell office:value-type="float" office:value="74.01938" calcext:value-type="float">
            <text:p>74,01938</text:p>
          </table:table-cell>
          <table:table-cell office:value-type="float" office:value="4.401305" calcext:value-type="float">
            <text:p>4,401305</text:p>
          </table:table-cell>
          <table:table-cell office:value-type="float" office:value="69.61808" calcext:value-type="float">
            <text:p>69,61808</text:p>
          </table:table-cell>
          <table:table-cell office:value-type="float" office:value="4.124831" calcext:value-type="float">
            <text:p>4,124831</text:p>
          </table:table-cell>
          <table:table-cell office:value-type="float" office:value="4.460174" calcext:value-type="float">
            <text:p>4,460174</text:p>
          </table:table-cell>
          <table:table-cell office:value-type="float" office:value="10.85115" calcext:value-type="float">
            <text:p>10,85115</text:p>
          </table:table-cell>
          <table:table-cell office:value-type="float" office:value="0.00004642241" calcext:value-type="float">
            <text:p>0,00004642241</text:p>
          </table:table-cell>
          <table:table-cell office:value-type="float" office:value="10.85119" calcext:value-type="float">
            <text:p>10,85119</text:p>
          </table:table-cell>
          <table:table-cell office:value-type="float" office:value="0.8037743" calcext:value-type="float">
            <text:p>0,8037743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3860.743" calcext:value-type="float">
            <text:p>3860,743</text:p>
          </table:table-cell>
          <table:table-cell office:value-type="float" office:value="3851.043" calcext:value-type="float">
            <text:p>3851,043</text:p>
          </table:table-cell>
          <table:table-cell office:value-type="float" office:value="93.39914" calcext:value-type="float">
            <text:p>93,39914</text:p>
          </table:table-cell>
          <table:table-cell office:value-type="float" office:value="97.57471" calcext:value-type="float">
            <text:p>97,57471</text:p>
          </table:table-cell>
          <table:table-cell office:value-type="float" office:value="2.264289" calcext:value-type="float">
            <text:p>2,264289</text:p>
          </table:table-cell>
          <table:table-cell office:value-type="float" office:value="0.7061497" calcext:value-type="float">
            <text:p>0,7061497</text:p>
          </table:table-cell>
          <table:table-cell office:value-type="float" office:value="0.02491096" calcext:value-type="float">
            <text:p>0,02491096</text:p>
          </table:table-cell>
          <table:table-cell office:value-type="float" office:value="0.7024472" calcext:value-type="float">
            <text:p>0,7024472</text:p>
          </table:table-cell>
          <table:table-cell office:value-type="float" office:value="0.02382831" calcext:value-type="float">
            <text:p>0,02382831</text:p>
          </table:table-cell>
          <table:table-cell office:value-type="float" office:value="0.8069526" calcext:value-type="float">
            <text:p>0,8069526</text:p>
          </table:table-cell>
          <table:table-cell office:value-type="float" office:value="75.11789" calcext:value-type="float">
            <text:p>75,11789</text:p>
          </table:table-cell>
          <table:table-cell office:value-type="float" office:value="4.440526" calcext:value-type="float">
            <text:p>4,440526</text:p>
          </table:table-cell>
          <table:table-cell office:value-type="float" office:value="70.67736" calcext:value-type="float">
            <text:p>70,67736</text:p>
          </table:table-cell>
          <table:table-cell office:value-type="float" office:value="4.190583" calcext:value-type="float">
            <text:p>4,190583</text:p>
          </table:table-cell>
          <table:table-cell office:value-type="float" office:value="4.407134" calcext:value-type="float">
            <text:p>4,407134</text:p>
          </table:table-cell>
          <table:table-cell office:value-type="float" office:value="11.00392" calcext:value-type="float">
            <text:p>11,00392</text:p>
          </table:table-cell>
          <table:table-cell office:value-type="float" office:value="0.00004641059" calcext:value-type="float">
            <text:p>0,00004641059</text:p>
          </table:table-cell>
          <table:table-cell office:value-type="float" office:value="11.00396" calcext:value-type="float">
            <text:p>11,00396</text:p>
          </table:table-cell>
          <table:table-cell office:value-type="float" office:value="0.8224193" calcext:value-type="float">
            <text:p>0,822419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910.972" calcext:value-type="float">
            <text:p>3910,972</text:p>
          </table:table-cell>
          <table:table-cell office:value-type="float" office:value="3901.084" calcext:value-type="float">
            <text:p>3901,084</text:p>
          </table:table-cell>
          <table:table-cell office:value-type="float" office:value="94.78295" calcext:value-type="float">
            <text:p>94,78295</text:p>
          </table:table-cell>
          <table:table-cell office:value-type="float" office:value="97.57034" calcext:value-type="float">
            <text:p>97,57034</text:p>
          </table:table-cell>
          <table:table-cell office:value-type="float" office:value="2.305516" calcext:value-type="float">
            <text:p>2,305516</text:p>
          </table:table-cell>
          <table:table-cell office:value-type="float" office:value="0.7245522" calcext:value-type="float">
            <text:p>0,7245522</text:p>
          </table:table-cell>
          <table:table-cell office:value-type="float" office:value="0.02737218" calcext:value-type="float">
            <text:p>0,02737218</text:p>
          </table:table-cell>
          <table:table-cell office:value-type="float" office:value="0.7207499" calcext:value-type="float">
            <text:p>0,7207499</text:p>
          </table:table-cell>
          <table:table-cell office:value-type="float" office:value="0.02571263" calcext:value-type="float">
            <text:p>0,02571263</text:p>
          </table:table-cell>
          <table:table-cell office:value-type="float" office:value="0.8071288" calcext:value-type="float">
            <text:p>0,8071288</text:p>
          </table:table-cell>
          <table:table-cell office:value-type="float" office:value="76.22165" calcext:value-type="float">
            <text:p>76,22165</text:p>
          </table:table-cell>
          <table:table-cell office:value-type="float" office:value="4.480324" calcext:value-type="float">
            <text:p>4,480324</text:p>
          </table:table-cell>
          <table:table-cell office:value-type="float" office:value="71.74132" calcext:value-type="float">
            <text:p>71,74132</text:p>
          </table:table-cell>
          <table:table-cell office:value-type="float" office:value="4.257418" calcext:value-type="float">
            <text:p>4,257418</text:p>
          </table:table-cell>
          <table:table-cell office:value-type="float" office:value="4.351827" calcext:value-type="float">
            <text:p>4,351827</text:p>
          </table:table-cell>
          <table:table-cell office:value-type="float" office:value="11.15701" calcext:value-type="float">
            <text:p>11,15701</text:p>
          </table:table-cell>
          <table:table-cell office:value-type="float" office:value="0.00004639724" calcext:value-type="float">
            <text:p>0,00004639724</text:p>
          </table:table-cell>
          <table:table-cell office:value-type="float" office:value="11.15705" calcext:value-type="float">
            <text:p>11,15705</text:p>
          </table:table-cell>
          <table:table-cell office:value-type="float" office:value="0.8413133" calcext:value-type="float">
            <text:p>0,8413133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3961.205" calcext:value-type="float">
            <text:p>3961,205</text:p>
          </table:table-cell>
          <table:table-cell office:value-type="float" office:value="3951.126" calcext:value-type="float">
            <text:p>3951,126</text:p>
          </table:table-cell>
          <table:table-cell office:value-type="float" office:value="96.17135" calcext:value-type="float">
            <text:p>96,17135</text:p>
          </table:table-cell>
          <table:table-cell office:value-type="float" office:value="97.56598" calcext:value-type="float">
            <text:p>97,56598</text:p>
          </table:table-cell>
          <table:table-cell office:value-type="float" office:value="2.344778" calcext:value-type="float">
            <text:p>2,344778</text:p>
          </table:table-cell>
          <table:table-cell office:value-type="float" office:value="0.743095" calcext:value-type="float">
            <text:p>0,743095</text:p>
          </table:table-cell>
          <table:table-cell office:value-type="float" office:value="0.02898154" calcext:value-type="float">
            <text:p>0,02898154</text:p>
          </table:table-cell>
          <table:table-cell office:value-type="float" office:value="0.7391429" calcext:value-type="float">
            <text:p>0,7391429</text:p>
          </table:table-cell>
          <table:table-cell office:value-type="float" office:value="0.02625087" calcext:value-type="float">
            <text:p>0,02625087</text:p>
          </table:table-cell>
          <table:table-cell office:value-type="float" office:value="0.8073072" calcext:value-type="float">
            <text:p>0,8073072</text:p>
          </table:table-cell>
          <table:table-cell office:value-type="float" office:value="77.33068" calcext:value-type="float">
            <text:p>77,33068</text:p>
          </table:table-cell>
          <table:table-cell office:value-type="float" office:value="4.520706" calcext:value-type="float">
            <text:p>4,520706</text:p>
          </table:table-cell>
          <table:table-cell office:value-type="float" office:value="72.80998" calcext:value-type="float">
            <text:p>72,80998</text:p>
          </table:table-cell>
          <table:table-cell office:value-type="float" office:value="4.325074" calcext:value-type="float">
            <text:p>4,325074</text:p>
          </table:table-cell>
          <table:table-cell office:value-type="float" office:value="4.297168" calcext:value-type="float">
            <text:p>4,297168</text:p>
          </table:table-cell>
          <table:table-cell office:value-type="float" office:value="11.31037" calcext:value-type="float">
            <text:p>11,31037</text:p>
          </table:table-cell>
          <table:table-cell office:value-type="float" office:value="0.00004638435" calcext:value-type="float">
            <text:p>0,00004638435</text:p>
          </table:table-cell>
          <table:table-cell office:value-type="float" office:value="11.31041" calcext:value-type="float">
            <text:p>11,31041</text:p>
          </table:table-cell>
          <table:table-cell office:value-type="float" office:value="0.8604032" calcext:value-type="float">
            <text:p>0,860403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11.442" calcext:value-type="float">
            <text:p>4011,442</text:p>
          </table:table-cell>
          <table:table-cell office:value-type="float" office:value="4001.17" calcext:value-type="float">
            <text:p>4001,17</text:p>
          </table:table-cell>
          <table:table-cell office:value-type="float" office:value="97.56635" calcext:value-type="float">
            <text:p>97,56635</text:p>
          </table:table-cell>
          <table:table-cell office:value-type="float" office:value="97.56155" calcext:value-type="float">
            <text:p>97,56155</text:p>
          </table:table-cell>
          <table:table-cell office:value-type="float" office:value="2.383787" calcext:value-type="float">
            <text:p>2,383787</text:p>
          </table:table-cell>
          <table:table-cell office:value-type="float" office:value="0.7617257" calcext:value-type="float">
            <text:p>0,7617257</text:p>
          </table:table-cell>
          <table:table-cell office:value-type="float" office:value="0.02935" calcext:value-type="float">
            <text:p>0,02935</text:p>
          </table:table-cell>
          <table:table-cell office:value-type="float" office:value="0.7578374" calcext:value-type="float">
            <text:p>0,7578374</text:p>
          </table:table-cell>
          <table:table-cell office:value-type="float" office:value="0.02738581" calcext:value-type="float">
            <text:p>0,02738581</text:p>
          </table:table-cell>
          <table:table-cell office:value-type="float" office:value="0.8074878" calcext:value-type="float">
            <text:p>0,8074878</text:p>
          </table:table-cell>
          <table:table-cell office:value-type="float" office:value="78.44511" calcext:value-type="float">
            <text:p>78,44511</text:p>
          </table:table-cell>
          <table:table-cell office:value-type="float" office:value="4.561728" calcext:value-type="float">
            <text:p>4,561728</text:p>
          </table:table-cell>
          <table:table-cell office:value-type="float" office:value="73.88338" calcext:value-type="float">
            <text:p>73,88338</text:p>
          </table:table-cell>
          <table:table-cell office:value-type="float" office:value="4.39366" calcext:value-type="float">
            <text:p>4,39366</text:p>
          </table:table-cell>
          <table:table-cell office:value-type="float" office:value="4.259707" calcext:value-type="float">
            <text:p>4,259707</text:p>
          </table:table-cell>
          <table:table-cell office:value-type="float" office:value="11.46397" calcext:value-type="float">
            <text:p>11,46397</text:p>
          </table:table-cell>
          <table:table-cell office:value-type="float" office:value="0.00004637051" calcext:value-type="float">
            <text:p>0,00004637051</text:p>
          </table:table-cell>
          <table:table-cell office:value-type="float" office:value="11.46401" calcext:value-type="float">
            <text:p>11,46401</text:p>
          </table:table-cell>
          <table:table-cell office:value-type="float" office:value="0.8797813" calcext:value-type="float">
            <text:p>0,8797813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4061.682" calcext:value-type="float">
            <text:p>4061,682</text:p>
          </table:table-cell>
          <table:table-cell office:value-type="float" office:value="4051.214" calcext:value-type="float">
            <text:p>4051,214</text:p>
          </table:table-cell>
          <table:table-cell office:value-type="float" office:value="98.97116" calcext:value-type="float">
            <text:p>98,97116</text:p>
          </table:table-cell>
          <table:table-cell office:value-type="float" office:value="97.557" calcext:value-type="float">
            <text:p>97,557</text:p>
          </table:table-cell>
          <table:table-cell office:value-type="float" office:value="2.425494" calcext:value-type="float">
            <text:p>2,425494</text:p>
          </table:table-cell>
          <table:table-cell office:value-type="float" office:value="0.7807419" calcext:value-type="float">
            <text:p>0,7807419</text:p>
          </table:table-cell>
          <table:table-cell office:value-type="float" office:value="0.03101954" calcext:value-type="float">
            <text:p>0,03101954</text:p>
          </table:table-cell>
          <table:table-cell office:value-type="float" office:value="0.7768387" calcext:value-type="float">
            <text:p>0,7768387</text:p>
          </table:table-cell>
          <table:table-cell office:value-type="float" office:value="0.02922322" calcext:value-type="float">
            <text:p>0,02922322</text:p>
          </table:table-cell>
          <table:table-cell office:value-type="float" office:value="0.8076708" calcext:value-type="float">
            <text:p>0,8076708</text:p>
          </table:table-cell>
          <table:table-cell office:value-type="float" office:value="79.56493" calcext:value-type="float">
            <text:p>79,56493</text:p>
          </table:table-cell>
          <table:table-cell office:value-type="float" office:value="4.603315" calcext:value-type="float">
            <text:p>4,603315</text:p>
          </table:table-cell>
          <table:table-cell office:value-type="float" office:value="74.96162" calcext:value-type="float">
            <text:p>74,96162</text:p>
          </table:table-cell>
          <table:table-cell office:value-type="float" office:value="4.463423" calcext:value-type="float">
            <text:p>4,463423</text:p>
          </table:table-cell>
          <table:table-cell office:value-type="float" office:value="4.226764" calcext:value-type="float">
            <text:p>4,226764</text:p>
          </table:table-cell>
          <table:table-cell office:value-type="float" office:value="11.61781" calcext:value-type="float">
            <text:p>11,61781</text:p>
          </table:table-cell>
          <table:table-cell office:value-type="float" office:value="0.00004635675" calcext:value-type="float">
            <text:p>0,00004635675</text:p>
          </table:table-cell>
          <table:table-cell office:value-type="float" office:value="11.61786" calcext:value-type="float">
            <text:p>11,61786</text:p>
          </table:table-cell>
          <table:table-cell office:value-type="float" office:value="0.8994457" calcext:value-type="float">
            <text:p>0,8994457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4111.926" calcext:value-type="float">
            <text:p>4111,926</text:p>
          </table:table-cell>
          <table:table-cell office:value-type="float" office:value="4101.259" calcext:value-type="float">
            <text:p>4101,259</text:p>
          </table:table-cell>
          <table:table-cell office:value-type="float" office:value="100.3793" calcext:value-type="float">
            <text:p>100,3793</text:p>
          </table:table-cell>
          <table:table-cell office:value-type="float" office:value="97.55248" calcext:value-type="float">
            <text:p>97,55248</text:p>
          </table:table-cell>
          <table:table-cell office:value-type="float" office:value="2.464586" calcext:value-type="float">
            <text:p>2,464586</text:p>
          </table:table-cell>
          <table:table-cell office:value-type="float" office:value="0.7997123" calcext:value-type="float">
            <text:p>0,7997123</text:p>
          </table:table-cell>
          <table:table-cell office:value-type="float" office:value="0.0299974" calcext:value-type="float">
            <text:p>0,0299974</text:p>
          </table:table-cell>
          <table:table-cell office:value-type="float" office:value="0.7960679" calcext:value-type="float">
            <text:p>0,7960679</text:p>
          </table:table-cell>
          <table:table-cell office:value-type="float" office:value="0.03095257" calcext:value-type="float">
            <text:p>0,03095257</text:p>
          </table:table-cell>
          <table:table-cell office:value-type="float" office:value="0.8078557" calcext:value-type="float">
            <text:p>0,8078557</text:p>
          </table:table-cell>
          <table:table-cell office:value-type="float" office:value="80.68994" calcext:value-type="float">
            <text:p>80,68994</text:p>
          </table:table-cell>
          <table:table-cell office:value-type="float" office:value="4.645375" calcext:value-type="float">
            <text:p>4,645375</text:p>
          </table:table-cell>
          <table:table-cell office:value-type="float" office:value="76.04456" calcext:value-type="float">
            <text:p>76,04456</text:p>
          </table:table-cell>
          <table:table-cell office:value-type="float" office:value="4.533625" calcext:value-type="float">
            <text:p>4,533625</text:p>
          </table:table-cell>
          <table:table-cell office:value-type="float" office:value="4.211755" calcext:value-type="float">
            <text:p>4,211755</text:p>
          </table:table-cell>
          <table:table-cell office:value-type="float" office:value="11.77186" calcext:value-type="float">
            <text:p>11,77186</text:p>
          </table:table-cell>
          <table:table-cell office:value-type="float" office:value="0.00004634272" calcext:value-type="float">
            <text:p>0,00004634272</text:p>
          </table:table-cell>
          <table:table-cell office:value-type="float" office:value="11.7719" calcext:value-type="float">
            <text:p>11,7719</text:p>
          </table:table-cell>
          <table:table-cell office:value-type="float" office:value="0.9192771" calcext:value-type="float">
            <text:p>0,9192771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4162.174" calcext:value-type="float">
            <text:p>4162,174</text:p>
          </table:table-cell>
          <table:table-cell office:value-type="float" office:value="4151.305" calcext:value-type="float">
            <text:p>4151,305</text:p>
          </table:table-cell>
          <table:table-cell office:value-type="float" office:value="101.795" calcext:value-type="float">
            <text:p>101,795</text:p>
          </table:table-cell>
          <table:table-cell office:value-type="float" office:value="97.54788" calcext:value-type="float">
            <text:p>97,54788</text:p>
          </table:table-cell>
          <table:table-cell office:value-type="float" office:value="2.503663" calcext:value-type="float">
            <text:p>2,503663</text:p>
          </table:table-cell>
          <table:table-cell office:value-type="float" office:value="0.8189964" calcext:value-type="float">
            <text:p>0,8189964</text:p>
          </table:table-cell>
          <table:table-cell office:value-type="float" office:value="0.0296555" calcext:value-type="float">
            <text:p>0,0296555</text:p>
          </table:table-cell>
          <table:table-cell office:value-type="float" office:value="0.8154072" calcext:value-type="float">
            <text:p>0,8154072</text:p>
          </table:table-cell>
          <table:table-cell office:value-type="float" office:value="0.0315604" calcext:value-type="float">
            <text:p>0,0315604</text:p>
          </table:table-cell>
          <table:table-cell office:value-type="float" office:value="0.8080431" calcext:value-type="float">
            <text:p>0,8080431</text:p>
          </table:table-cell>
          <table:table-cell office:value-type="float" office:value="81.82074" calcext:value-type="float">
            <text:p>81,82074</text:p>
          </table:table-cell>
          <table:table-cell office:value-type="float" office:value="4.687826" calcext:value-type="float">
            <text:p>4,687826</text:p>
          </table:table-cell>
          <table:table-cell office:value-type="float" office:value="77.13292" calcext:value-type="float">
            <text:p>77,13292</text:p>
          </table:table-cell>
          <table:table-cell office:value-type="float" office:value="4.604821" calcext:value-type="float">
            <text:p>4,604821</text:p>
          </table:table-cell>
          <table:table-cell office:value-type="float" office:value="4.211733" calcext:value-type="float">
            <text:p>4,211733</text:p>
          </table:table-cell>
          <table:table-cell office:value-type="float" office:value="11.92613" calcext:value-type="float">
            <text:p>11,92613</text:p>
          </table:table-cell>
          <table:table-cell office:value-type="float" office:value="0.00004632838" calcext:value-type="float">
            <text:p>0,00004632838</text:p>
          </table:table-cell>
          <table:table-cell office:value-type="float" office:value="11.92618" calcext:value-type="float">
            <text:p>11,92618</text:p>
          </table:table-cell>
          <table:table-cell office:value-type="float" office:value="0.939566" calcext:value-type="float">
            <text:p>0,939566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212.425" calcext:value-type="float">
            <text:p>4212,425</text:p>
          </table:table-cell>
          <table:table-cell office:value-type="float" office:value="4201.353" calcext:value-type="float">
            <text:p>4201,353</text:p>
          </table:table-cell>
          <table:table-cell office:value-type="float" office:value="103.2175" calcext:value-type="float">
            <text:p>103,2175</text:p>
          </table:table-cell>
          <table:table-cell office:value-type="float" office:value="97.54323" calcext:value-type="float">
            <text:p>97,54323</text:p>
          </table:table-cell>
          <table:table-cell office:value-type="float" office:value="2.542201" calcext:value-type="float">
            <text:p>2,542201</text:p>
          </table:table-cell>
          <table:table-cell office:value-type="float" office:value="0.8385289" calcext:value-type="float">
            <text:p>0,8385289</text:p>
          </table:table-cell>
          <table:table-cell office:value-type="float" office:value="0.02948199" calcext:value-type="float">
            <text:p>0,02948199</text:p>
          </table:table-cell>
          <table:table-cell office:value-type="float" office:value="0.8348698" calcext:value-type="float">
            <text:p>0,8348698</text:p>
          </table:table-cell>
          <table:table-cell office:value-type="float" office:value="0.03108684" calcext:value-type="float">
            <text:p>0,03108684</text:p>
          </table:table-cell>
          <table:table-cell office:value-type="float" office:value="0.808233" calcext:value-type="float">
            <text:p>0,808233</text:p>
          </table:table-cell>
          <table:table-cell office:value-type="float" office:value="82.95712" calcext:value-type="float">
            <text:p>82,95712</text:p>
          </table:table-cell>
          <table:table-cell office:value-type="float" office:value="4.730608" calcext:value-type="float">
            <text:p>4,730608</text:p>
          </table:table-cell>
          <table:table-cell office:value-type="float" office:value="78.22652" calcext:value-type="float">
            <text:p>78,22652</text:p>
          </table:table-cell>
          <table:table-cell office:value-type="float" office:value="4.677291" calcext:value-type="float">
            <text:p>4,677291</text:p>
          </table:table-cell>
          <table:table-cell office:value-type="float" office:value="4.168085" calcext:value-type="float">
            <text:p>4,168085</text:p>
          </table:table-cell>
          <table:table-cell office:value-type="float" office:value="12.08065" calcext:value-type="float">
            <text:p>12,08065</text:p>
          </table:table-cell>
          <table:table-cell office:value-type="float" office:value="0.00004631363" calcext:value-type="float">
            <text:p>0,00004631363</text:p>
          </table:table-cell>
          <table:table-cell office:value-type="float" office:value="12.0807" calcext:value-type="float">
            <text:p>12,0807</text:p>
          </table:table-cell>
          <table:table-cell office:value-type="float" office:value="0.9601634" calcext:value-type="float">
            <text:p>0,9601634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4262.679" calcext:value-type="float">
            <text:p>4262,679</text:p>
          </table:table-cell>
          <table:table-cell office:value-type="float" office:value="4251.402" calcext:value-type="float">
            <text:p>4251,402</text:p>
          </table:table-cell>
          <table:table-cell office:value-type="float" office:value="104.6501" calcext:value-type="float">
            <text:p>104,6501</text:p>
          </table:table-cell>
          <table:table-cell office:value-type="float" office:value="97.53846" calcext:value-type="float">
            <text:p>97,53846</text:p>
          </table:table-cell>
          <table:table-cell office:value-type="float" office:value="2.584481" calcext:value-type="float">
            <text:p>2,584481</text:p>
          </table:table-cell>
          <table:table-cell office:value-type="float" office:value="0.8585759" calcext:value-type="float">
            <text:p>0,8585759</text:p>
          </table:table-cell>
          <table:table-cell office:value-type="float" office:value="0.03194269" calcext:value-type="float">
            <text:p>0,03194269</text:p>
          </table:table-cell>
          <table:table-cell office:value-type="float" office:value="0.8546324" calcext:value-type="float">
            <text:p>0,8546324</text:p>
          </table:table-cell>
          <table:table-cell office:value-type="float" office:value="0.03090422" calcext:value-type="float">
            <text:p>0,03090422</text:p>
          </table:table-cell>
          <table:table-cell office:value-type="float" office:value="0.8084252" calcext:value-type="float">
            <text:p>0,8084252</text:p>
          </table:table-cell>
          <table:table-cell office:value-type="float" office:value="84.09859" calcext:value-type="float">
            <text:p>84,09859</text:p>
          </table:table-cell>
          <table:table-cell office:value-type="float" office:value="4.773731" calcext:value-type="float">
            <text:p>4,773731</text:p>
          </table:table-cell>
          <table:table-cell office:value-type="float" office:value="79.32486" calcext:value-type="float">
            <text:p>79,32486</text:p>
          </table:table-cell>
          <table:table-cell office:value-type="float" office:value="4.750835" calcext:value-type="float">
            <text:p>4,750835</text:p>
          </table:table-cell>
          <table:table-cell office:value-type="float" office:value="4.095847" calcext:value-type="float">
            <text:p>4,095847</text:p>
          </table:table-cell>
          <table:table-cell office:value-type="float" office:value="12.23535" calcext:value-type="float">
            <text:p>12,23535</text:p>
          </table:table-cell>
          <table:table-cell office:value-type="float" office:value="0.00004629909" calcext:value-type="float">
            <text:p>0,00004629909</text:p>
          </table:table-cell>
          <table:table-cell office:value-type="float" office:value="12.2354" calcext:value-type="float">
            <text:p>12,2354</text:p>
          </table:table-cell>
          <table:table-cell office:value-type="float" office:value="0.980837" calcext:value-type="float">
            <text:p>0,980837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4312.937" calcext:value-type="float">
            <text:p>4312,937</text:p>
          </table:table-cell>
          <table:table-cell office:value-type="float" office:value="4301.451" calcext:value-type="float">
            <text:p>4301,451</text:p>
          </table:table-cell>
          <table:table-cell office:value-type="float" office:value="106.0857" calcext:value-type="float">
            <text:p>106,0857</text:p>
          </table:table-cell>
          <table:table-cell office:value-type="float" office:value="97.53372" calcext:value-type="float">
            <text:p>97,53372</text:p>
          </table:table-cell>
          <table:table-cell office:value-type="float" office:value="2.623906" calcext:value-type="float">
            <text:p>2,623906</text:p>
          </table:table-cell>
          <table:table-cell office:value-type="float" office:value="0.8785502" calcext:value-type="float">
            <text:p>0,8785502</text:p>
          </table:table-cell>
          <table:table-cell office:value-type="float" office:value="0.03158983" calcext:value-type="float">
            <text:p>0,03158983</text:p>
          </table:table-cell>
          <table:table-cell office:value-type="float" office:value="0.8745933" calcext:value-type="float">
            <text:p>0,8745933</text:p>
          </table:table-cell>
          <table:table-cell office:value-type="float" office:value="0.03055257" calcext:value-type="float">
            <text:p>0,03055257</text:p>
          </table:table-cell>
          <table:table-cell office:value-type="float" office:value="0.8086196" calcext:value-type="float">
            <text:p>0,8086196</text:p>
          </table:table-cell>
          <table:table-cell office:value-type="float" office:value="85.24504" calcext:value-type="float">
            <text:p>85,24504</text:p>
          </table:table-cell>
          <table:table-cell office:value-type="float" office:value="4.817203" calcext:value-type="float">
            <text:p>4,817203</text:p>
          </table:table-cell>
          <table:table-cell office:value-type="float" office:value="80.42784" calcext:value-type="float">
            <text:p>80,42784</text:p>
          </table:table-cell>
          <table:table-cell office:value-type="float" office:value="4.824891" calcext:value-type="float">
            <text:p>4,824891</text:p>
          </table:table-cell>
          <table:table-cell office:value-type="float" office:value="4.001467" calcext:value-type="float">
            <text:p>4,001467</text:p>
          </table:table-cell>
          <table:table-cell office:value-type="float" office:value="12.3902" calcext:value-type="float">
            <text:p>12,3902</text:p>
          </table:table-cell>
          <table:table-cell office:value-type="float" office:value="0.00004628407" calcext:value-type="float">
            <text:p>0,00004628407</text:p>
          </table:table-cell>
          <table:table-cell office:value-type="float" office:value="12.39025" calcext:value-type="float">
            <text:p>12,39025</text:p>
          </table:table-cell>
          <table:table-cell office:value-type="float" office:value="1.001637" calcext:value-type="float">
            <text:p>1,001637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4363.198" calcext:value-type="float">
            <text:p>4363,198</text:p>
          </table:table-cell>
          <table:table-cell office:value-type="float" office:value="4351.502" calcext:value-type="float">
            <text:p>4351,502</text:p>
          </table:table-cell>
          <table:table-cell office:value-type="float" office:value="107.526" calcext:value-type="float">
            <text:p>107,526</text:p>
          </table:table-cell>
          <table:table-cell office:value-type="float" office:value="97.52899" calcext:value-type="float">
            <text:p>97,52899</text:p>
          </table:table-cell>
          <table:table-cell office:value-type="float" office:value="2.660814" calcext:value-type="float">
            <text:p>2,660814</text:p>
          </table:table-cell>
          <table:table-cell office:value-type="float" office:value="0.8985656" calcext:value-type="float">
            <text:p>0,8985656</text:p>
          </table:table-cell>
          <table:table-cell office:value-type="float" office:value="0.02932674" calcext:value-type="float">
            <text:p>0,02932674</text:p>
          </table:table-cell>
          <table:table-cell office:value-type="float" office:value="0.8947146" calcext:value-type="float">
            <text:p>0,8947146</text:p>
          </table:table-cell>
          <table:table-cell office:value-type="float" office:value="0.02939046" calcext:value-type="float">
            <text:p>0,02939046</text:p>
          </table:table-cell>
          <table:table-cell office:value-type="float" office:value="0.8088163" calcext:value-type="float">
            <text:p>0,8088163</text:p>
          </table:table-cell>
          <table:table-cell office:value-type="float" office:value="86.39724" calcext:value-type="float">
            <text:p>86,39724</text:p>
          </table:table-cell>
          <table:table-cell office:value-type="float" office:value="4.86104" calcext:value-type="float">
            <text:p>4,86104</text:p>
          </table:table-cell>
          <table:table-cell office:value-type="float" office:value="81.5362" calcext:value-type="float">
            <text:p>81,5362</text:p>
          </table:table-cell>
          <table:table-cell office:value-type="float" office:value="4.899935" calcext:value-type="float">
            <text:p>4,899935</text:p>
          </table:table-cell>
          <table:table-cell office:value-type="float" office:value="3.932955" calcext:value-type="float">
            <text:p>3,932955</text:p>
          </table:table-cell>
          <table:table-cell office:value-type="float" office:value="12.54526" calcext:value-type="float">
            <text:p>12,54526</text:p>
          </table:table-cell>
          <table:table-cell office:value-type="float" office:value="0.00004626909" calcext:value-type="float">
            <text:p>0,00004626909</text:p>
          </table:table-cell>
          <table:table-cell office:value-type="float" office:value="12.54531" calcext:value-type="float">
            <text:p>12,54531</text:p>
          </table:table-cell>
          <table:table-cell office:value-type="float" office:value="1.022682" calcext:value-type="float">
            <text:p>1,02268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4413.464" calcext:value-type="float">
            <text:p>4413,464</text:p>
          </table:table-cell>
          <table:table-cell office:value-type="float" office:value="4401.555" calcext:value-type="float">
            <text:p>4401,555</text:p>
          </table:table-cell>
          <table:table-cell office:value-type="float" office:value="108.9748" calcext:value-type="float">
            <text:p>108,9748</text:p>
          </table:table-cell>
          <table:table-cell office:value-type="float" office:value="97.52417" calcext:value-type="float">
            <text:p>97,52417</text:p>
          </table:table-cell>
          <table:table-cell office:value-type="float" office:value="2.699673" calcext:value-type="float">
            <text:p>2,699673</text:p>
          </table:table-cell>
          <table:table-cell office:value-type="float" office:value="0.9188136" calcext:value-type="float">
            <text:p>0,9188136</text:p>
          </table:table-cell>
          <table:table-cell office:value-type="float" office:value="0.02672224" calcext:value-type="float">
            <text:p>0,02672224</text:p>
          </table:table-cell>
          <table:table-cell office:value-type="float" office:value="0.915225" calcext:value-type="float">
            <text:p>0,915225</text:p>
          </table:table-cell>
          <table:table-cell office:value-type="float" office:value="0.02989704" calcext:value-type="float">
            <text:p>0,02989704</text:p>
          </table:table-cell>
          <table:table-cell office:value-type="float" office:value="0.8090152" calcext:value-type="float">
            <text:p>0,8090152</text:p>
          </table:table-cell>
          <table:table-cell office:value-type="float" office:value="87.55473" calcext:value-type="float">
            <text:p>87,55473</text:p>
          </table:table-cell>
          <table:table-cell office:value-type="float" office:value="4.905239" calcext:value-type="float">
            <text:p>4,905239</text:p>
          </table:table-cell>
          <table:table-cell office:value-type="float" office:value="82.64949" calcext:value-type="float">
            <text:p>82,64949</text:p>
          </table:table-cell>
          <table:table-cell office:value-type="float" office:value="4.975947" calcext:value-type="float">
            <text:p>4,975947</text:p>
          </table:table-cell>
          <table:table-cell office:value-type="float" office:value="3.884494" calcext:value-type="float">
            <text:p>3,884494</text:p>
          </table:table-cell>
          <table:table-cell office:value-type="float" office:value="12.70042" calcext:value-type="float">
            <text:p>12,70042</text:p>
          </table:table-cell>
          <table:table-cell office:value-type="float" office:value="0.00004625403" calcext:value-type="float">
            <text:p>0,00004625403</text:p>
          </table:table-cell>
          <table:table-cell office:value-type="float" office:value="12.70047" calcext:value-type="float">
            <text:p>12,70047</text:p>
          </table:table-cell>
          <table:table-cell office:value-type="float" office:value="1.044024" calcext:value-type="float">
            <text:p>1,044024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4463.733" calcext:value-type="float">
            <text:p>4463,733</text:p>
          </table:table-cell>
          <table:table-cell office:value-type="float" office:value="4451.608" calcext:value-type="float">
            <text:p>4451,608</text:p>
          </table:table-cell>
          <table:table-cell office:value-type="float" office:value="110.4416" calcext:value-type="float">
            <text:p>110,4416</text:p>
          </table:table-cell>
          <table:table-cell office:value-type="float" office:value="97.51906" calcext:value-type="float">
            <text:p>97,51906</text:p>
          </table:table-cell>
          <table:table-cell office:value-type="float" office:value="2.748589" calcext:value-type="float">
            <text:p>2,748589</text:p>
          </table:table-cell>
          <table:table-cell office:value-type="float" office:value="0.9401019" calcext:value-type="float">
            <text:p>0,9401019</text:p>
          </table:table-cell>
          <table:table-cell office:value-type="float" office:value="0.03198275" calcext:value-type="float">
            <text:p>0,03198275</text:p>
          </table:table-cell>
          <table:table-cell office:value-type="float" office:value="0.936065" calcext:value-type="float">
            <text:p>0,936065</text:p>
          </table:table-cell>
          <table:table-cell office:value-type="float" office:value="0.03122254" calcext:value-type="float">
            <text:p>0,03122254</text:p>
          </table:table-cell>
          <table:table-cell office:value-type="float" office:value="0.8092166" calcext:value-type="float">
            <text:p>0,8092166</text:p>
          </table:table-cell>
          <table:table-cell office:value-type="float" office:value="88.71793" calcext:value-type="float">
            <text:p>88,71793</text:p>
          </table:table-cell>
          <table:table-cell office:value-type="float" office:value="4.949801" calcext:value-type="float">
            <text:p>4,949801</text:p>
          </table:table-cell>
          <table:table-cell office:value-type="float" office:value="83.76813" calcext:value-type="float">
            <text:p>83,76813</text:p>
          </table:table-cell>
          <table:table-cell office:value-type="float" office:value="5.053518" calcext:value-type="float">
            <text:p>5,053518</text:p>
          </table:table-cell>
          <table:table-cell office:value-type="float" office:value="3.826103" calcext:value-type="float">
            <text:p>3,826103</text:p>
          </table:table-cell>
          <table:table-cell office:value-type="float" office:value="12.85571" calcext:value-type="float">
            <text:p>12,85571</text:p>
          </table:table-cell>
          <table:table-cell office:value-type="float" office:value="0.00004623825" calcext:value-type="float">
            <text:p>0,00004623825</text:p>
          </table:table-cell>
          <table:table-cell office:value-type="float" office:value="12.85576" calcext:value-type="float">
            <text:p>12,85576</text:p>
          </table:table-cell>
          <table:table-cell office:value-type="float" office:value="1.065774" calcext:value-type="float">
            <text:p>1,06577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4514.005" calcext:value-type="float">
            <text:p>4514,005</text:p>
          </table:table-cell>
          <table:table-cell office:value-type="float" office:value="4501.662" calcext:value-type="float">
            <text:p>4501,662</text:p>
          </table:table-cell>
          <table:table-cell office:value-type="float" office:value="111.9181" calcext:value-type="float">
            <text:p>111,9181</text:p>
          </table:table-cell>
          <table:table-cell office:value-type="float" office:value="97.51385" calcext:value-type="float">
            <text:p>97,51385</text:p>
          </table:table-cell>
          <table:table-cell office:value-type="float" office:value="2.800232" calcext:value-type="float">
            <text:p>2,800232</text:p>
          </table:table-cell>
          <table:table-cell office:value-type="float" office:value="0.962122" calcext:value-type="float">
            <text:p>0,962122</text:p>
          </table:table-cell>
          <table:table-cell office:value-type="float" office:value="0.04040701" calcext:value-type="float">
            <text:p>0,04040701</text:p>
          </table:table-cell>
          <table:table-cell office:value-type="float" office:value="0.9570347" calcext:value-type="float">
            <text:p>0,9570347</text:p>
          </table:table-cell>
          <table:table-cell office:value-type="float" office:value="0.0312475" calcext:value-type="float">
            <text:p>0,0312475</text:p>
          </table:table-cell>
          <table:table-cell office:value-type="float" office:value="0.8094205" calcext:value-type="float">
            <text:p>0,8094205</text:p>
          </table:table-cell>
          <table:table-cell office:value-type="float" office:value="89.88668" calcext:value-type="float">
            <text:p>89,88668</text:p>
          </table:table-cell>
          <table:table-cell office:value-type="float" office:value="4.994737" calcext:value-type="float">
            <text:p>4,994737</text:p>
          </table:table-cell>
          <table:table-cell office:value-type="float" office:value="84.89194" calcext:value-type="float">
            <text:p>84,89194</text:p>
          </table:table-cell>
          <table:table-cell office:value-type="float" office:value="5.132176" calcext:value-type="float">
            <text:p>5,132176</text:p>
          </table:table-cell>
          <table:table-cell office:value-type="float" office:value="3.777201" calcext:value-type="float">
            <text:p>3,777201</text:p>
          </table:table-cell>
          <table:table-cell office:value-type="float" office:value="13.01107" calcext:value-type="float">
            <text:p>13,01107</text:p>
          </table:table-cell>
          <table:table-cell office:value-type="float" office:value="0.00004622233" calcext:value-type="float">
            <text:p>0,00004622233</text:p>
          </table:table-cell>
          <table:table-cell office:value-type="float" office:value="13.01111" calcext:value-type="float">
            <text:p>13,01111</text:p>
          </table:table-cell>
          <table:table-cell office:value-type="float" office:value="1.087867" calcext:value-type="float">
            <text:p>1,087867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4564.282" calcext:value-type="float">
            <text:p>4564,282</text:p>
          </table:table-cell>
          <table:table-cell office:value-type="float" office:value="4551.718" calcext:value-type="float">
            <text:p>4551,718</text:p>
          </table:table-cell>
          <table:table-cell office:value-type="float" office:value="113.3895" calcext:value-type="float">
            <text:p>113,3895</text:p>
          </table:table-cell>
          <table:table-cell office:value-type="float" office:value="97.50886" calcext:value-type="float">
            <text:p>97,50886</text:p>
          </table:table-cell>
          <table:table-cell office:value-type="float" office:value="2.840636" calcext:value-type="float">
            <text:p>2,840636</text:p>
          </table:table-cell>
          <table:table-cell office:value-type="float" office:value="0.9833457" calcext:value-type="float">
            <text:p>0,9833457</text:p>
          </table:table-cell>
          <table:table-cell office:value-type="float" office:value="0.04044246" calcext:value-type="float">
            <text:p>0,04044246</text:p>
          </table:table-cell>
          <table:table-cell office:value-type="float" office:value="0.9780286" calcext:value-type="float">
            <text:p>0,9780286</text:p>
          </table:table-cell>
          <table:table-cell office:value-type="float" office:value="0.02919291" calcext:value-type="float">
            <text:p>0,02919291</text:p>
          </table:table-cell>
          <table:table-cell office:value-type="float" office:value="0.8096263" calcext:value-type="float">
            <text:p>0,8096263</text:p>
          </table:table-cell>
          <table:table-cell office:value-type="float" office:value="91.06156" calcext:value-type="float">
            <text:p>91,06156</text:p>
          </table:table-cell>
          <table:table-cell office:value-type="float" office:value="5.040286" calcext:value-type="float">
            <text:p>5,040286</text:p>
          </table:table-cell>
          <table:table-cell office:value-type="float" office:value="86.02128" calcext:value-type="float">
            <text:p>86,02128</text:p>
          </table:table-cell>
          <table:table-cell office:value-type="float" office:value="5.21086" calcext:value-type="float">
            <text:p>5,21086</text:p>
          </table:table-cell>
          <table:table-cell office:value-type="float" office:value="3.724441" calcext:value-type="float">
            <text:p>3,724441</text:p>
          </table:table-cell>
          <table:table-cell office:value-type="float" office:value="13.16644" calcext:value-type="float">
            <text:p>13,16644</text:p>
          </table:table-cell>
          <table:table-cell office:value-type="float" office:value="0.00004620688" calcext:value-type="float">
            <text:p>0,00004620688</text:p>
          </table:table-cell>
          <table:table-cell office:value-type="float" office:value="13.16648" calcext:value-type="float">
            <text:p>13,16648</text:p>
          </table:table-cell>
          <table:table-cell office:value-type="float" office:value="1.109932" calcext:value-type="float">
            <text:p>1,10993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4614.561" calcext:value-type="float">
            <text:p>4614,561</text:p>
          </table:table-cell>
          <table:table-cell office:value-type="float" office:value="4601.775" calcext:value-type="float">
            <text:p>4601,775</text:p>
          </table:table-cell>
          <table:table-cell office:value-type="float" office:value="114.8836" calcext:value-type="float">
            <text:p>114,8836</text:p>
          </table:table-cell>
          <table:table-cell office:value-type="float" office:value="97.50349" calcext:value-type="float">
            <text:p>97,50349</text:p>
          </table:table-cell>
          <table:table-cell office:value-type="float" office:value="2.895051" calcext:value-type="float">
            <text:p>2,895051</text:p>
          </table:table-cell>
          <table:table-cell office:value-type="float" office:value="1.005167" calcext:value-type="float">
            <text:p>1,005167</text:p>
          </table:table-cell>
          <table:table-cell office:value-type="float" office:value="0.04350086" calcext:value-type="float">
            <text:p>0,04350086</text:p>
          </table:table-cell>
          <table:table-cell office:value-type="float" office:value="1.000208" calcext:value-type="float">
            <text:p>1,000208</text:p>
          </table:table-cell>
          <table:table-cell office:value-type="float" office:value="0.03634076" calcext:value-type="float">
            <text:p>0,03634076</text:p>
          </table:table-cell>
          <table:table-cell office:value-type="float" office:value="0.8098346" calcext:value-type="float">
            <text:p>0,8098346</text:p>
          </table:table-cell>
          <table:table-cell office:value-type="float" office:value="92.24258" calcext:value-type="float">
            <text:p>92,24258</text:p>
          </table:table-cell>
          <table:table-cell office:value-type="float" office:value="5.08691" calcext:value-type="float">
            <text:p>5,08691</text:p>
          </table:table-cell>
          <table:table-cell office:value-type="float" office:value="87.15567" calcext:value-type="float">
            <text:p>87,15567</text:p>
          </table:table-cell>
          <table:table-cell office:value-type="float" office:value="5.291623" calcext:value-type="float">
            <text:p>5,291623</text:p>
          </table:table-cell>
          <table:table-cell office:value-type="float" office:value="3.669512" calcext:value-type="float">
            <text:p>3,669512</text:p>
          </table:table-cell>
          <table:table-cell office:value-type="float" office:value="13.32183" calcext:value-type="float">
            <text:p>13,32183</text:p>
          </table:table-cell>
          <table:table-cell office:value-type="float" office:value="0.00004619067" calcext:value-type="float">
            <text:p>0,00004619067</text:p>
          </table:table-cell>
          <table:table-cell office:value-type="float" office:value="13.32188" calcext:value-type="float">
            <text:p>13,32188</text:p>
          </table:table-cell>
          <table:table-cell office:value-type="float" office:value="1.132511" calcext:value-type="float">
            <text:p>1,132511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4664.845" calcext:value-type="float">
            <text:p>4664,845</text:p>
          </table:table-cell>
          <table:table-cell office:value-type="float" office:value="4651.834" calcext:value-type="float">
            <text:p>4651,834</text:p>
          </table:table-cell>
          <table:table-cell office:value-type="float" office:value="116.3885" calcext:value-type="float">
            <text:p>116,3885</text:p>
          </table:table-cell>
          <table:table-cell office:value-type="float" office:value="97.49801" calcext:value-type="float">
            <text:p>97,49801</text:p>
          </table:table-cell>
          <table:table-cell office:value-type="float" office:value="2.951857" calcext:value-type="float">
            <text:p>2,951857</text:p>
          </table:table-cell>
          <table:table-cell office:value-type="float" office:value="1.027503" calcext:value-type="float">
            <text:p>1,027503</text:p>
          </table:table-cell>
          <table:table-cell office:value-type="float" office:value="0.04860603" calcext:value-type="float">
            <text:p>0,04860603</text:p>
          </table:table-cell>
          <table:table-cell office:value-type="float" office:value="1.022671" calcext:value-type="float">
            <text:p>1,022671</text:p>
          </table:table-cell>
          <table:table-cell office:value-type="float" office:value="0.04303152" calcext:value-type="float">
            <text:p>0,04303152</text:p>
          </table:table-cell>
          <table:table-cell office:value-type="float" office:value="0.8100453" calcext:value-type="float">
            <text:p>0,8100453</text:p>
          </table:table-cell>
          <table:table-cell office:value-type="float" office:value="93.43051" calcext:value-type="float">
            <text:p>93,43051</text:p>
          </table:table-cell>
          <table:table-cell office:value-type="float" office:value="5.134676" calcext:value-type="float">
            <text:p>5,134676</text:p>
          </table:table-cell>
          <table:table-cell office:value-type="float" office:value="88.29583" calcext:value-type="float">
            <text:p>88,29583</text:p>
          </table:table-cell>
          <table:table-cell office:value-type="float" office:value="5.373418" calcext:value-type="float">
            <text:p>5,373418</text:p>
          </table:table-cell>
          <table:table-cell office:value-type="float" office:value="3.628263" calcext:value-type="float">
            <text:p>3,628263</text:p>
          </table:table-cell>
          <table:table-cell office:value-type="float" office:value="13.4773" calcext:value-type="float">
            <text:p>13,4773</text:p>
          </table:table-cell>
          <table:table-cell office:value-type="float" office:value="0.0000461754" calcext:value-type="float">
            <text:p>0,0000461754</text:p>
          </table:table-cell>
          <table:table-cell office:value-type="float" office:value="13.47734" calcext:value-type="float">
            <text:p>13,47734</text:p>
          </table:table-cell>
          <table:table-cell office:value-type="float" office:value="1.155355" calcext:value-type="float">
            <text:p>1,15535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4715.133" calcext:value-type="float">
            <text:p>4715,133</text:p>
          </table:table-cell>
          <table:table-cell office:value-type="float" office:value="4701.893" calcext:value-type="float">
            <text:p>4701,893</text:p>
          </table:table-cell>
          <table:table-cell office:value-type="float" office:value="117.898" calcext:value-type="float">
            <text:p>117,898</text:p>
          </table:table-cell>
          <table:table-cell office:value-type="float" office:value="97.49254" calcext:value-type="float">
            <text:p>97,49254</text:p>
          </table:table-cell>
          <table:table-cell office:value-type="float" office:value="3.006576" calcext:value-type="float">
            <text:p>3,006576</text:p>
          </table:table-cell>
          <table:table-cell office:value-type="float" office:value="1.049862" calcext:value-type="float">
            <text:p>1,049862</text:p>
          </table:table-cell>
          <table:table-cell office:value-type="float" office:value="0.05177203" calcext:value-type="float">
            <text:p>0,05177203</text:p>
          </table:table-cell>
          <table:table-cell office:value-type="float" office:value="1.045385" calcext:value-type="float">
            <text:p>1,045385</text:p>
          </table:table-cell>
          <table:table-cell office:value-type="float" office:value="0.04929785" calcext:value-type="float">
            <text:p>0,04929785</text:p>
          </table:table-cell>
          <table:table-cell office:value-type="float" office:value="0.8102581" calcext:value-type="float">
            <text:p>0,8102581</text:p>
          </table:table-cell>
          <table:table-cell office:value-type="float" office:value="94.62428" calcext:value-type="float">
            <text:p>94,62428</text:p>
          </table:table-cell>
          <table:table-cell office:value-type="float" office:value="5.183391" calcext:value-type="float">
            <text:p>5,183391</text:p>
          </table:table-cell>
          <table:table-cell office:value-type="float" office:value="89.44089" calcext:value-type="float">
            <text:p>89,44089</text:p>
          </table:table-cell>
          <table:table-cell office:value-type="float" office:value="5.456058" calcext:value-type="float">
            <text:p>5,456058</text:p>
          </table:table-cell>
          <table:table-cell office:value-type="float" office:value="3.581778" calcext:value-type="float">
            <text:p>3,581778</text:p>
          </table:table-cell>
          <table:table-cell office:value-type="float" office:value="13.63265" calcext:value-type="float">
            <text:p>13,63265</text:p>
          </table:table-cell>
          <table:table-cell office:value-type="float" office:value="0.0000461587" calcext:value-type="float">
            <text:p>0,0000461587</text:p>
          </table:table-cell>
          <table:table-cell office:value-type="float" office:value="13.63269" calcext:value-type="float">
            <text:p>13,63269</text:p>
          </table:table-cell>
          <table:table-cell office:value-type="float" office:value="1.178423" calcext:value-type="float">
            <text:p>1,178423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4765.424" calcext:value-type="float">
            <text:p>4765,424</text:p>
          </table:table-cell>
          <table:table-cell office:value-type="float" office:value="4751.954" calcext:value-type="float">
            <text:p>4751,954</text:p>
          </table:table-cell>
          <table:table-cell office:value-type="float" office:value="119.4157" calcext:value-type="float">
            <text:p>119,4157</text:p>
          </table:table-cell>
          <table:table-cell office:value-type="float" office:value="97.48702" calcext:value-type="float">
            <text:p>97,48702</text:p>
          </table:table-cell>
          <table:table-cell office:value-type="float" office:value="3.062463" calcext:value-type="float">
            <text:p>3,062463</text:p>
          </table:table-cell>
          <table:table-cell office:value-type="float" office:value="1.072564" calcext:value-type="float">
            <text:p>1,072564</text:p>
          </table:table-cell>
          <table:table-cell office:value-type="float" office:value="0.05569226" calcext:value-type="float">
            <text:p>0,05569226</text:p>
          </table:table-cell>
          <table:table-cell office:value-type="float" office:value="1.068399" calcext:value-type="float">
            <text:p>1,068399</text:p>
          </table:table-cell>
          <table:table-cell office:value-type="float" office:value="0.05533374" calcext:value-type="float">
            <text:p>0,05533374</text:p>
          </table:table-cell>
          <table:table-cell office:value-type="float" office:value="0.8104732" calcext:value-type="float">
            <text:p>0,8104732</text:p>
          </table:table-cell>
          <table:table-cell office:value-type="float" office:value="95.82381" calcext:value-type="float">
            <text:p>95,82381</text:p>
          </table:table-cell>
          <table:table-cell office:value-type="float" office:value="5.233003" calcext:value-type="float">
            <text:p>5,233003</text:p>
          </table:table-cell>
          <table:table-cell office:value-type="float" office:value="90.5908" calcext:value-type="float">
            <text:p>90,5908</text:p>
          </table:table-cell>
          <table:table-cell office:value-type="float" office:value="5.539715" calcext:value-type="float">
            <text:p>5,539715</text:p>
          </table:table-cell>
          <table:table-cell office:value-type="float" office:value="3.543893" calcext:value-type="float">
            <text:p>3,543893</text:p>
          </table:table-cell>
          <table:table-cell office:value-type="float" office:value="13.78794" calcext:value-type="float">
            <text:p>13,78794</text:p>
          </table:table-cell>
          <table:table-cell office:value-type="float" office:value="0.00004614258" calcext:value-type="float">
            <text:p>0,00004614258</text:p>
          </table:table-cell>
          <table:table-cell office:value-type="float" office:value="13.78798" calcext:value-type="float">
            <text:p>13,78798</text:p>
          </table:table-cell>
          <table:table-cell office:value-type="float" office:value="1.201768" calcext:value-type="float">
            <text:p>1,20176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4815.719" calcext:value-type="float">
            <text:p>4815,719</text:p>
          </table:table-cell>
          <table:table-cell office:value-type="float" office:value="4802.016" calcext:value-type="float">
            <text:p>4802,016</text:p>
          </table:table-cell>
          <table:table-cell office:value-type="float" office:value="120.9307" calcext:value-type="float">
            <text:p>120,9307</text:p>
          </table:table-cell>
          <table:table-cell office:value-type="float" office:value="97.48167" calcext:value-type="float">
            <text:p>97,48167</text:p>
          </table:table-cell>
          <table:table-cell office:value-type="float" office:value="3.109809" calcext:value-type="float">
            <text:p>3,109809</text:p>
          </table:table-cell>
          <table:table-cell office:value-type="float" office:value="1.09511" calcext:value-type="float">
            <text:p>1,09511</text:p>
          </table:table-cell>
          <table:table-cell office:value-type="float" office:value="0.05693423" calcext:value-type="float">
            <text:p>0,05693423</text:p>
          </table:table-cell>
          <table:table-cell office:value-type="float" office:value="1.090866" calcext:value-type="float">
            <text:p>1,090866</text:p>
          </table:table-cell>
          <table:table-cell office:value-type="float" office:value="0.0562083" calcext:value-type="float">
            <text:p>0,0562083</text:p>
          </table:table-cell>
          <table:table-cell office:value-type="float" office:value="0.8106906" calcext:value-type="float">
            <text:p>0,8106906</text:p>
          </table:table-cell>
          <table:table-cell office:value-type="float" office:value="97.02908" calcext:value-type="float">
            <text:p>97,02908</text:p>
          </table:table-cell>
          <table:table-cell office:value-type="float" office:value="5.28344" calcext:value-type="float">
            <text:p>5,28344</text:p>
          </table:table-cell>
          <table:table-cell office:value-type="float" office:value="91.74564" calcext:value-type="float">
            <text:p>91,74564</text:p>
          </table:table-cell>
          <table:table-cell office:value-type="float" office:value="5.623516" calcext:value-type="float">
            <text:p>5,623516</text:p>
          </table:table-cell>
          <table:table-cell office:value-type="float" office:value="3.49592" calcext:value-type="float">
            <text:p>3,49592</text:p>
          </table:table-cell>
          <table:table-cell office:value-type="float" office:value="13.94315" calcext:value-type="float">
            <text:p>13,94315</text:p>
          </table:table-cell>
          <table:table-cell office:value-type="float" office:value="0.00004612585" calcext:value-type="float">
            <text:p>0,00004612585</text:p>
          </table:table-cell>
          <table:table-cell office:value-type="float" office:value="13.9432" calcext:value-type="float">
            <text:p>13,9432</text:p>
          </table:table-cell>
          <table:table-cell office:value-type="float" office:value="1.225144" calcext:value-type="float">
            <text:p>1,225144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4866.018" calcext:value-type="float">
            <text:p>4866,018</text:p>
          </table:table-cell>
          <table:table-cell office:value-type="float" office:value="4852.079" calcext:value-type="float">
            <text:p>4852,079</text:p>
          </table:table-cell>
          <table:table-cell office:value-type="float" office:value="122.4535" calcext:value-type="float">
            <text:p>122,4535</text:p>
          </table:table-cell>
          <table:table-cell office:value-type="float" office:value="97.47627" calcext:value-type="float">
            <text:p>97,47627</text:p>
          </table:table-cell>
          <table:table-cell office:value-type="float" office:value="3.157958" calcext:value-type="float">
            <text:p>3,157958</text:p>
          </table:table-cell>
          <table:table-cell office:value-type="float" office:value="1.11786" calcext:value-type="float">
            <text:p>1,11786</text:p>
          </table:table-cell>
          <table:table-cell office:value-type="float" office:value="0.0580057" calcext:value-type="float">
            <text:p>0,0580057</text:p>
          </table:table-cell>
          <table:table-cell office:value-type="float" office:value="1.11362" calcext:value-type="float">
            <text:p>1,11362</text:p>
          </table:table-cell>
          <table:table-cell office:value-type="float" office:value="0.057562" calcext:value-type="float">
            <text:p>0,057562</text:p>
          </table:table-cell>
          <table:table-cell office:value-type="float" office:value="0.81091" calcext:value-type="float">
            <text:p>0,81091</text:p>
          </table:table-cell>
          <table:table-cell office:value-type="float" office:value="98.24009" calcext:value-type="float">
            <text:p>98,24009</text:p>
          </table:table-cell>
          <table:table-cell office:value-type="float" office:value="5.334671" calcext:value-type="float">
            <text:p>5,334671</text:p>
          </table:table-cell>
          <table:table-cell office:value-type="float" office:value="92.90542" calcext:value-type="float">
            <text:p>92,90542</text:p>
          </table:table-cell>
          <table:table-cell office:value-type="float" office:value="5.708182" calcext:value-type="float">
            <text:p>5,708182</text:p>
          </table:table-cell>
          <table:table-cell office:value-type="float" office:value="3.493523" calcext:value-type="float">
            <text:p>3,493523</text:p>
          </table:table-cell>
          <table:table-cell office:value-type="float" office:value="14.09834" calcext:value-type="float">
            <text:p>14,09834</text:p>
          </table:table-cell>
          <table:table-cell office:value-type="float" office:value="0.00004610927" calcext:value-type="float">
            <text:p>0,00004610927</text:p>
          </table:table-cell>
          <table:table-cell office:value-type="float" office:value="14.09839" calcext:value-type="float">
            <text:p>14,09839</text:p>
          </table:table-cell>
          <table:table-cell office:value-type="float" office:value="1.24884" calcext:value-type="float">
            <text:p>1,2488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4916.32" calcext:value-type="float">
            <text:p>4916,32</text:p>
          </table:table-cell>
          <table:table-cell office:value-type="float" office:value="4902.144" calcext:value-type="float">
            <text:p>4902,144</text:p>
          </table:table-cell>
          <table:table-cell office:value-type="float" office:value="123.9859" calcext:value-type="float">
            <text:p>123,9859</text:p>
          </table:table-cell>
          <table:table-cell office:value-type="float" office:value="97.47078" calcext:value-type="float">
            <text:p>97,47078</text:p>
          </table:table-cell>
          <table:table-cell office:value-type="float" office:value="3.20845" calcext:value-type="float">
            <text:p>3,20845</text:p>
          </table:table-cell>
          <table:table-cell office:value-type="float" office:value="1.140949" calcext:value-type="float">
            <text:p>1,140949</text:p>
          </table:table-cell>
          <table:table-cell office:value-type="float" office:value="0.05987937" calcext:value-type="float">
            <text:p>0,05987937</text:p>
          </table:table-cell>
          <table:table-cell office:value-type="float" office:value="1.136723" calcext:value-type="float">
            <text:p>1,136723</text:p>
          </table:table-cell>
          <table:table-cell office:value-type="float" office:value="0.05976655" calcext:value-type="float">
            <text:p>0,05976655</text:p>
          </table:table-cell>
          <table:table-cell office:value-type="float" office:value="0.8111318" calcext:value-type="float">
            <text:p>0,8111318</text:p>
          </table:table-cell>
          <table:table-cell office:value-type="float" office:value="99.45712" calcext:value-type="float">
            <text:p>99,45712</text:p>
          </table:table-cell>
          <table:table-cell office:value-type="float" office:value="5.386694" calcext:value-type="float">
            <text:p>5,386694</text:p>
          </table:table-cell>
          <table:table-cell office:value-type="float" office:value="94.07042" calcext:value-type="float">
            <text:p>94,07042</text:p>
          </table:table-cell>
          <table:table-cell office:value-type="float" office:value="5.79398" calcext:value-type="float">
            <text:p>5,79398</text:p>
          </table:table-cell>
          <table:table-cell office:value-type="float" office:value="3.474292" calcext:value-type="float">
            <text:p>3,474292</text:p>
          </table:table-cell>
          <table:table-cell office:value-type="float" office:value="14.25356" calcext:value-type="float">
            <text:p>14,25356</text:p>
          </table:table-cell>
          <table:table-cell office:value-type="float" office:value="0.00004609301" calcext:value-type="float">
            <text:p>0,00004609301</text:p>
          </table:table-cell>
          <table:table-cell office:value-type="float" office:value="14.25361" calcext:value-type="float">
            <text:p>14,25361</text:p>
          </table:table-cell>
          <table:table-cell office:value-type="float" office:value="1.272735" calcext:value-type="float">
            <text:p>1,272735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4966.627" calcext:value-type="float">
            <text:p>4966,627</text:p>
          </table:table-cell>
          <table:table-cell office:value-type="float" office:value="4952.21" calcext:value-type="float">
            <text:p>4952,21</text:p>
          </table:table-cell>
          <table:table-cell office:value-type="float" office:value="125.5244" calcext:value-type="float">
            <text:p>125,5244</text:p>
          </table:table-cell>
          <table:table-cell office:value-type="float" office:value="97.46528" calcext:value-type="float">
            <text:p>97,46528</text:p>
          </table:table-cell>
          <table:table-cell office:value-type="float" office:value="3.25826" calcext:value-type="float">
            <text:p>3,25826</text:p>
          </table:table-cell>
          <table:table-cell office:value-type="float" office:value="1.164222" calcext:value-type="float">
            <text:p>1,164222</text:p>
          </table:table-cell>
          <table:table-cell office:value-type="float" office:value="0.06137617" calcext:value-type="float">
            <text:p>0,06137617</text:p>
          </table:table-cell>
          <table:table-cell office:value-type="float" office:value="1.159982" calcext:value-type="float">
            <text:p>1,159982</text:p>
          </table:table-cell>
          <table:table-cell office:value-type="float" office:value="0.06132389" calcext:value-type="float">
            <text:p>0,06132389</text:p>
          </table:table-cell>
          <table:table-cell office:value-type="float" office:value="0.8113559" calcext:value-type="float">
            <text:p>0,8113559</text:p>
          </table:table-cell>
          <table:table-cell office:value-type="float" office:value="100.6799" calcext:value-type="float">
            <text:p>100,6799</text:p>
          </table:table-cell>
          <table:table-cell office:value-type="float" office:value="5.439459" calcext:value-type="float">
            <text:p>5,439459</text:p>
          </table:table-cell>
          <table:table-cell office:value-type="float" office:value="95.24045" calcext:value-type="float">
            <text:p>95,24045</text:p>
          </table:table-cell>
          <table:table-cell office:value-type="float" office:value="5.88062" calcext:value-type="float">
            <text:p>5,88062</text:p>
          </table:table-cell>
          <table:table-cell office:value-type="float" office:value="3.460524" calcext:value-type="float">
            <text:p>3,460524</text:p>
          </table:table-cell>
          <table:table-cell office:value-type="float" office:value="14.40876" calcext:value-type="float">
            <text:p>14,40876</text:p>
          </table:table-cell>
          <table:table-cell office:value-type="float" office:value="0.00004607605" calcext:value-type="float">
            <text:p>0,00004607605</text:p>
          </table:table-cell>
          <table:table-cell office:value-type="float" office:value="14.40881" calcext:value-type="float">
            <text:p>14,40881</text:p>
          </table:table-cell>
          <table:table-cell office:value-type="float" office:value="1.296846" calcext:value-type="float">
            <text:p>1,29684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16.937" calcext:value-type="float">
            <text:p>5016,937</text:p>
          </table:table-cell>
          <table:table-cell office:value-type="float" office:value="5002.277" calcext:value-type="float">
            <text:p>5002,277</text:p>
          </table:table-cell>
          <table:table-cell office:value-type="float" office:value="127.0723" calcext:value-type="float">
            <text:p>127,0723</text:p>
          </table:table-cell>
          <table:table-cell office:value-type="float" office:value="97.45971" calcext:value-type="float">
            <text:p>97,45971</text:p>
          </table:table-cell>
          <table:table-cell office:value-type="float" office:value="3.30999" calcext:value-type="float">
            <text:p>3,30999</text:p>
          </table:table-cell>
          <table:table-cell office:value-type="float" office:value="1.187822" calcext:value-type="float">
            <text:p>1,187822</text:p>
          </table:table-cell>
          <table:table-cell office:value-type="float" office:value="0.06353862" calcext:value-type="float">
            <text:p>0,06353862</text:p>
          </table:table-cell>
          <table:table-cell office:value-type="float" office:value="1.183557" calcext:value-type="float">
            <text:p>1,183557</text:p>
          </table:table-cell>
          <table:table-cell office:value-type="float" office:value="0.06349046" calcext:value-type="float">
            <text:p>0,06349046</text:p>
          </table:table-cell>
          <table:table-cell office:value-type="float" office:value="0.8115822" calcext:value-type="float">
            <text:p>0,8115822</text:p>
          </table:table-cell>
          <table:table-cell office:value-type="float" office:value="101.9087" calcext:value-type="float">
            <text:p>101,9087</text:p>
          </table:table-cell>
          <table:table-cell office:value-type="float" office:value="5.492986" calcext:value-type="float">
            <text:p>5,492986</text:p>
          </table:table-cell>
          <table:table-cell office:value-type="float" office:value="96.41575" calcext:value-type="float">
            <text:p>96,41575</text:p>
          </table:table-cell>
          <table:table-cell office:value-type="float" office:value="5.968305" calcext:value-type="float">
            <text:p>5,968305</text:p>
          </table:table-cell>
          <table:table-cell office:value-type="float" office:value="3.449263" calcext:value-type="float">
            <text:p>3,449263</text:p>
          </table:table-cell>
          <table:table-cell office:value-type="float" office:value="14.56404" calcext:value-type="float">
            <text:p>14,56404</text:p>
          </table:table-cell>
          <table:table-cell office:value-type="float" office:value="0.00004605945" calcext:value-type="float">
            <text:p>0,00004605945</text:p>
          </table:table-cell>
          <table:table-cell office:value-type="float" office:value="14.56409" calcext:value-type="float">
            <text:p>14,56409</text:p>
          </table:table-cell>
          <table:table-cell office:value-type="float" office:value="1.321214" calcext:value-type="float">
            <text:p>1,321214</text:p>
          </table:table-cell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style-name="ce1" office:value-type="string" calcext:value-type="string" table:number-columns-spanned="5" table:number-rows-spanned="1">
            <text:p>EPC_50Hz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383.8701885464" calcext:value-type="float">
            <text:p>383,8701885464</text:p>
          </table:table-cell>
          <table:table-cell table:formula="of:=[.A112]/([.E112]/100)" office:value-type="float" office:value="407.86644108642" calcext:value-type="float">
            <text:p>407,86644108642</text:p>
          </table:table-cell>
          <table:table-cell table:formula="of:=[.A112]" office:value-type="float" office:value="383.8701885464" calcext:value-type="float">
            <text:p>383,8701885464</text:p>
          </table:table-cell>
          <table:table-cell table:formula="of:=[.B112]-[.C112]" office:value-type="float" office:value="23.9962525400197" calcext:value-type="float">
            <text:p>23,9962525400197</text:p>
          </table:table-cell>
          <table:table-cell office:value-type="float" office:value="94.1166396342632" calcext:value-type="float">
            <text:p>94,1166396342632</text:p>
          </table:table-cell>
          <table:table-cell table:number-columns-repeated="15"/>
        </table:table-row>
        <table:table-row table:style-name="ro1">
          <table:table-cell office:value-type="float" office:value="388.621728220568" calcext:value-type="float">
            <text:p>388,621728220568</text:p>
          </table:table-cell>
          <table:table-cell table:formula="of:=[.A113]/([.E113]/100)" office:value-type="float" office:value="413.33748761388" calcext:value-type="float">
            <text:p>413,33748761388</text:p>
          </table:table-cell>
          <table:table-cell table:formula="of:=[.A113]" office:value-type="float" office:value="388.621728220568" calcext:value-type="float">
            <text:p>388,621728220568</text:p>
          </table:table-cell>
          <table:table-cell table:formula="of:=[.B113]-[.C113]" office:value-type="float" office:value="24.7157593933123" calcext:value-type="float">
            <text:p>24,7157593933123</text:p>
          </table:table-cell>
          <table:table-cell office:value-type="float" office:value="94.0204408905682" calcext:value-type="float">
            <text:p>94,0204408905682</text:p>
          </table:table-cell>
          <table:table-cell table:number-columns-repeated="15"/>
        </table:table-row>
        <table:table-row table:style-name="ro1">
          <table:table-cell office:value-type="float" office:value="398.988785702322" calcext:value-type="float">
            <text:p>398,988785702322</text:p>
          </table:table-cell>
          <table:table-cell table:formula="of:=[.A114]/([.E114]/100)" office:value-type="float" office:value="423.17383283032" calcext:value-type="float">
            <text:p>423,17383283032</text:p>
          </table:table-cell>
          <table:table-cell table:formula="of:=[.A114]" office:value-type="float" office:value="398.988785702322" calcext:value-type="float">
            <text:p>398,988785702322</text:p>
          </table:table-cell>
          <table:table-cell table:formula="of:=[.B114]-[.C114]" office:value-type="float" office:value="24.1850471279982" calcext:value-type="float">
            <text:p>24,1850471279982</text:p>
          </table:table-cell>
          <table:table-cell office:value-type="float" office:value="94.2848434256341" calcext:value-type="float">
            <text:p>94,2848434256341</text:p>
          </table:table-cell>
          <table:table-cell table:number-columns-repeated="15"/>
        </table:table-row>
        <table:table-row table:style-name="ro1">
          <table:table-cell office:value-type="float" office:value="402.133657039698" calcext:value-type="float">
            <text:p>402,133657039698</text:p>
          </table:table-cell>
          <table:table-cell table:formula="of:=[.A115]/([.E115]/100)" office:value-type="float" office:value="425.752393802084" calcext:value-type="float">
            <text:p>425,752393802084</text:p>
          </table:table-cell>
          <table:table-cell table:formula="of:=[.A115]" office:value-type="float" office:value="402.133657039698" calcext:value-type="float">
            <text:p>402,133657039698</text:p>
          </table:table-cell>
          <table:table-cell table:formula="of:=[.B115]-[.C115]" office:value-type="float" office:value="23.618736762386" calcext:value-type="float">
            <text:p>23,618736762386</text:p>
          </table:table-cell>
          <table:table-cell office:value-type="float" office:value="94.4524711766235" calcext:value-type="float">
            <text:p>94,4524711766235</text:p>
          </table:table-cell>
          <table:table-cell table:number-columns-repeated="15"/>
        </table:table-row>
        <table:table-row table:style-name="ro1">
          <table:table-cell office:value-type="float" office:value="416.562386586073" calcext:value-type="float">
            <text:p>416,562386586073</text:p>
          </table:table-cell>
          <table:table-cell table:formula="of:=[.A116]/([.E116]/100)" office:value-type="float" office:value="440.311587336144" calcext:value-type="float">
            <text:p>440,311587336144</text:p>
          </table:table-cell>
          <table:table-cell table:formula="of:=[.A116]" office:value-type="float" office:value="416.562386586073" calcext:value-type="float">
            <text:p>416,562386586073</text:p>
          </table:table-cell>
          <table:table-cell table:formula="of:=[.B116]-[.C116]" office:value-type="float" office:value="23.7492007500713" calcext:value-type="float">
            <text:p>23,7492007500713</text:p>
          </table:table-cell>
          <table:table-cell office:value-type="float" office:value="94.6062739584592" calcext:value-type="float">
            <text:p>94,6062739584592</text:p>
          </table:table-cell>
          <table:table-cell table:number-columns-repeated="15"/>
        </table:table-row>
        <table:table-row table:style-name="ro1">
          <table:table-cell office:value-type="float" office:value="417.940502473658" calcext:value-type="float">
            <text:p>417,940502473658</text:p>
          </table:table-cell>
          <table:table-cell table:formula="of:=[.A117]/([.E117]/100)" office:value-type="float" office:value="441.074231726037" calcext:value-type="float">
            <text:p>441,074231726037</text:p>
          </table:table-cell>
          <table:table-cell table:formula="of:=[.A117]" office:value-type="float" office:value="417.940502473658" calcext:value-type="float">
            <text:p>417,940502473658</text:p>
          </table:table-cell>
          <table:table-cell table:formula="of:=[.B117]-[.C117]" office:value-type="float" office:value="23.1337292523787" calcext:value-type="float">
            <text:p>23,1337292523787</text:p>
          </table:table-cell>
          <table:table-cell office:value-type="float" office:value="94.7551392513114" calcext:value-type="float">
            <text:p>94,7551392513114</text:p>
          </table:table-cell>
          <table:table-cell table:number-columns-repeated="15"/>
        </table:table-row>
        <table:table-row table:style-name="ro1">
          <table:table-cell office:value-type="float" office:value="432.071145475821" calcext:value-type="float">
            <text:p>432,071145475821</text:p>
          </table:table-cell>
          <table:table-cell table:formula="of:=[.A118]/([.E118]/100)" office:value-type="float" office:value="455.307306233711" calcext:value-type="float">
            <text:p>455,307306233711</text:p>
          </table:table-cell>
          <table:table-cell table:formula="of:=[.A118]" office:value-type="float" office:value="432.071145475821" calcext:value-type="float">
            <text:p>432,071145475821</text:p>
          </table:table-cell>
          <table:table-cell table:formula="of:=[.B118]-[.C118]" office:value-type="float" office:value="23.2361607578903" calcext:value-type="float">
            <text:p>23,2361607578903</text:p>
          </table:table-cell>
          <table:table-cell office:value-type="float" office:value="94.8965983106884" calcext:value-type="float">
            <text:p>94,8965983106884</text:p>
          </table:table-cell>
          <table:table-cell table:number-columns-repeated="15"/>
        </table:table-row>
        <table:table-row table:style-name="ro1">
          <table:table-cell office:value-type="float" office:value="434.766749479286" calcext:value-type="float">
            <text:p>434,766749479286</text:p>
          </table:table-cell>
          <table:table-cell table:formula="of:=[.A119]/([.E119]/100)" office:value-type="float" office:value="457.455252610211" calcext:value-type="float">
            <text:p>457,455252610211</text:p>
          </table:table-cell>
          <table:table-cell table:formula="of:=[.A119]" office:value-type="float" office:value="434.766749479286" calcext:value-type="float">
            <text:p>434,766749479286</text:p>
          </table:table-cell>
          <table:table-cell table:formula="of:=[.B119]-[.C119]" office:value-type="float" office:value="22.6885031309255" calcext:value-type="float">
            <text:p>22,6885031309255</text:p>
          </table:table-cell>
          <table:table-cell office:value-type="float" office:value="95.0402792401079" calcext:value-type="float">
            <text:p>95,0402792401079</text:p>
          </table:table-cell>
          <table:table-cell table:number-columns-repeated="15"/>
        </table:table-row>
        <table:table-row table:style-name="ro1">
          <table:table-cell office:value-type="float" office:value="452.734868098623" calcext:value-type="float">
            <text:p>452,734868098623</text:p>
          </table:table-cell>
          <table:table-cell table:formula="of:=[.A120]/([.E120]/100)" office:value-type="float" office:value="475.329449854967" calcext:value-type="float">
            <text:p>475,329449854967</text:p>
          </table:table-cell>
          <table:table-cell table:formula="of:=[.A120]" office:value-type="float" office:value="452.734868098623" calcext:value-type="float">
            <text:p>452,734868098623</text:p>
          </table:table-cell>
          <table:table-cell table:formula="of:=[.B120]-[.C120]" office:value-type="float" office:value="22.5945817563439" calcext:value-type="float">
            <text:p>22,5945817563439</text:p>
          </table:table-cell>
          <table:table-cell office:value-type="float" office:value="95.2465428423932" calcext:value-type="float">
            <text:p>95,2465428423932</text:p>
          </table:table-cell>
          <table:table-cell table:number-columns-repeated="15"/>
        </table:table-row>
        <table:table-row table:style-name="ro1">
          <table:table-cell office:value-type="float" office:value="469.238019604211" calcext:value-type="float">
            <text:p>469,238019604211</text:p>
          </table:table-cell>
          <table:table-cell table:formula="of:=[.A121]/([.E121]/100)" office:value-type="float" office:value="491.576259315488" calcext:value-type="float">
            <text:p>491,576259315488</text:p>
          </table:table-cell>
          <table:table-cell table:formula="of:=[.A121]" office:value-type="float" office:value="469.238019604211" calcext:value-type="float">
            <text:p>469,238019604211</text:p>
          </table:table-cell>
          <table:table-cell table:formula="of:=[.B121]-[.C121]" office:value-type="float" office:value="22.3382397112772" calcext:value-type="float">
            <text:p>22,3382397112772</text:p>
          </table:table-cell>
          <table:table-cell office:value-type="float" office:value="95.4557936255134" calcext:value-type="float">
            <text:p>95,4557936255134</text:p>
          </table:table-cell>
          <table:table-cell table:number-columns-repeated="15"/>
        </table:table-row>
        <table:table-row table:style-name="ro1">
          <table:table-cell office:value-type="float" office:value="491.620668291683" calcext:value-type="float">
            <text:p>491,620668291683</text:p>
          </table:table-cell>
          <table:table-cell table:formula="of:=[.A122]/([.E122]/100)" office:value-type="float" office:value="514.194651044528" calcext:value-type="float">
            <text:p>514,194651044528</text:p>
          </table:table-cell>
          <table:table-cell table:formula="of:=[.A122]" office:value-type="float" office:value="491.620668291683" calcext:value-type="float">
            <text:p>491,620668291683</text:p>
          </table:table-cell>
          <table:table-cell table:formula="of:=[.B122]-[.C122]" office:value-type="float" office:value="22.5739827528453" calcext:value-type="float">
            <text:p>22,5739827528453</text:p>
          </table:table-cell>
          <table:table-cell office:value-type="float" office:value="95.6098371099371" calcext:value-type="float">
            <text:p>95,6098371099371</text:p>
          </table:table-cell>
          <table:table-cell table:number-columns-repeated="15"/>
        </table:table-row>
        <table:table-row table:style-name="ro1">
          <table:table-cell office:value-type="float" office:value="521.703549217024" calcext:value-type="float">
            <text:p>521,703549217024</text:p>
          </table:table-cell>
          <table:table-cell table:formula="of:=[.A123]/([.E123]/100)" office:value-type="float" office:value="544.738016083655" calcext:value-type="float">
            <text:p>544,738016083655</text:p>
          </table:table-cell>
          <table:table-cell table:formula="of:=[.A123]" office:value-type="float" office:value="521.703549217024" calcext:value-type="float">
            <text:p>521,703549217024</text:p>
          </table:table-cell>
          <table:table-cell table:formula="of:=[.B123]-[.C123]" office:value-type="float" office:value="23.0344668666309" calcext:value-type="float">
            <text:p>23,0344668666309</text:p>
          </table:table-cell>
          <table:table-cell office:value-type="float" office:value="95.7714596399504" calcext:value-type="float">
            <text:p>95,7714596399504</text:p>
          </table:table-cell>
          <table:table-cell table:number-columns-repeated="15"/>
        </table:table-row>
        <table:table-row table:style-name="ro1">
          <table:table-cell office:value-type="float" office:value="542.433802074882" calcext:value-type="float">
            <text:p>542,433802074882</text:p>
          </table:table-cell>
          <table:table-cell table:formula="of:=[.A124]/([.E124]/100)" office:value-type="float" office:value="565.518741348462" calcext:value-type="float">
            <text:p>565,518741348462</text:p>
          </table:table-cell>
          <table:table-cell table:formula="of:=[.A124]" office:value-type="float" office:value="542.433802074882" calcext:value-type="float">
            <text:p>542,433802074882</text:p>
          </table:table-cell>
          <table:table-cell table:formula="of:=[.B124]-[.C124]" office:value-type="float" office:value="23.0849392735795" calcext:value-type="float">
            <text:p>23,0849392735795</text:p>
          </table:table-cell>
          <table:table-cell office:value-type="float" office:value="95.9179179069231" calcext:value-type="float">
            <text:p>95,9179179069231</text:p>
          </table:table-cell>
          <table:table-cell table:number-columns-repeated="15"/>
        </table:table-row>
        <table:table-row table:style-name="ro1">
          <table:table-cell office:value-type="float" office:value="571.08479640021" calcext:value-type="float">
            <text:p>571,08479640021</text:p>
          </table:table-cell>
          <table:table-cell table:formula="of:=[.A125]/([.E125]/100)" office:value-type="float" office:value="594.425206417014" calcext:value-type="float">
            <text:p>594,425206417014</text:p>
          </table:table-cell>
          <table:table-cell table:formula="of:=[.A125]" office:value-type="float" office:value="571.08479640021" calcext:value-type="float">
            <text:p>571,08479640021</text:p>
          </table:table-cell>
          <table:table-cell table:formula="of:=[.B125]-[.C125]" office:value-type="float" office:value="23.3404100168038" calcext:value-type="float">
            <text:p>23,3404100168038</text:p>
          </table:table-cell>
          <table:table-cell office:value-type="float" office:value="96.073448809903" calcext:value-type="float">
            <text:p>96,073448809903</text:p>
          </table:table-cell>
          <table:table-cell table:number-columns-repeated="15"/>
        </table:table-row>
        <table:table-row table:style-name="ro1">
          <table:table-cell office:value-type="float" office:value="591.813761889517" calcext:value-type="float">
            <text:p>591,813761889517</text:p>
          </table:table-cell>
          <table:table-cell table:formula="of:=[.A126]/([.E126]/100)" office:value-type="float" office:value="615.084653290535" calcext:value-type="float">
            <text:p>615,084653290535</text:p>
          </table:table-cell>
          <table:table-cell table:formula="of:=[.A126]" office:value-type="float" office:value="591.813761889517" calcext:value-type="float">
            <text:p>591,813761889517</text:p>
          </table:table-cell>
          <table:table-cell table:formula="of:=[.B126]-[.C126]" office:value-type="float" office:value="23.2708914010183" calcext:value-type="float">
            <text:p>23,2708914010183</text:p>
          </table:table-cell>
          <table:table-cell office:value-type="float" office:value="96.2166359904242" calcext:value-type="float">
            <text:p>96,2166359904242</text:p>
          </table:table-cell>
          <table:table-cell table:number-columns-repeated="15"/>
        </table:table-row>
        <table:table-row table:style-name="ro1">
          <table:table-cell office:value-type="float" office:value="620.460772659333" calcext:value-type="float">
            <text:p>620,460772659333</text:p>
          </table:table-cell>
          <table:table-cell table:formula="of:=[.A127]/([.E127]/100)" office:value-type="float" office:value="643.88501966248" calcext:value-type="float">
            <text:p>643,88501966248</text:p>
          </table:table-cell>
          <table:table-cell table:formula="of:=[.A127]" office:value-type="float" office:value="620.460772659333" calcext:value-type="float">
            <text:p>620,460772659333</text:p>
          </table:table-cell>
          <table:table-cell table:formula="of:=[.B127]-[.C127]" office:value-type="float" office:value="23.4242470031465" calcext:value-type="float">
            <text:p>23,4242470031465</text:p>
          </table:table-cell>
          <table:table-cell office:value-type="float" office:value="96.362045040988" calcext:value-type="float">
            <text:p>96,362045040988</text:p>
          </table:table-cell>
          <table:table-cell table:number-columns-repeated="15"/>
        </table:table-row>
        <table:table-row table:style-name="ro1">
          <table:table-cell office:value-type="float" office:value="642.071085231823" calcext:value-type="float">
            <text:p>642,071085231823</text:p>
          </table:table-cell>
          <table:table-cell table:formula="of:=[.A128]/([.E128]/100)" office:value-type="float" office:value="665.293461023477" calcext:value-type="float">
            <text:p>665,293461023477</text:p>
          </table:table-cell>
          <table:table-cell table:formula="of:=[.A128]" office:value-type="float" office:value="642.071085231823" calcext:value-type="float">
            <text:p>642,071085231823</text:p>
          </table:table-cell>
          <table:table-cell table:formula="of:=[.B128]-[.C128]" office:value-type="float" office:value="23.2223757916545" calcext:value-type="float">
            <text:p>23,2223757916545</text:p>
          </table:table-cell>
          <table:table-cell office:value-type="float" office:value="96.50945377459" calcext:value-type="float">
            <text:p>96,50945377459</text:p>
          </table:table-cell>
          <table:table-cell table:number-columns-repeated="15"/>
        </table:table-row>
        <table:table-row table:style-name="ro1">
          <table:table-cell office:value-type="float" office:value="666.75757709907" calcext:value-type="float">
            <text:p>666,75757709907</text:p>
          </table:table-cell>
          <table:table-cell table:formula="of:=[.A129]/([.E129]/100)" office:value-type="float" office:value="689.868517196497" calcext:value-type="float">
            <text:p>689,868517196497</text:p>
          </table:table-cell>
          <table:table-cell table:formula="of:=[.A129]" office:value-type="float" office:value="666.75757709907" calcext:value-type="float">
            <text:p>666,75757709907</text:p>
          </table:table-cell>
          <table:table-cell table:formula="of:=[.B129]-[.C129]" office:value-type="float" office:value="23.1109400974274" calcext:value-type="float">
            <text:p>23,1109400974274</text:p>
          </table:table-cell>
          <table:table-cell office:value-type="float" office:value="96.6499500236152" calcext:value-type="float">
            <text:p>96,6499500236152</text:p>
          </table:table-cell>
          <table:table-cell table:number-columns-repeated="15"/>
        </table:table-row>
        <table:table-row table:style-name="ro1">
          <table:table-cell office:value-type="float" office:value="697.591054613882" calcext:value-type="float">
            <text:p>697,591054613882</text:p>
          </table:table-cell>
          <table:table-cell table:formula="of:=[.A130]/([.E130]/100)" office:value-type="float" office:value="720.927706918649" calcext:value-type="float">
            <text:p>720,927706918649</text:p>
          </table:table-cell>
          <table:table-cell table:formula="of:=[.A130]" office:value-type="float" office:value="697.591054613882" calcext:value-type="float">
            <text:p>697,591054613882</text:p>
          </table:table-cell>
          <table:table-cell table:formula="of:=[.B130]-[.C130]" office:value-type="float" office:value="23.3366523047666" calcext:value-type="float">
            <text:p>23,3366523047666</text:p>
          </table:table-cell>
          <table:table-cell office:value-type="float" office:value="96.7629691464473" calcext:value-type="float">
            <text:p>96,7629691464473</text:p>
          </table:table-cell>
          <table:table-cell table:number-columns-repeated="15"/>
        </table:table-row>
        <table:table-row table:style-name="ro1">
          <table:table-cell office:value-type="float" office:value="728.423715985614" calcext:value-type="float">
            <text:p>728,423715985614</text:p>
          </table:table-cell>
          <table:table-cell table:formula="of:=[.A131]/([.E131]/100)" office:value-type="float" office:value="751.929680518748" calcext:value-type="float">
            <text:p>751,929680518748</text:p>
          </table:table-cell>
          <table:table-cell table:formula="of:=[.A131]" office:value-type="float" office:value="728.423715985614" calcext:value-type="float">
            <text:p>728,423715985614</text:p>
          </table:table-cell>
          <table:table-cell table:formula="of:=[.B131]-[.C131]" office:value-type="float" office:value="23.5059645331344" calcext:value-type="float">
            <text:p>23,5059645331344</text:p>
          </table:table-cell>
          <table:table-cell office:value-type="float" office:value="96.8739145239063" calcext:value-type="float">
            <text:p>96,8739145239063</text:p>
          </table:table-cell>
          <table:table-cell table:number-columns-repeated="15"/>
        </table:table-row>
        <table:table-row table:style-name="ro1">
          <table:table-cell office:value-type="float" office:value="756.171254494664" calcext:value-type="float">
            <text:p>756,171254494664</text:p>
          </table:table-cell>
          <table:table-cell table:formula="of:=[.A132]/([.E132]/100)" office:value-type="float" office:value="779.806828328655" calcext:value-type="float">
            <text:p>779,806828328655</text:p>
          </table:table-cell>
          <table:table-cell table:formula="of:=[.A132]" office:value-type="float" office:value="756.171254494664" calcext:value-type="float">
            <text:p>756,171254494664</text:p>
          </table:table-cell>
          <table:table-cell table:formula="of:=[.B132]-[.C132]" office:value-type="float" office:value="23.635573833991" calcext:value-type="float">
            <text:p>23,635573833991</text:p>
          </table:table-cell>
          <table:table-cell office:value-type="float" office:value="96.9690475928957" calcext:value-type="float">
            <text:p>96,9690475928957</text:p>
          </table:table-cell>
          <table:table-cell table:number-columns-repeated="15"/>
        </table:table-row>
        <table:table-row table:style-name="ro1">
          <table:table-cell office:value-type="float" office:value="787.008710706994" calcext:value-type="float">
            <text:p>787,008710706994</text:p>
          </table:table-cell>
          <table:table-cell table:formula="of:=[.A133]/([.E133]/100)" office:value-type="float" office:value="810.578917180599" calcext:value-type="float">
            <text:p>810,578917180599</text:p>
          </table:table-cell>
          <table:table-cell table:formula="of:=[.A133]" office:value-type="float" office:value="787.008710706994" calcext:value-type="float">
            <text:p>787,008710706994</text:p>
          </table:table-cell>
          <table:table-cell table:formula="of:=[.B133]-[.C133]" office:value-type="float" office:value="23.5702064736051" calcext:value-type="float">
            <text:p>23,5702064736051</text:p>
          </table:table-cell>
          <table:table-cell office:value-type="float" office:value="97.0921762244214" calcext:value-type="float">
            <text:p>97,0921762244214</text:p>
          </table:table-cell>
          <table:table-cell table:number-columns-repeated="15"/>
        </table:table-row>
        <table:table-row table:style-name="ro1">
          <table:table-cell office:value-type="float" office:value="820.920883957728" calcext:value-type="float">
            <text:p>820,920883957728</text:p>
          </table:table-cell>
          <table:table-cell table:formula="of:=[.A134]/([.E134]/100)" office:value-type="float" office:value="844.528175028159" calcext:value-type="float">
            <text:p>844,528175028159</text:p>
          </table:table-cell>
          <table:table-cell table:formula="of:=[.A134]" office:value-type="float" office:value="820.920883957728" calcext:value-type="float">
            <text:p>820,920883957728</text:p>
          </table:table-cell>
          <table:table-cell table:formula="of:=[.B134]-[.C134]" office:value-type="float" office:value="23.607291070431" calcext:value-type="float">
            <text:p>23,607291070431</text:p>
          </table:table-cell>
          <table:table-cell office:value-type="float" office:value="97.2046769109102" calcext:value-type="float">
            <text:p>97,2046769109102</text:p>
          </table:table-cell>
          <table:table-cell table:number-columns-repeated="15"/>
        </table:table-row>
        <table:table-row table:style-name="ro1">
          <table:table-cell office:value-type="float" office:value="857.915950251655" calcext:value-type="float">
            <text:p>857,915950251655</text:p>
          </table:table-cell>
          <table:table-cell table:formula="of:=[.A135]/([.E135]/100)" office:value-type="float" office:value="881.474917610744" calcext:value-type="float">
            <text:p>881,474917610744</text:p>
          </table:table-cell>
          <table:table-cell table:formula="of:=[.A135]" office:value-type="float" office:value="857.915950251655" calcext:value-type="float">
            <text:p>857,915950251655</text:p>
          </table:table-cell>
          <table:table-cell table:formula="of:=[.B135]-[.C135]" office:value-type="float" office:value="23.5589673590887" calcext:value-type="float">
            <text:p>23,5589673590887</text:p>
          </table:table-cell>
          <table:table-cell office:value-type="float" office:value="97.3273241372601" calcext:value-type="float">
            <text:p>97,3273241372601</text:p>
          </table:table-cell>
          <table:table-cell table:number-columns-repeated="15"/>
        </table:table-row>
        <table:table-row table:style-name="ro1">
          <table:table-cell office:value-type="float" office:value="910.30038536182" calcext:value-type="float">
            <text:p>910,30038536182</text:p>
          </table:table-cell>
          <table:table-cell table:formula="of:=[.A136]/([.E136]/100)" office:value-type="float" office:value="934.245696819835" calcext:value-type="float">
            <text:p>934,245696819835</text:p>
          </table:table-cell>
          <table:table-cell table:formula="of:=[.A136]" office:value-type="float" office:value="910.30038536182" calcext:value-type="float">
            <text:p>910,30038536182</text:p>
          </table:table-cell>
          <table:table-cell table:formula="of:=[.B136]-[.C136]" office:value-type="float" office:value="23.9453114580153" calcext:value-type="float">
            <text:p>23,9453114580153</text:p>
          </table:table-cell>
          <table:table-cell office:value-type="float" office:value="97.4369363926936" calcext:value-type="float">
            <text:p>97,4369363926936</text:p>
          </table:table-cell>
          <table:table-cell table:number-columns-repeated="15"/>
        </table:table-row>
        <table:table-row table:style-name="ro1">
          <table:table-cell office:value-type="float" office:value="968.844595599809" calcext:value-type="float">
            <text:p>968,844595599809</text:p>
          </table:table-cell>
          <table:table-cell table:formula="of:=[.A137]/([.E137]/100)" office:value-type="float" office:value="993.161474701445" calcext:value-type="float">
            <text:p>993,161474701445</text:p>
          </table:table-cell>
          <table:table-cell table:formula="of:=[.A137]" office:value-type="float" office:value="968.844595599809" calcext:value-type="float">
            <text:p>968,844595599809</text:p>
          </table:table-cell>
          <table:table-cell table:formula="of:=[.B137]-[.C137]" office:value-type="float" office:value="24.3168791016357" calcext:value-type="float">
            <text:p>24,3168791016357</text:p>
          </table:table-cell>
          <table:table-cell office:value-type="float" office:value="97.5515684285936" calcext:value-type="float">
            <text:p>97,5515684285936</text:p>
          </table:table-cell>
          <table:table-cell table:number-columns-repeated="15"/>
        </table:table-row>
        <table:table-row table:style-name="ro1">
          <table:table-cell office:value-type="float" office:value="1027.38835242498" calcext:value-type="float">
            <text:p>1027,38835242498</text:p>
          </table:table-cell>
          <table:table-cell table:formula="of:=[.A138]/([.E138]/100)" office:value-type="float" office:value="1051.95089689437" calcext:value-type="float">
            <text:p>1051,95089689437</text:p>
          </table:table-cell>
          <table:table-cell table:formula="of:=[.A138]" office:value-type="float" office:value="1027.38835242498" calcext:value-type="float">
            <text:p>1027,38835242498</text:p>
          </table:table-cell>
          <table:table-cell table:formula="of:=[.B138]-[.C138]" office:value-type="float" office:value="24.5625444693935" calcext:value-type="float">
            <text:p>24,5625444693935</text:p>
          </table:table-cell>
          <table:table-cell office:value-type="float" office:value="97.6650483837308" calcext:value-type="float">
            <text:p>97,6650483837308</text:p>
          </table:table-cell>
          <table:table-cell table:number-columns-repeated="15"/>
        </table:table-row>
        <table:table-row table:style-name="ro1">
          <table:table-cell office:value-type="float" office:value="1092.08698221985" calcext:value-type="float">
            <text:p>1092,08698221985</text:p>
          </table:table-cell>
          <table:table-cell table:formula="of:=[.A139]/([.E139]/100)" office:value-type="float" office:value="1116.98351512294" calcext:value-type="float">
            <text:p>1116,98351512294</text:p>
          </table:table-cell>
          <table:table-cell table:formula="of:=[.A139]" office:value-type="float" office:value="1092.08698221985" calcext:value-type="float">
            <text:p>1092,08698221985</text:p>
          </table:table-cell>
          <table:table-cell table:formula="of:=[.B139]-[.C139]" office:value-type="float" office:value="24.8965329030914" calcext:value-type="float">
            <text:p>24,8965329030914</text:p>
          </table:table-cell>
          <table:table-cell office:value-type="float" office:value="97.7710921812171" calcext:value-type="float">
            <text:p>97,7710921812171</text:p>
          </table:table-cell>
          <table:table-cell table:number-columns-repeated="15"/>
        </table:table-row>
        <table:table-row table:style-name="ro1">
          <table:table-cell office:value-type="float" office:value="1159.85968912276" calcext:value-type="float">
            <text:p>1159,85968912276</text:p>
          </table:table-cell>
          <table:table-cell table:formula="of:=[.A140]/([.E140]/100)" office:value-type="float" office:value="1185.16434606417" calcext:value-type="float">
            <text:p>1185,16434606417</text:p>
          </table:table-cell>
          <table:table-cell table:formula="of:=[.A140]" office:value-type="float" office:value="1159.85968912276" calcext:value-type="float">
            <text:p>1159,85968912276</text:p>
          </table:table-cell>
          <table:table-cell table:formula="of:=[.B140]-[.C140]" office:value-type="float" office:value="25.3046569414075" calcext:value-type="float">
            <text:p>25,3046569414075</text:p>
          </table:table-cell>
          <table:table-cell office:value-type="float" office:value="97.8648820287716" calcext:value-type="float">
            <text:p>97,8648820287716</text:p>
          </table:table-cell>
          <table:table-cell table:number-columns-repeated="15"/>
        </table:table-row>
        <table:table-row table:style-name="ro1">
          <table:table-cell office:value-type="float" office:value="1227.6327669998" calcext:value-type="float">
            <text:p>1227,6327669998</text:p>
          </table:table-cell>
          <table:table-cell table:formula="of:=[.A141]/([.E141]/100)" office:value-type="float" office:value="1253.20293818831" calcext:value-type="float">
            <text:p>1253,20293818831</text:p>
          </table:table-cell>
          <table:table-cell table:formula="of:=[.A141]" office:value-type="float" office:value="1227.6327669998" calcext:value-type="float">
            <text:p>1227,6327669998</text:p>
          </table:table-cell>
          <table:table-cell table:formula="of:=[.B141]-[.C141]" office:value-type="float" office:value="25.5701711885147" calcext:value-type="float">
            <text:p>25,5701711885147</text:p>
          </table:table-cell>
          <table:table-cell office:value-type="float" office:value="97.9596144878594" calcext:value-type="float">
            <text:p>97,9596144878594</text:p>
          </table:table-cell>
          <table:table-cell table:number-columns-repeated="15"/>
        </table:table-row>
        <table:table-row table:style-name="ro1">
          <table:table-cell office:value-type="float" office:value="1295.3999092908" calcext:value-type="float">
            <text:p>1295,3999092908</text:p>
          </table:table-cell>
          <table:table-cell table:formula="of:=[.A142]/([.E142]/100)" office:value-type="float" office:value="1321.30724067014" calcext:value-type="float">
            <text:p>1321,30724067014</text:p>
          </table:table-cell>
          <table:table-cell table:formula="of:=[.A142]" office:value-type="float" office:value="1295.3999092908" calcext:value-type="float">
            <text:p>1295,3999092908</text:p>
          </table:table-cell>
          <table:table-cell table:formula="of:=[.B142]-[.C142]" office:value-type="float" office:value="25.9073313793419" calcext:value-type="float">
            <text:p>25,9073313793419</text:p>
          </table:table-cell>
          <table:table-cell office:value-type="float" office:value="98.0392651624158" calcext:value-type="float">
            <text:p>98,0392651624158</text:p>
          </table:table-cell>
          <table:table-cell table:number-columns-repeated="15"/>
        </table:table-row>
        <table:table-row table:style-name="ro1">
          <table:table-cell office:value-type="float" office:value="1363.16278537933" calcext:value-type="float">
            <text:p>1363,16278537933</text:p>
          </table:table-cell>
          <table:table-cell table:formula="of:=[.A143]/([.E143]/100)" office:value-type="float" office:value="1389.45012854796" calcext:value-type="float">
            <text:p>1389,45012854796</text:p>
          </table:table-cell>
          <table:table-cell table:formula="of:=[.A143]" office:value-type="float" office:value="1363.16278537933" calcext:value-type="float">
            <text:p>1363,16278537933</text:p>
          </table:table-cell>
          <table:table-cell table:formula="of:=[.B143]-[.C143]" office:value-type="float" office:value="26.2873431686251" calcext:value-type="float">
            <text:p>26,2873431686251</text:p>
          </table:table-cell>
          <table:table-cell office:value-type="float" office:value="98.1080758043402" calcext:value-type="float">
            <text:p>98,1080758043402</text:p>
          </table:table-cell>
          <table:table-cell table:number-columns-repeated="15"/>
        </table:table-row>
        <table:table-row table:style-name="ro1">
          <table:table-cell office:value-type="float" office:value="1430.92529049373" calcext:value-type="float">
            <text:p>1430,92529049373</text:p>
          </table:table-cell>
          <table:table-cell table:formula="of:=[.A144]/([.E144]/100)" office:value-type="float" office:value="1457.51111178777" calcext:value-type="float">
            <text:p>1457,51111178777</text:p>
          </table:table-cell>
          <table:table-cell table:formula="of:=[.A144]" office:value-type="float" office:value="1430.92529049373" calcext:value-type="float">
            <text:p>1430,92529049373</text:p>
          </table:table-cell>
          <table:table-cell table:formula="of:=[.B144]-[.C144]" office:value-type="float" office:value="26.5858212940398" calcext:value-type="float">
            <text:p>26,5858212940398</text:p>
          </table:table-cell>
          <table:table-cell office:value-type="float" office:value="98.1759438347314" calcext:value-type="float">
            <text:p>98,1759438347314</text:p>
          </table:table-cell>
          <table:table-cell table:number-columns-repeated="15"/>
        </table:table-row>
        <table:table-row table:style-name="ro1">
          <table:table-cell office:value-type="float" office:value="1497.4482041096" calcext:value-type="float">
            <text:p>1497,4482041096</text:p>
          </table:table-cell>
          <table:table-cell table:formula="of:=[.A145]/([.E145]/100)" office:value-type="float" office:value="1524.53299129028" calcext:value-type="float">
            <text:p>1524,53299129028</text:p>
          </table:table-cell>
          <table:table-cell table:formula="of:=[.A145]" office:value-type="float" office:value="1497.4482041096" calcext:value-type="float">
            <text:p>1497,4482041096</text:p>
          </table:table-cell>
          <table:table-cell table:formula="of:=[.B145]-[.C145]" office:value-type="float" office:value="27.0847871806755" calcext:value-type="float">
            <text:p>27,0847871806755</text:p>
          </table:table-cell>
          <table:table-cell office:value-type="float" office:value="98.2234043254287" calcext:value-type="float">
            <text:p>98,2234043254287</text:p>
          </table:table-cell>
          <table:table-cell table:number-columns-repeated="15"/>
        </table:table-row>
        <table:table-row table:style-name="ro1">
          <table:table-cell office:value-type="float" office:value="1566.44065539522" calcext:value-type="float">
            <text:p>1566,44065539522</text:p>
          </table:table-cell>
          <table:table-cell table:formula="of:=[.A146]/([.E146]/100)" office:value-type="float" office:value="1593.73865743593" calcext:value-type="float">
            <text:p>1593,73865743593</text:p>
          </table:table-cell>
          <table:table-cell table:formula="of:=[.A146]" office:value-type="float" office:value="1566.44065539522" calcext:value-type="float">
            <text:p>1566,44065539522</text:p>
          </table:table-cell>
          <table:table-cell table:formula="of:=[.B146]-[.C146]" office:value-type="float" office:value="27.2980020407078" calcext:value-type="float">
            <text:p>27,2980020407078</text:p>
          </table:table-cell>
          <table:table-cell office:value-type="float" office:value="98.2871719956504" calcext:value-type="float">
            <text:p>98,2871719956504</text:p>
          </table:table-cell>
          <table:table-cell table:number-columns-repeated="15"/>
        </table:table-row>
        <table:table-row table:style-name="ro1">
          <table:table-cell office:value-type="float" office:value="1634.1940716435" calcext:value-type="float">
            <text:p>1634,1940716435</text:p>
          </table:table-cell>
          <table:table-cell table:formula="of:=[.A147]/([.E147]/100)" office:value-type="float" office:value="1661.91572260853" calcext:value-type="float">
            <text:p>1661,91572260853</text:p>
          </table:table-cell>
          <table:table-cell table:formula="of:=[.A147]" office:value-type="float" office:value="1634.1940716435" calcext:value-type="float">
            <text:p>1634,1940716435</text:p>
          </table:table-cell>
          <table:table-cell table:formula="of:=[.B147]-[.C147]" office:value-type="float" office:value="27.7216509650327" calcext:value-type="float">
            <text:p>27,7216509650327</text:p>
          </table:table-cell>
          <table:table-cell office:value-type="float" office:value="98.331946043478" calcext:value-type="float">
            <text:p>98,331946043478</text:p>
          </table:table-cell>
          <table:table-cell table:number-columns-repeated="15"/>
        </table:table-row>
        <table:table-row table:style-name="ro1">
          <table:table-cell office:value-type="float" office:value="1701.94804435297" calcext:value-type="float">
            <text:p>1701,94804435297</text:p>
          </table:table-cell>
          <table:table-cell table:formula="of:=[.A148]/([.E148]/100)" office:value-type="float" office:value="1730.00643029486" calcext:value-type="float">
            <text:p>1730,00643029486</text:p>
          </table:table-cell>
          <table:table-cell table:formula="of:=[.A148]" office:value-type="float" office:value="1701.94804435297" calcext:value-type="float">
            <text:p>1701,94804435297</text:p>
          </table:table-cell>
          <table:table-cell table:formula="of:=[.B148]-[.C148]" office:value-type="float" office:value="28.0583859418939" calcext:value-type="float">
            <text:p>28,0583859418939</text:p>
          </table:table-cell>
          <table:table-cell office:value-type="float" office:value="98.3781340086053" calcext:value-type="float">
            <text:p>98,3781340086053</text:p>
          </table:table-cell>
          <table:table-cell table:number-columns-repeated="15"/>
        </table:table-row>
        <table:table-row table:style-name="ro1">
          <table:table-cell office:value-type="float" office:value="1769.69737988584" calcext:value-type="float">
            <text:p>1769,69737988584</text:p>
          </table:table-cell>
          <table:table-cell table:formula="of:=[.A149]/([.E149]/100)" office:value-type="float" office:value="1798.24379285592" calcext:value-type="float">
            <text:p>1798,24379285592</text:p>
          </table:table-cell>
          <table:table-cell table:formula="of:=[.A149]" office:value-type="float" office:value="1769.69737988584" calcext:value-type="float">
            <text:p>1769,69737988584</text:p>
          </table:table-cell>
          <table:table-cell table:formula="of:=[.B149]-[.C149]" office:value-type="float" office:value="28.5464129700797" calcext:value-type="float">
            <text:p>28,5464129700797</text:p>
          </table:table-cell>
          <table:table-cell office:value-type="float" office:value="98.4125393295676" calcext:value-type="float">
            <text:p>98,4125393295676</text:p>
          </table:table-cell>
          <table:table-cell table:number-columns-repeated="15"/>
        </table:table-row>
        <table:table-row table:style-name="ro1">
          <table:table-cell office:value-type="float" office:value="1837.44727187991" calcext:value-type="float">
            <text:p>1837,44727187991</text:p>
          </table:table-cell>
          <table:table-cell table:formula="of:=[.A150]/([.E150]/100)" office:value-type="float" office:value="1866.40721959212" calcext:value-type="float">
            <text:p>1866,40721959212</text:p>
          </table:table-cell>
          <table:table-cell table:formula="of:=[.A150]" office:value-type="float" office:value="1837.44727187991" calcext:value-type="float">
            <text:p>1837,44727187991</text:p>
          </table:table-cell>
          <table:table-cell table:formula="of:=[.B150]-[.C150]" office:value-type="float" office:value="28.959947712211" calcext:value-type="float">
            <text:p>28,959947712211</text:p>
          </table:table-cell>
          <table:table-cell office:value-type="float" office:value="98.4483585678296" calcext:value-type="float">
            <text:p>98,4483585678296</text:p>
          </table:table-cell>
          <table:table-cell table:number-columns-repeated="15"/>
        </table:table-row>
        <table:table-row table:style-name="ro1">
          <table:table-cell office:value-type="float" office:value="1905.19734936104" calcext:value-type="float">
            <text:p>1905,19734936104</text:p>
          </table:table-cell>
          <table:table-cell table:formula="of:=[.A151]/([.E151]/100)" office:value-type="float" office:value="1934.511994044" calcext:value-type="float">
            <text:p>1934,511994044</text:p>
          </table:table-cell>
          <table:table-cell table:formula="of:=[.A151]" office:value-type="float" office:value="1905.19734936104" calcext:value-type="float">
            <text:p>1905,19734936104</text:p>
          </table:table-cell>
          <table:table-cell table:formula="of:=[.B151]-[.C151]" office:value-type="float" office:value="29.3146446829553" calcext:value-type="float">
            <text:p>29,3146446829553</text:p>
          </table:table-cell>
          <table:table-cell office:value-type="float" office:value="98.4846491118582" calcext:value-type="float">
            <text:p>98,4846491118582</text:p>
          </table:table-cell>
          <table:table-cell table:number-columns-repeated="15"/>
        </table:table-row>
        <table:table-row table:style-name="ro1">
          <table:table-cell office:value-type="float" office:value="1972.9370395666" calcext:value-type="float">
            <text:p>1972,9370395666</text:p>
          </table:table-cell>
          <table:table-cell table:formula="of:=[.A152]/([.E152]/100)" office:value-type="float" office:value="2003.09266757875" calcext:value-type="float">
            <text:p>2003,09266757875</text:p>
          </table:table-cell>
          <table:table-cell table:formula="of:=[.A152]" office:value-type="float" office:value="1972.9370395666" calcext:value-type="float">
            <text:p>1972,9370395666</text:p>
          </table:table-cell>
          <table:table-cell table:formula="of:=[.B152]-[.C152]" office:value-type="float" office:value="30.1556280121483" calcext:value-type="float">
            <text:p>30,1556280121483</text:p>
          </table:table-cell>
          <table:table-cell office:value-type="float" office:value="98.494546532957" calcext:value-type="float">
            <text:p>98,494546532957</text:p>
          </table:table-cell>
          <table:table-cell table:number-columns-repeated="15"/>
        </table:table-row>
        <table:table-row table:style-name="ro1">
          <table:table-cell office:value-type="float" office:value="2040.68043951343" calcext:value-type="float">
            <text:p>2040,68043951343</text:p>
          </table:table-cell>
          <table:table-cell table:formula="of:=[.A153]/([.E153]/100)" office:value-type="float" office:value="2071.46510240242" calcext:value-type="float">
            <text:p>2071,46510240242</text:p>
          </table:table-cell>
          <table:table-cell table:formula="of:=[.A153]" office:value-type="float" office:value="2040.68043951343" calcext:value-type="float">
            <text:p>2040,68043951343</text:p>
          </table:table-cell>
          <table:table-cell table:formula="of:=[.B153]-[.C153]" office:value-type="float" office:value="30.7846628889888" calcext:value-type="float">
            <text:p>30,7846628889888</text:p>
          </table:table-cell>
          <table:table-cell office:value-type="float" office:value="98.5138700693878" calcext:value-type="float">
            <text:p>98,5138700693878</text:p>
          </table:table-cell>
          <table:table-cell table:number-columns-repeated="15"/>
        </table:table-row>
        <table:table-row table:style-name="ro1">
          <table:table-cell office:value-type="float" office:value="2108.42346848614" calcext:value-type="float">
            <text:p>2108,42346848614</text:p>
          </table:table-cell>
          <table:table-cell table:formula="of:=[.A154]/([.E154]/100)" office:value-type="float" office:value="2139.83081398234" calcext:value-type="float">
            <text:p>2139,83081398234</text:p>
          </table:table-cell>
          <table:table-cell table:formula="of:=[.A154]" office:value-type="float" office:value="2108.42346848614" calcext:value-type="float">
            <text:p>2108,42346848614</text:p>
          </table:table-cell>
          <table:table-cell table:formula="of:=[.B154]-[.C154]" office:value-type="float" office:value="31.4073454962004" calcext:value-type="float">
            <text:p>31,4073454962004</text:p>
          </table:table-cell>
          <table:table-cell office:value-type="float" office:value="98.5322509942854" calcext:value-type="float">
            <text:p>98,5322509942854</text:p>
          </table:table-cell>
          <table:table-cell table:number-columns-repeated="15"/>
        </table:table-row>
        <table:table-row table:style-name="ro1">
          <table:table-cell office:value-type="float" office:value="2176.16612648472" calcext:value-type="float">
            <text:p>2176,16612648472</text:p>
          </table:table-cell>
          <table:table-cell table:formula="of:=[.A155]/([.E155]/100)" office:value-type="float" office:value="2208.19176780073" calcext:value-type="float">
            <text:p>2208,19176780073</text:p>
          </table:table-cell>
          <table:table-cell table:formula="of:=[.A155]" office:value-type="float" office:value="2176.16612648472" calcext:value-type="float">
            <text:p>2176,16612648472</text:p>
          </table:table-cell>
          <table:table-cell table:formula="of:=[.B155]-[.C155]" office:value-type="float" office:value="32.0256413160109" calcext:value-type="float">
            <text:p>32,0256413160109</text:p>
          </table:table-cell>
          <table:table-cell office:value-type="float" office:value="98.5496893076498" calcext:value-type="float">
            <text:p>98,5496893076498</text:p>
          </table:table-cell>
          <table:table-cell table:number-columns-repeated="15"/>
        </table:table-row>
        <table:table-row table:style-name="ro1">
          <table:table-cell office:value-type="float" office:value="2243.91267971163" calcext:value-type="float">
            <text:p>2243,91267971163</text:p>
          </table:table-cell>
          <table:table-cell table:formula="of:=[.A156]/([.E156]/100)" office:value-type="float" office:value="2276.30391437864" calcext:value-type="float">
            <text:p>2276,30391437864</text:p>
          </table:table-cell>
          <table:table-cell table:formula="of:=[.A156]" office:value-type="float" office:value="2243.91267971163" calcext:value-type="float">
            <text:p>2243,91267971163</text:p>
          </table:table-cell>
          <table:table-cell table:formula="of:=[.B156]-[.C156]" office:value-type="float" office:value="32.3912346670095" calcext:value-type="float">
            <text:p>32,3912346670095</text:p>
          </table:table-cell>
          <table:table-cell office:value-type="float" office:value="98.577025042113" calcext:value-type="float">
            <text:p>98,577025042113</text:p>
          </table:table-cell>
          <table:table-cell table:number-columns-repeated="15"/>
        </table:table-row>
        <table:table-row table:style-name="ro1">
          <table:table-cell office:value-type="float" office:value="2311.65051504655" calcext:value-type="float">
            <text:p>2311,65051504655</text:p>
          </table:table-cell>
          <table:table-cell table:formula="of:=[.A157]/([.E157]/100)" office:value-type="float" office:value="2344.89623329188" calcext:value-type="float">
            <text:p>2344,89623329188</text:p>
          </table:table-cell>
          <table:table-cell table:formula="of:=[.A157]" office:value-type="float" office:value="2311.65051504655" calcext:value-type="float">
            <text:p>2311,65051504655</text:p>
          </table:table-cell>
          <table:table-cell table:formula="of:=[.B157]-[.C157]" office:value-type="float" office:value="33.2457182453277" calcext:value-type="float">
            <text:p>33,2457182453277</text:p>
          </table:table-cell>
          <table:table-cell office:value-type="float" office:value="98.5822094055456" calcext:value-type="float">
            <text:p>98,5822094055456</text:p>
          </table:table-cell>
          <table:table-cell table:number-columns-repeated="15"/>
        </table:table-row>
        <table:table-row table:style-name="ro1">
          <table:table-cell office:value-type="float" office:value="2379.39206012275" calcext:value-type="float">
            <text:p>2379,39206012275</text:p>
          </table:table-cell>
          <table:table-cell table:formula="of:=[.A158]/([.E158]/100)" office:value-type="float" office:value="2413.25436552075" calcext:value-type="float">
            <text:p>2413,25436552075</text:p>
          </table:table-cell>
          <table:table-cell table:formula="of:=[.A158]" office:value-type="float" office:value="2379.39206012275" calcext:value-type="float">
            <text:p>2379,39206012275</text:p>
          </table:table-cell>
          <table:table-cell table:formula="of:=[.B158]-[.C158]" office:value-type="float" office:value="33.8623053979982" calcext:value-type="float">
            <text:p>33,8623053979982</text:p>
          </table:table-cell>
          <table:table-cell office:value-type="float" office:value="98.5968198843104" calcext:value-type="float">
            <text:p>98,5968198843104</text:p>
          </table:table-cell>
          <table:table-cell table:number-columns-repeated="15"/>
        </table:table-row>
        <table:table-row table:style-name="ro1">
          <table:table-cell office:value-type="float" office:value="2447.13583104371" calcext:value-type="float">
            <text:p>2447,13583104371</text:p>
          </table:table-cell>
          <table:table-cell table:formula="of:=[.A159]/([.E159]/100)" office:value-type="float" office:value="2481.45217984116" calcext:value-type="float">
            <text:p>2481,45217984116</text:p>
          </table:table-cell>
          <table:table-cell table:formula="of:=[.A159]" office:value-type="float" office:value="2447.13583104371" calcext:value-type="float">
            <text:p>2447,13583104371</text:p>
          </table:table-cell>
          <table:table-cell table:formula="of:=[.B159]-[.C159]" office:value-type="float" office:value="34.3163487974521" calcext:value-type="float">
            <text:p>34,3163487974521</text:p>
          </table:table-cell>
          <table:table-cell office:value-type="float" office:value="98.6170860322745" calcext:value-type="float">
            <text:p>98,6170860322745</text:p>
          </table:table-cell>
          <table:table-cell table:number-columns-repeated="15"/>
        </table:table-row>
        <table:table-row table:style-name="ro1">
          <table:table-cell office:value-type="float" office:value="2514.87236796918" calcext:value-type="float">
            <text:p>2514,87236796918</text:p>
          </table:table-cell>
          <table:table-cell table:formula="of:=[.A160]/([.E160]/100)" office:value-type="float" office:value="2550.08984169766" calcext:value-type="float">
            <text:p>2550,08984169766</text:p>
          </table:table-cell>
          <table:table-cell table:formula="of:=[.A160]" office:value-type="float" office:value="2514.87236796918" calcext:value-type="float">
            <text:p>2514,87236796918</text:p>
          </table:table-cell>
          <table:table-cell table:formula="of:=[.B160]-[.C160]" office:value-type="float" office:value="35.2174737284768" calcext:value-type="float">
            <text:p>35,2174737284768</text:p>
          </table:table-cell>
          <table:table-cell office:value-type="float" office:value="98.6189712553409" calcext:value-type="float">
            <text:p>98,6189712553409</text:p>
          </table:table-cell>
          <table:table-cell table:number-columns-repeated="15"/>
        </table:table-row>
        <table:table-row table:style-name="ro1">
          <table:table-cell office:value-type="float" office:value="2582.61502596776" calcext:value-type="float">
            <text:p>2582,61502596776</text:p>
          </table:table-cell>
          <table:table-cell table:formula="of:=[.A161]/([.E161]/100)" office:value-type="float" office:value="2618.31816188406" calcext:value-type="float">
            <text:p>2618,31816188406</text:p>
          </table:table-cell>
          <table:table-cell table:formula="of:=[.A161]" office:value-type="float" office:value="2582.61502596776" calcext:value-type="float">
            <text:p>2582,61502596776</text:p>
          </table:table-cell>
          <table:table-cell table:formula="of:=[.B161]-[.C161]" office:value-type="float" office:value="35.703135916302" calcext:value-type="float">
            <text:p>35,703135916302</text:p>
          </table:table-cell>
          <table:table-cell office:value-type="float" office:value="98.6364095687053" calcext:value-type="float">
            <text:p>98,6364095687053</text:p>
          </table:table-cell>
          <table:table-cell table:number-columns-repeated="15"/>
        </table:table-row>
        <table:table-row table:style-name="ro1">
          <table:table-cell office:value-type="float" office:value="2650.353788738" calcext:value-type="float">
            <text:p>2650,353788738</text:p>
          </table:table-cell>
          <table:table-cell table:formula="of:=[.A162]/([.E162]/100)" office:value-type="float" office:value="2686.78796454591" calcext:value-type="float">
            <text:p>2686,78796454591</text:p>
          </table:table-cell>
          <table:table-cell table:formula="of:=[.A162]" office:value-type="float" office:value="2650.353788738" calcext:value-type="float">
            <text:p>2650,353788738</text:p>
          </table:table-cell>
          <table:table-cell table:formula="of:=[.B162]-[.C162]" office:value-type="float" office:value="36.4341758079117" calcext:value-type="float">
            <text:p>36,4341758079117</text:p>
          </table:table-cell>
          <table:table-cell office:value-type="float" office:value="98.643950460971" calcext:value-type="float">
            <text:p>98,643950460971</text:p>
          </table:table-cell>
          <table:table-cell table:number-columns-repeated="15"/>
        </table:table-row>
        <table:table-row table:style-name="ro1">
          <table:table-cell office:value-type="float" office:value="2718.0912530988" calcext:value-type="float">
            <text:p>2718,0912530988</text:p>
          </table:table-cell>
          <table:table-cell table:formula="of:=[.A163]/([.E163]/100)" office:value-type="float" office:value="2755.33812848136" calcext:value-type="float">
            <text:p>2755,33812848136</text:p>
          </table:table-cell>
          <table:table-cell table:formula="of:=[.A163]" office:value-type="float" office:value="2718.0912530988" calcext:value-type="float">
            <text:p>2718,0912530988</text:p>
          </table:table-cell>
          <table:table-cell table:formula="of:=[.B163]-[.C163]" office:value-type="float" office:value="37.2468753825619" calcext:value-type="float">
            <text:p>37,2468753825619</text:p>
          </table:table-cell>
          <table:table-cell office:value-type="float" office:value="98.6481922128704" calcext:value-type="float">
            <text:p>98,6481922128704</text:p>
          </table:table-cell>
          <table:table-cell table:number-columns-repeated="15"/>
        </table:table-row>
        <table:table-row table:style-name="ro1">
          <table:table-cell office:value-type="float" office:value="2785.83261268793" calcext:value-type="float">
            <text:p>2785,83261268793</text:p>
          </table:table-cell>
          <table:table-cell table:formula="of:=[.A164]/([.E164]/100)" office:value-type="float" office:value="2823.6030646717" calcext:value-type="float">
            <text:p>2823,6030646717</text:p>
          </table:table-cell>
          <table:table-cell table:formula="of:=[.A164]" office:value-type="float" office:value="2785.83261268793" calcext:value-type="float">
            <text:p>2785,83261268793</text:p>
          </table:table-cell>
          <table:table-cell table:formula="of:=[.B164]-[.C164]" office:value-type="float" office:value="37.7704519837657" calcext:value-type="float">
            <text:p>37,7704519837657</text:p>
          </table:table-cell>
          <table:table-cell office:value-type="float" office:value="98.6623313858686" calcext:value-type="float">
            <text:p>98,6623313858686</text:p>
          </table:table-cell>
          <table:table-cell table:number-columns-repeated="15"/>
        </table:table-row>
        <table:table-row table:style-name="ro1">
          <table:table-cell office:value-type="float" office:value="2853.56636730744" calcext:value-type="float">
            <text:p>2853,56636730744</text:p>
          </table:table-cell>
          <table:table-cell table:formula="of:=[.A165]/([.E165]/100)" office:value-type="float" office:value="2892.40714274709" calcext:value-type="float">
            <text:p>2892,40714274709</text:p>
          </table:table-cell>
          <table:table-cell table:formula="of:=[.A165]" office:value-type="float" office:value="2853.56636730744" calcext:value-type="float">
            <text:p>2853,56636730744</text:p>
          </table:table-cell>
          <table:table-cell table:formula="of:=[.B165]-[.C165]" office:value-type="float" office:value="38.840775439653" calcext:value-type="float">
            <text:p>38,840775439653</text:p>
          </table:table-cell>
          <table:table-cell office:value-type="float" office:value="98.657147022436" calcext:value-type="float">
            <text:p>98,657147022436</text:p>
          </table:table-cell>
          <table:table-cell table:number-columns-repeated="15"/>
        </table:table-row>
        <table:table-row table:style-name="ro1">
          <table:table-cell office:value-type="float" office:value="2912.06676137903" calcext:value-type="float">
            <text:p>2912,06676137903</text:p>
          </table:table-cell>
          <table:table-cell table:formula="of:=[.A166]/([.E166]/100)" office:value-type="float" office:value="2951.60510076526" calcext:value-type="float">
            <text:p>2951,60510076526</text:p>
          </table:table-cell>
          <table:table-cell table:formula="of:=[.A166]" office:value-type="float" office:value="2912.06676137903" calcext:value-type="float">
            <text:p>2912,06676137903</text:p>
          </table:table-cell>
          <table:table-cell table:formula="of:=[.B166]-[.C166]" office:value-type="float" office:value="39.5383393862267" calcext:value-type="float">
            <text:p>39,5383393862267</text:p>
          </table:table-cell>
          <table:table-cell office:value-type="float" office:value="98.6604461628022" calcext:value-type="float">
            <text:p>98,6604461628022</text:p>
          </table:table-cell>
          <table:table-cell table:number-columns-repeated="15"/>
        </table:table-row>
        <table:table-row table:style-name="ro1">
          <table:table-cell office:value-type="float" office:value="2979.81301318947" calcext:value-type="float">
            <text:p>2979,81301318947</text:p>
          </table:table-cell>
          <table:table-cell table:formula="of:=[.A167]/([.E167]/100)" office:value-type="float" office:value="3019.45801302037" calcext:value-type="float">
            <text:p>3019,45801302037</text:p>
          </table:table-cell>
          <table:table-cell table:formula="of:=[.A167]" office:value-type="float" office:value="2979.81301318947" calcext:value-type="float">
            <text:p>2979,81301318947</text:p>
          </table:table-cell>
          <table:table-cell table:formula="of:=[.B167]-[.C167]" office:value-type="float" office:value="39.6449998308958" calcext:value-type="float">
            <text:p>39,6449998308958</text:p>
          </table:table-cell>
          <table:table-cell office:value-type="float" office:value="98.6870160253946" calcext:value-type="float">
            <text:p>98,6870160253946</text:p>
          </table:table-cell>
          <table:table-cell table:number-columns-repeated="15"/>
        </table:table-row>
        <table:table-row table:style-name="ro1">
          <table:table-cell office:value-type="float" office:value="3161.47542314604" calcext:value-type="float">
            <text:p>3161,47542314604</text:p>
          </table:table-cell>
          <table:table-cell table:formula="of:=[.A168]/([.E168]/100)" office:value-type="float" office:value="3202.93341862316" calcext:value-type="float">
            <text:p>3202,93341862316</text:p>
          </table:table-cell>
          <table:table-cell table:formula="of:=[.A168]" office:value-type="float" office:value="3161.47542314604" calcext:value-type="float">
            <text:p>3161,47542314604</text:p>
          </table:table-cell>
          <table:table-cell table:formula="of:=[.B168]-[.C168]" office:value-type="float" office:value="41.4579954771166" calcext:value-type="float">
            <text:p>41,4579954771166</text:p>
          </table:table-cell>
          <table:table-cell office:value-type="float" office:value="98.7056241870011" calcext:value-type="float">
            <text:p>98,7056241870011</text:p>
          </table:table-cell>
          <table:table-cell table:number-columns-repeated="15"/>
        </table:table-row>
        <table:table-row table:style-name="ro1">
          <table:table-cell office:value-type="float" office:value="3343.13083759048" calcext:value-type="float">
            <text:p>3343,13083759048</text:p>
          </table:table-cell>
          <table:table-cell table:formula="of:=[.A169]/([.E169]/100)" office:value-type="float" office:value="3386.94238051731" calcext:value-type="float">
            <text:p>3386,94238051731</text:p>
          </table:table-cell>
          <table:table-cell table:formula="of:=[.A169]" office:value-type="float" office:value="3343.13083759048" calcext:value-type="float">
            <text:p>3343,13083759048</text:p>
          </table:table-cell>
          <table:table-cell table:formula="of:=[.B169]-[.C169]" office:value-type="float" office:value="43.8115429268323" calcext:value-type="float">
            <text:p>43,8115429268323</text:p>
          </table:table-cell>
          <table:table-cell office:value-type="float" office:value="98.7064573882671" calcext:value-type="float">
            <text:p>98,7064573882671</text:p>
          </table:table-cell>
          <table:table-cell table:number-columns-repeated="15"/>
        </table:table-row>
        <table:table-row table:style-name="ro1">
          <table:table-cell office:value-type="float" office:value="3524.78355584796" calcext:value-type="float">
            <text:p>3524,78355584796</text:p>
          </table:table-cell>
          <table:table-cell table:formula="of:=[.A170]/([.E170]/100)" office:value-type="float" office:value="3571.19336261183" calcext:value-type="float">
            <text:p>3571,19336261183</text:p>
          </table:table-cell>
          <table:table-cell table:formula="of:=[.A170]" office:value-type="float" office:value="3524.78355584796" calcext:value-type="float">
            <text:p>3524,78355584796</text:p>
          </table:table-cell>
          <table:table-cell table:formula="of:=[.B170]-[.C170]" office:value-type="float" office:value="46.4098067638683" calcext:value-type="float">
            <text:p>46,4098067638683</text:p>
          </table:table-cell>
          <table:table-cell office:value-type="float" office:value="98.7004398235685" calcext:value-type="float">
            <text:p>98,7004398235685</text:p>
          </table:table-cell>
          <table:table-cell table:number-columns-repeated="15"/>
        </table:table-row>
        <table:table-row table:style-name="ro1">
          <table:table-cell office:value-type="float" office:value="3709.509963678" calcext:value-type="float">
            <text:p>3709,509963678</text:p>
          </table:table-cell>
          <table:table-cell table:formula="of:=[.A171]/([.E171]/100)" office:value-type="float" office:value="3759.08539777234" calcext:value-type="float">
            <text:p>3759,08539777234</text:p>
          </table:table-cell>
          <table:table-cell table:formula="of:=[.A171]" office:value-type="float" office:value="3709.509963678" calcext:value-type="float">
            <text:p>3709,509963678</text:p>
          </table:table-cell>
          <table:table-cell table:formula="of:=[.B171]-[.C171]" office:value-type="float" office:value="49.5754340943408" calcext:value-type="float">
            <text:p>49,5754340943408</text:p>
          </table:table-cell>
          <table:table-cell office:value-type="float" office:value="98.6811836165329" calcext:value-type="float">
            <text:p>98,6811836165329</text:p>
          </table:table-cell>
          <table:table-cell table:number-columns-repeated="15"/>
        </table:table-row>
        <table:table-row table:style-name="ro1">
          <table:table-cell office:value-type="float" office:value="3808.02251422593" calcext:value-type="float">
            <text:p>3808,02251422593</text:p>
          </table:table-cell>
          <table:table-cell table:formula="of:=[.A172]/([.E172]/100)" office:value-type="float" office:value="3860.1312976149" calcext:value-type="float">
            <text:p>3860,1312976149</text:p>
          </table:table-cell>
          <table:table-cell table:formula="of:=[.A172]" office:value-type="float" office:value="3808.02251422593" calcext:value-type="float">
            <text:p>3808,02251422593</text:p>
          </table:table-cell>
          <table:table-cell table:formula="of:=[.B172]-[.C172]" office:value-type="float" office:value="52.1087833889656" calcext:value-type="float">
            <text:p>52,1087833889656</text:p>
          </table:table-cell>
          <table:table-cell office:value-type="float" office:value="98.6500774359369" calcext:value-type="float">
            <text:p>98,6500774359369</text:p>
          </table:table-cell>
          <table:table-cell table:number-columns-repeated="15"/>
        </table:table-row>
        <table:table-row table:style-name="ro1">
          <table:table-cell office:value-type="float" office:value="3891.15892913471" calcext:value-type="float">
            <text:p>3891,15892913471</text:p>
          </table:table-cell>
          <table:table-cell table:formula="of:=[.A173]/([.E173]/100)" office:value-type="float" office:value="3943.78357324749" calcext:value-type="float">
            <text:p>3943,78357324749</text:p>
          </table:table-cell>
          <table:table-cell table:formula="of:=[.A173]" office:value-type="float" office:value="3891.15892913471" calcext:value-type="float">
            <text:p>3891,15892913471</text:p>
          </table:table-cell>
          <table:table-cell table:formula="of:=[.B173]-[.C173]" office:value-type="float" office:value="52.6246441127769" calcext:value-type="float">
            <text:p>52,6246441127769</text:p>
          </table:table-cell>
          <table:table-cell office:value-type="float" office:value="98.6656305262349" calcext:value-type="float">
            <text:p>98,6656305262349</text:p>
          </table:table-cell>
          <table:table-cell table:number-columns-repeated="15"/>
        </table:table-row>
        <table:table-row table:style-name="ro1">
          <table:table-cell office:value-type="float" office:value="4075.89674110691" calcext:value-type="float">
            <text:p>4075,89674110691</text:p>
          </table:table-cell>
          <table:table-cell table:formula="of:=[.A174]/([.E174]/100)" office:value-type="float" office:value="4130.61285439848" calcext:value-type="float">
            <text:p>4130,61285439848</text:p>
          </table:table-cell>
          <table:table-cell table:formula="of:=[.A174]" office:value-type="float" office:value="4075.89674110691" calcext:value-type="float">
            <text:p>4075,89674110691</text:p>
          </table:table-cell>
          <table:table-cell table:formula="of:=[.B174]-[.C174]" office:value-type="float" office:value="54.7161132915721" calcext:value-type="float">
            <text:p>54,7161132915721</text:p>
          </table:table-cell>
          <table:table-cell office:value-type="float" office:value="98.6753512076711" calcext:value-type="float">
            <text:p>98,6753512076711</text:p>
          </table:table-cell>
          <table:table-cell table:number-columns-repeated="15"/>
        </table:table-row>
        <table:table-row table:style-name="ro1">
          <table:table-cell office:value-type="float" office:value="4248.31028247211" calcext:value-type="float">
            <text:p>4248,31028247211</text:p>
          </table:table-cell>
          <table:table-cell table:formula="of:=[.A175]/([.E175]/100)" office:value-type="float" office:value="4305.87822324867" calcext:value-type="float">
            <text:p>4305,87822324867</text:p>
          </table:table-cell>
          <table:table-cell table:formula="of:=[.A175]" office:value-type="float" office:value="4248.31028247211" calcext:value-type="float">
            <text:p>4248,31028247211</text:p>
          </table:table-cell>
          <table:table-cell table:formula="of:=[.B175]-[.C175]" office:value-type="float" office:value="57.5679407765629" calcext:value-type="float">
            <text:p>57,5679407765629</text:p>
          </table:table-cell>
          <table:table-cell office:value-type="float" office:value="98.6630383445185" calcext:value-type="float">
            <text:p>98,6630383445185</text:p>
          </table:table-cell>
          <table:table-cell table:number-columns-repeated="15"/>
        </table:table-row>
        <table:table-row table:style-name="ro1">
          <table:table-cell office:value-type="float" office:value="4405.33500552017" calcext:value-type="float">
            <text:p>4405,33500552017</text:p>
          </table:table-cell>
          <table:table-cell table:formula="of:=[.A176]/([.E176]/100)" office:value-type="float" office:value="4464.93477568551" calcext:value-type="float">
            <text:p>4464,93477568551</text:p>
          </table:table-cell>
          <table:table-cell table:formula="of:=[.A176]" office:value-type="float" office:value="4405.33500552017" calcext:value-type="float">
            <text:p>4405,33500552017</text:p>
          </table:table-cell>
          <table:table-cell table:formula="of:=[.B176]-[.C176]" office:value-type="float" office:value="59.5997701653423" calcext:value-type="float">
            <text:p>59,5997701653423</text:p>
          </table:table-cell>
          <table:table-cell office:value-type="float" office:value="98.6651592204683" calcext:value-type="float">
            <text:p>98,6651592204683</text:p>
          </table:table-cell>
          <table:table-cell table:number-columns-repeated="15"/>
        </table:table-row>
        <table:table-row table:style-name="ro1">
          <table:table-cell office:value-type="float" office:value="4473.0702440362" calcext:value-type="float">
            <text:p>4473,0702440362</text:p>
          </table:table-cell>
          <table:table-cell table:formula="of:=[.A177]/([.E177]/100)" office:value-type="float" office:value="4533.65137345192" calcext:value-type="float">
            <text:p>4533,65137345192</text:p>
          </table:table-cell>
          <table:table-cell table:formula="of:=[.A177]" office:value-type="float" office:value="4473.0702440362" calcext:value-type="float">
            <text:p>4473,0702440362</text:p>
          </table:table-cell>
          <table:table-cell table:formula="of:=[.B177]-[.C177]" office:value-type="float" office:value="60.581129415722" calcext:value-type="float">
            <text:p>60,581129415722</text:p>
          </table:table-cell>
          <table:table-cell office:value-type="float" office:value="98.6637453031684" calcext:value-type="float">
            <text:p>98,6637453031684</text:p>
          </table:table-cell>
          <table:table-cell table:number-columns-repeated="15"/>
        </table:table-row>
        <table:table-row table:style-name="ro1">
          <table:table-cell office:value-type="float" office:value="4540.8030712204" calcext:value-type="float">
            <text:p>4540,8030712204</text:p>
          </table:table-cell>
          <table:table-cell table:formula="of:=[.A178]/([.E178]/100)" office:value-type="float" office:value="4602.65332356389" calcext:value-type="float">
            <text:p>4602,65332356389</text:p>
          </table:table-cell>
          <table:table-cell table:formula="of:=[.A178]" office:value-type="float" office:value="4540.8030712204" calcext:value-type="float">
            <text:p>4540,8030712204</text:p>
          </table:table-cell>
          <table:table-cell table:formula="of:=[.B178]-[.C178]" office:value-type="float" office:value="61.8502523434872" calcext:value-type="float">
            <text:p>61,8502523434872</text:p>
          </table:table-cell>
          <table:table-cell office:value-type="float" office:value="98.6562044109028" calcext:value-type="float">
            <text:p>98,6562044109028</text:p>
          </table:table-cell>
          <table:table-cell table:number-columns-repeated="15"/>
        </table:table-row>
        <table:table-row table:style-name="ro1">
          <table:table-cell office:value-type="float" office:value="4608.52829343498" calcext:value-type="float">
            <text:p>4608,52829343498</text:p>
          </table:table-cell>
          <table:table-cell table:formula="of:=[.A179]/([.E179]/100)" office:value-type="float" office:value="4672.57338867563" calcext:value-type="float">
            <text:p>4672,57338867563</text:p>
          </table:table-cell>
          <table:table-cell table:formula="of:=[.A179]" office:value-type="float" office:value="4608.52829343498" calcext:value-type="float">
            <text:p>4608,52829343498</text:p>
          </table:table-cell>
          <table:table-cell table:formula="of:=[.B179]-[.C179]" office:value-type="float" office:value="64.04509524065" calcext:value-type="float">
            <text:p>64,04509524065</text:p>
          </table:table-cell>
          <table:table-cell office:value-type="float" office:value="98.6293399822062" calcext:value-type="float">
            <text:p>98,6293399822062</text:p>
          </table:table-cell>
          <table:table-cell table:number-columns-repeated="15"/>
        </table:table-row>
        <table:table-row table:style-name="ro1">
          <table:table-cell office:value-type="float" office:value="4657.79068978205" calcext:value-type="float">
            <text:p>4657,79068978205</text:p>
          </table:table-cell>
          <table:table-cell table:formula="of:=[.A180]/([.E180]/100)" office:value-type="float" office:value="4722.52038858048" calcext:value-type="float">
            <text:p>4722,52038858048</text:p>
          </table:table-cell>
          <table:table-cell table:formula="of:=[.A180]" office:value-type="float" office:value="4657.79068978205" calcext:value-type="float">
            <text:p>4657,79068978205</text:p>
          </table:table-cell>
          <table:table-cell table:formula="of:=[.B180]-[.C180]" office:value-type="float" office:value="64.7296987984328" calcext:value-type="float">
            <text:p>64,7296987984328</text:p>
          </table:table-cell>
          <table:table-cell office:value-type="float" office:value="98.6293399822062" calcext:value-type="float">
            <text:p>98,6293399822062</text:p>
          </table:table-cell>
          <table:table-cell table:number-columns-repeated="15"/>
        </table:table-row>
        <table:table-row table:style-name="ro1">
          <table:table-cell office:value-type="float" office:value="4802.4836763688" calcext:value-type="float">
            <text:p>4802,4836763688</text:p>
          </table:table-cell>
          <table:table-cell table:formula="of:=[.A181]/([.E181]/100)" office:value-type="float" office:value="4871.14454077052" calcext:value-type="float">
            <text:p>4871,14454077052</text:p>
          </table:table-cell>
          <table:table-cell table:formula="of:=[.A181]" office:value-type="float" office:value="4802.4836763688" calcext:value-type="float">
            <text:p>4802,4836763688</text:p>
          </table:table-cell>
          <table:table-cell table:formula="of:=[.B181]-[.C181]" office:value-type="float" office:value="68.6608644017169" calcext:value-type="float">
            <text:p>68,6608644017169</text:p>
          </table:table-cell>
          <table:table-cell office:value-type="float" office:value="98.5904572564612" calcext:value-type="float">
            <text:p>98,5904572564612</text:p>
          </table:table-cell>
          <table:table-cell table:number-columns-repeated="15"/>
        </table:table-row>
        <table:table-row table:style-name="ro1">
          <table:table-cell office:value-type="float" office:value="4984.13366200436" calcext:value-type="float">
            <text:p>4984,13366200436</text:p>
          </table:table-cell>
          <table:table-cell table:formula="of:=[.A182]/([.E182]/100)" office:value-type="float" office:value="5056.0562467679" calcext:value-type="float">
            <text:p>5056,0562467679</text:p>
          </table:table-cell>
          <table:table-cell table:formula="of:=[.A182]" office:value-type="float" office:value="4984.13366200436" calcext:value-type="float">
            <text:p>4984,13366200436</text:p>
          </table:table-cell>
          <table:table-cell table:formula="of:=[.B182]-[.C182]" office:value-type="float" office:value="71.9225847635353" calcext:value-type="float">
            <text:p>71,9225847635353</text:p>
          </table:table-cell>
          <table:table-cell office:value-type="float" office:value="98.5774963478796" calcext:value-type="float">
            <text:p>98,5774963478796</text:p>
          </table:table-cell>
          <table:table-cell table:number-columns-repeated="15"/>
        </table:table-row>
        <table:table-row table:style-name="ro1">
          <table:table-cell office:value-type="float" office:value="5165.78109719279" calcext:value-type="float">
            <text:p>5165,78109719279</text:p>
          </table:table-cell>
          <table:table-cell table:formula="of:=[.A183]/([.E183]/100)" office:value-type="float" office:value="5241.35860633474" calcext:value-type="float">
            <text:p>5241,35860633474</text:p>
          </table:table-cell>
          <table:table-cell table:formula="of:=[.A183]" office:value-type="float" office:value="5165.78109719279" calcext:value-type="float">
            <text:p>5165,78109719279</text:p>
          </table:table-cell>
          <table:table-cell table:formula="of:=[.B183]-[.C183]" office:value-type="float" office:value="75.5775091419446" calcext:value-type="float">
            <text:p>75,5775091419446</text:p>
          </table:table-cell>
          <table:table-cell office:value-type="float" office:value="98.5580549850071" calcext:value-type="float">
            <text:p>98,5580549850071</text:p>
          </table:table-cell>
          <table:table-cell table:number-columns-repeated="15"/>
        </table:table-row>
        <table:table-row table:style-name="ro1">
          <table:table-cell office:value-type="float" office:value="5276.61383763231" calcext:value-type="float">
            <text:p>5276,61383763231</text:p>
          </table:table-cell>
          <table:table-cell table:formula="of:=[.A184]/([.E184]/100)" office:value-type="float" office:value="5354.86916617937" calcext:value-type="float">
            <text:p>5354,86916617937</text:p>
          </table:table-cell>
          <table:table-cell table:formula="of:=[.A184]" office:value-type="float" office:value="5276.61383763231" calcext:value-type="float">
            <text:p>5276,61383763231</text:p>
          </table:table-cell>
          <table:table-cell table:formula="of:=[.B184]-[.C184]" office:value-type="float" office:value="78.2553285470594" calcext:value-type="float">
            <text:p>78,2553285470594</text:p>
          </table:table-cell>
          <table:table-cell office:value-type="float" office:value="98.5386136221346" calcext:value-type="float">
            <text:p>98,5386136221346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 table:number-columns-spanned="5" table:number-rows-spanned="1">
            <text:p>80Ruby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 office:value-type="float" office:value="277.502940966605" calcext:value-type="float">
            <text:p>277,502940966605</text:p>
          </table:table-cell>
          <table:table-cell table:number-columns-repeated="3"/>
          <table:table-cell office:value-type="float" office:value="95.0515531732869" calcext:value-type="float">
            <text:p>95,0515531732869</text:p>
          </table:table-cell>
          <table:table-cell table:number-columns-repeated="15"/>
        </table:table-row>
        <table:table-row table:style-name="ro1">
          <table:table-cell office:value-type="float" office:value="327.482409692574" calcext:value-type="float">
            <text:p>327,482409692574</text:p>
          </table:table-cell>
          <table:table-cell table:number-columns-repeated="3"/>
          <table:table-cell office:value-type="float" office:value="95.1350790285909" calcext:value-type="float">
            <text:p>95,1350790285909</text:p>
          </table:table-cell>
          <table:table-cell table:number-columns-repeated="15"/>
        </table:table-row>
        <table:table-row table:style-name="ro1">
          <table:table-cell office:value-type="float" office:value="379.868338636056" calcext:value-type="float">
            <text:p>379,868338636056</text:p>
          </table:table-cell>
          <table:table-cell table:number-columns-repeated="3"/>
          <table:table-cell office:value-type="float" office:value="95.2484869786804" calcext:value-type="float">
            <text:p>95,2484869786804</text:p>
          </table:table-cell>
          <table:table-cell table:number-columns-repeated="15"/>
        </table:table-row>
        <table:table-row table:style-name="ro1">
          <table:table-cell office:value-type="float" office:value="441.495557699442" calcext:value-type="float">
            <text:p>441,495557699442</text:p>
          </table:table-cell>
          <table:table-cell table:number-columns-repeated="3"/>
          <table:table-cell office:value-type="float" office:value="95.3735597464934" calcext:value-type="float">
            <text:p>95,3735597464934</text:p>
          </table:table-cell>
          <table:table-cell table:number-columns-repeated="15"/>
        </table:table-row>
        <table:table-row table:style-name="ro1">
          <table:table-cell office:value-type="float" office:value="500.045370824453" calcext:value-type="float">
            <text:p>500,045370824453</text:p>
          </table:table-cell>
          <table:table-cell table:number-columns-repeated="3"/>
          <table:table-cell office:value-type="float" office:value="95.5024282089625" calcext:value-type="float">
            <text:p>95,5024282089625</text:p>
          </table:table-cell>
          <table:table-cell table:number-columns-repeated="15"/>
        </table:table-row>
        <table:table-row table:style-name="ro1">
          <table:table-cell office:value-type="float" office:value="540.129679560421" calcext:value-type="float">
            <text:p>540,129679560421</text:p>
          </table:table-cell>
          <table:table-cell table:number-columns-repeated="3"/>
          <table:table-cell office:value-type="float" office:value="95.651355220427" calcext:value-type="float">
            <text:p>95,651355220427</text:p>
          </table:table-cell>
          <table:table-cell table:number-columns-repeated="15"/>
        </table:table-row>
        <table:table-row table:style-name="ro1">
          <table:table-cell office:value-type="float" office:value="577.134116925792" calcext:value-type="float">
            <text:p>577,134116925792</text:p>
          </table:table-cell>
          <table:table-cell table:number-columns-repeated="3"/>
          <table:table-cell office:value-type="float" office:value="95.7978134873997" calcext:value-type="float">
            <text:p>95,7978134873997</text:p>
          </table:table-cell>
          <table:table-cell table:number-columns-repeated="15"/>
        </table:table-row>
        <table:table-row table:style-name="ro1">
          <table:table-cell office:value-type="float" office:value="614.140424619056" calcext:value-type="float">
            <text:p>614,140424619056</text:p>
          </table:table-cell>
          <table:table-cell table:number-columns-repeated="3"/>
          <table:table-cell office:value-type="float" office:value="95.9490240875191" calcext:value-type="float">
            <text:p>95,9490240875191</text:p>
          </table:table-cell>
          <table:table-cell table:number-columns-repeated="15"/>
        </table:table-row>
        <table:table-row table:style-name="ro1">
          <table:table-cell office:value-type="float" office:value="651.147072371937" calcext:value-type="float">
            <text:p>651,147072371937</text:p>
          </table:table-cell>
          <table:table-cell table:number-columns-repeated="3"/>
          <table:table-cell office:value-type="float" office:value="96.1010987482106" calcext:value-type="float">
            <text:p>96,1010987482106</text:p>
          </table:table-cell>
          <table:table-cell table:number-columns-repeated="15"/>
        </table:table-row>
        <table:table-row table:style-name="ro1">
          <table:table-cell office:value-type="float" office:value="681.985888822735" calcext:value-type="float">
            <text:p>681,985888822735</text:p>
          </table:table-cell>
          <table:table-cell table:number-columns-repeated="3"/>
          <table:table-cell office:value-type="float" office:value="96.2276836220248" calcext:value-type="float">
            <text:p>96,2276836220248</text:p>
          </table:table-cell>
          <table:table-cell table:number-columns-repeated="15"/>
        </table:table-row>
        <table:table-row table:style-name="ro1">
          <table:table-cell office:value-type="float" office:value="706.648457495931" calcext:value-type="float">
            <text:p>706,648457495931</text:p>
          </table:table-cell>
          <table:table-cell table:number-columns-repeated="3"/>
          <table:table-cell office:value-type="float" office:value="96.307393209802" calcext:value-type="float">
            <text:p>96,307393209802</text:p>
          </table:table-cell>
          <table:table-cell table:number-columns-repeated="15"/>
        </table:table-row>
        <table:table-row table:style-name="ro1">
          <table:table-cell office:value-type="float" office:value="737.488889229909" calcext:value-type="float">
            <text:p>737,488889229909</text:p>
          </table:table-cell>
          <table:table-cell table:number-columns-repeated="3"/>
          <table:table-cell office:value-type="float" office:value="96.4380823713337" calcext:value-type="float">
            <text:p>96,4380823713337</text:p>
          </table:table-cell>
          <table:table-cell table:number-columns-repeated="15"/>
        </table:table-row>
        <table:table-row table:style-name="ro1">
          <table:table-cell office:value-type="float" office:value="774.494290097528" calcext:value-type="float">
            <text:p>774,494290097528</text:p>
          </table:table-cell>
          <table:table-cell table:number-columns-repeated="3"/>
          <table:table-cell office:value-type="float" office:value="96.5869888099274" calcext:value-type="float">
            <text:p>96,5869888099274</text:p>
          </table:table-cell>
          <table:table-cell table:number-columns-repeated="15"/>
        </table:table-row>
        <table:table-row table:style-name="ro1">
          <table:table-cell office:value-type="float" office:value="811.500371084381" calcext:value-type="float">
            <text:p>811,500371084381</text:p>
          </table:table-cell>
          <table:table-cell table:number-columns-repeated="3"/>
          <table:table-cell office:value-type="float" office:value="96.7376233696654" calcext:value-type="float">
            <text:p>96,7376233696654</text:p>
          </table:table-cell>
          <table:table-cell table:number-columns-repeated="15"/>
        </table:table-row>
        <table:table-row table:style-name="ro1">
          <table:table-cell office:value-type="float" office:value="848.506282041425" calcext:value-type="float">
            <text:p>848,506282041425</text:p>
          </table:table-cell>
          <table:table-cell table:number-columns-repeated="3"/>
          <table:table-cell office:value-type="float" office:value="96.8878258991173" calcext:value-type="float">
            <text:p>96,8878258991173</text:p>
          </table:table-cell>
          <table:table-cell table:number-columns-repeated="15"/>
        </table:table-row>
        <table:table-row table:style-name="ro1">
          <table:table-cell office:value-type="float" office:value="885.512589734689" calcext:value-type="float">
            <text:p>885,512589734689</text:p>
          </table:table-cell>
          <table:table-cell table:number-columns-repeated="3"/>
          <table:table-cell office:value-type="float" office:value="97.0390364992366" calcext:value-type="float">
            <text:p>97,0390364992366</text:p>
          </table:table-cell>
          <table:table-cell table:number-columns-repeated="15"/>
        </table:table-row>
        <table:table-row table:style-name="ro1">
          <table:table-cell office:value-type="float" office:value="922.514306623124" calcext:value-type="float">
            <text:p>922,514306623124</text:p>
          </table:table-cell>
          <table:table-cell table:number-columns-repeated="3"/>
          <table:table-cell office:value-type="float" office:value="97.1785822816325" calcext:value-type="float">
            <text:p>97,1785822816325</text:p>
          </table:table-cell>
          <table:table-cell table:number-columns-repeated="15"/>
        </table:table-row>
        <table:table-row table:style-name="ro1">
          <table:table-cell office:value-type="float" office:value="956.438041900834" calcext:value-type="float">
            <text:p>956,438041900834</text:p>
          </table:table-cell>
          <table:table-cell table:number-columns-repeated="3"/>
          <table:table-cell office:value-type="float" office:value="97.3204610275731" calcext:value-type="float">
            <text:p>97,3204610275731</text:p>
          </table:table-cell>
          <table:table-cell table:number-columns-repeated="15"/>
        </table:table-row>
        <table:table-row table:style-name="ro1">
          <table:table-cell office:value-type="float" office:value="978.015096642788" calcext:value-type="float">
            <text:p>978,015096642788</text:p>
          </table:table-cell>
          <table:table-cell table:number-columns-repeated="3"/>
          <table:table-cell office:value-type="float" office:value="97.3833646372227" calcext:value-type="float">
            <text:p>97,3833646372227</text:p>
          </table:table-cell>
          <table:table-cell table:number-columns-repeated="15"/>
        </table:table-row>
        <table:table-row table:style-name="ro1">
          <table:table-cell office:value-type="float" office:value="1008.84787703539" calcext:value-type="float">
            <text:p>1008,84787703539</text:p>
          </table:table-cell>
          <table:table-cell table:number-columns-repeated="3"/>
          <table:table-cell office:value-type="float" office:value="97.494612435882" calcext:value-type="float">
            <text:p>97,494612435882</text:p>
          </table:table-cell>
          <table:table-cell table:number-columns-repeated="15"/>
        </table:table-row>
        <table:table-row table:style-name="ro1">
          <table:table-cell office:value-type="float" office:value="1098.15630443381" calcext:value-type="float">
            <text:p>1098,15630443381</text:p>
          </table:table-cell>
          <table:table-cell table:number-columns-repeated="3"/>
          <table:table-cell office:value-type="float" office:value="97.5462793305461" calcext:value-type="float">
            <text:p>97,5462793305461</text:p>
          </table:table-cell>
          <table:table-cell table:number-columns-repeated="15"/>
        </table:table-row>
        <table:table-row table:style-name="ro1">
          <table:table-cell office:value-type="float" office:value="1193.62139526736" calcext:value-type="float">
            <text:p>1193,62139526736</text:p>
          </table:table-cell>
          <table:table-cell table:number-columns-repeated="3"/>
          <table:table-cell office:value-type="float" office:value="97.5950594773898" calcext:value-type="float">
            <text:p>97,5950594773898</text:p>
          </table:table-cell>
          <table:table-cell table:number-columns-repeated="15"/>
        </table:table-row>
        <table:table-row table:style-name="ro1">
          <table:table-cell office:value-type="float" office:value="1292.16495925235" calcext:value-type="float">
            <text:p>1292,16495925235</text:p>
          </table:table-cell>
          <table:table-cell table:number-columns-repeated="3"/>
          <table:table-cell office:value-type="float" office:value="97.6427556209703" calcext:value-type="float">
            <text:p>97,6427556209703</text:p>
          </table:table-cell>
          <table:table-cell table:number-columns-repeated="15"/>
        </table:table-row>
        <table:table-row table:style-name="ro1">
          <table:table-cell office:value-type="float" office:value="1384.55092772973" calcext:value-type="float">
            <text:p>1384,55092772973</text:p>
          </table:table-cell>
          <table:table-cell table:number-columns-repeated="3"/>
          <table:table-cell office:value-type="float" office:value="97.6909702008941" calcext:value-type="float">
            <text:p>97,6909702008941</text:p>
          </table:table-cell>
          <table:table-cell table:number-columns-repeated="15"/>
        </table:table-row>
        <table:table-row table:style-name="ro1">
          <table:table-cell office:value-type="float" office:value="1483.09428767895" calcext:value-type="float">
            <text:p>1483,09428767895</text:p>
          </table:table-cell>
          <table:table-cell table:number-columns-repeated="3"/>
          <table:table-cell office:value-type="float" office:value="97.7381479081313" calcext:value-type="float">
            <text:p>97,7381479081313</text:p>
          </table:table-cell>
          <table:table-cell table:number-columns-repeated="15"/>
        </table:table-row>
        <table:table-row table:style-name="ro1">
          <table:table-cell office:value-type="float" office:value="1501.96739238284" calcext:value-type="float">
            <text:p>1501,96739238284</text:p>
          </table:table-cell>
          <table:table-cell table:number-columns-repeated="3"/>
          <table:table-cell office:value-type="float" office:value="97.7537647045901" calcext:value-type="float">
            <text:p>97,7537647045901</text:p>
          </table:table-cell>
          <table:table-cell table:number-columns-repeated="15"/>
        </table:table-row>
        <table:table-row table:style-name="ro1">
          <table:table-cell office:value-type="float" office:value="1569.70318736006" calcext:value-type="float">
            <text:p>1569,70318736006</text:p>
          </table:table-cell>
          <table:table-cell table:number-columns-repeated="3"/>
          <table:table-cell office:value-type="float" office:value="97.7537647045901" calcext:value-type="float">
            <text:p>97,7537647045901</text:p>
          </table:table-cell>
          <table:table-cell table:number-columns-repeated="15"/>
        </table:table-row>
        <table:table-row table:style-name="ro1">
          <table:table-cell office:value-type="float" office:value="1575.48066422787" calcext:value-type="float">
            <text:p>1575,48066422787</text:p>
          </table:table-cell>
          <table:table-cell table:number-columns-repeated="3"/>
          <table:table-cell office:value-type="float" office:value="97.7873993607416" calcext:value-type="float">
            <text:p>97,7873993607416</text:p>
          </table:table-cell>
          <table:table-cell table:number-columns-repeated="15"/>
        </table:table-row>
        <table:table-row table:style-name="ro1">
          <table:table-cell office:value-type="float" office:value="1674.02443224863" calcext:value-type="float">
            <text:p>1674,02443224863</text:p>
          </table:table-cell>
          <table:table-cell table:number-columns-repeated="3"/>
          <table:table-cell office:value-type="float" office:value="97.8356139406654" calcext:value-type="float">
            <text:p>97,8356139406654</text:p>
          </table:table-cell>
          <table:table-cell table:number-columns-repeated="15"/>
        </table:table-row>
        <table:table-row table:style-name="ro1">
          <table:table-cell office:value-type="float" office:value="1769.48926340028" calcext:value-type="float">
            <text:p>1769,48926340028</text:p>
          </table:table-cell>
          <table:table-cell table:number-columns-repeated="3"/>
          <table:table-cell office:value-type="float" office:value="97.8837342594359" calcext:value-type="float">
            <text:p>97,8837342594359</text:p>
          </table:table-cell>
          <table:table-cell table:number-columns-repeated="15"/>
        </table:table-row>
        <table:table-row table:style-name="ro1">
          <table:table-cell office:value-type="float" office:value="1864.95396471099" calcext:value-type="float">
            <text:p>1864,95396471099</text:p>
          </table:table-cell>
          <table:table-cell table:number-columns-repeated="3"/>
          <table:table-cell office:value-type="float" office:value="97.9315246641697" calcext:value-type="float">
            <text:p>97,9315246641697</text:p>
          </table:table-cell>
          <table:table-cell table:number-columns-repeated="15"/>
        </table:table-row>
        <table:table-row table:style-name="ro1">
          <table:table-cell office:value-type="float" office:value="1960.41925958031" calcext:value-type="float">
            <text:p>1960,41925958031</text:p>
          </table:table-cell>
          <table:table-cell table:number-columns-repeated="3"/>
          <table:table-cell office:value-type="float" office:value="97.9808232473567" calcext:value-type="float">
            <text:p>97,9808232473567</text:p>
          </table:table-cell>
          <table:table-cell table:number-columns-repeated="15"/>
        </table:table-row>
        <table:table-row table:style-name="ro1">
          <table:table-cell office:value-type="float" office:value="2055.88349717336" calcext:value-type="float">
            <text:p>2055,88349717336</text:p>
          </table:table-cell>
          <table:table-cell table:number-columns-repeated="3"/>
          <table:table-cell office:value-type="float" office:value="98.027435387674" calcext:value-type="float">
            <text:p>98,027435387674</text:p>
          </table:table-cell>
          <table:table-cell table:number-columns-repeated="15"/>
        </table:table-row>
        <table:table-row table:style-name="ro1">
          <table:table-cell office:value-type="float" office:value="2154.42726519412" calcext:value-type="float">
            <text:p>2154,42726519412</text:p>
          </table:table-cell>
          <table:table-cell table:number-columns-repeated="3"/>
          <table:table-cell office:value-type="float" office:value="98.0756499675977" calcext:value-type="float">
            <text:p>98,0756499675977</text:p>
          </table:table-cell>
          <table:table-cell table:number-columns-repeated="15"/>
        </table:table-row>
        <table:table-row table:style-name="ro1">
          <table:table-cell office:value-type="float" office:value="2249.89241167379" calcext:value-type="float">
            <text:p>2249,89241167379</text:p>
          </table:table-cell>
          <table:table-cell table:number-columns-repeated="3"/>
          <table:table-cell office:value-type="float" office:value="98.1245715061714" calcext:value-type="float">
            <text:p>98,1245715061714</text:p>
          </table:table-cell>
          <table:table-cell table:number-columns-repeated="15"/>
        </table:table-row>
        <table:table-row table:style-name="ro1">
          <table:table-cell office:value-type="float" office:value="2345.35720572803" calcext:value-type="float">
            <text:p>2345,35720572803</text:p>
          </table:table-cell>
          <table:table-cell table:number-columns-repeated="3"/>
          <table:table-cell office:value-type="float" office:value="98.1725975637885" calcext:value-type="float">
            <text:p>98,1725975637885</text:p>
          </table:table-cell>
          <table:table-cell table:number-columns-repeated="15"/>
        </table:table-row>
        <table:table-row table:style-name="ro1">
          <table:table-cell office:value-type="float" office:value="2440.82055298318" calcext:value-type="float">
            <text:p>2440,82055298318</text:p>
          </table:table-cell>
          <table:table-cell table:number-columns-repeated="3"/>
          <table:table-cell office:value-type="float" office:value="98.2169474364262" calcext:value-type="float">
            <text:p>98,2169474364262</text:p>
          </table:table-cell>
          <table:table-cell table:number-columns-repeated="15"/>
        </table:table-row>
        <table:table-row table:style-name="ro1">
          <table:table-cell office:value-type="float" office:value="2536.26776286378" calcext:value-type="float">
            <text:p>2536,26776286378</text:p>
          </table:table-cell>
          <table:table-cell table:number-columns-repeated="3"/>
          <table:table-cell office:value-type="float" office:value="98.2202937073691" calcext:value-type="float">
            <text:p>98,2202937073691</text:p>
          </table:table-cell>
          <table:table-cell table:number-columns-repeated="15"/>
        </table:table-row>
        <table:table-row table:style-name="ro1">
          <table:table-cell office:value-type="float" office:value="2622.44675917716" calcext:value-type="float">
            <text:p>2622,44675917716</text:p>
          </table:table-cell>
          <table:table-cell table:number-columns-repeated="3"/>
          <table:table-cell office:value-type="float" office:value="98.1435651285656" calcext:value-type="float">
            <text:p>98,1435651285656</text:p>
          </table:table-cell>
          <table:table-cell table:number-columns-repeated="15"/>
        </table:table-row>
        <table:table-row table:style-name="ro1">
          <table:table-cell office:value-type="float" office:value="2711.70363508339" calcext:value-type="float">
            <text:p>2711,70363508339</text:p>
          </table:table-cell>
          <table:table-cell table:number-columns-repeated="3"/>
          <table:table-cell office:value-type="float" office:value="98.0642443680459" calcext:value-type="float">
            <text:p>98,0642443680459</text:p>
          </table:table-cell>
          <table:table-cell table:number-columns-repeated="15"/>
        </table:table-row>
        <table:table-row table:style-name="ro1">
          <table:table-cell office:value-type="float" office:value="2800.96010291807" calcext:value-type="float">
            <text:p>2800,96010291807</text:p>
          </table:table-cell>
          <table:table-cell table:number-columns-repeated="3"/>
          <table:table-cell office:value-type="float" office:value="97.9838867348396" calcext:value-type="float">
            <text:p>97,9838867348396</text:p>
          </table:table-cell>
          <table:table-cell table:number-columns-repeated="15"/>
        </table:table-row>
        <table:table-row table:style-name="ro1">
          <table:table-cell office:value-type="float" office:value="2887.13828308838" calcext:value-type="float">
            <text:p>2887,13828308838</text:p>
          </table:table-cell>
          <table:table-cell table:number-columns-repeated="3"/>
          <table:table-cell office:value-type="float" office:value="97.9050844106631" calcext:value-type="float">
            <text:p>97,9050844106631</text:p>
          </table:table-cell>
          <table:table-cell table:number-columns-repeated="15"/>
        </table:table-row>
        <table:table-row table:style-name="ro1">
          <table:table-cell office:value-type="float" office:value="2976.39497350754" calcext:value-type="float">
            <text:p>2976,39497350754</text:p>
          </table:table-cell>
          <table:table-cell table:number-columns-repeated="3"/>
          <table:table-cell office:value-type="float" office:value="97.8252923443767" calcext:value-type="float">
            <text:p>97,8252923443767</text:p>
          </table:table-cell>
          <table:table-cell table:number-columns-repeated="15"/>
        </table:table-row>
        <table:table-row table:style-name="ro1">
          <table:table-cell office:value-type="float" office:value="3065.65162682929" calcext:value-type="float">
            <text:p>3065,65162682929</text:p>
          </table:table-cell>
          <table:table-cell table:number-columns-repeated="3"/>
          <table:table-cell office:value-type="float" office:value="97.7454060169371" calcext:value-type="float">
            <text:p>97,7454060169371</text:p>
          </table:table-cell>
          <table:table-cell table:number-columns-repeated="15"/>
        </table:table-row>
        <table:table-row table:style-name="ro1">
          <table:table-cell office:value-type="float" office:value="3151.82960296383" calcext:value-type="float">
            <text:p>3151,82960296383</text:p>
          </table:table-cell>
          <table:table-cell table:number-columns-repeated="3"/>
          <table:table-cell office:value-type="float" office:value="97.6660852564173" calcext:value-type="float">
            <text:p>97,6660852564173</text:p>
          </table:table-cell>
          <table:table-cell table:number-columns-repeated="15"/>
        </table:table-row>
        <table:table-row table:style-name="ro1">
          <table:table-cell office:value-type="float" office:value="3238.00778313413" calcext:value-type="float">
            <text:p>3238,00778313413</text:p>
          </table:table-cell>
          <table:table-cell table:number-columns-repeated="3"/>
          <table:table-cell office:value-type="float" office:value="97.5872829322408" calcext:value-type="float">
            <text:p>97,5872829322408</text:p>
          </table:table-cell>
          <table:table-cell table:number-columns-repeated="15"/>
        </table:table-row>
        <table:table-row table:style-name="ro1">
          <table:table-cell office:value-type="float" office:value="3330.34315074051" calcext:value-type="float">
            <text:p>3330,34315074051</text:p>
          </table:table-cell>
          <table:table-cell table:number-columns-repeated="3"/>
          <table:table-cell office:value-type="float" office:value="97.5069252990345" calcext:value-type="float">
            <text:p>97,5069252990345</text:p>
          </table:table-cell>
          <table:table-cell table:number-columns-repeated="15"/>
        </table:table-row>
        <table:table-row table:style-name="ro1">
          <table:table-cell office:value-type="float" office:value="3416.52092283927" calcext:value-type="float">
            <text:p>3416,52092283927</text:p>
          </table:table-cell>
          <table:table-cell table:number-columns-repeated="3"/>
          <table:table-cell office:value-type="float" office:value="97.4270861021715" calcext:value-type="float">
            <text:p>97,4270861021715</text:p>
          </table:table-cell>
          <table:table-cell table:number-columns-repeated="15"/>
        </table:table-row>
        <table:table-row table:style-name="ro1">
          <table:table-cell office:value-type="float" office:value="3502.69930704535" calcext:value-type="float">
            <text:p>3502,69930704535</text:p>
          </table:table-cell>
          <table:table-cell table:number-columns-repeated="3"/>
          <table:table-cell office:value-type="float" office:value="97.3488022143383" calcext:value-type="float">
            <text:p>97,3488022143383</text:p>
          </table:table-cell>
          <table:table-cell table:number-columns-repeated="15"/>
        </table:table-row>
        <table:table-row table:style-name="ro1">
          <table:table-cell office:value-type="float" office:value="3595.03426658019" calcext:value-type="float">
            <text:p>3595,03426658019</text:p>
          </table:table-cell>
          <table:table-cell table:number-columns-repeated="3"/>
          <table:table-cell office:value-type="float" office:value="97.2674077084455" calcext:value-type="float">
            <text:p>97,2674077084455</text:p>
          </table:table-cell>
          <table:table-cell table:number-columns-repeated="15"/>
        </table:table-row>
        <table:table-row table:style-name="ro1">
          <table:table-cell office:value-type="float" office:value="3681.21244675049" calcext:value-type="float">
            <text:p>3681,21244675049</text:p>
          </table:table-cell>
          <table:table-cell table:number-columns-repeated="3"/>
          <table:table-cell office:value-type="float" office:value="97.188605384269" calcext:value-type="float">
            <text:p>97,188605384269</text:p>
          </table:table-cell>
          <table:table-cell table:number-columns-repeated="15"/>
        </table:table-row>
        <table:table-row table:style-name="ro1">
          <table:table-cell office:value-type="float" office:value="3767.39042288503" calcext:value-type="float">
            <text:p>3767,39042288503</text:p>
          </table:table-cell>
          <table:table-cell table:number-columns-repeated="3"/>
          <table:table-cell office:value-type="float" office:value="97.1092846237492" calcext:value-type="float">
            <text:p>97,1092846237492</text:p>
          </table:table-cell>
          <table:table-cell table:number-columns-repeated="15"/>
        </table:table-row>
        <table:table-row table:style-name="ro1">
          <table:table-cell office:value-type="float" office:value="3859.72579049141" calcext:value-type="float">
            <text:p>3859,72579049141</text:p>
          </table:table-cell>
          <table:table-cell table:number-columns-repeated="3"/>
          <table:table-cell office:value-type="float" office:value="97.0289269905429" calcext:value-type="float">
            <text:p>97,0289269905429</text:p>
          </table:table-cell>
          <table:table-cell table:number-columns-repeated="15"/>
        </table:table-row>
        <table:table-row table:style-name="ro1">
          <table:table-cell office:value-type="float" office:value="3945.90356259017" calcext:value-type="float">
            <text:p>3945,90356259017</text:p>
          </table:table-cell>
          <table:table-cell table:number-columns-repeated="3"/>
          <table:table-cell office:value-type="float" office:value="96.9490877936799" calcext:value-type="float">
            <text:p>96,9490877936799</text:p>
          </table:table-cell>
          <table:table-cell table:number-columns-repeated="15"/>
        </table:table-row>
        <table:table-row table:style-name="ro1">
          <table:table-cell office:value-type="float" office:value="4032.08174276048" calcext:value-type="float">
            <text:p>4032,08174276048</text:p>
          </table:table-cell>
          <table:table-cell table:number-columns-repeated="3"/>
          <table:table-cell office:value-type="float" office:value="96.8702854695034" calcext:value-type="float">
            <text:p>96,8702854695034</text:p>
          </table:table-cell>
          <table:table-cell table:number-columns-repeated="15"/>
        </table:table-row>
        <table:table-row table:style-name="ro1">
          <table:table-cell office:value-type="float" office:value="4124.41690633108" calcext:value-type="float">
            <text:p>4124,41690633108</text:p>
          </table:table-cell>
          <table:table-cell table:number-columns-repeated="3"/>
          <table:table-cell office:value-type="float" office:value="96.7894093999539" calcext:value-type="float">
            <text:p>96,7894093999539</text:p>
          </table:table-cell>
          <table:table-cell table:number-columns-repeated="15"/>
        </table:table-row>
        <table:table-row table:style-name="ro1">
          <table:table-cell office:value-type="float" office:value="4210.59488246562" calcext:value-type="float">
            <text:p>4210,59488246562</text:p>
          </table:table-cell>
          <table:table-cell table:number-columns-repeated="3"/>
          <table:table-cell office:value-type="float" office:value="96.7100886394341" calcext:value-type="float">
            <text:p>96,7100886394341</text:p>
          </table:table-cell>
          <table:table-cell table:number-columns-repeated="15"/>
        </table:table-row>
        <table:table-row table:style-name="ro1">
          <table:table-cell office:value-type="float" office:value="4296.77306263592" calcext:value-type="float">
            <text:p>4296,77306263592</text:p>
          </table:table-cell>
          <table:table-cell table:number-columns-repeated="3"/>
          <table:table-cell office:value-type="float" office:value="96.6312863152576" calcext:value-type="float">
            <text:p>96,6312863152576</text:p>
          </table:table-cell>
          <table:table-cell table:number-columns-repeated="15"/>
        </table:table-row>
        <table:table-row table:style-name="ro1">
          <table:table-cell office:value-type="float" office:value="4386.02969740897" calcext:value-type="float">
            <text:p>4386,02969740897</text:p>
          </table:table-cell>
          <table:table-cell table:number-columns-repeated="3"/>
          <table:table-cell office:value-type="float" office:value="96.5513528572413" calcext:value-type="float">
            <text:p>96,5513528572413</text:p>
          </table:table-cell>
          <table:table-cell table:number-columns-repeated="15"/>
        </table:table-row>
        <table:table-row table:style-name="ro1">
          <table:table-cell office:value-type="float" office:value="4475.28620234107" calcext:value-type="float">
            <text:p>4475,28620234107</text:p>
          </table:table-cell>
          <table:table-cell table:number-columns-repeated="3"/>
          <table:table-cell office:value-type="float" office:value="96.4710894851883" calcext:value-type="float">
            <text:p>96,4710894851883</text:p>
          </table:table-cell>
          <table:table-cell table:number-columns-repeated="15"/>
        </table:table-row>
        <table:table-row table:style-name="ro1">
          <table:table-cell office:value-type="float" office:value="4561.46458654714" calcext:value-type="float">
            <text:p>4561,46458654714</text:p>
          </table:table-cell>
          <table:table-cell table:number-columns-repeated="3"/>
          <table:table-cell office:value-type="float" office:value="96.3928055973551" calcext:value-type="float">
            <text:p>96,3928055973551</text:p>
          </table:table-cell>
          <table:table-cell table:number-columns-repeated="15"/>
        </table:table-row>
        <table:table-row table:style-name="ro1">
          <table:table-cell office:value-type="float" office:value="4650.72103583312" calcext:value-type="float">
            <text:p>4650,72103583312</text:p>
          </table:table-cell>
          <table:table-cell table:number-columns-repeated="3"/>
          <table:table-cell office:value-type="float" office:value="96.3124008335722" calcext:value-type="float">
            <text:p>96,3124008335722</text:p>
          </table:table-cell>
          <table:table-cell table:number-columns-repeated="15"/>
        </table:table-row>
        <table:table-row table:style-name="ro1">
          <table:table-cell office:value-type="float" office:value="4739.97772625228" calcext:value-type="float">
            <text:p>4739,97772625228</text:p>
          </table:table-cell>
          <table:table-cell table:number-columns-repeated="3"/>
          <table:table-cell office:value-type="float" office:value="96.2326087672858" calcext:value-type="float">
            <text:p>96,2326087672858</text:p>
          </table:table-cell>
          <table:table-cell table:number-columns-repeated="15"/>
        </table:table-row>
        <table:table-row table:style-name="ro1">
          <table:table-cell office:value-type="float" office:value="4826.15590642259" calcext:value-type="float">
            <text:p>4826,15590642259</text:p>
          </table:table-cell>
          <table:table-cell table:number-columns-repeated="3"/>
          <table:table-cell office:value-type="float" office:value="96.1538064431093" calcext:value-type="float">
            <text:p>96,1538064431093</text:p>
          </table:table-cell>
          <table:table-cell table:number-columns-repeated="15"/>
        </table:table-row>
        <table:table-row table:style-name="ro1">
          <table:table-cell office:value-type="float" office:value="4915.41255974434" calcext:value-type="float">
            <text:p>4915,41255974434</text:p>
          </table:table-cell>
          <table:table-cell table:number-columns-repeated="3"/>
          <table:table-cell office:value-type="float" office:value="96.0739201156696" calcext:value-type="float">
            <text:p>96,0739201156696</text:p>
          </table:table-cell>
          <table:table-cell table:number-columns-repeated="15"/>
        </table:table-row>
        <table:table-row table:style-name="ro1">
          <table:table-cell office:value-type="float" office:value="4989.2798521993" calcext:value-type="float">
            <text:p>4989,2798521993</text:p>
          </table:table-cell>
          <table:table-cell table:number-columns-repeated="3"/>
          <table:table-cell office:value-type="float" office:value="96.0070889579649" calcext:value-type="float">
            <text:p>96,0070889579649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 table:number-columns-spanned="5" table:number-rows-spanned="1">
            <text:p>OCP_min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 office:value-type="float" office:value="500.634101465262" calcext:value-type="float">
            <text:p>500,63410146526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565.290690617134" calcext:value-type="float">
            <text:p>565,290690617134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633.026485594352" calcext:value-type="float">
            <text:p>633,02648559435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700.762790660996" calcext:value-type="float">
            <text:p>700,762790660996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768.498075548789" calcext:value-type="float">
            <text:p>768,498075548789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846.702435803415" calcext:value-type="float">
            <text:p>846,70243580341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914.437822709093" calcext:value-type="float">
            <text:p>914,437822709093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982.481609681366" calcext:value-type="float">
            <text:p>982,481609681366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050.21791474801" calcext:value-type="float">
            <text:p>1050,21791474801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117.95370972523" calcext:value-type="float">
            <text:p>1117,95370972523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185.68899461302" calcext:value-type="float">
            <text:p>1185,6889946130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260.50615704725" calcext:value-type="float">
            <text:p>1260,5061570472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328.24195202447" calcext:value-type="float">
            <text:p>1328,24195202447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395.97815507322" calcext:value-type="float">
            <text:p>1395,9781550732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472.34085446044" calcext:value-type="float">
            <text:p>1472,34085446044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33658179343" calcext:value-type="float">
            <text:p>1501,33658179343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38146966287" calcext:value-type="float">
            <text:p>1501,38146966287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43599255478" calcext:value-type="float">
            <text:p>1501,43599255478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49691990282" calcext:value-type="float">
            <text:p>1501,4969199028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54180777225" calcext:value-type="float">
            <text:p>1501,5418077722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58669564168" calcext:value-type="float">
            <text:p>1501,58669564168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63158351112" calcext:value-type="float">
            <text:p>1501,6315835111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67647138055" calcext:value-type="float">
            <text:p>1501,6764713805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72458981635" calcext:value-type="float">
            <text:p>1501,7245898163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76947768579" calcext:value-type="float">
            <text:p>1501,76947768579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8.47046579061" calcext:value-type="float">
            <text:p>1508,47046579061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579.97353188676" calcext:value-type="float">
            <text:p>1579,9735318867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647.70973493551" calcext:value-type="float">
            <text:p>1647,70973493551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715.75301181836" calcext:value-type="float">
            <text:p>1715,7530118183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752.90078431227" calcext:value-type="float">
            <text:p>1752,9007843122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783.48880679558" calcext:value-type="float">
            <text:p>1783,4888067955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826.79437883287" calcext:value-type="float">
            <text:p>1826,7943788328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858.30607124769" calcext:value-type="float">
            <text:p>1858,30607124769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900.68797335347" calcext:value-type="float">
            <text:p>1900,6879733534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929.73654595094" calcext:value-type="float">
            <text:p>1929,73654595094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997.47336110701" calcext:value-type="float">
            <text:p>1997,47336110701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065.20813590538" calcext:value-type="float">
            <text:p>2065,2081359053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136.63861060862" calcext:value-type="float">
            <text:p>2136,6386106086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211.45587506073" calcext:value-type="float">
            <text:p>2211,4558750607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279.1926902168" calcext:value-type="float">
            <text:p>2279,192690216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346.92746501517" calcext:value-type="float">
            <text:p>2346,9274650151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414.97114996956" calcext:value-type="float">
            <text:p>2414,9711499695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493.17520417053" calcext:value-type="float">
            <text:p>2493,1752041705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571.3792583715" calcext:value-type="float">
            <text:p>2571,379258371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639.11546142026" calcext:value-type="float">
            <text:p>2639,1154614202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707.15873830311" calcext:value-type="float">
            <text:p>2707,15873830311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774.89453328033" calcext:value-type="float">
            <text:p>2774,8945332803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849.71179773244" calcext:value-type="float">
            <text:p>2849,71179773244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921.14227243568" calcext:value-type="float">
            <text:p>2921,1422724356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988.87908759175" calcext:value-type="float">
            <text:p>2988,8790875917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056.61386239012" calcext:value-type="float">
            <text:p>3056,6138623901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128.04433709337" calcext:value-type="float">
            <text:p>3128,0443370933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202.86160154548" calcext:value-type="float">
            <text:p>3202,8616015454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270.59841670155" calcext:value-type="float">
            <text:p>3270,5984167015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338.33319149992" calcext:value-type="float">
            <text:p>3338,3331914999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406.3768764543" calcext:value-type="float">
            <text:p>3406,376876454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484.58093065527" calcext:value-type="float">
            <text:p>3484,5809306552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562.78498485625" calcext:value-type="float">
            <text:p>3562,7849848562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630.521187905" calcext:value-type="float">
            <text:p>3630,52118790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698.56446478785" calcext:value-type="float">
            <text:p>3698,5644647878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766.30025976507" calcext:value-type="float">
            <text:p>3766,3002597650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841.11752421718" calcext:value-type="float">
            <text:p>3841,1175242171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912.54799892043" calcext:value-type="float">
            <text:p>3912,5479989204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980.2848140765" calcext:value-type="float">
            <text:p>3980,284814076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048.01958887487" calcext:value-type="float">
            <text:p>4048,0195888748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119.45006357812" calcext:value-type="float">
            <text:p>4119,4500635781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194.26732803022" calcext:value-type="float">
            <text:p>4194,2673280302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262.00414318629" calcext:value-type="float">
            <text:p>4262,00414318629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329.73891798466" calcext:value-type="float">
            <text:p>4329,7389179846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397.78260293905" calcext:value-type="float">
            <text:p>4397,7826029390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475.98665714002" calcext:value-type="float">
            <text:p>4475,9866571400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554.19071134099" calcext:value-type="float">
            <text:p>4554,19071134099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621.92691438975" calcext:value-type="float">
            <text:p>4621,9269143897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689.9701912726" calcext:value-type="float">
            <text:p>4689,970191272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757.70598624982" calcext:value-type="float">
            <text:p>4757,7059862498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832.52325070193" calcext:value-type="float">
            <text:p>4832,5232507019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903.95372540517" calcext:value-type="float">
            <text:p>4903,9537254051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971.69054056124" calcext:value-type="float">
            <text:p>4971,69054056124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5011.71521741439" calcext:value-type="float">
            <text:p>5011,71521741439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 table:number-columns-spanned="5" table:number-rows-spanned="1">
            <text:p>OCP_peak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 office:value-type="float" office:value="1501.96739238284" calcext:value-type="float">
            <text:p>1501,9673923828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1569.70318736006" calcext:value-type="float">
            <text:p>1569,7031873600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1647.90724156103" calcext:value-type="float">
            <text:p>1647,9072415610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1715.64262846671" calcext:value-type="float">
            <text:p>1715,64262846671</text:p>
          </table:table-cell>
          <table:table-cell table:number-columns-repeated="3"/>
          <table:table-cell office:value-type="float" office:value="98.7527278319036" calcext:value-type="float">
            <text:p>98,7527278319036</text:p>
          </table:table-cell>
          <table:table-cell table:number-columns-repeated="15"/>
        </table:table-row>
        <table:table-row table:style-name="ro1">
          <table:table-cell office:value-type="float" office:value="1783.68672149263" calcext:value-type="float">
            <text:p>1783,6867214926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1851.42200638043" calcext:value-type="float">
            <text:p>1851,42200638043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15"/>
        </table:table-row>
        <table:table-row table:style-name="ro1">
          <table:table-cell office:value-type="float" office:value="1919.15780135765" calcext:value-type="float">
            <text:p>1919,15780135765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15"/>
        </table:table-row>
        <table:table-row table:style-name="ro1">
          <table:table-cell office:value-type="float" office:value="1993.97516782764" calcext:value-type="float">
            <text:p>1993,97516782764</text:p>
          </table:table-cell>
          <table:table-cell table:number-columns-repeated="3"/>
          <table:table-cell office:value-type="float" office:value="98.7527278319036" calcext:value-type="float">
            <text:p>98,7527278319036</text:p>
          </table:table-cell>
          <table:table-cell table:number-columns-repeated="15"/>
        </table:table-row>
        <table:table-row table:style-name="ro1">
          <table:table-cell office:value-type="float" office:value="2061.7113708764" calcext:value-type="float">
            <text:p>2061,711370876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129.44716585362" calcext:value-type="float">
            <text:p>2129,44716585362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200.87764055687" calcext:value-type="float">
            <text:p>2200,8776405568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268.61343553409" calcext:value-type="float">
            <text:p>2268,61343553409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340.04391023733" calcext:value-type="float">
            <text:p>2340,0439102373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407.77970521455" calcext:value-type="float">
            <text:p>2407,77970521455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475.51550019177" calcext:value-type="float">
            <text:p>2475,5155001917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550.33276464388" calcext:value-type="float">
            <text:p>2550,3327646438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618.0685596211" calcext:value-type="float">
            <text:p>2618,068559621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685.80435459832" calcext:value-type="float">
            <text:p>2685,80435459832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753.84803955271" calcext:value-type="float">
            <text:p>2753,8480395527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821.58383452993" calcext:value-type="float">
            <text:p>2821,5838345299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899.7878887309" calcext:value-type="float">
            <text:p>2899,7878887309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967.52317361869" calcext:value-type="float">
            <text:p>2967,52317361869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15"/>
        </table:table-row>
        <table:table-row table:style-name="ro1">
          <table:table-cell office:value-type="float" office:value="3045.72773790908" calcext:value-type="float">
            <text:p>3045,7277379090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113.4635328863" calcext:value-type="float">
            <text:p>3113,463532886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181.19932786352" calcext:value-type="float">
            <text:p>3181,19932786352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249.24301281791" calcext:value-type="float">
            <text:p>3249,2430128179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316.97880779513" calcext:value-type="float">
            <text:p>3316,9788077951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391.79607224724" calcext:value-type="float">
            <text:p>3391,7960722472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459.53186722446" calcext:value-type="float">
            <text:p>3459,5318672244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527.26766220167" calcext:value-type="float">
            <text:p>3527,2676622016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598.6976268155" calcext:value-type="float">
            <text:p>3598,6976268155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15"/>
        </table:table-row>
        <table:table-row table:style-name="ro1">
          <table:table-cell office:value-type="float" office:value="3666.43393188214" calcext:value-type="float">
            <text:p>3666,4339318821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734.16972685936" calcext:value-type="float">
            <text:p>3734,1697268593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805.60020156261" calcext:value-type="float">
            <text:p>3805,6002015626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873.33599653983" calcext:value-type="float">
            <text:p>3873,3359965398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948.15326099194" calcext:value-type="float">
            <text:p>3948,1532609919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015.88854587973" calcext:value-type="float">
            <text:p>4015,88854587973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15"/>
        </table:table-row>
        <table:table-row table:style-name="ro1">
          <table:table-cell office:value-type="float" office:value="4083.62485094638" calcext:value-type="float">
            <text:p>4083,6248509463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151.66853590076" calcext:value-type="float">
            <text:p>4151,6685359007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219.40433087798" calcext:value-type="float">
            <text:p>4219,4043308779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287.1401258552" calcext:value-type="float">
            <text:p>4287,1401258552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365.34418005617" calcext:value-type="float">
            <text:p>4365,3441800561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443.54823425714" calcext:value-type="float">
            <text:p>4443,5482342571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511.28402923436" calcext:value-type="float">
            <text:p>4511,2840292343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579.01982421158" calcext:value-type="float">
            <text:p>4579,0198242115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647.06350916597" calcext:value-type="float">
            <text:p>4647,0635091659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714.79879405376" calcext:value-type="float">
            <text:p>4714,79879405376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15"/>
        </table:table-row>
        <table:table-row table:style-name="ro1">
          <table:table-cell office:value-type="float" office:value="4782.5350991204" calcext:value-type="float">
            <text:p>4782,535099120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857.35236357251" calcext:value-type="float">
            <text:p>4857,3523635725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925.08815854973" calcext:value-type="float">
            <text:p>4925,0881585497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968.80853530776" calcext:value-type="float">
            <text:p>4968,8085353077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 table:number-columns-spanned="16" table:number-rows-spanned="1">
            <text:p>iTHD_EPC_50Hz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office:value-type="float" office:value="253.742348109824" calcext:value-type="float">
            <text:p>253,742348109824</text:p>
          </table:table-cell>
          <table:table-cell table:number-columns-repeated="14"/>
          <table:table-cell office:value-type="float" office:value="7.34857547476844" calcext:value-type="float">
            <text:p>7,34857547476844</text:p>
          </table:table-cell>
          <table:table-cell table:number-columns-repeated="4"/>
        </table:table-row>
        <table:table-row table:style-name="ro1">
          <table:table-cell office:value-type="float" office:value="296.768215528705" calcext:value-type="float">
            <text:p>296,768215528705</text:p>
          </table:table-cell>
          <table:table-cell table:number-columns-repeated="14"/>
          <table:table-cell office:value-type="float" office:value="6.70635164970489" calcext:value-type="float">
            <text:p>6,70635164970489</text:p>
          </table:table-cell>
          <table:table-cell table:number-columns-repeated="4"/>
        </table:table-row>
        <table:table-row table:style-name="ro1">
          <table:table-cell office:value-type="float" office:value="333.640993976667" calcext:value-type="float">
            <text:p>333,640993976667</text:p>
          </table:table-cell>
          <table:table-cell table:number-columns-repeated="14"/>
          <table:table-cell office:value-type="float" office:value="6.11386232961259" calcext:value-type="float">
            <text:p>6,11386232961259</text:p>
          </table:table-cell>
          <table:table-cell table:number-columns-repeated="4"/>
        </table:table-row>
        <table:table-row table:style-name="ro1">
          <table:table-cell office:value-type="float" office:value="370.512426678231" calcext:value-type="float">
            <text:p>370,512426678231</text:p>
          </table:table-cell>
          <table:table-cell table:number-columns-repeated="14"/>
          <table:table-cell office:value-type="float" office:value="5.51272353039485" calcext:value-type="float">
            <text:p>5,51272353039485</text:p>
          </table:table-cell>
          <table:table-cell table:number-columns-repeated="4"/>
        </table:table-row>
        <table:table-row table:style-name="ro1">
          <table:table-cell office:value-type="float" office:value="407.382513633396" calcext:value-type="float">
            <text:p>407,382513633396</text:p>
          </table:table-cell>
          <table:table-cell table:number-columns-repeated="14"/>
          <table:table-cell office:value-type="float" office:value="4.90293525205168" calcext:value-type="float">
            <text:p>4,90293525205168</text:p>
          </table:table-cell>
          <table:table-cell table:number-columns-repeated="4"/>
        </table:table-row>
        <table:table-row table:style-name="ro1">
          <table:table-cell office:value-type="float" office:value="459.652098968123" calcext:value-type="float">
            <text:p>459,652098968123</text:p>
          </table:table-cell>
          <table:table-cell table:number-columns-repeated="14"/>
          <table:table-cell office:value-type="float" office:value="4.27663433174178" calcext:value-type="float">
            <text:p>4,27663433174178</text:p>
          </table:table-cell>
          <table:table-cell table:number-columns-repeated="4"/>
        </table:table-row>
        <table:table-row table:style-name="ro1">
          <table:table-cell office:value-type="float" office:value="527.347791758929" calcext:value-type="float">
            <text:p>527,347791758929</text:p>
          </table:table-cell>
          <table:table-cell table:number-columns-repeated="14"/>
          <table:table-cell office:value-type="float" office:value="3.8048445612635" calcext:value-type="float">
            <text:p>3,8048445612635</text:p>
          </table:table-cell>
          <table:table-cell table:number-columns-repeated="4"/>
        </table:table-row>
        <table:table-row table:style-name="ro1">
          <table:table-cell office:value-type="float" office:value="595.047888810675" calcext:value-type="float">
            <text:p>595,047888810675</text:p>
          </table:table-cell>
          <table:table-cell table:number-columns-repeated="14"/>
          <table:table-cell office:value-type="float" office:value="3.36136217701392" calcext:value-type="float">
            <text:p>3,36136217701392</text:p>
          </table:table-cell>
          <table:table-cell table:number-columns-repeated="4"/>
        </table:table-row>
        <table:table-row table:style-name="ro1">
          <table:table-cell office:value-type="float" office:value="662.761932688735" calcext:value-type="float">
            <text:p>662,761932688735</text:p>
          </table:table-cell>
          <table:table-cell table:number-columns-repeated="14"/>
          <table:table-cell office:value-type="float" office:value="3.00751984915522" calcext:value-type="float">
            <text:p>3,00751984915522</text:p>
          </table:table-cell>
          <table:table-cell table:number-columns-repeated="4"/>
        </table:table-row>
        <table:table-row table:style-name="ro1">
          <table:table-cell office:value-type="float" office:value="730.502402132439" calcext:value-type="float">
            <text:p>730,502402132439</text:p>
          </table:table-cell>
          <table:table-cell table:number-columns-repeated="14"/>
          <table:table-cell office:value-type="float" office:value="2.82352183866869" calcext:value-type="float">
            <text:p>2,82352183866869</text:p>
          </table:table-cell>
          <table:table-cell table:number-columns-repeated="4"/>
        </table:table-row>
        <table:table-row table:style-name="ro1">
          <table:table-cell office:value-type="float" office:value="798.243605619633" calcext:value-type="float">
            <text:p>798,243605619633</text:p>
          </table:table-cell>
          <table:table-cell table:number-columns-repeated="14"/>
          <table:table-cell office:value-type="float" office:value="2.64424172588694" calcext:value-type="float">
            <text:p>2,64424172588694</text:p>
          </table:table-cell>
          <table:table-cell table:number-columns-repeated="4"/>
        </table:table-row>
        <table:table-row table:style-name="ro1">
          <table:table-cell office:value-type="float" office:value="865.989580389513" calcext:value-type="float">
            <text:p>865,989580389513</text:p>
          </table:table-cell>
          <table:table-cell table:number-columns-repeated="14"/>
          <table:table-cell office:value-type="float" office:value="2.49562794818629" calcext:value-type="float">
            <text:p>2,49562794818629</text:p>
          </table:table-cell>
          <table:table-cell table:number-columns-repeated="4"/>
        </table:table-row>
        <table:table-row table:style-name="ro1">
          <table:table-cell office:value-type="float" office:value="933.743629637785" calcext:value-type="float">
            <text:p>933,743629637785</text:p>
          </table:table-cell>
          <table:table-cell table:number-columns-repeated="14"/>
          <table:table-cell office:value-type="float" office:value="2.39891104523824" calcext:value-type="float">
            <text:p>2,39891104523824</text:p>
          </table:table-cell>
          <table:table-cell table:number-columns-repeated="4"/>
        </table:table-row>
        <table:table-row table:style-name="ro1">
          <table:table-cell office:value-type="float" office:value="1001.49767888606" calcext:value-type="float">
            <text:p>1001,49767888606</text:p>
          </table:table-cell>
          <table:table-cell table:number-columns-repeated="14"/>
          <table:table-cell office:value-type="float" office:value="2.30219414229019" calcext:value-type="float">
            <text:p>2,30219414229019</text:p>
          </table:table-cell>
          <table:table-cell table:number-columns-repeated="4"/>
        </table:table-row>
        <table:table-row table:style-name="ro1">
          <table:table-cell office:value-type="float" office:value="1069.25282919956" calcext:value-type="float">
            <text:p>1069,25282919956</text:p>
          </table:table-cell>
          <table:table-cell table:number-columns-repeated="14"/>
          <table:table-cell office:value-type="float" office:value="2.21255408589932" calcext:value-type="float">
            <text:p>2,21255408589932</text:p>
          </table:table-cell>
          <table:table-cell table:number-columns-repeated="4"/>
        </table:table-row>
        <table:table-row table:style-name="ro1">
          <table:table-cell office:value-type="float" office:value="1137.01018164354" calcext:value-type="float">
            <text:p>1137,01018164354</text:p>
          </table:table-cell>
          <table:table-cell table:number-columns-repeated="14"/>
          <table:table-cell office:value-type="float" office:value="2.1370677226228" calcext:value-type="float">
            <text:p>2,1370677226228</text:p>
          </table:table-cell>
          <table:table-cell table:number-columns-repeated="4"/>
        </table:table-row>
        <table:table-row table:style-name="ro1">
          <table:table-cell office:value-type="float" office:value="1204.76716706577" calcext:value-type="float">
            <text:p>1204,76716706577</text:p>
          </table:table-cell>
          <table:table-cell table:number-columns-repeated="14"/>
          <table:table-cell office:value-type="float" office:value="2.05922241049388" calcext:value-type="float">
            <text:p>2,05922241049388</text:p>
          </table:table-cell>
          <table:table-cell table:number-columns-repeated="4"/>
        </table:table-row>
        <table:table-row table:style-name="ro1">
          <table:table-cell office:value-type="float" office:value="1272.52562057499" calcext:value-type="float">
            <text:p>1272,52562057499</text:p>
          </table:table-cell>
          <table:table-cell table:number-columns-repeated="14"/>
          <table:table-cell office:value-type="float" office:value="1.99081289377453" calcext:value-type="float">
            <text:p>1,99081289377453</text:p>
          </table:table-cell>
          <table:table-cell table:number-columns-repeated="4"/>
        </table:table-row>
        <table:table-row table:style-name="ro1">
          <table:table-cell office:value-type="float" office:value="1340.28701025816" calcext:value-type="float">
            <text:p>1340,28701025816</text:p>
          </table:table-cell>
          <table:table-cell table:number-columns-repeated="14"/>
          <table:table-cell office:value-type="float" office:value="1.94127496787431" calcext:value-type="float">
            <text:p>1,94127496787431</text:p>
          </table:table-cell>
          <table:table-cell table:number-columns-repeated="4"/>
        </table:table-row>
        <table:table-row table:style-name="ro1">
          <table:table-cell office:value-type="float" office:value="1408.0432616369" calcext:value-type="float">
            <text:p>1408,0432616369</text:p>
          </table:table-cell>
          <table:table-cell table:number-columns-repeated="14"/>
          <table:table-cell office:value-type="float" office:value="1.85871175804061" calcext:value-type="float">
            <text:p>1,85871175804061</text:p>
          </table:table-cell>
          <table:table-cell table:number-columns-repeated="4"/>
        </table:table-row>
        <table:table-row table:style-name="ro1">
          <table:table-cell office:value-type="float" office:value="1475.80465132007" calcext:value-type="float">
            <text:p>1475,80465132007</text:p>
          </table:table-cell>
          <table:table-cell table:number-columns-repeated="14"/>
          <table:table-cell office:value-type="float" office:value="1.8091738321404" calcext:value-type="float">
            <text:p>1,8091738321404</text:p>
          </table:table-cell>
          <table:table-cell table:number-columns-repeated="4"/>
        </table:table-row>
        <table:table-row table:style-name="ro1">
          <table:table-cell office:value-type="float" office:value="1543.56934419895" calcext:value-type="float">
            <text:p>1543,56934419895</text:p>
          </table:table-cell>
          <table:table-cell table:number-columns-repeated="14"/>
          <table:table-cell office:value-type="float" office:value="1.7808664459117" calcext:value-type="float">
            <text:p>1,7808664459117</text:p>
          </table:table-cell>
          <table:table-cell table:number-columns-repeated="4"/>
        </table:table-row>
        <table:table-row table:style-name="ro1">
          <table:table-cell office:value-type="float" office:value="1611.32853175166" calcext:value-type="float">
            <text:p>1611,32853175166</text:p>
          </table:table-cell>
          <table:table-cell table:number-columns-repeated="14"/>
          <table:table-cell office:value-type="float" office:value="1.71717482689713" calcext:value-type="float">
            <text:p>1,71717482689713</text:p>
          </table:table-cell>
          <table:table-cell table:number-columns-repeated="4"/>
        </table:table-row>
        <table:table-row table:style-name="ro1">
          <table:table-cell office:value-type="float" office:value="1685.25478568673" calcext:value-type="float">
            <text:p>1685,25478568673</text:p>
          </table:table-cell>
          <table:table-cell table:number-columns-repeated="14"/>
          <table:table-cell office:value-type="float" office:value="1.69358533837322" calcext:value-type="float">
            <text:p>1,69358533837322</text:p>
          </table:table-cell>
          <table:table-cell table:number-columns-repeated="4"/>
        </table:table-row>
        <table:table-row table:style-name="ro1">
          <table:table-cell office:value-type="float" office:value="1753.02168069608" calcext:value-type="float">
            <text:p>1753,02168069608</text:p>
          </table:table-cell>
          <table:table-cell table:number-columns-repeated="14"/>
          <table:table-cell office:value-type="float" office:value="1.67943164525887" calcext:value-type="float">
            <text:p>1,67943164525887</text:p>
          </table:table-cell>
          <table:table-cell table:number-columns-repeated="4"/>
        </table:table-row>
        <table:table-row table:style-name="ro1">
          <table:table-cell office:value-type="float" office:value="1820.79041081416" calcext:value-type="float">
            <text:p>1820,79041081416</text:p>
          </table:table-cell>
          <table:table-cell table:number-columns-repeated="14"/>
          <table:table-cell office:value-type="float" office:value="1.67707269640648" calcext:value-type="float">
            <text:p>1,67707269640648</text:p>
          </table:table-cell>
          <table:table-cell table:number-columns-repeated="4"/>
        </table:table-row>
        <table:table-row table:style-name="ro1">
          <table:table-cell office:value-type="float" office:value="1888.55290156257" calcext:value-type="float">
            <text:p>1888,55290156257</text:p>
          </table:table-cell>
          <table:table-cell table:number-columns-repeated="14"/>
          <table:table-cell office:value-type="float" office:value="1.63461161706343" calcext:value-type="float">
            <text:p>1,63461161706343</text:p>
          </table:table-cell>
          <table:table-cell table:number-columns-repeated="4"/>
        </table:table-row>
        <table:table-row table:style-name="ro1">
          <table:table-cell office:value-type="float" office:value="1956.31282315876" calcext:value-type="float">
            <text:p>1956,31282315876</text:p>
          </table:table-cell>
          <table:table-cell table:number-columns-repeated="14"/>
          <table:table-cell office:value-type="float" office:value="1.57563789575365" calcext:value-type="float">
            <text:p>1,57563789575365</text:p>
          </table:table-cell>
          <table:table-cell table:number-columns-repeated="4"/>
        </table:table-row>
        <table:table-row table:style-name="ro1">
          <table:table-cell office:value-type="float" office:value="2024.0731117767" calcext:value-type="float">
            <text:p>2024,0731117767</text:p>
          </table:table-cell>
          <table:table-cell table:number-columns-repeated="14"/>
          <table:table-cell office:value-type="float" office:value="1.51902312329626" calcext:value-type="float">
            <text:p>1,51902312329626</text:p>
          </table:table-cell>
          <table:table-cell table:number-columns-repeated="4"/>
        </table:table-row>
        <table:table-row table:style-name="ro1">
          <table:table-cell office:value-type="float" office:value="2091.84184189477" calcext:value-type="float">
            <text:p>2091,84184189477</text:p>
          </table:table-cell>
          <table:table-cell table:number-columns-repeated="14"/>
          <table:table-cell office:value-type="float" office:value="1.51666417444387" calcext:value-type="float">
            <text:p>1,51666417444387</text:p>
          </table:table-cell>
          <table:table-cell table:number-columns-repeated="4"/>
        </table:table-row>
        <table:table-row table:style-name="ro1">
          <table:table-cell office:value-type="float" office:value="2159.60726881714" calcext:value-type="float">
            <text:p>2159,60726881714</text:p>
          </table:table-cell>
          <table:table-cell table:number-columns-repeated="14"/>
          <table:table-cell office:value-type="float" office:value="1.49307468591995" calcext:value-type="float">
            <text:p>1,49307468591995</text:p>
          </table:table-cell>
          <table:table-cell table:number-columns-repeated="4"/>
        </table:table-row>
        <table:table-row table:style-name="ro1">
          <table:table-cell office:value-type="float" office:value="2227.37930213092" calcext:value-type="float">
            <text:p>2227,37930213092</text:p>
          </table:table-cell>
          <table:table-cell table:number-columns-repeated="14"/>
          <table:table-cell office:value-type="float" office:value="1.51194627673909" calcext:value-type="float">
            <text:p>1,51194627673909</text:p>
          </table:table-cell>
          <table:table-cell table:number-columns-repeated="4"/>
        </table:table-row>
        <table:table-row table:style-name="ro1">
          <table:table-cell office:value-type="float" office:value="2295.14693118376" calcext:value-type="float">
            <text:p>2295,14693118376</text:p>
          </table:table-cell>
          <table:table-cell table:number-columns-repeated="14"/>
          <table:table-cell office:value-type="float" office:value="1.50251048132952" calcext:value-type="float">
            <text:p>1,50251048132952</text:p>
          </table:table-cell>
          <table:table-cell table:number-columns-repeated="4"/>
        </table:table-row>
        <table:table-row table:style-name="ro1">
          <table:table-cell office:value-type="float" office:value="2362.90685277995" calcext:value-type="float">
            <text:p>2362,90685277995</text:p>
          </table:table-cell>
          <table:table-cell table:number-columns-repeated="14"/>
          <table:table-cell office:value-type="float" office:value="1.44353676001973" calcext:value-type="float">
            <text:p>1,44353676001973</text:p>
          </table:table-cell>
          <table:table-cell table:number-columns-repeated="4"/>
        </table:table-row>
        <table:table-row table:style-name="ro1">
          <table:table-cell office:value-type="float" office:value="2430.67631694152" calcext:value-type="float">
            <text:p>2430,67631694152</text:p>
          </table:table-cell>
          <table:table-cell table:number-columns-repeated="14"/>
          <table:table-cell office:value-type="float" office:value="1.44589570887213" calcext:value-type="float">
            <text:p>1,44589570887213</text:p>
          </table:table-cell>
          <table:table-cell table:number-columns-repeated="4"/>
        </table:table-row>
        <table:table-row table:style-name="ro1">
          <table:table-cell office:value-type="float" office:value="2498.43733960294" calcext:value-type="float">
            <text:p>2498,43733960294</text:p>
          </table:table-cell>
          <table:table-cell table:number-columns-repeated="14"/>
          <table:table-cell office:value-type="float" office:value="1.39399883411951" calcext:value-type="float">
            <text:p>1,39399883411951</text:p>
          </table:table-cell>
          <table:table-cell table:number-columns-repeated="4"/>
        </table:table-row>
        <table:table-row table:style-name="ro1">
          <table:table-cell office:value-type="float" office:value="2566.20166546008" calcext:value-type="float">
            <text:p>2566,20166546008</text:p>
          </table:table-cell>
          <table:table-cell table:number-columns-repeated="14"/>
          <table:table-cell office:value-type="float" office:value="1.36333249903843" calcext:value-type="float">
            <text:p>1,36333249903843</text:p>
          </table:table-cell>
          <table:table-cell table:number-columns-repeated="4"/>
        </table:table-row>
        <table:table-row table:style-name="ro1">
          <table:table-cell office:value-type="float" office:value="2633.9740657956" calcext:value-type="float">
            <text:p>2633,9740657956</text:p>
          </table:table-cell>
          <table:table-cell table:number-columns-repeated="14"/>
          <table:table-cell office:value-type="float" office:value="1.38456303870995" calcext:value-type="float">
            <text:p>1,38456303870995</text:p>
          </table:table-cell>
          <table:table-cell table:number-columns-repeated="4"/>
        </table:table-row>
        <table:table-row table:style-name="ro1">
          <table:table-cell office:value-type="float" office:value="2701.73068419609" calcext:value-type="float">
            <text:p>2701,73068419609</text:p>
          </table:table-cell>
          <table:table-cell table:number-columns-repeated="14"/>
          <table:table-cell office:value-type="float" office:value="1.30435877772864" calcext:value-type="float">
            <text:p>1,30435877772864</text:p>
          </table:table-cell>
          <table:table-cell table:number-columns-repeated="4"/>
        </table:table-row>
        <table:table-row table:style-name="ro1">
          <table:table-cell office:value-type="float" office:value="2769.49464303148" calcext:value-type="float">
            <text:p>2769,49464303148</text:p>
          </table:table-cell>
          <table:table-cell table:number-columns-repeated="14"/>
          <table:table-cell office:value-type="float" office:value="1.27133349379516" calcext:value-type="float">
            <text:p>1,27133349379516</text:p>
          </table:table-cell>
          <table:table-cell table:number-columns-repeated="4"/>
        </table:table-row>
        <table:table-row table:style-name="ro1">
          <table:table-cell office:value-type="float" office:value="2837.2597029321" calcext:value-type="float">
            <text:p>2837,2597029321</text:p>
          </table:table-cell>
          <table:table-cell table:number-columns-repeated="14"/>
          <table:table-cell office:value-type="float" office:value="1.24538505641886" calcext:value-type="float">
            <text:p>1,24538505641886</text:p>
          </table:table-cell>
          <table:table-cell table:number-columns-repeated="4"/>
        </table:table-row>
        <table:table-row table:style-name="ro1">
          <table:table-cell office:value-type="float" office:value="2905.02256070226" calcext:value-type="float">
            <text:p>2905,02256070226</text:p>
          </table:table-cell>
          <table:table-cell table:number-columns-repeated="14"/>
          <table:table-cell office:value-type="float" office:value="1.20528292592821" calcext:value-type="float">
            <text:p>1,20528292592821</text:p>
          </table:table-cell>
          <table:table-cell table:number-columns-repeated="4"/>
        </table:table-row>
        <table:table-row table:style-name="ro1">
          <table:table-cell office:value-type="float" office:value="2972.79826423349" calcext:value-type="float">
            <text:p>2972,79826423349</text:p>
          </table:table-cell>
          <table:table-cell table:number-columns-repeated="14"/>
          <table:table-cell office:value-type="float" office:value="1.24774400527125" calcext:value-type="float">
            <text:p>1,24774400527125</text:p>
          </table:table-cell>
          <table:table-cell table:number-columns-repeated="4"/>
        </table:table-row>
        <table:table-row table:style-name="ro1">
          <table:table-cell office:value-type="float" office:value="3040.56552626458" calcext:value-type="float">
            <text:p>3040,56552626458</text:p>
          </table:table-cell>
          <table:table-cell table:number-columns-repeated="14"/>
          <table:table-cell office:value-type="float" office:value="1.23594926100929" calcext:value-type="float">
            <text:p>1,23594926100929</text:p>
          </table:table-cell>
          <table:table-cell table:number-columns-repeated="4"/>
        </table:table-row>
        <table:table-row table:style-name="ro1">
          <table:table-cell office:value-type="float" office:value="3108.32985212171" calcext:value-type="float">
            <text:p>3108,32985212171</text:p>
          </table:table-cell>
          <table:table-cell table:number-columns-repeated="14"/>
          <table:table-cell office:value-type="float" office:value="1.20528292592821" calcext:value-type="float">
            <text:p>1,20528292592821</text:p>
          </table:table-cell>
          <table:table-cell table:number-columns-repeated="4"/>
        </table:table-row>
        <table:table-row table:style-name="ro1">
          <table:table-cell office:value-type="float" office:value="3176.10665671818" calcext:value-type="float">
            <text:p>3176,10665671818</text:p>
          </table:table-cell>
          <table:table-cell table:number-columns-repeated="14"/>
          <table:table-cell office:value-type="float" office:value="1.25482085182842" calcext:value-type="float">
            <text:p>1,25482085182842</text:p>
          </table:table-cell>
          <table:table-cell table:number-columns-repeated="4"/>
        </table:table-row>
        <table:table-row table:style-name="ro1">
          <table:table-cell office:value-type="float" office:value="3243.8643761839" calcext:value-type="float">
            <text:p>3243,8643761839</text:p>
          </table:table-cell>
          <table:table-cell table:number-columns-repeated="14"/>
          <table:table-cell office:value-type="float" office:value="1.18169343740429" calcext:value-type="float">
            <text:p>1,18169343740429</text:p>
          </table:table-cell>
          <table:table-cell table:number-columns-repeated="4"/>
        </table:table-row>
        <table:table-row table:style-name="ro1">
          <table:table-cell office:value-type="float" office:value="3311.63310630198" calcext:value-type="float">
            <text:p>3311,63310630198</text:p>
          </table:table-cell>
          <table:table-cell table:number-columns-repeated="14"/>
          <table:table-cell office:value-type="float" office:value="1.1793344885519" calcext:value-type="float">
            <text:p>1,1793344885519</text:p>
          </table:table-cell>
          <table:table-cell table:number-columns-repeated="4"/>
        </table:table-row>
        <table:table-row table:style-name="ro1">
          <table:table-cell office:value-type="float" office:value="3379.40734174623" calcext:value-type="float">
            <text:p>3379,40734174623</text:p>
          </table:table-cell>
          <table:table-cell table:number-columns-repeated="14"/>
          <table:table-cell office:value-type="float" office:value="1.21235977248538" calcext:value-type="float">
            <text:p>1,21235977248538</text:p>
          </table:table-cell>
          <table:table-cell table:number-columns-repeated="4"/>
        </table:table-row>
        <table:table-row table:style-name="ro1">
          <table:table-cell office:value-type="float" office:value="3447.16983249464" calcext:value-type="float">
            <text:p>3447,16983249464</text:p>
          </table:table-cell>
          <table:table-cell table:number-columns-repeated="14"/>
          <table:table-cell office:value-type="float" office:value="1.16989869314233" calcext:value-type="float">
            <text:p>1,16989869314233</text:p>
          </table:table-cell>
          <table:table-cell table:number-columns-repeated="4"/>
        </table:table-row>
        <table:table-row table:style-name="ro1">
          <table:table-cell office:value-type="float" office:value="3514.93232324304" calcext:value-type="float">
            <text:p>3514,93232324304</text:p>
          </table:table-cell>
          <table:table-cell table:number-columns-repeated="14"/>
          <table:table-cell office:value-type="float" office:value="1.12743761379929" calcext:value-type="float">
            <text:p>1,12743761379929</text:p>
          </table:table-cell>
          <table:table-cell table:number-columns-repeated="4"/>
        </table:table-row>
        <table:table-row table:style-name="ro1">
          <table:table-cell office:value-type="float" office:value="3582.69297888273" calcext:value-type="float">
            <text:p>3582,69297888273</text:p>
          </table:table-cell>
          <table:table-cell table:number-columns-repeated="14"/>
          <table:table-cell office:value-type="float" office:value="1.07318179019429" calcext:value-type="float">
            <text:p>1,07318179019429</text:p>
          </table:table-cell>
          <table:table-cell table:number-columns-repeated="4"/>
        </table:table-row>
        <table:table-row table:style-name="ro1">
          <table:table-cell office:value-type="float" office:value="3650.45069834845" calcext:value-type="float">
            <text:p>3650,45069834845</text:p>
          </table:table-cell>
          <table:table-cell table:number-columns-repeated="14"/>
          <table:table-cell office:value-type="float" office:value="1.00005437577016" calcext:value-type="float">
            <text:p>1,00005437577016</text:p>
          </table:table-cell>
          <table:table-cell table:number-columns-repeated="4"/>
        </table:table-row>
        <table:table-row table:style-name="ro1">
          <table:table-cell office:value-type="float" office:value="3718.2175933578" calcext:value-type="float">
            <text:p>3718,2175933578</text:p>
          </table:table-cell>
          <table:table-cell table:number-columns-repeated="14"/>
          <table:table-cell office:value-type="float" office:value="0.985900682655807" calcext:value-type="float">
            <text:p>0,985900682655807</text:p>
          </table:table-cell>
          <table:table-cell table:number-columns-repeated="4"/>
        </table:table-row>
        <table:table-row table:style-name="ro1">
          <table:table-cell office:value-type="float" office:value="3785.98448836715" calcext:value-type="float">
            <text:p>3785,98448836715</text:p>
          </table:table-cell>
          <table:table-cell table:number-columns-repeated="14"/>
          <table:table-cell office:value-type="float" office:value="0.971746989541458" calcext:value-type="float">
            <text:p>0,971746989541458</text:p>
          </table:table-cell>
          <table:table-cell table:number-columns-repeated="4"/>
        </table:table-row>
        <table:table-row table:style-name="ro1">
          <table:table-cell office:value-type="float" office:value="3853.75248444173" calcext:value-type="float">
            <text:p>3853,75248444173</text:p>
          </table:table-cell>
          <table:table-cell table:number-columns-repeated="14"/>
          <table:table-cell office:value-type="float" office:value="0.964670142984286" calcext:value-type="float">
            <text:p>0,964670142984286</text:p>
          </table:table-cell>
          <table:table-cell table:number-columns-repeated="4"/>
        </table:table-row>
        <table:table-row table:style-name="ro1">
          <table:table-cell office:value-type="float" office:value="3921.52304966853" calcext:value-type="float">
            <text:p>3921,52304966853</text:p>
          </table:table-cell>
          <table:table-cell table:number-columns-repeated="14"/>
          <table:table-cell office:value-type="float" office:value="0.974105938393851" calcext:value-type="float">
            <text:p>0,974105938393851</text:p>
          </table:table-cell>
          <table:table-cell table:number-columns-repeated="4"/>
        </table:table-row>
        <table:table-row table:style-name="ro1">
          <table:table-cell office:value-type="float" office:value="3989.28921063439" calcext:value-type="float">
            <text:p>3989,28921063439</text:p>
          </table:table-cell>
          <table:table-cell table:number-columns-repeated="14"/>
          <table:table-cell office:value-type="float" office:value="0.95523434757472" calcext:value-type="float">
            <text:p>0,95523434757472</text:p>
          </table:table-cell>
          <table:table-cell table:number-columns-repeated="4"/>
        </table:table-row>
        <table:table-row table:style-name="ro1">
          <table:table-cell office:value-type="float" office:value="4057.06161096991" calcext:value-type="float">
            <text:p>4057,06161096991</text:p>
          </table:table-cell>
          <table:table-cell table:number-columns-repeated="14"/>
          <table:table-cell office:value-type="float" office:value="0.976464887246241" calcext:value-type="float">
            <text:p>0,976464887246241</text:p>
          </table:table-cell>
          <table:table-cell table:number-columns-repeated="4"/>
        </table:table-row>
        <table:table-row table:style-name="ro1">
          <table:table-cell office:value-type="float" office:value="4124.83364428369" calcext:value-type="float">
            <text:p>4124,83364428369</text:p>
          </table:table-cell>
          <table:table-cell table:number-columns-repeated="14"/>
          <table:table-cell office:value-type="float" office:value="0.995336478065372" calcext:value-type="float">
            <text:p>0,995336478065372</text:p>
          </table:table-cell>
          <table:table-cell table:number-columns-repeated="4"/>
        </table:table-row>
        <table:table-row table:style-name="ro1">
          <table:table-cell office:value-type="float" office:value="4192.59503396687" calcext:value-type="float">
            <text:p>4192,59503396687</text:p>
          </table:table-cell>
          <table:table-cell table:number-columns-repeated="14"/>
          <table:table-cell office:value-type="float" office:value="0.945798552165154" calcext:value-type="float">
            <text:p>0,945798552165154</text:p>
          </table:table-cell>
          <table:table-cell table:number-columns-repeated="4"/>
        </table:table-row>
        <table:table-row table:style-name="ro1">
          <table:table-cell office:value-type="float" office:value="4260.36706728065" calcext:value-type="float">
            <text:p>4260,36706728065</text:p>
          </table:table-cell>
          <table:table-cell table:number-columns-repeated="14"/>
          <table:table-cell office:value-type="float" office:value="0.964670142984286" calcext:value-type="float">
            <text:p>0,964670142984286</text:p>
          </table:table-cell>
          <table:table-cell table:number-columns-repeated="4"/>
        </table:table-row>
        <table:table-row table:style-name="ro1">
          <table:table-cell office:value-type="float" office:value="4328.13249420302" calcext:value-type="float">
            <text:p>4328,13249420302</text:p>
          </table:table-cell>
          <table:table-cell table:number-columns-repeated="14"/>
          <table:table-cell office:value-type="float" office:value="0.941080654460372" calcext:value-type="float">
            <text:p>0,941080654460372</text:p>
          </table:table-cell>
          <table:table-cell table:number-columns-repeated="4"/>
        </table:table-row>
        <table:table-row table:style-name="ro1">
          <table:table-cell office:value-type="float" office:value="4395.89498495143" calcext:value-type="float">
            <text:p>4395,89498495143</text:p>
          </table:table-cell>
          <table:table-cell table:number-columns-repeated="14"/>
          <table:table-cell office:value-type="float" office:value="0.898619575117326" calcext:value-type="float">
            <text:p>0,898619575117326</text:p>
          </table:table-cell>
          <table:table-cell table:number-columns-repeated="4"/>
        </table:table-row>
        <table:table-row table:style-name="ro1">
          <table:table-cell office:value-type="float" office:value="4463.6710555044" calcext:value-type="float">
            <text:p>4463,6710555044</text:p>
          </table:table-cell>
          <table:table-cell table:number-columns-repeated="14"/>
          <table:table-cell office:value-type="float" office:value="0.943439603312761" calcext:value-type="float">
            <text:p>0,943439603312761</text:p>
          </table:table-cell>
          <table:table-cell table:number-columns-repeated="4"/>
        </table:table-row>
        <table:table-row table:style-name="ro1">
          <table:table-cell office:value-type="float" office:value="4531.43134412234" calcext:value-type="float">
            <text:p>4531,43134412234</text:p>
          </table:table-cell>
          <table:table-cell table:number-columns-repeated="14"/>
          <table:table-cell office:value-type="float" office:value="0.886824830855371" calcext:value-type="float">
            <text:p>0,886824830855371</text:p>
          </table:table-cell>
          <table:table-cell table:number-columns-repeated="4"/>
        </table:table-row>
        <table:table-row table:style-name="ro1">
          <table:table-cell office:value-type="float" office:value="4599.19970721867" calcext:value-type="float">
            <text:p>4599,19970721867</text:p>
          </table:table-cell>
          <table:table-cell table:number-columns-repeated="14"/>
          <table:table-cell office:value-type="float" office:value="0.882106933150585" calcext:value-type="float">
            <text:p>0,882106933150585</text:p>
          </table:table-cell>
          <table:table-cell table:number-columns-repeated="4"/>
        </table:table-row>
        <table:table-row table:style-name="ro1">
          <table:table-cell office:value-type="float" office:value="4666.97320861943" calcext:value-type="float">
            <text:p>4666,97320861943</text:p>
          </table:table-cell>
          <table:table-cell table:number-columns-repeated="14"/>
          <table:table-cell office:value-type="float" office:value="0.910414319379282" calcext:value-type="float">
            <text:p>0,910414319379282</text:p>
          </table:table-cell>
          <table:table-cell table:number-columns-repeated="4"/>
        </table:table-row>
        <table:table-row table:style-name="ro1">
          <table:table-cell office:value-type="float" office:value="4734.73569936784" calcext:value-type="float">
            <text:p>4734,73569936784</text:p>
          </table:table-cell>
          <table:table-cell table:number-columns-repeated="14"/>
          <table:table-cell office:value-type="float" office:value="0.86795324003624" calcext:value-type="float">
            <text:p>0,86795324003624</text:p>
          </table:table-cell>
          <table:table-cell table:number-columns-repeated="4"/>
        </table:table-row>
        <table:table-row table:style-name="ro1">
          <table:table-cell office:value-type="float" office:value="4802.49965820322" calcext:value-type="float">
            <text:p>4802,49965820322</text:p>
          </table:table-cell>
          <table:table-cell table:number-columns-repeated="14"/>
          <table:table-cell office:value-type="float" office:value="0.83492795610276" calcext:value-type="float">
            <text:p>0,83492795610276</text:p>
          </table:table-cell>
          <table:table-cell table:number-columns-repeated="4"/>
        </table:table-row>
        <table:table-row table:style-name="ro1">
          <table:table-cell office:value-type="float" office:value="4870.26581916908" calcext:value-type="float">
            <text:p>4870,26581916908</text:p>
          </table:table-cell>
          <table:table-cell table:number-columns-repeated="14"/>
          <table:table-cell office:value-type="float" office:value="0.816056365283629" calcext:value-type="float">
            <text:p>0,816056365283629</text:p>
          </table:table-cell>
          <table:table-cell table:number-columns-repeated="4"/>
        </table:table-row>
        <table:table-row table:style-name="ro1">
          <table:table-cell office:value-type="float" office:value="4938.03785248286" calcext:value-type="float">
            <text:p>4938,03785248286</text:p>
          </table:table-cell>
          <table:table-cell table:number-columns-repeated="14"/>
          <table:table-cell office:value-type="float" office:value="0.83492795610276" calcext:value-type="float">
            <text:p>0,83492795610276</text:p>
          </table:table-cell>
          <table:table-cell table:number-columns-repeated="4"/>
        </table:table-row>
        <table:table-row table:style-name="ro1">
          <table:table-cell office:value-type="float" office:value="5005.81869431853" calcext:value-type="float">
            <text:p>5005,81869431853</text:p>
          </table:table-cell>
          <table:table-cell table:number-columns-repeated="14"/>
          <table:table-cell office:value-type="float" office:value="0.910414319379282" calcext:value-type="float">
            <text:p>0,910414319379282</text:p>
          </table:table-cell>
          <table:table-cell table:number-columns-repeated="4"/>
        </table:table-row>
        <table:table-row table:style-name="ro1">
          <table:table-cell office:value-type="float" office:value="5062.80983089268" calcext:value-type="float">
            <text:p>5062,80983089268</text:p>
          </table:table-cell>
          <table:table-cell table:number-columns-repeated="14"/>
          <table:table-cell office:value-type="float" office:value="0.932824333477001" calcext:value-type="float">
            <text:p>0,932824333477001</text:p>
          </table:table-cell>
          <table:table-cell table:number-columns-repeated="4"/>
        </table:table-row>
        <table:table-row table:style-name="ro1">
          <table:table-cell office:value-type="float" office:value="5141.35431944595" calcext:value-type="float">
            <text:p>5141,35431944595</text:p>
          </table:table-cell>
          <table:table-cell table:number-columns-repeated="14"/>
          <table:table-cell office:value-type="float" office:value="0.893901677412543" calcext:value-type="float">
            <text:p>0,893901677412543</text:p>
          </table:table-cell>
          <table:table-cell table:number-columns-repeated="4"/>
        </table:table-row>
        <table:table-row table:style-name="ro1">
          <table:table-cell office:value-type="float" office:value="5209.12818786845" calcext:value-type="float">
            <text:p>5209,12818786845</text:p>
          </table:table-cell>
          <table:table-cell table:number-columns-repeated="14"/>
          <table:table-cell office:value-type="float" office:value="0.92456801249363" calcext:value-type="float">
            <text:p>0,92456801249363</text:p>
          </table:table-cell>
          <table:table-cell table:number-columns-repeated="4"/>
        </table:table-row>
        <table:table-row table:style-name="ro1">
          <table:table-cell office:value-type="float" office:value="5258.40599544826" calcext:value-type="float">
            <text:p>5258,40599544826</text:p>
          </table:table-cell>
          <table:table-cell table:number-columns-repeated="14"/>
          <table:table-cell office:value-type="float" office:value="0.86795324003624" calcext:value-type="float">
            <text:p>0,86795324003624</text:p>
          </table:table-cell>
          <table:table-cell table:number-columns-repeated="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 table:number-columns-spanned="16" table:number-rows-spanned="1">
            <text:p>iTHD_OCP_min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office:value-type="float" office:value="280.893791011025" calcext:value-type="float">
            <text:p>280,893791011025</text:p>
          </table:table-cell>
          <table:table-cell table:number-columns-repeated="14"/>
          <table:table-cell office:value-type="float" office:value="14.9839031727462" calcext:value-type="float">
            <text:p>14,9839031727462</text:p>
          </table:table-cell>
          <table:table-cell table:number-columns-repeated="4"/>
        </table:table-row>
        <table:table-row table:style-name="ro1">
          <table:table-cell office:value-type="float" office:value="338.101470414769" calcext:value-type="float">
            <text:p>338,101470414769</text:p>
          </table:table-cell>
          <table:table-cell table:number-columns-repeated="14"/>
          <table:table-cell office:value-type="float" office:value="14.9839031727462" calcext:value-type="float">
            <text:p>14,9839031727462</text:p>
          </table:table-cell>
          <table:table-cell table:number-columns-repeated="4"/>
        </table:table-row>
        <table:table-row table:style-name="ro1">
          <table:table-cell office:value-type="float" office:value="415.111808073655" calcext:value-type="float">
            <text:p>415,111808073655</text:p>
          </table:table-cell>
          <table:table-cell table:number-columns-repeated="14"/>
          <table:table-cell office:value-type="float" office:value="14.9839031727462" calcext:value-type="float">
            <text:p>14,9839031727462</text:p>
          </table:table-cell>
          <table:table-cell table:number-columns-repeated="4"/>
        </table:table-row>
        <table:table-row table:style-name="ro1">
          <table:table-cell office:value-type="float" office:value="489.034162402693" calcext:value-type="float">
            <text:p>489,034162402693</text:p>
          </table:table-cell>
          <table:table-cell table:number-columns-repeated="14"/>
          <table:table-cell office:value-type="float" office:value="14.9352498526657" calcext:value-type="float">
            <text:p>14,9352498526657</text:p>
          </table:table-cell>
          <table:table-cell table:number-columns-repeated="4"/>
        </table:table-row>
        <table:table-row table:style-name="ro1">
          <table:table-cell office:value-type="float" office:value="497.623489722626" calcext:value-type="float">
            <text:p>497,623489722626</text:p>
          </table:table-cell>
          <table:table-cell table:number-columns-repeated="14"/>
          <table:table-cell office:value-type="float" office:value="10.7452259273268" calcext:value-type="float">
            <text:p>10,7452259273268</text:p>
          </table:table-cell>
          <table:table-cell table:number-columns-repeated="4"/>
        </table:table-row>
        <table:table-row table:style-name="ro1">
          <table:table-cell office:value-type="float" office:value="497.722603944882" calcext:value-type="float">
            <text:p>497,722603944882</text:p>
          </table:table-cell>
          <table:table-cell table:number-columns-repeated="14"/>
          <table:table-cell office:value-type="float" office:value="11.3822600649151" calcext:value-type="float">
            <text:p>11,3822600649151</text:p>
          </table:table-cell>
          <table:table-cell table:number-columns-repeated="4"/>
        </table:table-row>
        <table:table-row table:style-name="ro1">
          <table:table-cell office:value-type="float" office:value="497.834839194523" calcext:value-type="float">
            <text:p>497,834839194523</text:p>
          </table:table-cell>
          <table:table-cell table:number-columns-repeated="14"/>
          <table:table-cell office:value-type="float" office:value="12.1036266239764" calcext:value-type="float">
            <text:p>12,1036266239764</text:p>
          </table:table-cell>
          <table:table-cell table:number-columns-repeated="4"/>
        </table:table-row>
        <table:table-row table:style-name="ro1">
          <table:table-cell office:value-type="float" office:value="497.947881892004" calcext:value-type="float">
            <text:p>497,947881892004</text:p>
          </table:table-cell>
          <table:table-cell table:number-columns-repeated="14"/>
          <table:table-cell office:value-type="float" office:value="12.8301828705129" calcext:value-type="float">
            <text:p>12,8301828705129</text:p>
          </table:table-cell>
          <table:table-cell table:number-columns-repeated="4"/>
        </table:table-row>
        <table:table-row table:style-name="ro1">
          <table:table-cell office:value-type="float" office:value="498.05688735029" calcext:value-type="float">
            <text:p>498,05688735029</text:p>
          </table:table-cell>
          <table:table-cell table:number-columns-repeated="14"/>
          <table:table-cell office:value-type="float" office:value="13.5307906796731" calcext:value-type="float">
            <text:p>13,5307906796731</text:p>
          </table:table-cell>
          <table:table-cell table:number-columns-repeated="4"/>
        </table:table-row>
        <table:table-row table:style-name="ro1">
          <table:table-cell office:value-type="float" office:value="498.16993004777" calcext:value-type="float">
            <text:p>498,16993004777</text:p>
          </table:table-cell>
          <table:table-cell table:number-columns-repeated="14"/>
          <table:table-cell office:value-type="float" office:value="14.2573469262097" calcext:value-type="float">
            <text:p>14,2573469262097</text:p>
          </table:table-cell>
          <table:table-cell table:number-columns-repeated="4"/>
        </table:table-row>
        <table:table-row table:style-name="ro1">
          <table:table-cell office:value-type="float" office:value="503.681915046879" calcext:value-type="float">
            <text:p>503,681915046879</text:p>
          </table:table-cell>
          <table:table-cell table:number-columns-repeated="14"/>
          <table:table-cell office:value-type="float" office:value="10.0870623478749" calcext:value-type="float">
            <text:p>10,0870623478749</text:p>
          </table:table-cell>
          <table:table-cell table:number-columns-repeated="4"/>
        </table:table-row>
        <table:table-row table:style-name="ro1">
          <table:table-cell office:value-type="float" office:value="580.666875773677" calcext:value-type="float">
            <text:p>580,666875773677</text:p>
          </table:table-cell>
          <table:table-cell table:number-columns-repeated="14"/>
          <table:table-cell office:value-type="float" office:value="9.92395788436673" calcext:value-type="float">
            <text:p>9,92395788436673</text:p>
          </table:table-cell>
          <table:table-cell table:number-columns-repeated="4"/>
        </table:table-row>
        <table:table-row table:style-name="ro1">
          <table:table-cell office:value-type="float" office:value="663.838040445274" calcext:value-type="float">
            <text:p>663,838040445274</text:p>
          </table:table-cell>
          <table:table-cell table:number-columns-repeated="14"/>
          <table:table-cell office:value-type="float" office:value="9.92395788436673" calcext:value-type="float">
            <text:p>9,92395788436673</text:p>
          </table:table-cell>
          <table:table-cell table:number-columns-repeated="4"/>
        </table:table-row>
        <table:table-row table:style-name="ro1">
          <table:table-cell office:value-type="float" office:value="747.00920511687" calcext:value-type="float">
            <text:p>747,00920511687</text:p>
          </table:table-cell>
          <table:table-cell table:number-columns-repeated="14"/>
          <table:table-cell office:value-type="float" office:value="9.92395788436673" calcext:value-type="float">
            <text:p>9,92395788436673</text:p>
          </table:table-cell>
          <table:table-cell table:number-columns-repeated="4"/>
        </table:table-row>
        <table:table-row table:style-name="ro1">
          <table:table-cell office:value-type="float" office:value="833.260783294822" calcext:value-type="float">
            <text:p>833,260783294822</text:p>
          </table:table-cell>
          <table:table-cell table:number-columns-repeated="14"/>
          <table:table-cell office:value-type="float" office:value="9.92395788436673" calcext:value-type="float">
            <text:p>9,92395788436673</text:p>
          </table:table-cell>
          <table:table-cell table:number-columns-repeated="4"/>
        </table:table-row>
        <table:table-row table:style-name="ro1">
          <table:table-cell office:value-type="float" office:value="913.351534460064" calcext:value-type="float">
            <text:p>913,351534460064</text:p>
          </table:table-cell>
          <table:table-cell table:number-columns-repeated="14"/>
          <table:table-cell office:value-type="float" office:value="9.92395788436673" calcext:value-type="float">
            <text:p>9,92395788436673</text:p>
          </table:table-cell>
          <table:table-cell table:number-columns-repeated="4"/>
        </table:table-row>
        <table:table-row table:style-name="ro1">
          <table:table-cell office:value-type="float" office:value="999.603112638016" calcext:value-type="float">
            <text:p>999,603112638016</text:p>
          </table:table-cell>
          <table:table-cell table:number-columns-repeated="14"/>
          <table:table-cell office:value-type="float" office:value="9.92395788436673" calcext:value-type="float">
            <text:p>9,92395788436673</text:p>
          </table:table-cell>
          <table:table-cell table:number-columns-repeated="4"/>
        </table:table-row>
        <table:table-row table:style-name="ro1">
          <table:table-cell office:value-type="float" office:value="1085.85469081597" calcext:value-type="float">
            <text:p>1085,85469081597</text:p>
          </table:table-cell>
          <table:table-cell table:number-columns-repeated="14"/>
          <table:table-cell office:value-type="float" office:value="9.92395788436673" calcext:value-type="float">
            <text:p>9,92395788436673</text:p>
          </table:table-cell>
          <table:table-cell table:number-columns-repeated="4"/>
        </table:table-row>
        <table:table-row table:style-name="ro1">
          <table:table-cell office:value-type="float" office:value="1165.94544198121" calcext:value-type="float">
            <text:p>1165,94544198121</text:p>
          </table:table-cell>
          <table:table-cell table:number-columns-repeated="14"/>
          <table:table-cell office:value-type="float" office:value="9.92395788436673" calcext:value-type="float">
            <text:p>9,92395788436673</text:p>
          </table:table-cell>
          <table:table-cell table:number-columns-repeated="4"/>
        </table:table-row>
        <table:table-row table:style-name="ro1">
          <table:table-cell office:value-type="float" office:value="1252.19702015916" calcext:value-type="float">
            <text:p>1252,19702015916</text:p>
          </table:table-cell>
          <table:table-cell table:number-columns-repeated="14"/>
          <table:table-cell office:value-type="float" office:value="9.92395788436673" calcext:value-type="float">
            <text:p>9,92395788436673</text:p>
          </table:table-cell>
          <table:table-cell table:number-columns-repeated="4"/>
        </table:table-row>
        <table:table-row table:style-name="ro1">
          <table:table-cell office:value-type="float" office:value="1332.2877713244" calcext:value-type="float">
            <text:p>1332,2877713244</text:p>
          </table:table-cell>
          <table:table-cell table:number-columns-repeated="14"/>
          <table:table-cell office:value-type="float" office:value="9.92395788436673" calcext:value-type="float">
            <text:p>9,92395788436673</text:p>
          </table:table-cell>
          <table:table-cell table:number-columns-repeated="4"/>
        </table:table-row>
        <table:table-row table:style-name="ro1">
          <table:table-cell office:value-type="float" office:value="1418.53934950235" calcext:value-type="float">
            <text:p>1418,53934950235</text:p>
          </table:table-cell>
          <table:table-cell table:number-columns-repeated="14"/>
          <table:table-cell office:value-type="float" office:value="9.92395788436673" calcext:value-type="float">
            <text:p>9,92395788436673</text:p>
          </table:table-cell>
          <table:table-cell table:number-columns-repeated="4"/>
        </table:table-row>
        <table:table-row table:style-name="ro1">
          <table:table-cell office:value-type="float" office:value="1495.54391967667" calcext:value-type="float">
            <text:p>1495,54391967667</text:p>
          </table:table-cell>
          <table:table-cell table:number-columns-repeated="14"/>
          <table:table-cell office:value-type="float" office:value="9.88688868811486" calcext:value-type="float">
            <text:p>9,88688868811486</text:p>
          </table:table-cell>
          <table:table-cell table:number-columns-repeated="4"/>
        </table:table-row>
        <table:table-row table:style-name="ro1">
          <table:table-cell office:value-type="float" office:value="1501.03629522826" calcext:value-type="float">
            <text:p>1501,03629522826</text:p>
          </table:table-cell>
          <table:table-cell table:number-columns-repeated="14"/>
          <table:table-cell office:value-type="float" office:value="5.59056884252377" calcext:value-type="float">
            <text:p>5,59056884252377</text:p>
          </table:table-cell>
          <table:table-cell table:number-columns-repeated="4"/>
        </table:table-row>
        <table:table-row table:style-name="ro1">
          <table:table-cell office:value-type="float" office:value="1501.14530068655" calcext:value-type="float">
            <text:p>1501,14530068655</text:p>
          </table:table-cell>
          <table:table-cell table:number-columns-repeated="14"/>
          <table:table-cell office:value-type="float" office:value="6.29117665168401" calcext:value-type="float">
            <text:p>6,29117665168401</text:p>
          </table:table-cell>
          <table:table-cell table:number-columns-repeated="4"/>
        </table:table-row>
        <table:table-row table:style-name="ro1">
          <table:table-cell office:value-type="float" office:value="1501.26238062322" calcext:value-type="float">
            <text:p>1501,26238062322</text:p>
          </table:table-cell>
          <table:table-cell table:number-columns-repeated="14"/>
          <table:table-cell office:value-type="float" office:value="7.04368133559686" calcext:value-type="float">
            <text:p>7,04368133559686</text:p>
          </table:table-cell>
          <table:table-cell table:number-columns-repeated="4"/>
        </table:table-row>
        <table:table-row table:style-name="ro1">
          <table:table-cell office:value-type="float" office:value="1501.3754233207" calcext:value-type="float">
            <text:p>1501,3754233207</text:p>
          </table:table-cell>
          <table:table-cell table:number-columns-repeated="14"/>
          <table:table-cell office:value-type="float" office:value="7.7702375821334" calcext:value-type="float">
            <text:p>7,7702375821334</text:p>
          </table:table-cell>
          <table:table-cell table:number-columns-repeated="4"/>
        </table:table-row>
        <table:table-row table:style-name="ro1">
          <table:table-cell office:value-type="float" office:value="1501.48846601818" calcext:value-type="float">
            <text:p>1501,48846601818</text:p>
          </table:table-cell>
          <table:table-cell table:number-columns-repeated="14"/>
          <table:table-cell office:value-type="float" office:value="8.49679382866994" calcext:value-type="float">
            <text:p>8,49679382866994</text:p>
          </table:table-cell>
          <table:table-cell table:number-columns-repeated="4"/>
        </table:table-row>
        <table:table-row table:style-name="ro1">
          <table:table-cell office:value-type="float" office:value="1501.60150871567" calcext:value-type="float">
            <text:p>1501,60150871567</text:p>
          </table:table-cell>
          <table:table-cell table:number-columns-repeated="14"/>
          <table:table-cell office:value-type="float" office:value="9.22335007520649" calcext:value-type="float">
            <text:p>9,22335007520649</text:p>
          </table:table-cell>
          <table:table-cell table:number-columns-repeated="4"/>
        </table:table-row>
        <table:table-row table:style-name="ro1">
          <table:table-cell office:value-type="float" office:value="1510.17206287334" calcext:value-type="float">
            <text:p>1510,17206287334</text:p>
          </table:table-cell>
          <table:table-cell table:number-columns-repeated="14"/>
          <table:table-cell office:value-type="float" office:value="4.9126659160678" calcext:value-type="float">
            <text:p>4,9126659160678</text:p>
          </table:table-cell>
          <table:table-cell table:number-columns-repeated="4"/>
        </table:table-row>
        <table:table-row table:style-name="ro1">
          <table:table-cell office:value-type="float" office:value="1584.09441720238" calcext:value-type="float">
            <text:p>1584,09441720238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1670.34599538033" calcext:value-type="float">
            <text:p>1670,34599538033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1753.51716005193" calcext:value-type="float">
            <text:p>1753,51716005193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1836.68832472352" calcext:value-type="float">
            <text:p>1836,68832472352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1922.93990290147" calcext:value-type="float">
            <text:p>1922,93990290147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2003.03065406672" calcext:value-type="float">
            <text:p>2003,03065406672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2089.28223224467" calcext:value-type="float">
            <text:p>2089,28223224467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2172.45339691626" calcext:value-type="float">
            <text:p>2172,45339691626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2255.62456158786" calcext:value-type="float">
            <text:p>2255,62456158786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2341.87613976581" calcext:value-type="float">
            <text:p>2341,87613976581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2421.96325741578" calcext:value-type="float">
            <text:p>2421,96325741578</text:p>
          </table:table-cell>
          <table:table-cell table:number-columns-repeated="14"/>
          <table:table-cell office:value-type="float" office:value="4.84065900234855" calcext:value-type="float">
            <text:p>4,84065900234855</text:p>
          </table:table-cell>
          <table:table-cell table:number-columns-repeated="4"/>
        </table:table-row>
        <table:table-row table:style-name="ro1">
          <table:table-cell office:value-type="float" office:value="2502.0576420963" calcext:value-type="float">
            <text:p>2502,0576420963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2575.99059417822" calcext:value-type="float">
            <text:p>2575,99059417822</text:p>
          </table:table-cell>
          <table:table-cell table:number-columns-repeated="14"/>
          <table:table-cell office:value-type="float" office:value="4.88347392401946" calcext:value-type="float">
            <text:p>4,88347392401946</text:p>
          </table:table-cell>
          <table:table-cell table:number-columns-repeated="4"/>
        </table:table-row>
        <table:table-row table:style-name="ro1">
          <table:table-cell office:value-type="float" office:value="2675.88674315377" calcext:value-type="float">
            <text:p>2675,88674315377</text:p>
          </table:table-cell>
          <table:table-cell table:number-columns-repeated="14"/>
          <table:table-cell office:value-type="float" office:value="4.90108179223909" calcext:value-type="float">
            <text:p>4,90108179223909</text:p>
          </table:table-cell>
          <table:table-cell table:number-columns-repeated="4"/>
        </table:table-row>
        <table:table-row table:style-name="ro1">
          <table:table-cell office:value-type="float" office:value="2760.81843248894" calcext:value-type="float">
            <text:p>2760,81843248894</text:p>
          </table:table-cell>
          <table:table-cell table:number-columns-repeated="14"/>
          <table:table-cell office:value-type="float" office:value="4.90293525205168" calcext:value-type="float">
            <text:p>4,90293525205168</text:p>
          </table:table-cell>
          <table:table-cell table:number-columns-repeated="4"/>
        </table:table-row>
        <table:table-row table:style-name="ro1">
          <table:table-cell office:value-type="float" office:value="2840.90716503459" calcext:value-type="float">
            <text:p>2840,90716503459</text:p>
          </table:table-cell>
          <table:table-cell table:number-columns-repeated="14"/>
          <table:table-cell office:value-type="float" office:value="4.88996103336353" calcext:value-type="float">
            <text:p>4,88996103336353</text:p>
          </table:table-cell>
          <table:table-cell table:number-columns-repeated="4"/>
        </table:table-row>
        <table:table-row table:style-name="ro1">
          <table:table-cell office:value-type="float" office:value="2927.15874321254" calcext:value-type="float">
            <text:p>2927,15874321254</text:p>
          </table:table-cell>
          <table:table-cell table:number-columns-repeated="14"/>
          <table:table-cell office:value-type="float" office:value="4.88996103336353" calcext:value-type="float">
            <text:p>4,88996103336353</text:p>
          </table:table-cell>
          <table:table-cell table:number-columns-repeated="4"/>
        </table:table-row>
        <table:table-row table:style-name="ro1">
          <table:table-cell office:value-type="float" office:value="3013.40830277089" calcext:value-type="float">
            <text:p>3013,40830277089</text:p>
          </table:table-cell>
          <table:table-cell table:number-columns-repeated="14"/>
          <table:table-cell office:value-type="float" office:value="4.87698681467538" calcext:value-type="float">
            <text:p>4,87698681467538</text:p>
          </table:table-cell>
          <table:table-cell table:number-columns-repeated="4"/>
        </table:table-row>
        <table:table-row table:style-name="ro1">
          <table:table-cell office:value-type="float" office:value="3093.49865021222" calcext:value-type="float">
            <text:p>3093,49865021222</text:p>
          </table:table-cell>
          <table:table-cell table:number-columns-repeated="14"/>
          <table:table-cell office:value-type="float" office:value="4.87439197093775" calcext:value-type="float">
            <text:p>4,87439197093775</text:p>
          </table:table-cell>
          <table:table-cell table:number-columns-repeated="4"/>
        </table:table-row>
        <table:table-row table:style-name="ro1">
          <table:table-cell office:value-type="float" office:value="3179.74861349449" calcext:value-type="float">
            <text:p>3179,74861349449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3259.83936465973" calcext:value-type="float">
            <text:p>3259,83936465973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3346.09094283768" calcext:value-type="float">
            <text:p>3346,09094283768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3432.34252101563" calcext:value-type="float">
            <text:p>3432,34252101563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3512.43327218088" calcext:value-type="float">
            <text:p>3512,43327218088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3598.68485035883" calcext:value-type="float">
            <text:p>3598,68485035883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3678.77560152407" calcext:value-type="float">
            <text:p>3678,77560152407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3765.02717970202" calcext:value-type="float">
            <text:p>3765,02717970202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3851.27875787997" calcext:value-type="float">
            <text:p>3851,27875787997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3931.36950904521" calcext:value-type="float">
            <text:p>3931,36950904521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4017.62108722317" calcext:value-type="float">
            <text:p>4017,62108722317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4100.79225189476" calcext:value-type="float">
            <text:p>4100,79225189476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4183.96341656636" calcext:value-type="float">
            <text:p>4183,96341656636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4270.21499474431" calcext:value-type="float">
            <text:p>4270,21499474431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4350.30574590955" calcext:value-type="float">
            <text:p>4350,30574590955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4436.5573240875" calcext:value-type="float">
            <text:p>4436,5573240875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4519.7284887591" calcext:value-type="float">
            <text:p>4519,7284887591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4602.8996534307" calcext:value-type="float">
            <text:p>4602,8996534307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4689.15123160865" calcext:value-type="float">
            <text:p>4689,15123160865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4769.24198277389" calcext:value-type="float">
            <text:p>4769,24198277389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4855.49356095184" calcext:value-type="float">
            <text:p>4855,49356095184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4938.66472562344" calcext:value-type="float">
            <text:p>4938,66472562344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  <table:table-row table:style-name="ro1">
          <table:table-cell office:value-type="float" office:value="5006.43382276326" calcext:value-type="float">
            <text:p>5006,43382276326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22:03:06.272327145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30T22:47:04.739130372</dc:date>
    <meta:editing-duration>PT20M36S</meta:editing-duration>
    <meta:editing-cycles>4</meta:editing-cycles>
    <meta:generator>LibreOffice/24.2.7.2$Linux_X86_64 LibreOffice_project/420$Build-2</meta:generator>
    <meta:document-statistic meta:table-count="1" meta:cell-count="3081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000" chart:origin="0" chart:interval-major="5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84" chart:maximum="99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ong_20_Dot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905cm" svg:height="20.614cm" xlink:href=".." xlink:type="simple" chart:class="chart:scatter" chart:style-name="ch1">
        <chart:title svg:x="19.469cm" svg:y="0.548cm" chart:style-name="ch2">
          <text:p>Efficency</text:p>
        </chart:title>
        <chart:legend chart:legend-position="end" svg:x="35.464cm" svg:y="9.039cm" style:legend-expansion="custom" svg:width="5.23cm" svg:height="2.14cm" style:legend-expansion-aspect-ratio="2.44392523364486" chart:style-name="ch3"/>
        <chart:plot-area chart:style-name="ch4" table:cell-range-address="losses_summary.A2:losses_summary.A101 losses_summary.E2:losses_summary.E101 losses_summary.A110:losses_summary.A110 losses_summary.E112:losses_summary.E184 losses_summary.A254:losses_summary.A254 losses_summary.E255:losses_summary.E333 losses_summary.A335:losses_summary.A335 losses_summary.E336:losses_summary.E386" chart:data-source-has-labels="both" svg:x="1.829cm" svg:y="1.739cm" svg:width="32.78cm" svg:height="17.482cm">
          <chart:coordinate-region svg:x="2.45cm" svg:y="1.938cm" svg:width="32.018cm" svg:height="16.229cm"/>
          <chart:axis chart:dimension="x" chart:name="primary-x" chart:style-name="ch5">
            <chart:title svg:x="17.315cm" svg:y="19.633cm" chart:style-name="ch6">
              <text:p>Load Power</text:p>
            </chart:title>
            <chart:grid chart:style-name="ch7" chart:class="major"/>
          </chart:axis>
          <chart:axis chart:dimension="y" chart:name="primary-y" chart:style-name="ch8">
            <chart:title svg:x="0.451cm" svg:y="11.463cm" chart:style-name="ch9">
              <text:p>Efficency (%)</text:p>
            </chart:title>
            <chart:grid chart:style-name="ch7" chart:class="major"/>
          </chart:axis>
          <chart:series chart:style-name="ch10" chart:values-cell-range-address="losses_summary.E2:losses_summary.E101" loext:label-string="simulations_efficiency" chart:class="chart:scatter">
            <chart:domain table:cell-range-address="losses_summary.A2:losses_summary.A101"/>
            <chart:data-point chart:repeated="100"/>
          </chart:series>
          <chart:series chart:style-name="ch11" chart:values-cell-range-address="losses_summary.E112:losses_summary.E184" chart:label-cell-address="losses_summary.A110:losses_summary.A110" chart:class="chart:scatter">
            <chart:domain table:cell-range-address="losses_summary.A112:losses_summary.A184"/>
            <chart:data-point chart:repeated="73"/>
          </chart:series>
          <chart:series chart:style-name="ch12" chart:values-cell-range-address="losses_summary.E255:losses_summary.E333" chart:label-cell-address="losses_summary.A254:losses_summary.A254" chart:class="chart:scatter">
            <chart:domain table:cell-range-address="losses_summary.A255:losses_summary.A333"/>
            <chart:data-point chart:repeated="79"/>
          </chart:series>
          <chart:series chart:style-name="ch12" chart:values-cell-range-address="losses_summary.E336:losses_summary.E386" chart:label-cell-address="losses_summary.A335:losses_summary.A335" chart:class="chart:scatter">
            <chart:domain table:cell-range-address="losses_summary.A336:losses_summary.A386"/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simulations_efficiency</text:p>
              </table:table-cell>
              <table:table-cell office:value-type="string">
                <text:p>Colonna A</text:p>
              </table:table-cell>
              <table:table-cell office:value-type="string">
                <text:p>EPC_50Hz</text:p>
                <draw:g>
                  <svg:desc>losses_summary.A110:losses_summary.A110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OCP_min</text:p>
                <draw:g>
                  <svg:desc>losses_summary.A254:losses_summary.A254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OCP_peak</text:p>
                <draw:g>
                  <svg:desc>losses_summary.A335:losses_summary.A335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0">
                <text:p>50</text:p>
                <draw:g>
                  <svg:desc>losses_summary.A2:losses_summary.A101</svg:desc>
                </draw:g>
              </table:table-cell>
              <table:table-cell office:value-type="float" office:value="84.0780614357687">
                <text:p>84.0780614357687</text:p>
                <draw:g>
                  <svg:desc>losses_summary.E2:losses_summary.E101</svg:desc>
                </draw:g>
              </table:table-cell>
              <table:table-cell office:value-type="float" office:value="383.8701885464">
                <text:p>383.8701885464</text:p>
                <draw:g>
                  <svg:desc>losses_summary.A112:losses_summary.A184</svg:desc>
                </draw:g>
              </table:table-cell>
              <table:table-cell office:value-type="float" office:value="94.1166396342632">
                <text:p>94.1166396342632</text:p>
                <draw:g>
                  <svg:desc>losses_summary.E112:losses_summary.E184</svg:desc>
                </draw:g>
              </table:table-cell>
              <table:table-cell office:value-type="float" office:value="500.634101465262">
                <text:p>500.634101465262</text:p>
                <draw:g>
                  <svg:desc>losses_summary.A255:losses_summary.A333</svg:desc>
                </draw:g>
              </table:table-cell>
              <table:table-cell office:value-type="float" office:value="96.9983392462902">
                <text:p>96.9983392462902</text:p>
                <draw:g>
                  <svg:desc>losses_summary.E255:losses_summary.E333</svg:desc>
                </draw:g>
              </table:table-cell>
              <table:table-cell office:value-type="float" office:value="1501.96739238284">
                <text:p>1501.96739238284</text:p>
                <draw:g>
                  <svg:desc>losses_summary.A336:losses_summary.A386</svg:desc>
                </draw:g>
              </table:table-cell>
              <table:table-cell office:value-type="float" office:value="98.7537647045901">
                <text:p>98.7537647045901</text:p>
                <draw:g>
                  <svg:desc>losses_summary.E336:losses_summary.E386</svg:desc>
                </draw:g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91.6796606842046">
                <text:p>91.6796606842046</text:p>
              </table:table-cell>
              <table:table-cell office:value-type="float" office:value="388.621728220568">
                <text:p>388.621728220568</text:p>
              </table:table-cell>
              <table:table-cell office:value-type="float" office:value="94.0204408905682">
                <text:p>94.0204408905682</text:p>
              </table:table-cell>
              <table:table-cell office:value-type="float" office:value="565.290690617134">
                <text:p>565.290690617134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569.70318736006">
                <text:p>1569.7031873600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94.1012175660788">
                <text:p>94.1012175660788</text:p>
              </table:table-cell>
              <table:table-cell office:value-type="float" office:value="398.988785702322">
                <text:p>398.988785702322</text:p>
              </table:table-cell>
              <table:table-cell office:value-type="float" office:value="94.2848434256341">
                <text:p>94.2848434256341</text:p>
              </table:table-cell>
              <table:table-cell office:value-type="float" office:value="633.026485594352">
                <text:p>633.02648559435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647.90724156103">
                <text:p>1647.9072415610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95.259627624515">
                <text:p>95.259627624515</text:p>
              </table:table-cell>
              <table:table-cell office:value-type="float" office:value="402.133657039698">
                <text:p>402.133657039698</text:p>
              </table:table-cell>
              <table:table-cell office:value-type="float" office:value="94.4524711766235">
                <text:p>94.4524711766235</text:p>
              </table:table-cell>
              <table:table-cell office:value-type="float" office:value="700.762790660996">
                <text:p>700.762790660996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715.64262846671">
                <text:p>1715.64262846671</text:p>
              </table:table-cell>
              <table:table-cell office:value-type="float" office:value="98.7527278319036">
                <text:p>98.7527278319036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95.85234">
                <text:p>95.85234</text:p>
              </table:table-cell>
              <table:table-cell office:value-type="float" office:value="416.562386586073">
                <text:p>416.562386586073</text:p>
              </table:table-cell>
              <table:table-cell office:value-type="float" office:value="94.6062739584592">
                <text:p>94.6062739584592</text:p>
              </table:table-cell>
              <table:table-cell office:value-type="float" office:value="768.498075548789">
                <text:p>768.498075548789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783.68672149263">
                <text:p>1783.6867214926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96.3800103875685">
                <text:p>96.3800103875685</text:p>
              </table:table-cell>
              <table:table-cell office:value-type="float" office:value="417.940502473658">
                <text:p>417.940502473658</text:p>
              </table:table-cell>
              <table:table-cell office:value-type="float" office:value="94.7551392513114">
                <text:p>94.7551392513114</text:p>
              </table:table-cell>
              <table:table-cell office:value-type="float" office:value="846.702435803415">
                <text:p>846.70243580341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851.42200638043">
                <text:p>1851.42200638043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/>
              <table:table-cell office:value-type="float" office:value="350">
                <text:p>350</text:p>
              </table:table-cell>
              <table:table-cell office:value-type="float" office:value="96.61709">
                <text:p>96.61709</text:p>
              </table:table-cell>
              <table:table-cell office:value-type="float" office:value="432.071145475821">
                <text:p>432.071145475821</text:p>
              </table:table-cell>
              <table:table-cell office:value-type="float" office:value="94.8965983106884">
                <text:p>94.8965983106884</text:p>
              </table:table-cell>
              <table:table-cell office:value-type="float" office:value="914.437822709093">
                <text:p>914.437822709093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919.15780135765">
                <text:p>1919.15780135765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/>
              <table:table-cell office:value-type="float" office:value="400">
                <text:p>400</text:p>
              </table:table-cell>
              <table:table-cell office:value-type="float" office:value="96.82651">
                <text:p>96.82651</text:p>
              </table:table-cell>
              <table:table-cell office:value-type="float" office:value="434.766749479286">
                <text:p>434.766749479286</text:p>
              </table:table-cell>
              <table:table-cell office:value-type="float" office:value="95.0402792401079">
                <text:p>95.0402792401079</text:p>
              </table:table-cell>
              <table:table-cell office:value-type="float" office:value="982.481609681366">
                <text:p>982.481609681366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993.97516782764">
                <text:p>1993.97516782764</text:p>
              </table:table-cell>
              <table:table-cell office:value-type="float" office:value="98.7527278319036">
                <text:p>98.7527278319036</text:p>
              </table:table-cell>
            </table:table-row>
            <table:table-row>
              <table:table-cell office:value-type="string"/>
              <table:table-cell office:value-type="float" office:value="450">
                <text:p>450</text:p>
              </table:table-cell>
              <table:table-cell office:value-type="float" office:value="96.97536">
                <text:p>96.97536</text:p>
              </table:table-cell>
              <table:table-cell office:value-type="float" office:value="452.734868098623">
                <text:p>452.734868098623</text:p>
              </table:table-cell>
              <table:table-cell office:value-type="float" office:value="95.2465428423932">
                <text:p>95.2465428423932</text:p>
              </table:table-cell>
              <table:table-cell office:value-type="float" office:value="1050.21791474801">
                <text:p>1050.21791474801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061.7113708764">
                <text:p>2061.711370876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97.0872">
                <text:p>97.0872</text:p>
              </table:table-cell>
              <table:table-cell office:value-type="float" office:value="469.238019604211">
                <text:p>469.238019604211</text:p>
              </table:table-cell>
              <table:table-cell office:value-type="float" office:value="95.4557936255134">
                <text:p>95.4557936255134</text:p>
              </table:table-cell>
              <table:table-cell office:value-type="float" office:value="1117.95370972523">
                <text:p>1117.95370972523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129.44716585362">
                <text:p>2129.44716585362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550">
                <text:p>550</text:p>
              </table:table-cell>
              <table:table-cell office:value-type="float" office:value="97.17409">
                <text:p>97.17409</text:p>
              </table:table-cell>
              <table:table-cell office:value-type="float" office:value="491.620668291683">
                <text:p>491.620668291683</text:p>
              </table:table-cell>
              <table:table-cell office:value-type="float" office:value="95.6098371099371">
                <text:p>95.6098371099371</text:p>
              </table:table-cell>
              <table:table-cell office:value-type="float" office:value="1185.68899461302">
                <text:p>1185.6889946130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200.87764055687">
                <text:p>2200.8776405568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600">
                <text:p>600</text:p>
              </table:table-cell>
              <table:table-cell office:value-type="float" office:value="97.24565">
                <text:p>97.24565</text:p>
              </table:table-cell>
              <table:table-cell office:value-type="float" office:value="521.703549217024">
                <text:p>521.703549217024</text:p>
              </table:table-cell>
              <table:table-cell office:value-type="float" office:value="95.7714596399504">
                <text:p>95.7714596399504</text:p>
              </table:table-cell>
              <table:table-cell office:value-type="float" office:value="1260.50615704725">
                <text:p>1260.5061570472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268.61343553409">
                <text:p>2268.61343553409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650">
                <text:p>650</text:p>
              </table:table-cell>
              <table:table-cell office:value-type="float" office:value="97.30273">
                <text:p>97.30273</text:p>
              </table:table-cell>
              <table:table-cell office:value-type="float" office:value="542.433802074882">
                <text:p>542.433802074882</text:p>
              </table:table-cell>
              <table:table-cell office:value-type="float" office:value="95.9179179069231">
                <text:p>95.9179179069231</text:p>
              </table:table-cell>
              <table:table-cell office:value-type="float" office:value="1328.24195202447">
                <text:p>1328.24195202447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340.04391023733">
                <text:p>2340.0439102373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700">
                <text:p>700</text:p>
              </table:table-cell>
              <table:table-cell office:value-type="float" office:value="97.34937">
                <text:p>97.34937</text:p>
              </table:table-cell>
              <table:table-cell office:value-type="float" office:value="571.08479640021">
                <text:p>571.08479640021</text:p>
              </table:table-cell>
              <table:table-cell office:value-type="float" office:value="96.073448809903">
                <text:p>96.073448809903</text:p>
              </table:table-cell>
              <table:table-cell office:value-type="float" office:value="1395.97815507322">
                <text:p>1395.9781550732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407.77970521455">
                <text:p>2407.77970521455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750">
                <text:p>750</text:p>
              </table:table-cell>
              <table:table-cell office:value-type="float" office:value="97.38909">
                <text:p>97.38909</text:p>
              </table:table-cell>
              <table:table-cell office:value-type="float" office:value="591.813761889517">
                <text:p>591.813761889517</text:p>
              </table:table-cell>
              <table:table-cell office:value-type="float" office:value="96.2166359904242">
                <text:p>96.2166359904242</text:p>
              </table:table-cell>
              <table:table-cell office:value-type="float" office:value="1472.34085446044">
                <text:p>1472.34085446044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475.51550019177">
                <text:p>2475.5155001917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800">
                <text:p>800</text:p>
              </table:table-cell>
              <table:table-cell office:value-type="float" office:value="97.42358">
                <text:p>97.42358</text:p>
              </table:table-cell>
              <table:table-cell office:value-type="float" office:value="620.460772659333">
                <text:p>620.460772659333</text:p>
              </table:table-cell>
              <table:table-cell office:value-type="float" office:value="96.362045040988">
                <text:p>96.362045040988</text:p>
              </table:table-cell>
              <table:table-cell office:value-type="float" office:value="1501.33658179343">
                <text:p>1501.33658179343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550.33276464388">
                <text:p>2550.3327646438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850">
                <text:p>850</text:p>
              </table:table-cell>
              <table:table-cell office:value-type="float" office:value="97.45315">
                <text:p>97.45315</text:p>
              </table:table-cell>
              <table:table-cell office:value-type="float" office:value="642.071085231823">
                <text:p>642.071085231823</text:p>
              </table:table-cell>
              <table:table-cell office:value-type="float" office:value="96.50945377459">
                <text:p>96.50945377459</text:p>
              </table:table-cell>
              <table:table-cell office:value-type="float" office:value="1501.38146966287">
                <text:p>1501.38146966287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618.0685596211">
                <text:p>2618.068559621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900">
                <text:p>900</text:p>
              </table:table-cell>
              <table:table-cell office:value-type="float" office:value="97.47903">
                <text:p>97.47903</text:p>
              </table:table-cell>
              <table:table-cell office:value-type="float" office:value="666.75757709907">
                <text:p>666.75757709907</text:p>
              </table:table-cell>
              <table:table-cell office:value-type="float" office:value="96.6499500236152">
                <text:p>96.6499500236152</text:p>
              </table:table-cell>
              <table:table-cell office:value-type="float" office:value="1501.43599255478">
                <text:p>1501.43599255478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685.80435459832">
                <text:p>2685.80435459832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950">
                <text:p>950</text:p>
              </table:table-cell>
              <table:table-cell office:value-type="float" office:value="97.50194">
                <text:p>97.50194</text:p>
              </table:table-cell>
              <table:table-cell office:value-type="float" office:value="697.591054613882">
                <text:p>697.591054613882</text:p>
              </table:table-cell>
              <table:table-cell office:value-type="float" office:value="96.7629691464473">
                <text:p>96.7629691464473</text:p>
              </table:table-cell>
              <table:table-cell office:value-type="float" office:value="1501.49691990282">
                <text:p>1501.4969199028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753.84803955271">
                <text:p>2753.8480395527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97.52216">
                <text:p>97.52216</text:p>
              </table:table-cell>
              <table:table-cell office:value-type="float" office:value="728.423715985614">
                <text:p>728.423715985614</text:p>
              </table:table-cell>
              <table:table-cell office:value-type="float" office:value="96.8739145239063">
                <text:p>96.8739145239063</text:p>
              </table:table-cell>
              <table:table-cell office:value-type="float" office:value="1501.54180777225">
                <text:p>1501.5418077722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821.58383452993">
                <text:p>2821.5838345299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1050">
                <text:p>1050</text:p>
              </table:table-cell>
              <table:table-cell office:value-type="float" office:value="97.53983">
                <text:p>97.53983</text:p>
              </table:table-cell>
              <table:table-cell office:value-type="float" office:value="756.171254494664">
                <text:p>756.171254494664</text:p>
              </table:table-cell>
              <table:table-cell office:value-type="float" office:value="96.9690475928957">
                <text:p>96.9690475928957</text:p>
              </table:table-cell>
              <table:table-cell office:value-type="float" office:value="1501.58669564168">
                <text:p>1501.58669564168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899.7878887309">
                <text:p>2899.7878887309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1100">
                <text:p>1100</text:p>
              </table:table-cell>
              <table:table-cell office:value-type="float" office:value="97.5556">
                <text:p>97.5556</text:p>
              </table:table-cell>
              <table:table-cell office:value-type="float" office:value="787.008710706994">
                <text:p>787.008710706994</text:p>
              </table:table-cell>
              <table:table-cell office:value-type="float" office:value="97.0921762244214">
                <text:p>97.0921762244214</text:p>
              </table:table-cell>
              <table:table-cell office:value-type="float" office:value="1501.63158351112">
                <text:p>1501.6315835111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967.52317361869">
                <text:p>2967.52317361869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/>
              <table:table-cell office:value-type="float" office:value="1150">
                <text:p>1150</text:p>
              </table:table-cell>
              <table:table-cell office:value-type="float" office:value="97.56946">
                <text:p>97.56946</text:p>
              </table:table-cell>
              <table:table-cell office:value-type="float" office:value="820.920883957728">
                <text:p>820.920883957728</text:p>
              </table:table-cell>
              <table:table-cell office:value-type="float" office:value="97.2046769109102">
                <text:p>97.2046769109102</text:p>
              </table:table-cell>
              <table:table-cell office:value-type="float" office:value="1501.67647138055">
                <text:p>1501.6764713805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3045.72773790908">
                <text:p>3045.7277379090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1200">
                <text:p>1200</text:p>
              </table:table-cell>
              <table:table-cell office:value-type="float" office:value="97.58189">
                <text:p>97.58189</text:p>
              </table:table-cell>
              <table:table-cell office:value-type="float" office:value="857.915950251655">
                <text:p>857.915950251655</text:p>
              </table:table-cell>
              <table:table-cell office:value-type="float" office:value="97.3273241372601">
                <text:p>97.3273241372601</text:p>
              </table:table-cell>
              <table:table-cell office:value-type="float" office:value="1501.72458981635">
                <text:p>1501.7245898163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3113.4635328863">
                <text:p>3113.463532886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1250">
                <text:p>1250</text:p>
              </table:table-cell>
              <table:table-cell office:value-type="float" office:value="97.59288">
                <text:p>97.59288</text:p>
              </table:table-cell>
              <table:table-cell office:value-type="float" office:value="910.30038536182">
                <text:p>910.30038536182</text:p>
              </table:table-cell>
              <table:table-cell office:value-type="float" office:value="97.4369363926936">
                <text:p>97.4369363926936</text:p>
              </table:table-cell>
              <table:table-cell office:value-type="float" office:value="1501.76947768579">
                <text:p>1501.76947768579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3181.19932786352">
                <text:p>3181.19932786352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1300">
                <text:p>1300</text:p>
              </table:table-cell>
              <table:table-cell office:value-type="float" office:value="97.6025">
                <text:p>97.6025</text:p>
              </table:table-cell>
              <table:table-cell office:value-type="float" office:value="968.844595599809">
                <text:p>968.844595599809</text:p>
              </table:table-cell>
              <table:table-cell office:value-type="float" office:value="97.5515684285936">
                <text:p>97.5515684285936</text:p>
              </table:table-cell>
              <table:table-cell office:value-type="float" office:value="1508.47046579061">
                <text:p>1508.47046579061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249.24301281791">
                <text:p>3249.2430128179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1350">
                <text:p>1350</text:p>
              </table:table-cell>
              <table:table-cell office:value-type="float" office:value="97.61109">
                <text:p>97.61109</text:p>
              </table:table-cell>
              <table:table-cell office:value-type="float" office:value="1027.38835242498">
                <text:p>1027.38835242498</text:p>
              </table:table-cell>
              <table:table-cell office:value-type="float" office:value="97.6650483837308">
                <text:p>97.6650483837308</text:p>
              </table:table-cell>
              <table:table-cell office:value-type="float" office:value="1579.97353188676">
                <text:p>1579.9735318867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316.97880779513">
                <text:p>3316.9788077951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1400">
                <text:p>1400</text:p>
              </table:table-cell>
              <table:table-cell office:value-type="float" office:value="97.61881">
                <text:p>97.61881</text:p>
              </table:table-cell>
              <table:table-cell office:value-type="float" office:value="1092.08698221985">
                <text:p>1092.08698221985</text:p>
              </table:table-cell>
              <table:table-cell office:value-type="float" office:value="97.7710921812171">
                <text:p>97.7710921812171</text:p>
              </table:table-cell>
              <table:table-cell office:value-type="float" office:value="1647.70973493551">
                <text:p>1647.70973493551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391.79607224724">
                <text:p>3391.7960722472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1450">
                <text:p>1450</text:p>
              </table:table-cell>
              <table:table-cell office:value-type="float" office:value="97.62578">
                <text:p>97.62578</text:p>
              </table:table-cell>
              <table:table-cell office:value-type="float" office:value="1159.85968912276">
                <text:p>1159.85968912276</text:p>
              </table:table-cell>
              <table:table-cell office:value-type="float" office:value="97.8648820287716">
                <text:p>97.8648820287716</text:p>
              </table:table-cell>
              <table:table-cell office:value-type="float" office:value="1715.75301181836">
                <text:p>1715.7530118183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459.53186722446">
                <text:p>3459.5318672244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97.63198">
                <text:p>97.63198</text:p>
              </table:table-cell>
              <table:table-cell office:value-type="float" office:value="1227.6327669998">
                <text:p>1227.6327669998</text:p>
              </table:table-cell>
              <table:table-cell office:value-type="float" office:value="97.9596144878594">
                <text:p>97.9596144878594</text:p>
              </table:table-cell>
              <table:table-cell office:value-type="float" office:value="1752.90078431227">
                <text:p>1752.9007843122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527.26766220167">
                <text:p>3527.2676622016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1550">
                <text:p>1550</text:p>
              </table:table-cell>
              <table:table-cell office:value-type="float" office:value="97.6374">
                <text:p>97.6374</text:p>
              </table:table-cell>
              <table:table-cell office:value-type="float" office:value="1295.3999092908">
                <text:p>1295.3999092908</text:p>
              </table:table-cell>
              <table:table-cell office:value-type="float" office:value="98.0392651624158">
                <text:p>98.0392651624158</text:p>
              </table:table-cell>
              <table:table-cell office:value-type="float" office:value="1783.48880679558">
                <text:p>1783.4888067955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598.6976268155">
                <text:p>3598.6976268155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97.6421">
                <text:p>97.6421</text:p>
              </table:table-cell>
              <table:table-cell office:value-type="float" office:value="1363.16278537933">
                <text:p>1363.16278537933</text:p>
              </table:table-cell>
              <table:table-cell office:value-type="float" office:value="98.1080758043402">
                <text:p>98.1080758043402</text:p>
              </table:table-cell>
              <table:table-cell office:value-type="float" office:value="1826.79437883287">
                <text:p>1826.7943788328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666.43393188214">
                <text:p>3666.4339318821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1650">
                <text:p>1650</text:p>
              </table:table-cell>
              <table:table-cell office:value-type="float" office:value="97.64607">
                <text:p>97.64607</text:p>
              </table:table-cell>
              <table:table-cell office:value-type="float" office:value="1430.92529049373">
                <text:p>1430.92529049373</text:p>
              </table:table-cell>
              <table:table-cell office:value-type="float" office:value="98.1759438347314">
                <text:p>98.1759438347314</text:p>
              </table:table-cell>
              <table:table-cell office:value-type="float" office:value="1858.30607124769">
                <text:p>1858.30607124769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734.16972685936">
                <text:p>3734.1697268593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1700">
                <text:p>1700</text:p>
              </table:table-cell>
              <table:table-cell office:value-type="float" office:value="97.6495">
                <text:p>97.6495</text:p>
              </table:table-cell>
              <table:table-cell office:value-type="float" office:value="1497.4482041096">
                <text:p>1497.4482041096</text:p>
              </table:table-cell>
              <table:table-cell office:value-type="float" office:value="98.2234043254287">
                <text:p>98.2234043254287</text:p>
              </table:table-cell>
              <table:table-cell office:value-type="float" office:value="1900.68797335347">
                <text:p>1900.6879733534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805.60020156261">
                <text:p>3805.6002015626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1750">
                <text:p>1750</text:p>
              </table:table-cell>
              <table:table-cell office:value-type="float" office:value="97.65253">
                <text:p>97.65253</text:p>
              </table:table-cell>
              <table:table-cell office:value-type="float" office:value="1566.44065539522">
                <text:p>1566.44065539522</text:p>
              </table:table-cell>
              <table:table-cell office:value-type="float" office:value="98.2871719956504">
                <text:p>98.2871719956504</text:p>
              </table:table-cell>
              <table:table-cell office:value-type="float" office:value="1929.73654595094">
                <text:p>1929.73654595094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873.33599653983">
                <text:p>3873.3359965398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1800">
                <text:p>1800</text:p>
              </table:table-cell>
              <table:table-cell office:value-type="float" office:value="97.6551">
                <text:p>97.6551</text:p>
              </table:table-cell>
              <table:table-cell office:value-type="float" office:value="1634.1940716435">
                <text:p>1634.1940716435</text:p>
              </table:table-cell>
              <table:table-cell office:value-type="float" office:value="98.331946043478">
                <text:p>98.331946043478</text:p>
              </table:table-cell>
              <table:table-cell office:value-type="float" office:value="1997.47336110701">
                <text:p>1997.47336110701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948.15326099194">
                <text:p>3948.1532609919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1850">
                <text:p>1850</text:p>
              </table:table-cell>
              <table:table-cell office:value-type="float" office:value="97.65716">
                <text:p>97.65716</text:p>
              </table:table-cell>
              <table:table-cell office:value-type="float" office:value="1701.94804435297">
                <text:p>1701.94804435297</text:p>
              </table:table-cell>
              <table:table-cell office:value-type="float" office:value="98.3781340086053">
                <text:p>98.3781340086053</text:p>
              </table:table-cell>
              <table:table-cell office:value-type="float" office:value="2065.20813590538">
                <text:p>2065.2081359053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015.88854587973">
                <text:p>4015.88854587973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/>
              <table:table-cell office:value-type="float" office:value="1900">
                <text:p>1900</text:p>
              </table:table-cell>
              <table:table-cell office:value-type="float" office:value="97.65876">
                <text:p>97.65876</text:p>
              </table:table-cell>
              <table:table-cell office:value-type="float" office:value="1769.69737988584">
                <text:p>1769.69737988584</text:p>
              </table:table-cell>
              <table:table-cell office:value-type="float" office:value="98.4125393295676">
                <text:p>98.4125393295676</text:p>
              </table:table-cell>
              <table:table-cell office:value-type="float" office:value="2136.63861060862">
                <text:p>2136.6386106086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083.62485094638">
                <text:p>4083.6248509463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1950">
                <text:p>1950</text:p>
              </table:table-cell>
              <table:table-cell office:value-type="float" office:value="97.66008">
                <text:p>97.66008</text:p>
              </table:table-cell>
              <table:table-cell office:value-type="float" office:value="1837.44727187991">
                <text:p>1837.44727187991</text:p>
              </table:table-cell>
              <table:table-cell office:value-type="float" office:value="98.4483585678296">
                <text:p>98.4483585678296</text:p>
              </table:table-cell>
              <table:table-cell office:value-type="float" office:value="2211.45587506073">
                <text:p>2211.4558750607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151.66853590076">
                <text:p>4151.6685359007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97.661">
                <text:p>97.661</text:p>
              </table:table-cell>
              <table:table-cell office:value-type="float" office:value="1905.19734936104">
                <text:p>1905.19734936104</text:p>
              </table:table-cell>
              <table:table-cell office:value-type="float" office:value="98.4846491118582">
                <text:p>98.4846491118582</text:p>
              </table:table-cell>
              <table:table-cell office:value-type="float" office:value="2279.1926902168">
                <text:p>2279.192690216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219.40433087798">
                <text:p>4219.4043308779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2050">
                <text:p>2050</text:p>
              </table:table-cell>
              <table:table-cell office:value-type="float" office:value="97.66166">
                <text:p>97.66166</text:p>
              </table:table-cell>
              <table:table-cell office:value-type="float" office:value="1972.9370395666">
                <text:p>1972.9370395666</text:p>
              </table:table-cell>
              <table:table-cell office:value-type="float" office:value="98.494546532957">
                <text:p>98.494546532957</text:p>
              </table:table-cell>
              <table:table-cell office:value-type="float" office:value="2346.92746501517">
                <text:p>2346.9274650151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287.1401258552">
                <text:p>4287.1401258552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2100">
                <text:p>2100</text:p>
              </table:table-cell>
              <table:table-cell office:value-type="float" office:value="97.66202">
                <text:p>97.66202</text:p>
              </table:table-cell>
              <table:table-cell office:value-type="float" office:value="2040.68043951343">
                <text:p>2040.68043951343</text:p>
              </table:table-cell>
              <table:table-cell office:value-type="float" office:value="98.5138700693878">
                <text:p>98.5138700693878</text:p>
              </table:table-cell>
              <table:table-cell office:value-type="float" office:value="2414.97114996956">
                <text:p>2414.9711499695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365.34418005617">
                <text:p>4365.3441800561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2150">
                <text:p>2150</text:p>
              </table:table-cell>
              <table:table-cell office:value-type="float" office:value="97.66207">
                <text:p>97.66207</text:p>
              </table:table-cell>
              <table:table-cell office:value-type="float" office:value="2108.42346848614">
                <text:p>2108.42346848614</text:p>
              </table:table-cell>
              <table:table-cell office:value-type="float" office:value="98.5322509942854">
                <text:p>98.5322509942854</text:p>
              </table:table-cell>
              <table:table-cell office:value-type="float" office:value="2493.17520417053">
                <text:p>2493.1752041705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443.54823425714">
                <text:p>4443.5482342571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2200">
                <text:p>2200</text:p>
              </table:table-cell>
              <table:table-cell office:value-type="float" office:value="97.66192">
                <text:p>97.66192</text:p>
              </table:table-cell>
              <table:table-cell office:value-type="float" office:value="2176.16612648472">
                <text:p>2176.16612648472</text:p>
              </table:table-cell>
              <table:table-cell office:value-type="float" office:value="98.5496893076498">
                <text:p>98.5496893076498</text:p>
              </table:table-cell>
              <table:table-cell office:value-type="float" office:value="2571.3792583715">
                <text:p>2571.379258371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511.28402923436">
                <text:p>4511.2840292343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2250">
                <text:p>2250</text:p>
              </table:table-cell>
              <table:table-cell office:value-type="float" office:value="97.66145">
                <text:p>97.66145</text:p>
              </table:table-cell>
              <table:table-cell office:value-type="float" office:value="2243.91267971163">
                <text:p>2243.91267971163</text:p>
              </table:table-cell>
              <table:table-cell office:value-type="float" office:value="98.577025042113">
                <text:p>98.577025042113</text:p>
              </table:table-cell>
              <table:table-cell office:value-type="float" office:value="2639.11546142026">
                <text:p>2639.1154614202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579.01982421158">
                <text:p>4579.0198242115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2300">
                <text:p>2300</text:p>
              </table:table-cell>
              <table:table-cell office:value-type="float" office:value="97.66073">
                <text:p>97.66073</text:p>
              </table:table-cell>
              <table:table-cell office:value-type="float" office:value="2311.65051504655">
                <text:p>2311.65051504655</text:p>
              </table:table-cell>
              <table:table-cell office:value-type="float" office:value="98.5822094055456">
                <text:p>98.5822094055456</text:p>
              </table:table-cell>
              <table:table-cell office:value-type="float" office:value="2707.15873830311">
                <text:p>2707.15873830311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647.06350916597">
                <text:p>4647.0635091659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2350">
                <text:p>2350</text:p>
              </table:table-cell>
              <table:table-cell office:value-type="float" office:value="97.65985">
                <text:p>97.65985</text:p>
              </table:table-cell>
              <table:table-cell office:value-type="float" office:value="2379.39206012275">
                <text:p>2379.39206012275</text:p>
              </table:table-cell>
              <table:table-cell office:value-type="float" office:value="98.5968198843104">
                <text:p>98.5968198843104</text:p>
              </table:table-cell>
              <table:table-cell office:value-type="float" office:value="2774.89453328033">
                <text:p>2774.8945332803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714.79879405376">
                <text:p>4714.79879405376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/>
              <table:table-cell office:value-type="float" office:value="2400">
                <text:p>2400</text:p>
              </table:table-cell>
              <table:table-cell office:value-type="float" office:value="97.65877">
                <text:p>97.65877</text:p>
              </table:table-cell>
              <table:table-cell office:value-type="float" office:value="2447.13583104371">
                <text:p>2447.13583104371</text:p>
              </table:table-cell>
              <table:table-cell office:value-type="float" office:value="98.6170860322745">
                <text:p>98.6170860322745</text:p>
              </table:table-cell>
              <table:table-cell office:value-type="float" office:value="2849.71179773244">
                <text:p>2849.71179773244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782.5350991204">
                <text:p>4782.535099120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2450">
                <text:p>2450</text:p>
              </table:table-cell>
              <table:table-cell office:value-type="float" office:value="97.65693">
                <text:p>97.65693</text:p>
              </table:table-cell>
              <table:table-cell office:value-type="float" office:value="2514.87236796918">
                <text:p>2514.87236796918</text:p>
              </table:table-cell>
              <table:table-cell office:value-type="float" office:value="98.6189712553409">
                <text:p>98.6189712553409</text:p>
              </table:table-cell>
              <table:table-cell office:value-type="float" office:value="2921.14227243568">
                <text:p>2921.1422724356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857.35236357251">
                <text:p>4857.3523635725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2500">
                <text:p>2500</text:p>
              </table:table-cell>
              <table:table-cell office:value-type="float" office:value="97.65563">
                <text:p>97.65563</text:p>
              </table:table-cell>
              <table:table-cell office:value-type="float" office:value="2582.61502596776">
                <text:p>2582.61502596776</text:p>
              </table:table-cell>
              <table:table-cell office:value-type="float" office:value="98.6364095687053">
                <text:p>98.6364095687053</text:p>
              </table:table-cell>
              <table:table-cell office:value-type="float" office:value="2988.87908759175">
                <text:p>2988.8790875917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925.08815854973">
                <text:p>4925.0881585497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2550">
                <text:p>2550</text:p>
              </table:table-cell>
              <table:table-cell office:value-type="float" office:value="97.65428">
                <text:p>97.65428</text:p>
              </table:table-cell>
              <table:table-cell office:value-type="float" office:value="2650.353788738">
                <text:p>2650.353788738</text:p>
              </table:table-cell>
              <table:table-cell office:value-type="float" office:value="98.643950460971">
                <text:p>98.643950460971</text:p>
              </table:table-cell>
              <table:table-cell office:value-type="float" office:value="3056.61386239012">
                <text:p>3056.6138623901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968.80853530776">
                <text:p>4968.8085353077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/>
              <table:table-cell office:value-type="float" office:value="2600">
                <text:p>2600</text:p>
              </table:table-cell>
              <table:table-cell office:value-type="float" office:value="97.65266">
                <text:p>97.65266</text:p>
              </table:table-cell>
              <table:table-cell office:value-type="float" office:value="2718.0912530988">
                <text:p>2718.0912530988</text:p>
              </table:table-cell>
              <table:table-cell office:value-type="float" office:value="98.6481922128704">
                <text:p>98.6481922128704</text:p>
              </table:table-cell>
              <table:table-cell office:value-type="float" office:value="3128.04433709337">
                <text:p>3128.0443370933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50">
                <text:p>2650</text:p>
              </table:table-cell>
              <table:table-cell office:value-type="float" office:value="97.65094">
                <text:p>97.65094</text:p>
              </table:table-cell>
              <table:table-cell office:value-type="float" office:value="2785.83261268793">
                <text:p>2785.83261268793</text:p>
              </table:table-cell>
              <table:table-cell office:value-type="float" office:value="98.6623313858686">
                <text:p>98.6623313858686</text:p>
              </table:table-cell>
              <table:table-cell office:value-type="float" office:value="3202.86160154548">
                <text:p>3202.8616015454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00">
                <text:p>2700</text:p>
              </table:table-cell>
              <table:table-cell office:value-type="float" office:value="97.64908">
                <text:p>97.64908</text:p>
              </table:table-cell>
              <table:table-cell office:value-type="float" office:value="2853.56636730744">
                <text:p>2853.56636730744</text:p>
              </table:table-cell>
              <table:table-cell office:value-type="float" office:value="98.657147022436">
                <text:p>98.657147022436</text:p>
              </table:table-cell>
              <table:table-cell office:value-type="float" office:value="3270.59841670155">
                <text:p>3270.5984167015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50">
                <text:p>2750</text:p>
              </table:table-cell>
              <table:table-cell office:value-type="float" office:value="97.64702">
                <text:p>97.64702</text:p>
              </table:table-cell>
              <table:table-cell office:value-type="float" office:value="2912.06676137903">
                <text:p>2912.06676137903</text:p>
              </table:table-cell>
              <table:table-cell office:value-type="float" office:value="98.6604461628022">
                <text:p>98.6604461628022</text:p>
              </table:table-cell>
              <table:table-cell office:value-type="float" office:value="3338.33319149992">
                <text:p>3338.3331914999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00">
                <text:p>2800</text:p>
              </table:table-cell>
              <table:table-cell office:value-type="float" office:value="97.64436">
                <text:p>97.64436</text:p>
              </table:table-cell>
              <table:table-cell office:value-type="float" office:value="2979.81301318947">
                <text:p>2979.81301318947</text:p>
              </table:table-cell>
              <table:table-cell office:value-type="float" office:value="98.6870160253946">
                <text:p>98.6870160253946</text:p>
              </table:table-cell>
              <table:table-cell office:value-type="float" office:value="3406.3768764543">
                <text:p>3406.376876454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50">
                <text:p>2850</text:p>
              </table:table-cell>
              <table:table-cell office:value-type="float" office:value="97.64205">
                <text:p>97.64205</text:p>
              </table:table-cell>
              <table:table-cell office:value-type="float" office:value="3161.47542314604">
                <text:p>3161.47542314604</text:p>
              </table:table-cell>
              <table:table-cell office:value-type="float" office:value="98.7056241870011">
                <text:p>98.7056241870011</text:p>
              </table:table-cell>
              <table:table-cell office:value-type="float" office:value="3484.58093065527">
                <text:p>3484.5809306552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00">
                <text:p>2900</text:p>
              </table:table-cell>
              <table:table-cell office:value-type="float" office:value="97.63974">
                <text:p>97.63974</text:p>
              </table:table-cell>
              <table:table-cell office:value-type="float" office:value="3343.13083759048">
                <text:p>3343.13083759048</text:p>
              </table:table-cell>
              <table:table-cell office:value-type="float" office:value="98.7064573882671">
                <text:p>98.7064573882671</text:p>
              </table:table-cell>
              <table:table-cell office:value-type="float" office:value="3562.78498485625">
                <text:p>3562.7849848562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50">
                <text:p>2950</text:p>
              </table:table-cell>
              <table:table-cell office:value-type="float" office:value="97.63711">
                <text:p>97.63711</text:p>
              </table:table-cell>
              <table:table-cell office:value-type="float" office:value="3524.78355584796">
                <text:p>3524.78355584796</text:p>
              </table:table-cell>
              <table:table-cell office:value-type="float" office:value="98.7004398235685">
                <text:p>98.7004398235685</text:p>
              </table:table-cell>
              <table:table-cell office:value-type="float" office:value="3630.521187905">
                <text:p>3630.52118790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00">
                <text:p>3000</text:p>
              </table:table-cell>
              <table:table-cell office:value-type="float" office:value="97.6345">
                <text:p>97.6345</text:p>
              </table:table-cell>
              <table:table-cell office:value-type="float" office:value="3709.509963678">
                <text:p>3709.509963678</text:p>
              </table:table-cell>
              <table:table-cell office:value-type="float" office:value="98.6811836165329">
                <text:p>98.6811836165329</text:p>
              </table:table-cell>
              <table:table-cell office:value-type="float" office:value="3698.56446478785">
                <text:p>3698.5644647878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50">
                <text:p>3050</text:p>
              </table:table-cell>
              <table:table-cell office:value-type="float" office:value="97.63169">
                <text:p>97.63169</text:p>
              </table:table-cell>
              <table:table-cell office:value-type="float" office:value="3808.02251422593">
                <text:p>3808.02251422593</text:p>
              </table:table-cell>
              <table:table-cell office:value-type="float" office:value="98.6500774359369">
                <text:p>98.6500774359369</text:p>
              </table:table-cell>
              <table:table-cell office:value-type="float" office:value="3766.30025976507">
                <text:p>3766.3002597650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00">
                <text:p>3100</text:p>
              </table:table-cell>
              <table:table-cell office:value-type="float" office:value="97.62879">
                <text:p>97.62879</text:p>
              </table:table-cell>
              <table:table-cell office:value-type="float" office:value="3891.15892913471">
                <text:p>3891.15892913471</text:p>
              </table:table-cell>
              <table:table-cell office:value-type="float" office:value="98.6656305262349">
                <text:p>98.6656305262349</text:p>
              </table:table-cell>
              <table:table-cell office:value-type="float" office:value="3841.11752421718">
                <text:p>3841.1175242171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50">
                <text:p>3150</text:p>
              </table:table-cell>
              <table:table-cell office:value-type="float" office:value="97.62582">
                <text:p>97.62582</text:p>
              </table:table-cell>
              <table:table-cell office:value-type="float" office:value="4075.89674110691">
                <text:p>4075.89674110691</text:p>
              </table:table-cell>
              <table:table-cell office:value-type="float" office:value="98.6753512076711">
                <text:p>98.6753512076711</text:p>
              </table:table-cell>
              <table:table-cell office:value-type="float" office:value="3912.54799892043">
                <text:p>3912.5479989204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00">
                <text:p>3200</text:p>
              </table:table-cell>
              <table:table-cell office:value-type="float" office:value="97.62278">
                <text:p>97.62278</text:p>
              </table:table-cell>
              <table:table-cell office:value-type="float" office:value="4248.31028247211">
                <text:p>4248.31028247211</text:p>
              </table:table-cell>
              <table:table-cell office:value-type="float" office:value="98.6630383445185">
                <text:p>98.6630383445185</text:p>
              </table:table-cell>
              <table:table-cell office:value-type="float" office:value="3980.2848140765">
                <text:p>3980.284814076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50">
                <text:p>3250</text:p>
              </table:table-cell>
              <table:table-cell office:value-type="float" office:value="97.61969">
                <text:p>97.61969</text:p>
              </table:table-cell>
              <table:table-cell office:value-type="float" office:value="4405.33500552017">
                <text:p>4405.33500552017</text:p>
              </table:table-cell>
              <table:table-cell office:value-type="float" office:value="98.6651592204683">
                <text:p>98.6651592204683</text:p>
              </table:table-cell>
              <table:table-cell office:value-type="float" office:value="4048.01958887487">
                <text:p>4048.0195888748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00">
                <text:p>3300</text:p>
              </table:table-cell>
              <table:table-cell office:value-type="float" office:value="97.61643">
                <text:p>97.61643</text:p>
              </table:table-cell>
              <table:table-cell office:value-type="float" office:value="4473.0702440362">
                <text:p>4473.0702440362</text:p>
              </table:table-cell>
              <table:table-cell office:value-type="float" office:value="98.6637453031684">
                <text:p>98.6637453031684</text:p>
              </table:table-cell>
              <table:table-cell office:value-type="float" office:value="4119.45006357812">
                <text:p>4119.4500635781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50">
                <text:p>3350</text:p>
              </table:table-cell>
              <table:table-cell office:value-type="float" office:value="97.6131">
                <text:p>97.6131</text:p>
              </table:table-cell>
              <table:table-cell office:value-type="float" office:value="4540.8030712204">
                <text:p>4540.8030712204</text:p>
              </table:table-cell>
              <table:table-cell office:value-type="float" office:value="98.6562044109028">
                <text:p>98.6562044109028</text:p>
              </table:table-cell>
              <table:table-cell office:value-type="float" office:value="4194.26732803022">
                <text:p>4194.2673280302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00">
                <text:p>3400</text:p>
              </table:table-cell>
              <table:table-cell office:value-type="float" office:value="97.60968">
                <text:p>97.60968</text:p>
              </table:table-cell>
              <table:table-cell office:value-type="float" office:value="4608.52829343498">
                <text:p>4608.52829343498</text:p>
              </table:table-cell>
              <table:table-cell office:value-type="float" office:value="98.6293399822062">
                <text:p>98.6293399822062</text:p>
              </table:table-cell>
              <table:table-cell office:value-type="float" office:value="4262.00414318629">
                <text:p>4262.00414318629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50">
                <text:p>3450</text:p>
              </table:table-cell>
              <table:table-cell office:value-type="float" office:value="97.60615">
                <text:p>97.60615</text:p>
              </table:table-cell>
              <table:table-cell office:value-type="float" office:value="4657.79068978205">
                <text:p>4657.79068978205</text:p>
              </table:table-cell>
              <table:table-cell office:value-type="float" office:value="98.6293399822062">
                <text:p>98.6293399822062</text:p>
              </table:table-cell>
              <table:table-cell office:value-type="float" office:value="4329.73891798466">
                <text:p>4329.7389179846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00">
                <text:p>3500</text:p>
              </table:table-cell>
              <table:table-cell office:value-type="float" office:value="97.6025">
                <text:p>97.6025</text:p>
              </table:table-cell>
              <table:table-cell office:value-type="float" office:value="4802.4836763688">
                <text:p>4802.4836763688</text:p>
              </table:table-cell>
              <table:table-cell office:value-type="float" office:value="98.5904572564612">
                <text:p>98.5904572564612</text:p>
              </table:table-cell>
              <table:table-cell office:value-type="float" office:value="4397.78260293905">
                <text:p>4397.7826029390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50">
                <text:p>3550</text:p>
              </table:table-cell>
              <table:table-cell office:value-type="float" office:value="97.59879">
                <text:p>97.59879</text:p>
              </table:table-cell>
              <table:table-cell office:value-type="float" office:value="4984.13366200436">
                <text:p>4984.13366200436</text:p>
              </table:table-cell>
              <table:table-cell office:value-type="float" office:value="98.5774963478796">
                <text:p>98.5774963478796</text:p>
              </table:table-cell>
              <table:table-cell office:value-type="float" office:value="4475.98665714002">
                <text:p>4475.9866571400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00">
                <text:p>3600</text:p>
              </table:table-cell>
              <table:table-cell office:value-type="float" office:value="97.59495">
                <text:p>97.59495</text:p>
              </table:table-cell>
              <table:table-cell office:value-type="float" office:value="5165.78109719279">
                <text:p>5165.78109719279</text:p>
              </table:table-cell>
              <table:table-cell office:value-type="float" office:value="98.5580549850071">
                <text:p>98.5580549850071</text:p>
              </table:table-cell>
              <table:table-cell office:value-type="float" office:value="4554.19071134099">
                <text:p>4554.19071134099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50">
                <text:p>3650</text:p>
              </table:table-cell>
              <table:table-cell office:value-type="float" office:value="97.59101">
                <text:p>97.59101</text:p>
              </table:table-cell>
              <table:table-cell office:value-type="float" office:value="5276.61383763231">
                <text:p>5276.61383763231</text:p>
              </table:table-cell>
              <table:table-cell office:value-type="float" office:value="98.5386136221346">
                <text:p>98.5386136221346</text:p>
              </table:table-cell>
              <table:table-cell office:value-type="float" office:value="4621.92691438975">
                <text:p>4621.9269143897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00">
                <text:p>3700</text:p>
              </table:table-cell>
              <table:table-cell office:value-type="float" office:value="97.58707">
                <text:p>97.5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9.9701912726">
                <text:p>4689.970191272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50">
                <text:p>3750</text:p>
              </table:table-cell>
              <table:table-cell office:value-type="float" office:value="97.58304">
                <text:p>97.58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7.70598624982">
                <text:p>4757.7059862498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00">
                <text:p>3800</text:p>
              </table:table-cell>
              <table:table-cell office:value-type="float" office:value="97.57893">
                <text:p>97.57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2.52325070193">
                <text:p>4832.5232507019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50">
                <text:p>3850</text:p>
              </table:table-cell>
              <table:table-cell office:value-type="float" office:value="97.57471">
                <text:p>97.57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3.95372540517">
                <text:p>4903.9537254051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00">
                <text:p>3900</text:p>
              </table:table-cell>
              <table:table-cell office:value-type="float" office:value="97.57034">
                <text:p>97.57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1.69054056124">
                <text:p>4971.69054056124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50">
                <text:p>3950</text:p>
              </table:table-cell>
              <table:table-cell office:value-type="float" office:value="97.56598">
                <text:p>97.56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1.71521741439">
                <text:p>5011.71521741439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00">
                <text:p>4000</text:p>
              </table:table-cell>
              <table:table-cell office:value-type="float" office:value="97.56155">
                <text:p>97.5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50">
                <text:p>4050</text:p>
              </table:table-cell>
              <table:table-cell office:value-type="float" office:value="97.557">
                <text:p>97.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00">
                <text:p>4100</text:p>
              </table:table-cell>
              <table:table-cell office:value-type="float" office:value="97.55248">
                <text:p>97.5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50">
                <text:p>4150</text:p>
              </table:table-cell>
              <table:table-cell office:value-type="float" office:value="97.54788">
                <text:p>97.54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00">
                <text:p>4200</text:p>
              </table:table-cell>
              <table:table-cell office:value-type="float" office:value="97.54323">
                <text:p>97.54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50">
                <text:p>4250</text:p>
              </table:table-cell>
              <table:table-cell office:value-type="float" office:value="97.53846">
                <text:p>97.5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00">
                <text:p>4300</text:p>
              </table:table-cell>
              <table:table-cell office:value-type="float" office:value="97.53372">
                <text:p>97.53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50">
                <text:p>4350</text:p>
              </table:table-cell>
              <table:table-cell office:value-type="float" office:value="97.52899">
                <text:p>97.52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00">
                <text:p>4400</text:p>
              </table:table-cell>
              <table:table-cell office:value-type="float" office:value="97.52417">
                <text:p>97.52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50">
                <text:p>4450</text:p>
              </table:table-cell>
              <table:table-cell office:value-type="float" office:value="97.51906">
                <text:p>97.5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00">
                <text:p>4500</text:p>
              </table:table-cell>
              <table:table-cell office:value-type="float" office:value="97.51385">
                <text:p>97.5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50">
                <text:p>4550</text:p>
              </table:table-cell>
              <table:table-cell office:value-type="float" office:value="97.50886">
                <text:p>97.50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00">
                <text:p>4600</text:p>
              </table:table-cell>
              <table:table-cell office:value-type="float" office:value="97.50349">
                <text:p>97.50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50">
                <text:p>4650</text:p>
              </table:table-cell>
              <table:table-cell office:value-type="float" office:value="97.49801">
                <text:p>97.49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00">
                <text:p>4700</text:p>
              </table:table-cell>
              <table:table-cell office:value-type="float" office:value="97.49254">
                <text:p>97.49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50">
                <text:p>4750</text:p>
              </table:table-cell>
              <table:table-cell office:value-type="float" office:value="97.48702">
                <text:p>97.48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00">
                <text:p>4800</text:p>
              </table:table-cell>
              <table:table-cell office:value-type="float" office:value="97.48167">
                <text:p>97.48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50">
                <text:p>4850</text:p>
              </table:table-cell>
              <table:table-cell office:value-type="float" office:value="97.47627">
                <text:p>97.47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00">
                <text:p>4900</text:p>
              </table:table-cell>
              <table:table-cell office:value-type="float" office:value="97.47078">
                <text:p>97.47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50">
                <text:p>4950</text:p>
              </table:table-cell>
              <table:table-cell office:value-type="float" office:value="97.46528">
                <text:p>97.4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97.45971">
                <text:p>97.45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uble_20_Dash_20__28_Rounded_29_" draw:display-name="Double Dash (Rounded)" draw:style="round" draw:dots1="1" draw:dots1-length="701%" draw:distance="399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20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ouble_20_Dash_20__28_Rounded_29_" svg:stroke-width="0.08cm" svg:stroke-color="#1c1c1c" svg:stroke-linecap="round" draw:fill-color="#1c1c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31cm" svg:height="22.485cm" xlink:href=".." xlink:type="simple" chart:class="chart:scatter" chart:style-name="ch1">
        <chart:title svg:x="19.329cm" svg:y="0.585cm" chart:style-name="ch2">
          <text:p>iTHD</text:p>
        </chart:title>
        <chart:legend chart:legend-position="end" svg:x="35.015cm" svg:y="10.445cm" style:legend-expansion="high" chart:style-name="ch3"/>
        <chart:plot-area chart:style-name="ch4" table:cell-range-address="losses_summary.A1:losses_summary.A101 losses_summary.P2:losses_summary.P101 losses_summary.A390:losses_summary.A390 losses_summary.P391:losses_summary.P467 losses_summary.A471:losses_summary.A471 losses_summary.P472:losses_summary.P543" chart:data-source-has-labels="row" svg:x="1.807cm" svg:y="1.813cm" svg:width="32.412cm" svg:height="19.242cm">
          <chart:coordinate-region svg:x="2.428cm" svg:y="2.012cm" svg:width="31.791cm" svg:height="17.989cm"/>
          <chart:axis chart:dimension="x" chart:name="primary-x" chart:style-name="ch5">
            <chart:title svg:x="16.858cm" svg:y="21.504cm" chart:style-name="ch6">
              <text:p>Load Power(W)</text:p>
            </chart:title>
            <chart:grid chart:style-name="ch7" chart:class="major"/>
          </chart:axis>
          <chart:axis chart:dimension="y" chart:name="primary-y" chart:style-name="ch8">
            <chart:title svg:x="0.451cm" svg:y="12.087cm" chart:style-name="ch9">
              <text:p>iTHD(%)</text:p>
            </chart:title>
            <chart:grid chart:style-name="ch7" chart:class="major"/>
          </chart:axis>
          <chart:series chart:style-name="ch10" chart:values-cell-range-address="losses_summary.P2:losses_summary.P101" loext:label-string="simulations_ithd" chart:class="chart:scatter">
            <chart:domain table:cell-range-address="losses_summary.A2:losses_summary.A101"/>
            <chart:data-point chart:repeated="100"/>
          </chart:series>
          <chart:series chart:style-name="ch11" chart:values-cell-range-address="losses_summary.P391:losses_summary.P467" chart:label-cell-address="losses_summary.A390:losses_summary.A390" chart:class="chart:scatter">
            <chart:domain table:cell-range-address="losses_summary.A391:losses_summary.A467"/>
            <chart:data-point chart:repeated="77"/>
          </chart:series>
          <chart:series chart:style-name="ch12" chart:values-cell-range-address="losses_summary.P472:losses_summary.P543" chart:label-cell-address="losses_summary.A471:losses_summary.A471" chart:class="chart:scatter">
            <chart:domain table:cell-range-address="losses_summary.A472:losses_summary.A543"/>
            <chart:data-point chart:repeated="7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simulations_ithd</text:p>
              </table:table-cell>
              <table:table-cell office:value-type="string">
                <text:p>Colonna A</text:p>
              </table:table-cell>
              <table:table-cell office:value-type="string">
                <text:p>iTHD_EPC_50Hz</text:p>
                <draw:g>
                  <svg:desc>losses_summary.A390:losses_summary.A390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iTHD_OCP_min</text:p>
                <draw:g>
                  <svg:desc>losses_summary.A471:losses_summary.A4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losses_summary.A2:losses_summary.A101</svg:desc>
                </draw:g>
              </table:table-cell>
              <table:table-cell office:value-type="float" office:value="224.47134331826">
                <text:p>224.47134331826</text:p>
                <draw:g>
                  <svg:desc>losses_summary.P2:losses_summary.P101</svg:desc>
                </draw:g>
              </table:table-cell>
              <table:table-cell office:value-type="float" office:value="253.742348109824">
                <text:p>253.742348109824</text:p>
                <draw:g>
                  <svg:desc>losses_summary.A391:losses_summary.A467</svg:desc>
                </draw:g>
              </table:table-cell>
              <table:table-cell office:value-type="float" office:value="7.34857547476844">
                <text:p>7.34857547476844</text:p>
                <draw:g>
                  <svg:desc>losses_summary.P391:losses_summary.P467</svg:desc>
                </draw:g>
              </table:table-cell>
              <table:table-cell office:value-type="float" office:value="280.893791011025">
                <text:p>280.893791011025</text:p>
                <draw:g>
                  <svg:desc>losses_summary.A472:losses_summary.A543</svg:desc>
                </draw:g>
              </table:table-cell>
              <table:table-cell office:value-type="float" office:value="14.9839031727462">
                <text:p>14.9839031727462</text:p>
                <draw:g>
                  <svg:desc>losses_summary.P472:losses_summary.P5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42.751988602735">
                <text:p>142.751988602735</text:p>
              </table:table-cell>
              <table:table-cell office:value-type="float" office:value="296.768215528705">
                <text:p>296.768215528705</text:p>
              </table:table-cell>
              <table:table-cell office:value-type="float" office:value="6.70635164970489">
                <text:p>6.70635164970489</text:p>
              </table:table-cell>
              <table:table-cell office:value-type="float" office:value="338.101470414769">
                <text:p>338.101470414769</text:p>
              </table:table-cell>
              <table:table-cell office:value-type="float" office:value="14.9839031727462">
                <text:p>14.98390317274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00.900581416217">
                <text:p>100.900581416217</text:p>
              </table:table-cell>
              <table:table-cell office:value-type="float" office:value="333.640993976667">
                <text:p>333.640993976667</text:p>
              </table:table-cell>
              <table:table-cell office:value-type="float" office:value="6.11386232961259">
                <text:p>6.11386232961259</text:p>
              </table:table-cell>
              <table:table-cell office:value-type="float" office:value="415.111808073655">
                <text:p>415.111808073655</text:p>
              </table:table-cell>
              <table:table-cell office:value-type="float" office:value="14.9839031727462">
                <text:p>14.9839031727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77.6098511805879">
                <text:p>77.6098511805879</text:p>
              </table:table-cell>
              <table:table-cell office:value-type="float" office:value="370.512426678231">
                <text:p>370.512426678231</text:p>
              </table:table-cell>
              <table:table-cell office:value-type="float" office:value="5.51272353039485">
                <text:p>5.51272353039485</text:p>
              </table:table-cell>
              <table:table-cell office:value-type="float" office:value="489.034162402693">
                <text:p>489.034162402693</text:p>
              </table:table-cell>
              <table:table-cell office:value-type="float" office:value="14.9352498526657">
                <text:p>14.9352498526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52.92027">
                <text:p>52.92027</text:p>
              </table:table-cell>
              <table:table-cell office:value-type="float" office:value="407.382513633396">
                <text:p>407.382513633396</text:p>
              </table:table-cell>
              <table:table-cell office:value-type="float" office:value="4.90293525205168">
                <text:p>4.90293525205168</text:p>
              </table:table-cell>
              <table:table-cell office:value-type="float" office:value="497.623489722626">
                <text:p>497.623489722626</text:p>
              </table:table-cell>
              <table:table-cell office:value-type="float" office:value="10.7452259273268">
                <text:p>10.7452259273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53.0558012574158">
                <text:p>53.0558012574158</text:p>
              </table:table-cell>
              <table:table-cell office:value-type="float" office:value="459.652098968123">
                <text:p>459.652098968123</text:p>
              </table:table-cell>
              <table:table-cell office:value-type="float" office:value="4.27663433174178">
                <text:p>4.27663433174178</text:p>
              </table:table-cell>
              <table:table-cell office:value-type="float" office:value="497.722603944882">
                <text:p>497.722603944882</text:p>
              </table:table-cell>
              <table:table-cell office:value-type="float" office:value="11.3822600649151">
                <text:p>11.3822600649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41.15312">
                <text:p>41.15312</text:p>
              </table:table-cell>
              <table:table-cell office:value-type="float" office:value="527.347791758929">
                <text:p>527.347791758929</text:p>
              </table:table-cell>
              <table:table-cell office:value-type="float" office:value="3.8048445612635">
                <text:p>3.8048445612635</text:p>
              </table:table-cell>
              <table:table-cell office:value-type="float" office:value="497.834839194523">
                <text:p>497.834839194523</text:p>
              </table:table-cell>
              <table:table-cell office:value-type="float" office:value="12.1036266239764">
                <text:p>12.1036266239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37.8047">
                <text:p>37.8047</text:p>
              </table:table-cell>
              <table:table-cell office:value-type="float" office:value="595.047888810675">
                <text:p>595.047888810675</text:p>
              </table:table-cell>
              <table:table-cell office:value-type="float" office:value="3.36136217701392">
                <text:p>3.36136217701392</text:p>
              </table:table-cell>
              <table:table-cell office:value-type="float" office:value="497.947881892004">
                <text:p>497.947881892004</text:p>
              </table:table-cell>
              <table:table-cell office:value-type="float" office:value="12.8301828705129">
                <text:p>12.8301828705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33.53494">
                <text:p>33.53494</text:p>
              </table:table-cell>
              <table:table-cell office:value-type="float" office:value="662.761932688735">
                <text:p>662.761932688735</text:p>
              </table:table-cell>
              <table:table-cell office:value-type="float" office:value="3.00751984915522">
                <text:p>3.00751984915522</text:p>
              </table:table-cell>
              <table:table-cell office:value-type="float" office:value="498.05688735029">
                <text:p>498.05688735029</text:p>
              </table:table-cell>
              <table:table-cell office:value-type="float" office:value="13.5307906796731">
                <text:p>13.5307906796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30.74423">
                <text:p>30.74423</text:p>
              </table:table-cell>
              <table:table-cell office:value-type="float" office:value="730.502402132439">
                <text:p>730.502402132439</text:p>
              </table:table-cell>
              <table:table-cell office:value-type="float" office:value="2.82352183866869">
                <text:p>2.82352183866869</text:p>
              </table:table-cell>
              <table:table-cell office:value-type="float" office:value="498.16993004777">
                <text:p>498.16993004777</text:p>
              </table:table-cell>
              <table:table-cell office:value-type="float" office:value="14.2573469262097">
                <text:p>14.2573469262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28.71033">
                <text:p>28.71033</text:p>
              </table:table-cell>
              <table:table-cell office:value-type="float" office:value="798.243605619633">
                <text:p>798.243605619633</text:p>
              </table:table-cell>
              <table:table-cell office:value-type="float" office:value="2.64424172588694">
                <text:p>2.64424172588694</text:p>
              </table:table-cell>
              <table:table-cell office:value-type="float" office:value="503.681915046879">
                <text:p>503.681915046879</text:p>
              </table:table-cell>
              <table:table-cell office:value-type="float" office:value="10.0870623478749">
                <text:p>10.0870623478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26.64918">
                <text:p>26.64918</text:p>
              </table:table-cell>
              <table:table-cell office:value-type="float" office:value="865.989580389513">
                <text:p>865.989580389513</text:p>
              </table:table-cell>
              <table:table-cell office:value-type="float" office:value="2.49562794818629">
                <text:p>2.49562794818629</text:p>
              </table:table-cell>
              <table:table-cell office:value-type="float" office:value="580.666875773677">
                <text:p>580.666875773677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24.23697">
                <text:p>24.23697</text:p>
              </table:table-cell>
              <table:table-cell office:value-type="float" office:value="933.743629637785">
                <text:p>933.743629637785</text:p>
              </table:table-cell>
              <table:table-cell office:value-type="float" office:value="2.39891104523824">
                <text:p>2.39891104523824</text:p>
              </table:table-cell>
              <table:table-cell office:value-type="float" office:value="663.838040445274">
                <text:p>663.838040445274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22.39759">
                <text:p>22.39759</text:p>
              </table:table-cell>
              <table:table-cell office:value-type="float" office:value="1001.49767888606">
                <text:p>1001.49767888606</text:p>
              </table:table-cell>
              <table:table-cell office:value-type="float" office:value="2.30219414229019">
                <text:p>2.30219414229019</text:p>
              </table:table-cell>
              <table:table-cell office:value-type="float" office:value="747.00920511687">
                <text:p>747.00920511687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20.87613">
                <text:p>20.87613</text:p>
              </table:table-cell>
              <table:table-cell office:value-type="float" office:value="1069.25282919956">
                <text:p>1069.25282919956</text:p>
              </table:table-cell>
              <table:table-cell office:value-type="float" office:value="2.21255408589932">
                <text:p>2.21255408589932</text:p>
              </table:table-cell>
              <table:table-cell office:value-type="float" office:value="833.260783294822">
                <text:p>833.260783294822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19.5318">
                <text:p>19.5318</text:p>
              </table:table-cell>
              <table:table-cell office:value-type="float" office:value="1137.01018164354">
                <text:p>1137.01018164354</text:p>
              </table:table-cell>
              <table:table-cell office:value-type="float" office:value="2.1370677226228">
                <text:p>2.1370677226228</text:p>
              </table:table-cell>
              <table:table-cell office:value-type="float" office:value="913.351534460064">
                <text:p>913.351534460064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18.44495">
                <text:p>18.44495</text:p>
              </table:table-cell>
              <table:table-cell office:value-type="float" office:value="1204.76716706577">
                <text:p>1204.76716706577</text:p>
              </table:table-cell>
              <table:table-cell office:value-type="float" office:value="2.05922241049388">
                <text:p>2.05922241049388</text:p>
              </table:table-cell>
              <table:table-cell office:value-type="float" office:value="999.603112638016">
                <text:p>999.603112638016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17.55746">
                <text:p>17.55746</text:p>
              </table:table-cell>
              <table:table-cell office:value-type="float" office:value="1272.52562057499">
                <text:p>1272.52562057499</text:p>
              </table:table-cell>
              <table:table-cell office:value-type="float" office:value="1.99081289377453">
                <text:p>1.99081289377453</text:p>
              </table:table-cell>
              <table:table-cell office:value-type="float" office:value="1085.85469081597">
                <text:p>1085.85469081597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16.67848">
                <text:p>16.67848</text:p>
              </table:table-cell>
              <table:table-cell office:value-type="float" office:value="1340.28701025816">
                <text:p>1340.28701025816</text:p>
              </table:table-cell>
              <table:table-cell office:value-type="float" office:value="1.94127496787431">
                <text:p>1.94127496787431</text:p>
              </table:table-cell>
              <table:table-cell office:value-type="float" office:value="1165.94544198121">
                <text:p>1165.94544198121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15.8156">
                <text:p>15.8156</text:p>
              </table:table-cell>
              <table:table-cell office:value-type="float" office:value="1408.0432616369">
                <text:p>1408.0432616369</text:p>
              </table:table-cell>
              <table:table-cell office:value-type="float" office:value="1.85871175804061">
                <text:p>1.85871175804061</text:p>
              </table:table-cell>
              <table:table-cell office:value-type="float" office:value="1252.19702015916">
                <text:p>1252.19702015916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">
                <text:p>1050</text:p>
              </table:table-cell>
              <table:table-cell office:value-type="float" office:value="15.08548">
                <text:p>15.08548</text:p>
              </table:table-cell>
              <table:table-cell office:value-type="float" office:value="1475.80465132007">
                <text:p>1475.80465132007</text:p>
              </table:table-cell>
              <table:table-cell office:value-type="float" office:value="1.8091738321404">
                <text:p>1.8091738321404</text:p>
              </table:table-cell>
              <table:table-cell office:value-type="float" office:value="1332.2877713244">
                <text:p>1332.2877713244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14.50796">
                <text:p>14.50796</text:p>
              </table:table-cell>
              <table:table-cell office:value-type="float" office:value="1543.56934419895">
                <text:p>1543.56934419895</text:p>
              </table:table-cell>
              <table:table-cell office:value-type="float" office:value="1.7808664459117">
                <text:p>1.7808664459117</text:p>
              </table:table-cell>
              <table:table-cell office:value-type="float" office:value="1418.53934950235">
                <text:p>1418.53934950235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">
                <text:p>1150</text:p>
              </table:table-cell>
              <table:table-cell office:value-type="float" office:value="13.96622">
                <text:p>13.96622</text:p>
              </table:table-cell>
              <table:table-cell office:value-type="float" office:value="1611.32853175166">
                <text:p>1611.32853175166</text:p>
              </table:table-cell>
              <table:table-cell office:value-type="float" office:value="1.71717482689713">
                <text:p>1.71717482689713</text:p>
              </table:table-cell>
              <table:table-cell office:value-type="float" office:value="1495.54391967667">
                <text:p>1495.54391967667</text:p>
              </table:table-cell>
              <table:table-cell office:value-type="float" office:value="9.88688868811486">
                <text:p>9.886888688114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13.37075">
                <text:p>13.37075</text:p>
              </table:table-cell>
              <table:table-cell office:value-type="float" office:value="1685.25478568673">
                <text:p>1685.25478568673</text:p>
              </table:table-cell>
              <table:table-cell office:value-type="float" office:value="1.69358533837322">
                <text:p>1.69358533837322</text:p>
              </table:table-cell>
              <table:table-cell office:value-type="float" office:value="1501.03629522826">
                <text:p>1501.03629522826</text:p>
              </table:table-cell>
              <table:table-cell office:value-type="float" office:value="5.59056884252377">
                <text:p>5.590568842523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13.02337">
                <text:p>13.02337</text:p>
              </table:table-cell>
              <table:table-cell office:value-type="float" office:value="1753.02168069608">
                <text:p>1753.02168069608</text:p>
              </table:table-cell>
              <table:table-cell office:value-type="float" office:value="1.67943164525887">
                <text:p>1.67943164525887</text:p>
              </table:table-cell>
              <table:table-cell office:value-type="float" office:value="1501.14530068655">
                <text:p>1501.14530068655</text:p>
              </table:table-cell>
              <table:table-cell office:value-type="float" office:value="6.29117665168401">
                <text:p>6.291176651684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12.50268">
                <text:p>12.50268</text:p>
              </table:table-cell>
              <table:table-cell office:value-type="float" office:value="1820.79041081416">
                <text:p>1820.79041081416</text:p>
              </table:table-cell>
              <table:table-cell office:value-type="float" office:value="1.67707269640648">
                <text:p>1.67707269640648</text:p>
              </table:table-cell>
              <table:table-cell office:value-type="float" office:value="1501.26238062322">
                <text:p>1501.26238062322</text:p>
              </table:table-cell>
              <table:table-cell office:value-type="float" office:value="7.04368133559686">
                <text:p>7.043681335596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">
                <text:p>1350</text:p>
              </table:table-cell>
              <table:table-cell office:value-type="float" office:value="12.06279">
                <text:p>12.06279</text:p>
              </table:table-cell>
              <table:table-cell office:value-type="float" office:value="1888.55290156257">
                <text:p>1888.55290156257</text:p>
              </table:table-cell>
              <table:table-cell office:value-type="float" office:value="1.63461161706343">
                <text:p>1.63461161706343</text:p>
              </table:table-cell>
              <table:table-cell office:value-type="float" office:value="1501.3754233207">
                <text:p>1501.3754233207</text:p>
              </table:table-cell>
              <table:table-cell office:value-type="float" office:value="7.7702375821334">
                <text:p>7.77023758213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11.59471">
                <text:p>11.59471</text:p>
              </table:table-cell>
              <table:table-cell office:value-type="float" office:value="1956.31282315876">
                <text:p>1956.31282315876</text:p>
              </table:table-cell>
              <table:table-cell office:value-type="float" office:value="1.57563789575365">
                <text:p>1.57563789575365</text:p>
              </table:table-cell>
              <table:table-cell office:value-type="float" office:value="1501.48846601818">
                <text:p>1501.48846601818</text:p>
              </table:table-cell>
              <table:table-cell office:value-type="float" office:value="8.49679382866994">
                <text:p>8.496793828669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11.20085">
                <text:p>11.20085</text:p>
              </table:table-cell>
              <table:table-cell office:value-type="float" office:value="2024.0731117767">
                <text:p>2024.0731117767</text:p>
              </table:table-cell>
              <table:table-cell office:value-type="float" office:value="1.51902312329626">
                <text:p>1.51902312329626</text:p>
              </table:table-cell>
              <table:table-cell office:value-type="float" office:value="1501.60150871567">
                <text:p>1501.60150871567</text:p>
              </table:table-cell>
              <table:table-cell office:value-type="float" office:value="9.22335007520649">
                <text:p>9.223350075206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10.83844">
                <text:p>10.83844</text:p>
              </table:table-cell>
              <table:table-cell office:value-type="float" office:value="2091.84184189477">
                <text:p>2091.84184189477</text:p>
              </table:table-cell>
              <table:table-cell office:value-type="float" office:value="1.51666417444387">
                <text:p>1.51666417444387</text:p>
              </table:table-cell>
              <table:table-cell office:value-type="float" office:value="1510.17206287334">
                <text:p>1510.17206287334</text:p>
              </table:table-cell>
              <table:table-cell office:value-type="float" office:value="4.9126659160678">
                <text:p>4.9126659160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">
                <text:p>1550</text:p>
              </table:table-cell>
              <table:table-cell office:value-type="float" office:value="10.50916">
                <text:p>10.50916</text:p>
              </table:table-cell>
              <table:table-cell office:value-type="float" office:value="2159.60726881714">
                <text:p>2159.60726881714</text:p>
              </table:table-cell>
              <table:table-cell office:value-type="float" office:value="1.49307468591995">
                <text:p>1.49307468591995</text:p>
              </table:table-cell>
              <table:table-cell office:value-type="float" office:value="1584.09441720238">
                <text:p>1584.09441720238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10.23655">
                <text:p>10.23655</text:p>
              </table:table-cell>
              <table:table-cell office:value-type="float" office:value="2227.37930213092">
                <text:p>2227.37930213092</text:p>
              </table:table-cell>
              <table:table-cell office:value-type="float" office:value="1.51194627673909">
                <text:p>1.51194627673909</text:p>
              </table:table-cell>
              <table:table-cell office:value-type="float" office:value="1670.34599538033">
                <text:p>1670.34599538033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">
                <text:p>1650</text:p>
              </table:table-cell>
              <table:table-cell office:value-type="float" office:value="9.937587">
                <text:p>9.937587</text:p>
              </table:table-cell>
              <table:table-cell office:value-type="float" office:value="2295.14693118376">
                <text:p>2295.14693118376</text:p>
              </table:table-cell>
              <table:table-cell office:value-type="float" office:value="1.50251048132952">
                <text:p>1.50251048132952</text:p>
              </table:table-cell>
              <table:table-cell office:value-type="float" office:value="1753.51716005193">
                <text:p>1753.51716005193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">
                <text:p>1700</text:p>
              </table:table-cell>
              <table:table-cell office:value-type="float" office:value="9.627526">
                <text:p>9.627526</text:p>
              </table:table-cell>
              <table:table-cell office:value-type="float" office:value="2362.90685277995">
                <text:p>2362.90685277995</text:p>
              </table:table-cell>
              <table:table-cell office:value-type="float" office:value="1.44353676001973">
                <text:p>1.44353676001973</text:p>
              </table:table-cell>
              <table:table-cell office:value-type="float" office:value="1836.68832472352">
                <text:p>1836.68832472352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">
                <text:p>1750</text:p>
              </table:table-cell>
              <table:table-cell office:value-type="float" office:value="9.322042">
                <text:p>9.322042</text:p>
              </table:table-cell>
              <table:table-cell office:value-type="float" office:value="2430.67631694152">
                <text:p>2430.67631694152</text:p>
              </table:table-cell>
              <table:table-cell office:value-type="float" office:value="1.44589570887213">
                <text:p>1.44589570887213</text:p>
              </table:table-cell>
              <table:table-cell office:value-type="float" office:value="1922.93990290147">
                <text:p>1922.93990290147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9.063236">
                <text:p>9.063236</text:p>
              </table:table-cell>
              <table:table-cell office:value-type="float" office:value="2498.43733960294">
                <text:p>2498.43733960294</text:p>
              </table:table-cell>
              <table:table-cell office:value-type="float" office:value="1.39399883411951">
                <text:p>1.39399883411951</text:p>
              </table:table-cell>
              <table:table-cell office:value-type="float" office:value="2003.03065406672">
                <text:p>2003.03065406672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">
                <text:p>1850</text:p>
              </table:table-cell>
              <table:table-cell office:value-type="float" office:value="8.79719">
                <text:p>8.79719</text:p>
              </table:table-cell>
              <table:table-cell office:value-type="float" office:value="2566.20166546008">
                <text:p>2566.20166546008</text:p>
              </table:table-cell>
              <table:table-cell office:value-type="float" office:value="1.36333249903843">
                <text:p>1.36333249903843</text:p>
              </table:table-cell>
              <table:table-cell office:value-type="float" office:value="2089.28223224467">
                <text:p>2089.28223224467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">
                <text:p>1900</text:p>
              </table:table-cell>
              <table:table-cell office:value-type="float" office:value="8.481279">
                <text:p>8.481279</text:p>
              </table:table-cell>
              <table:table-cell office:value-type="float" office:value="2633.9740657956">
                <text:p>2633.9740657956</text:p>
              </table:table-cell>
              <table:table-cell office:value-type="float" office:value="1.38456303870995">
                <text:p>1.38456303870995</text:p>
              </table:table-cell>
              <table:table-cell office:value-type="float" office:value="2172.45339691626">
                <text:p>2172.45339691626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">
                <text:p>1950</text:p>
              </table:table-cell>
              <table:table-cell office:value-type="float" office:value="8.215373">
                <text:p>8.215373</text:p>
              </table:table-cell>
              <table:table-cell office:value-type="float" office:value="2701.73068419609">
                <text:p>2701.73068419609</text:p>
              </table:table-cell>
              <table:table-cell office:value-type="float" office:value="1.30435877772864">
                <text:p>1.30435877772864</text:p>
              </table:table-cell>
              <table:table-cell office:value-type="float" office:value="2255.62456158786">
                <text:p>2255.62456158786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7.992791">
                <text:p>7.992791</text:p>
              </table:table-cell>
              <table:table-cell office:value-type="float" office:value="2769.49464303148">
                <text:p>2769.49464303148</text:p>
              </table:table-cell>
              <table:table-cell office:value-type="float" office:value="1.27133349379516">
                <text:p>1.27133349379516</text:p>
              </table:table-cell>
              <table:table-cell office:value-type="float" office:value="2341.87613976581">
                <text:p>2341.87613976581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7.831628">
                <text:p>7.831628</text:p>
              </table:table-cell>
              <table:table-cell office:value-type="float" office:value="2837.2597029321">
                <text:p>2837.2597029321</text:p>
              </table:table-cell>
              <table:table-cell office:value-type="float" office:value="1.24538505641886">
                <text:p>1.24538505641886</text:p>
              </table:table-cell>
              <table:table-cell office:value-type="float" office:value="2421.96325741578">
                <text:p>2421.96325741578</text:p>
              </table:table-cell>
              <table:table-cell office:value-type="float" office:value="4.84065900234855">
                <text:p>4.840659002348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">
                <text:p>2100</text:p>
              </table:table-cell>
              <table:table-cell office:value-type="float" office:value="7.678129">
                <text:p>7.678129</text:p>
              </table:table-cell>
              <table:table-cell office:value-type="float" office:value="2905.02256070226">
                <text:p>2905.02256070226</text:p>
              </table:table-cell>
              <table:table-cell office:value-type="float" office:value="1.20528292592821">
                <text:p>1.20528292592821</text:p>
              </table:table-cell>
              <table:table-cell office:value-type="float" office:value="2502.0576420963">
                <text:p>2502.0576420963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">
                <text:p>2150</text:p>
              </table:table-cell>
              <table:table-cell office:value-type="float" office:value="7.493235">
                <text:p>7.493235</text:p>
              </table:table-cell>
              <table:table-cell office:value-type="float" office:value="2972.79826423349">
                <text:p>2972.79826423349</text:p>
              </table:table-cell>
              <table:table-cell office:value-type="float" office:value="1.24774400527125">
                <text:p>1.24774400527125</text:p>
              </table:table-cell>
              <table:table-cell office:value-type="float" office:value="2575.99059417822">
                <text:p>2575.99059417822</text:p>
              </table:table-cell>
              <table:table-cell office:value-type="float" office:value="4.88347392401946">
                <text:p>4.88347392401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">
                <text:p>2200</text:p>
              </table:table-cell>
              <table:table-cell office:value-type="float" office:value="7.315907">
                <text:p>7.315907</text:p>
              </table:table-cell>
              <table:table-cell office:value-type="float" office:value="3040.56552626458">
                <text:p>3040.56552626458</text:p>
              </table:table-cell>
              <table:table-cell office:value-type="float" office:value="1.23594926100929">
                <text:p>1.23594926100929</text:p>
              </table:table-cell>
              <table:table-cell office:value-type="float" office:value="2675.88674315377">
                <text:p>2675.88674315377</text:p>
              </table:table-cell>
              <table:table-cell office:value-type="float" office:value="4.90108179223909">
                <text:p>4.901081792239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">
                <text:p>2250</text:p>
              </table:table-cell>
              <table:table-cell office:value-type="float" office:value="7.12301">
                <text:p>7.12301</text:p>
              </table:table-cell>
              <table:table-cell office:value-type="float" office:value="3108.32985212171">
                <text:p>3108.32985212171</text:p>
              </table:table-cell>
              <table:table-cell office:value-type="float" office:value="1.20528292592821">
                <text:p>1.20528292592821</text:p>
              </table:table-cell>
              <table:table-cell office:value-type="float" office:value="2760.81843248894">
                <text:p>2760.81843248894</text:p>
              </table:table-cell>
              <table:table-cell office:value-type="float" office:value="4.90293525205168">
                <text:p>4.902935252051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6.878308">
                <text:p>6.878308</text:p>
              </table:table-cell>
              <table:table-cell office:value-type="float" office:value="3176.10665671818">
                <text:p>3176.10665671818</text:p>
              </table:table-cell>
              <table:table-cell office:value-type="float" office:value="1.25482085182842">
                <text:p>1.25482085182842</text:p>
              </table:table-cell>
              <table:table-cell office:value-type="float" office:value="2840.90716503459">
                <text:p>2840.90716503459</text:p>
              </table:table-cell>
              <table:table-cell office:value-type="float" office:value="4.88996103336353">
                <text:p>4.88996103336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">
                <text:p>2350</text:p>
              </table:table-cell>
              <table:table-cell office:value-type="float" office:value="6.728102">
                <text:p>6.728102</text:p>
              </table:table-cell>
              <table:table-cell office:value-type="float" office:value="3243.8643761839">
                <text:p>3243.8643761839</text:p>
              </table:table-cell>
              <table:table-cell office:value-type="float" office:value="1.18169343740429">
                <text:p>1.18169343740429</text:p>
              </table:table-cell>
              <table:table-cell office:value-type="float" office:value="2927.15874321254">
                <text:p>2927.15874321254</text:p>
              </table:table-cell>
              <table:table-cell office:value-type="float" office:value="4.88996103336353">
                <text:p>4.889961033363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6.577839">
                <text:p>6.577839</text:p>
              </table:table-cell>
              <table:table-cell office:value-type="float" office:value="3311.63310630198">
                <text:p>3311.63310630198</text:p>
              </table:table-cell>
              <table:table-cell office:value-type="float" office:value="1.1793344885519">
                <text:p>1.1793344885519</text:p>
              </table:table-cell>
              <table:table-cell office:value-type="float" office:value="3013.40830277089">
                <text:p>3013.40830277089</text:p>
              </table:table-cell>
              <table:table-cell office:value-type="float" office:value="4.87698681467538">
                <text:p>4.876986814675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">
                <text:p>2450</text:p>
              </table:table-cell>
              <table:table-cell office:value-type="float" office:value="6.555424">
                <text:p>6.555424</text:p>
              </table:table-cell>
              <table:table-cell office:value-type="float" office:value="3379.40734174623">
                <text:p>3379.40734174623</text:p>
              </table:table-cell>
              <table:table-cell office:value-type="float" office:value="1.21235977248538">
                <text:p>1.21235977248538</text:p>
              </table:table-cell>
              <table:table-cell office:value-type="float" office:value="3093.49865021222">
                <text:p>3093.49865021222</text:p>
              </table:table-cell>
              <table:table-cell office:value-type="float" office:value="4.87439197093775">
                <text:p>4.874391970937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6.472648">
                <text:p>6.472648</text:p>
              </table:table-cell>
              <table:table-cell office:value-type="float" office:value="3447.16983249464">
                <text:p>3447.16983249464</text:p>
              </table:table-cell>
              <table:table-cell office:value-type="float" office:value="1.16989869314233">
                <text:p>1.16989869314233</text:p>
              </table:table-cell>
              <table:table-cell office:value-type="float" office:value="3179.74861349449">
                <text:p>3179.74861349449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">
                <text:p>2550</text:p>
              </table:table-cell>
              <table:table-cell office:value-type="float" office:value="6.323946">
                <text:p>6.323946</text:p>
              </table:table-cell>
              <table:table-cell office:value-type="float" office:value="3514.93232324304">
                <text:p>3514.93232324304</text:p>
              </table:table-cell>
              <table:table-cell office:value-type="float" office:value="1.12743761379929">
                <text:p>1.12743761379929</text:p>
              </table:table-cell>
              <table:table-cell office:value-type="float" office:value="3259.83936465973">
                <text:p>3259.83936465973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">
                <text:p>2600</text:p>
              </table:table-cell>
              <table:table-cell office:value-type="float" office:value="6.194813">
                <text:p>6.194813</text:p>
              </table:table-cell>
              <table:table-cell office:value-type="float" office:value="3582.69297888273">
                <text:p>3582.69297888273</text:p>
              </table:table-cell>
              <table:table-cell office:value-type="float" office:value="1.07318179019429">
                <text:p>1.07318179019429</text:p>
              </table:table-cell>
              <table:table-cell office:value-type="float" office:value="3346.09094283768">
                <text:p>3346.09094283768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">
                <text:p>2650</text:p>
              </table:table-cell>
              <table:table-cell office:value-type="float" office:value="6.028892">
                <text:p>6.028892</text:p>
              </table:table-cell>
              <table:table-cell office:value-type="float" office:value="3650.45069834845">
                <text:p>3650.45069834845</text:p>
              </table:table-cell>
              <table:table-cell office:value-type="float" office:value="1.00005437577016">
                <text:p>1.00005437577016</text:p>
              </table:table-cell>
              <table:table-cell office:value-type="float" office:value="3432.34252101563">
                <text:p>3432.34252101563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">
                <text:p>2700</text:p>
              </table:table-cell>
              <table:table-cell office:value-type="float" office:value="5.937532">
                <text:p>5.937532</text:p>
              </table:table-cell>
              <table:table-cell office:value-type="float" office:value="3718.2175933578">
                <text:p>3718.2175933578</text:p>
              </table:table-cell>
              <table:table-cell office:value-type="float" office:value="0.985900682655807">
                <text:p>0.985900682655807</text:p>
              </table:table-cell>
              <table:table-cell office:value-type="float" office:value="3512.43327218088">
                <text:p>3512.43327218088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">
                <text:p>2750</text:p>
              </table:table-cell>
              <table:table-cell office:value-type="float" office:value="5.881345">
                <text:p>5.881345</text:p>
              </table:table-cell>
              <table:table-cell office:value-type="float" office:value="3785.98448836715">
                <text:p>3785.98448836715</text:p>
              </table:table-cell>
              <table:table-cell office:value-type="float" office:value="0.971746989541458">
                <text:p>0.971746989541458</text:p>
              </table:table-cell>
              <table:table-cell office:value-type="float" office:value="3598.68485035883">
                <text:p>3598.68485035883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">
                <text:p>2800</text:p>
              </table:table-cell>
              <table:table-cell office:value-type="float" office:value="5.85351">
                <text:p>5.85351</text:p>
              </table:table-cell>
              <table:table-cell office:value-type="float" office:value="3853.75248444173">
                <text:p>3853.75248444173</text:p>
              </table:table-cell>
              <table:table-cell office:value-type="float" office:value="0.964670142984286">
                <text:p>0.964670142984286</text:p>
              </table:table-cell>
              <table:table-cell office:value-type="float" office:value="3678.77560152407">
                <text:p>3678.77560152407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">
                <text:p>2850</text:p>
              </table:table-cell>
              <table:table-cell office:value-type="float" office:value="5.764213">
                <text:p>5.764213</text:p>
              </table:table-cell>
              <table:table-cell office:value-type="float" office:value="3921.52304966853">
                <text:p>3921.52304966853</text:p>
              </table:table-cell>
              <table:table-cell office:value-type="float" office:value="0.974105938393851">
                <text:p>0.974105938393851</text:p>
              </table:table-cell>
              <table:table-cell office:value-type="float" office:value="3765.02717970202">
                <text:p>3765.02717970202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">
                <text:p>2900</text:p>
              </table:table-cell>
              <table:table-cell office:value-type="float" office:value="5.675325">
                <text:p>5.675325</text:p>
              </table:table-cell>
              <table:table-cell office:value-type="float" office:value="3989.28921063439">
                <text:p>3989.28921063439</text:p>
              </table:table-cell>
              <table:table-cell office:value-type="float" office:value="0.95523434757472">
                <text:p>0.95523434757472</text:p>
              </table:table-cell>
              <table:table-cell office:value-type="float" office:value="3851.27875787997">
                <text:p>3851.27875787997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">
                <text:p>2950</text:p>
              </table:table-cell>
              <table:table-cell office:value-type="float" office:value="5.595998">
                <text:p>5.595998</text:p>
              </table:table-cell>
              <table:table-cell office:value-type="float" office:value="4057.06161096991">
                <text:p>4057.06161096991</text:p>
              </table:table-cell>
              <table:table-cell office:value-type="float" office:value="0.976464887246241">
                <text:p>0.976464887246241</text:p>
              </table:table-cell>
              <table:table-cell office:value-type="float" office:value="3931.36950904521">
                <text:p>3931.36950904521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">
                <text:p>3000</text:p>
              </table:table-cell>
              <table:table-cell office:value-type="float" office:value="5.496038">
                <text:p>5.496038</text:p>
              </table:table-cell>
              <table:table-cell office:value-type="float" office:value="4124.83364428369">
                <text:p>4124.83364428369</text:p>
              </table:table-cell>
              <table:table-cell office:value-type="float" office:value="0.995336478065372">
                <text:p>0.995336478065372</text:p>
              </table:table-cell>
              <table:table-cell office:value-type="float" office:value="4017.62108722317">
                <text:p>4017.62108722317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">
                <text:p>3050</text:p>
              </table:table-cell>
              <table:table-cell office:value-type="float" office:value="5.378618">
                <text:p>5.378618</text:p>
              </table:table-cell>
              <table:table-cell office:value-type="float" office:value="4192.59503396687">
                <text:p>4192.59503396687</text:p>
              </table:table-cell>
              <table:table-cell office:value-type="float" office:value="0.945798552165154">
                <text:p>0.945798552165154</text:p>
              </table:table-cell>
              <table:table-cell office:value-type="float" office:value="4100.79225189476">
                <text:p>4100.79225189476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">
                <text:p>3100</text:p>
              </table:table-cell>
              <table:table-cell office:value-type="float" office:value="5.294364">
                <text:p>5.294364</text:p>
              </table:table-cell>
              <table:table-cell office:value-type="float" office:value="4260.36706728065">
                <text:p>4260.36706728065</text:p>
              </table:table-cell>
              <table:table-cell office:value-type="float" office:value="0.964670142984286">
                <text:p>0.964670142984286</text:p>
              </table:table-cell>
              <table:table-cell office:value-type="float" office:value="4183.96341656636">
                <text:p>4183.96341656636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">
                <text:p>3150</text:p>
              </table:table-cell>
              <table:table-cell office:value-type="float" office:value="5.217234">
                <text:p>5.217234</text:p>
              </table:table-cell>
              <table:table-cell office:value-type="float" office:value="4328.13249420302">
                <text:p>4328.13249420302</text:p>
              </table:table-cell>
              <table:table-cell office:value-type="float" office:value="0.941080654460372">
                <text:p>0.941080654460372</text:p>
              </table:table-cell>
              <table:table-cell office:value-type="float" office:value="4270.21499474431">
                <text:p>4270.21499474431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">
                <text:p>3200</text:p>
              </table:table-cell>
              <table:table-cell office:value-type="float" office:value="5.168372">
                <text:p>5.168372</text:p>
              </table:table-cell>
              <table:table-cell office:value-type="float" office:value="4395.89498495143">
                <text:p>4395.89498495143</text:p>
              </table:table-cell>
              <table:table-cell office:value-type="float" office:value="0.898619575117326">
                <text:p>0.898619575117326</text:p>
              </table:table-cell>
              <table:table-cell office:value-type="float" office:value="4350.30574590955">
                <text:p>4350.30574590955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">
                <text:p>3250</text:p>
              </table:table-cell>
              <table:table-cell office:value-type="float" office:value="5.107139">
                <text:p>5.107139</text:p>
              </table:table-cell>
              <table:table-cell office:value-type="float" office:value="4463.6710555044">
                <text:p>4463.6710555044</text:p>
              </table:table-cell>
              <table:table-cell office:value-type="float" office:value="0.943439603312761">
                <text:p>0.943439603312761</text:p>
              </table:table-cell>
              <table:table-cell office:value-type="float" office:value="4436.5573240875">
                <text:p>4436.5573240875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">
                <text:p>3300</text:p>
              </table:table-cell>
              <table:table-cell office:value-type="float" office:value="5.032189">
                <text:p>5.032189</text:p>
              </table:table-cell>
              <table:table-cell office:value-type="float" office:value="4531.43134412234">
                <text:p>4531.43134412234</text:p>
              </table:table-cell>
              <table:table-cell office:value-type="float" office:value="0.886824830855371">
                <text:p>0.886824830855371</text:p>
              </table:table-cell>
              <table:table-cell office:value-type="float" office:value="4519.7284887591">
                <text:p>4519.7284887591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">
                <text:p>3350</text:p>
              </table:table-cell>
              <table:table-cell office:value-type="float" office:value="4.955383">
                <text:p>4.955383</text:p>
              </table:table-cell>
              <table:table-cell office:value-type="float" office:value="4599.19970721867">
                <text:p>4599.19970721867</text:p>
              </table:table-cell>
              <table:table-cell office:value-type="float" office:value="0.882106933150585">
                <text:p>0.882106933150585</text:p>
              </table:table-cell>
              <table:table-cell office:value-type="float" office:value="4602.8996534307">
                <text:p>4602.8996534307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">
                <text:p>3400</text:p>
              </table:table-cell>
              <table:table-cell office:value-type="float" office:value="4.884972">
                <text:p>4.884972</text:p>
              </table:table-cell>
              <table:table-cell office:value-type="float" office:value="4666.97320861943">
                <text:p>4666.97320861943</text:p>
              </table:table-cell>
              <table:table-cell office:value-type="float" office:value="0.910414319379282">
                <text:p>0.910414319379282</text:p>
              </table:table-cell>
              <table:table-cell office:value-type="float" office:value="4689.15123160865">
                <text:p>4689.15123160865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">
                <text:p>3450</text:p>
              </table:table-cell>
              <table:table-cell office:value-type="float" office:value="4.836078">
                <text:p>4.836078</text:p>
              </table:table-cell>
              <table:table-cell office:value-type="float" office:value="4734.73569936784">
                <text:p>4734.73569936784</text:p>
              </table:table-cell>
              <table:table-cell office:value-type="float" office:value="0.86795324003624">
                <text:p>0.86795324003624</text:p>
              </table:table-cell>
              <table:table-cell office:value-type="float" office:value="4769.24198277389">
                <text:p>4769.24198277389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">
                <text:p>3500</text:p>
              </table:table-cell>
              <table:table-cell office:value-type="float" office:value="4.773309">
                <text:p>4.773309</text:p>
              </table:table-cell>
              <table:table-cell office:value-type="float" office:value="4802.49965820322">
                <text:p>4802.49965820322</text:p>
              </table:table-cell>
              <table:table-cell office:value-type="float" office:value="0.83492795610276">
                <text:p>0.83492795610276</text:p>
              </table:table-cell>
              <table:table-cell office:value-type="float" office:value="4855.49356095184">
                <text:p>4855.49356095184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">
                <text:p>3550</text:p>
              </table:table-cell>
              <table:table-cell office:value-type="float" office:value="4.708873">
                <text:p>4.708873</text:p>
              </table:table-cell>
              <table:table-cell office:value-type="float" office:value="4870.26581916908">
                <text:p>4870.26581916908</text:p>
              </table:table-cell>
              <table:table-cell office:value-type="float" office:value="0.816056365283629">
                <text:p>0.816056365283629</text:p>
              </table:table-cell>
              <table:table-cell office:value-type="float" office:value="4938.66472562344">
                <text:p>4938.66472562344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">
                <text:p>3600</text:p>
              </table:table-cell>
              <table:table-cell office:value-type="float" office:value="4.639505">
                <text:p>4.639505</text:p>
              </table:table-cell>
              <table:table-cell office:value-type="float" office:value="4938.03785248286">
                <text:p>4938.03785248286</text:p>
              </table:table-cell>
              <table:table-cell office:value-type="float" office:value="0.83492795610276">
                <text:p>0.83492795610276</text:p>
              </table:table-cell>
              <table:table-cell office:value-type="float" office:value="5006.43382276326">
                <text:p>5006.43382276326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">
                <text:p>3650</text:p>
              </table:table-cell>
              <table:table-cell office:value-type="float" office:value="4.583518">
                <text:p>4.583518</text:p>
              </table:table-cell>
              <table:table-cell office:value-type="float" office:value="5005.81869431853">
                <text:p>5005.81869431853</text:p>
              </table:table-cell>
              <table:table-cell office:value-type="float" office:value="0.910414319379282">
                <text:p>0.910414319379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">
                <text:p>3700</text:p>
              </table:table-cell>
              <table:table-cell office:value-type="float" office:value="4.544998">
                <text:p>4.544998</text:p>
              </table:table-cell>
              <table:table-cell office:value-type="float" office:value="5062.80983089268">
                <text:p>5062.80983089268</text:p>
              </table:table-cell>
              <table:table-cell office:value-type="float" office:value="0.932824333477001">
                <text:p>0.932824333477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">
                <text:p>3750</text:p>
              </table:table-cell>
              <table:table-cell office:value-type="float" office:value="4.499962">
                <text:p>4.499962</text:p>
              </table:table-cell>
              <table:table-cell office:value-type="float" office:value="5141.35431944595">
                <text:p>5141.35431944595</text:p>
              </table:table-cell>
              <table:table-cell office:value-type="float" office:value="0.893901677412543">
                <text:p>0.89390167741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">
                <text:p>3800</text:p>
              </table:table-cell>
              <table:table-cell office:value-type="float" office:value="4.460174">
                <text:p>4.460174</text:p>
              </table:table-cell>
              <table:table-cell office:value-type="float" office:value="5209.12818786845">
                <text:p>5209.12818786845</text:p>
              </table:table-cell>
              <table:table-cell office:value-type="float" office:value="0.92456801249363">
                <text:p>0.92456801249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">
                <text:p>3850</text:p>
              </table:table-cell>
              <table:table-cell office:value-type="float" office:value="4.407134">
                <text:p>4.407134</text:p>
              </table:table-cell>
              <table:table-cell office:value-type="float" office:value="5258.40599544826">
                <text:p>5258.40599544826</text:p>
              </table:table-cell>
              <table:table-cell office:value-type="float" office:value="0.86795324003624">
                <text:p>0.86795324003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">
                <text:p>3900</text:p>
              </table:table-cell>
              <table:table-cell office:value-type="float" office:value="4.351827">
                <text:p>4.35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">
                <text:p>3950</text:p>
              </table:table-cell>
              <table:table-cell office:value-type="float" office:value="4.297168">
                <text:p>4.29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4.259707">
                <text:p>4.259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0">
                <text:p>4050</text:p>
              </table:table-cell>
              <table:table-cell office:value-type="float" office:value="4.226764">
                <text:p>4.226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0">
                <text:p>4100</text:p>
              </table:table-cell>
              <table:table-cell office:value-type="float" office:value="4.211755">
                <text:p>4.21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0">
                <text:p>4150</text:p>
              </table:table-cell>
              <table:table-cell office:value-type="float" office:value="4.211733">
                <text:p>4.21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">
                <text:p>4200</text:p>
              </table:table-cell>
              <table:table-cell office:value-type="float" office:value="4.168085">
                <text:p>4.168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0">
                <text:p>4250</text:p>
              </table:table-cell>
              <table:table-cell office:value-type="float" office:value="4.095847">
                <text:p>4.095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0">
                <text:p>4300</text:p>
              </table:table-cell>
              <table:table-cell office:value-type="float" office:value="4.001467">
                <text:p>4.00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0">
                <text:p>4350</text:p>
              </table:table-cell>
              <table:table-cell office:value-type="float" office:value="3.932955">
                <text:p>3.93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0">
                <text:p>4400</text:p>
              </table:table-cell>
              <table:table-cell office:value-type="float" office:value="3.884494">
                <text:p>3.88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0">
                <text:p>4450</text:p>
              </table:table-cell>
              <table:table-cell office:value-type="float" office:value="3.826103">
                <text:p>3.826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0">
                <text:p>4500</text:p>
              </table:table-cell>
              <table:table-cell office:value-type="float" office:value="3.777201">
                <text:p>3.777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0">
                <text:p>4550</text:p>
              </table:table-cell>
              <table:table-cell office:value-type="float" office:value="3.724441">
                <text:p>3.724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0">
                <text:p>4600</text:p>
              </table:table-cell>
              <table:table-cell office:value-type="float" office:value="3.669512">
                <text:p>3.669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0">
                <text:p>4650</text:p>
              </table:table-cell>
              <table:table-cell office:value-type="float" office:value="3.628263">
                <text:p>3.62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0">
                <text:p>4700</text:p>
              </table:table-cell>
              <table:table-cell office:value-type="float" office:value="3.581778">
                <text:p>3.58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0">
                <text:p>4750</text:p>
              </table:table-cell>
              <table:table-cell office:value-type="float" office:value="3.543893">
                <text:p>3.5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0">
                <text:p>4800</text:p>
              </table:table-cell>
              <table:table-cell office:value-type="float" office:value="3.49592">
                <text:p>3.49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0">
                <text:p>4850</text:p>
              </table:table-cell>
              <table:table-cell office:value-type="float" office:value="3.493523">
                <text:p>3.493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0">
                <text:p>4900</text:p>
              </table:table-cell>
              <table:table-cell office:value-type="float" office:value="3.474292">
                <text:p>3.474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0">
                <text:p>4950</text:p>
              </table:table-cell>
              <table:table-cell office:value-type="float" office:value="3.460524">
                <text:p>3.46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0">
                <text:p>5000</text:p>
              </table:table-cell>
              <table:table-cell office:value-type="float" office:value="3.449263">
                <text:p>3.449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uble_20_Dash_20__28_Rounded_29_" draw:display-name="Double Dash (Rounded)" draw:style="round" draw:dots1="1" draw:dots1-length="701%" draw:distance="399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3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ash_20__28_Rounded_29_" svg:stroke-width="0.08cm" svg:stroke-color="#1c1c1c" svg:stroke-linecap="round" draw:fill-color="#1c1c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5429" draw:fill-color="#ff5429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9.927cm" svg:height="22.327cm" xlink:href=".." xlink:type="simple" chart:class="chart:scatter" chart:style-name="ch1">
        <chart:title svg:x="19.179cm" svg:y="0.582cm" chart:style-name="ch2">
          <text:p>Losses</text:p>
        </chart:title>
        <chart:legend chart:legend-position="end" svg:x="34.899cm" svg:y="9.37cm" style:legend-expansion="high" chart:style-name="ch3"/>
        <chart:plot-area chart:style-name="ch4" table:cell-range-address="losses_summary.A112:losses_summary.A184 losses_summary.D112:losses_summary.D184 losses_summary.D2:losses_summary.D101 losses_summary.F1:losses_summary.F101 losses_summary.L1:losses_summary.L101 losses_summary.O1:losses_summary.O101 losses_summary.S1:losses_summary.T101" chart:data-source-has-labels="row" svg:x="1.809cm" svg:y="1.807cm" svg:width="32.292cm" svg:height="19.093cm">
          <chart:coordinate-region svg:x="2.616cm" svg:y="2.006cm" svg:width="31.485cm" svg:height="17.84cm"/>
          <chart:axis chart:dimension="x" chart:name="primary-x" chart:style-name="ch5">
            <chart:title svg:x="17.289cm" svg:y="21.346cm" chart:style-name="ch6">
              <text:p>Load(W)</text:p>
            </chart:title>
            <chart:grid chart:style-name="ch7" chart:class="major"/>
          </chart:axis>
          <chart:axis chart:dimension="y" chart:name="primary-y" chart:style-name="ch8">
            <chart:title svg:x="0.451cm" svg:y="11.992cm" chart:style-name="ch9">
              <text:p>Loss(W)</text:p>
            </chart:title>
            <chart:grid chart:style-name="ch7" chart:class="major"/>
          </chart:axis>
          <chart:series chart:style-name="ch10" chart:values-cell-range-address="losses_summary.D112:losses_summary.D184" loext:label-string="epc_50_hz" chart:class="chart:scatter">
            <chart:domain table:cell-range-address="losses_summary.A112:losses_summary.A184"/>
            <chart:data-point chart:repeated="73"/>
          </chart:series>
          <chart:series chart:style-name="ch11" chart:values-cell-range-address="losses_summary.D2:losses_summary.D101" loext:label-string="simulations_losses" chart:class="chart:scatter">
            <chart:domain table:cell-range-address="losses_summary.A2:losses_summary.A101"/>
            <chart:data-point chart:repeated="100"/>
          </chart:series>
          <chart:series chart:style-name="ch12" chart:values-cell-range-address="losses_summary.F2:losses_summary.F101" chart:label-cell-address="losses_summary.F1:losses_summary.F1" chart:class="chart:scatter">
            <chart:domain table:cell-range-address="losses_summary.A2:losses_summary.A101"/>
            <chart:data-point chart:repeated="100"/>
          </chart:series>
          <chart:series chart:style-name="ch13" chart:values-cell-range-address="losses_summary.L2:losses_summary.L101" chart:label-cell-address="losses_summary.L1:losses_summary.L1" chart:class="chart:scatter">
            <chart:domain table:cell-range-address="losses_summary.A2:losses_summary.A101"/>
            <chart:data-point chart:repeated="100"/>
          </chart:series>
          <chart:series chart:style-name="ch14" chart:values-cell-range-address="losses_summary.O2:losses_summary.O101" chart:label-cell-address="losses_summary.O1:losses_summary.O1" chart:class="chart:scatter">
            <chart:domain table:cell-range-address="losses_summary.A2:losses_summary.A101"/>
            <chart:data-point chart:repeated="100"/>
          </chart:series>
          <chart:series chart:style-name="ch15" chart:values-cell-range-address="losses_summary.S2:losses_summary.S101" chart:label-cell-address="losses_summary.S1:losses_summary.S1" chart:class="chart:scatter">
            <chart:domain table:cell-range-address="losses_summary.A2:losses_summary.A101"/>
            <chart:data-point chart:repeated="100"/>
          </chart:series>
          <chart:series chart:style-name="ch16" chart:values-cell-range-address="losses_summary.T2:losses_summary.T101" chart:label-cell-address="losses_summary.T1:losses_summary.T1" chart:class="chart:scatter">
            <chart:domain table:cell-range-address="losses_summary.A2:losses_summary.A101"/>
            <chart:data-point chart:repeated="1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epc_50_hz</text:p>
              </table:table-cell>
              <table:table-cell office:value-type="string">
                <text:p>Colonna A</text:p>
              </table:table-cell>
              <table:table-cell office:value-type="string">
                <text:p>simulations_losses</text:p>
              </table:table-cell>
              <table:table-cell office:value-type="string">
                <text:p>Colonna A</text:p>
              </table:table-cell>
              <table:table-cell office:value-type="string">
                <text:p>Caps_losses</text:p>
                <draw:g>
                  <svg:desc>losses_summary.F1:losses_summary.F1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GaN_total_losses</text:p>
                <draw:g>
                  <svg:desc>losses_summary.L1:losses_summary.L1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L_losses</text:p>
                <draw:g>
                  <svg:desc>losses_summary.O1:losses_summary.O1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Si_total</text:p>
                <draw:g>
                  <svg:desc>losses_summary.S1:losses_summary.S1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EMI_losses</text:p>
                <draw:g>
                  <svg:desc>losses_summary.T1:losses_summary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3.8701885464">
                <text:p>383.8701885464</text:p>
                <draw:g>
                  <svg:desc>losses_summary.A112:losses_summary.A184</svg:desc>
                </draw:g>
              </table:table-cell>
              <table:table-cell office:value-type="float" office:value="23.9962525400197">
                <text:p>23.9962525400197</text:p>
                <draw:g>
                  <svg:desc>losses_summary.D112:losses_summary.D184</svg:desc>
                </draw:g>
              </table:table-cell>
              <table:table-cell office:value-type="float" office:value="50">
                <text:p>50</text:p>
                <draw:g>
                  <svg:desc>losses_summary.A2:losses_summary.A101</svg:desc>
                </draw:g>
              </table:table-cell>
              <table:table-cell office:value-type="float" office:value="7.96072323593492">
                <text:p>7.96072323593492</text:p>
                <draw:g>
                  <svg:desc>losses_summary.D2:losses_summary.D101</svg:desc>
                </draw:g>
              </table:table-cell>
              <table:table-cell office:value-type="float" office:value="50">
                <text:p>50</text:p>
                <draw:g>
                  <svg:desc>losses_summary.A2:losses_summary.A101</svg:desc>
                </draw:g>
              </table:table-cell>
              <table:table-cell office:value-type="float" office:value="0.811799962001621">
                <text:p>0.811799962001621</text:p>
                <draw:g>
                  <svg:desc>losses_summary.F2:losses_summary.F101</svg:desc>
                </draw:g>
              </table:table-cell>
              <table:table-cell office:value-type="float" office:value="50">
                <text:p>50</text:p>
                <draw:g>
                  <svg:desc>losses_summary.A2:losses_summary.A101</svg:desc>
                </draw:g>
              </table:table-cell>
              <table:table-cell office:value-type="float" office:value="4.91783522941106">
                <text:p>4.91783522941106</text:p>
                <draw:g>
                  <svg:desc>losses_summary.L2:losses_summary.L101</svg:desc>
                </draw:g>
              </table:table-cell>
              <table:table-cell office:value-type="float" office:value="50">
                <text:p>50</text:p>
                <draw:g>
                  <svg:desc>losses_summary.A2:losses_summary.A101</svg:desc>
                </draw:g>
              </table:table-cell>
              <table:table-cell office:value-type="float" office:value="1.80529672281003">
                <text:p>1.80529672281003</text:p>
                <draw:g>
                  <svg:desc>losses_summary.O2:losses_summary.O101</svg:desc>
                </draw:g>
              </table:table-cell>
              <table:table-cell office:value-type="float" office:value="50">
                <text:p>50</text:p>
                <draw:g>
                  <svg:desc>losses_summary.A2:losses_summary.A101</svg:desc>
                </draw:g>
              </table:table-cell>
              <table:table-cell office:value-type="float" office:value="0.353098157078724">
                <text:p>0.353098157078724</text:p>
                <draw:g>
                  <svg:desc>losses_summary.S2:losses_summary.S101</svg:desc>
                </draw:g>
              </table:table-cell>
              <table:table-cell office:value-type="float" office:value="50">
                <text:p>50</text:p>
                <draw:g>
                  <svg:desc>losses_summary.A2:losses_summary.A101</svg:desc>
                </draw:g>
              </table:table-cell>
              <table:table-cell office:value-type="float" office:value="0.0726931646359359">
                <text:p>0.0726931646359359</text:p>
                <draw:g>
                  <svg:desc>losses_summary.T2:losses_summary.T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8.621728220568">
                <text:p>388.621728220568</text:p>
              </table:table-cell>
              <table:table-cell office:value-type="float" office:value="24.7157593933123">
                <text:p>24.7157593933123</text:p>
              </table:table-cell>
              <table:table-cell office:value-type="float" office:value="100">
                <text:p>100</text:p>
              </table:table-cell>
              <table:table-cell office:value-type="float" office:value="8.32028109106539">
                <text:p>8.32028109106539</text:p>
              </table:table-cell>
              <table:table-cell office:value-type="float" office:value="100">
                <text:p>100</text:p>
              </table:table-cell>
              <table:table-cell office:value-type="float" office:value="0.812974857504904">
                <text:p>0.812974857504904</text:p>
              </table:table-cell>
              <table:table-cell office:value-type="float" office:value="100">
                <text:p>100</text:p>
              </table:table-cell>
              <table:table-cell office:value-type="float" office:value="5.22988035473526">
                <text:p>5.22988035473526</text:p>
              </table:table-cell>
              <table:table-cell office:value-type="float" office:value="100">
                <text:p>100</text:p>
              </table:table-cell>
              <table:table-cell office:value-type="float" office:value="1.80482783699536">
                <text:p>1.80482783699536</text:p>
              </table:table-cell>
              <table:table-cell office:value-type="float" office:value="100">
                <text:p>100</text:p>
              </table:table-cell>
              <table:table-cell office:value-type="float" office:value="0.422711922142738">
                <text:p>0.422711922142738</text:p>
              </table:table-cell>
              <table:table-cell office:value-type="float" office:value="100">
                <text:p>100</text:p>
              </table:table-cell>
              <table:table-cell office:value-type="float" office:value="0.0498861196944658">
                <text:p>0.0498861196944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8.988785702322">
                <text:p>398.988785702322</text:p>
              </table:table-cell>
              <table:table-cell office:value-type="float" office:value="24.1850471279982">
                <text:p>24.1850471279982</text:p>
              </table:table-cell>
              <table:table-cell office:value-type="float" office:value="150">
                <text:p>150</text:p>
              </table:table-cell>
              <table:table-cell office:value-type="float" office:value="8.84817853162813">
                <text:p>8.84817853162813</text:p>
              </table:table-cell>
              <table:table-cell office:value-type="float" office:value="150">
                <text:p>150</text:p>
              </table:table-cell>
              <table:table-cell office:value-type="float" office:value="0.81490935660504">
                <text:p>0.81490935660504</text:p>
              </table:table-cell>
              <table:table-cell office:value-type="float" office:value="150">
                <text:p>150</text:p>
              </table:table-cell>
              <table:table-cell office:value-type="float" office:value="5.6786320952747">
                <text:p>5.6786320952747</text:p>
              </table:table-cell>
              <table:table-cell office:value-type="float" office:value="150">
                <text:p>150</text:p>
              </table:table-cell>
              <table:table-cell office:value-type="float" office:value="1.80521005550922">
                <text:p>1.80521005550922</text:p>
              </table:table-cell>
              <table:table-cell office:value-type="float" office:value="150">
                <text:p>150</text:p>
              </table:table-cell>
              <table:table-cell office:value-type="float" office:value="0.508185963635365">
                <text:p>0.508185963635365</text:p>
              </table:table-cell>
              <table:table-cell office:value-type="float" office:value="150">
                <text:p>150</text:p>
              </table:table-cell>
              <table:table-cell office:value-type="float" office:value="0.0412410606119529">
                <text:p>0.0412410606119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2.133657039698">
                <text:p>402.133657039698</text:p>
              </table:table-cell>
              <table:table-cell office:value-type="float" office:value="23.618736762386">
                <text:p>23.618736762386</text:p>
              </table:table-cell>
              <table:table-cell office:value-type="float" office:value="200">
                <text:p>200</text:p>
              </table:table-cell>
              <table:table-cell office:value-type="float" office:value="9.48074626161961">
                <text:p>9.48074626161961</text:p>
              </table:table-cell>
              <table:table-cell office:value-type="float" office:value="200">
                <text:p>200</text:p>
              </table:table-cell>
              <table:table-cell office:value-type="float" office:value="0.81782278670652">
                <text:p>0.81782278670652</text:p>
              </table:table-cell>
              <table:table-cell office:value-type="float" office:value="200">
                <text:p>200</text:p>
              </table:table-cell>
              <table:table-cell office:value-type="float" office:value="6.19988238047612">
                <text:p>6.19988238047612</text:p>
              </table:table-cell>
              <table:table-cell office:value-type="float" office:value="200">
                <text:p>200</text:p>
              </table:table-cell>
              <table:table-cell office:value-type="float" office:value="1.8081795008168">
                <text:p>1.8081795008168</text:p>
              </table:table-cell>
              <table:table-cell office:value-type="float" office:value="200">
                <text:p>200</text:p>
              </table:table-cell>
              <table:table-cell office:value-type="float" office:value="0.609791985024823">
                <text:p>0.609791985024823</text:p>
              </table:table-cell>
              <table:table-cell office:value-type="float" office:value="200">
                <text:p>200</text:p>
              </table:table-cell>
              <table:table-cell office:value-type="float" office:value="0.0450696085872516">
                <text:p>0.0450696085872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6.562386586073">
                <text:p>416.562386586073</text:p>
              </table:table-cell>
              <table:table-cell office:value-type="float" office:value="23.7492007500713">
                <text:p>23.7492007500713</text:p>
              </table:table-cell>
              <table:table-cell office:value-type="float" office:value="250">
                <text:p>250</text:p>
              </table:table-cell>
              <table:table-cell office:value-type="float" office:value="10.36917">
                <text:p>10.36917</text:p>
              </table:table-cell>
              <table:table-cell office:value-type="float" office:value="250">
                <text:p>250</text:p>
              </table:table-cell>
              <table:table-cell office:value-type="float" office:value="0.8239494">
                <text:p>0.8239494</text:p>
              </table:table-cell>
              <table:table-cell office:value-type="float" office:value="250">
                <text:p>250</text:p>
              </table:table-cell>
              <table:table-cell office:value-type="float" office:value="6.857323">
                <text:p>6.857323</text:p>
              </table:table-cell>
              <table:table-cell office:value-type="float" office:value="250">
                <text:p>250</text:p>
              </table:table-cell>
              <table:table-cell office:value-type="float" office:value="1.811476">
                <text:p>1.811476</text:p>
              </table:table-cell>
              <table:table-cell office:value-type="float" office:value="250">
                <text:p>250</text:p>
              </table:table-cell>
              <table:table-cell office:value-type="float" office:value="0.7254062">
                <text:p>0.7254062</text:p>
              </table:table-cell>
              <table:table-cell office:value-type="float" office:value="250">
                <text:p>250</text:p>
              </table:table-cell>
              <table:table-cell office:value-type="float" office:value="0.1510153">
                <text:p>0.1510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7.940502473658">
                <text:p>417.940502473658</text:p>
              </table:table-cell>
              <table:table-cell office:value-type="float" office:value="23.1337292523787">
                <text:p>23.1337292523787</text:p>
              </table:table-cell>
              <table:table-cell office:value-type="float" office:value="300">
                <text:p>300</text:p>
              </table:table-cell>
              <table:table-cell office:value-type="float" office:value="10.859989909994">
                <text:p>10.859989909994</text:p>
              </table:table-cell>
              <table:table-cell office:value-type="float" office:value="300">
                <text:p>300</text:p>
              </table:table-cell>
              <table:table-cell office:value-type="float" office:value="0.825240453951475">
                <text:p>0.825240453951475</text:p>
              </table:table-cell>
              <table:table-cell office:value-type="float" office:value="300">
                <text:p>300</text:p>
              </table:table-cell>
              <table:table-cell office:value-type="float" office:value="7.32700868348168">
                <text:p>7.32700868348168</text:p>
              </table:table-cell>
              <table:table-cell office:value-type="float" office:value="300">
                <text:p>300</text:p>
              </table:table-cell>
              <table:table-cell office:value-type="float" office:value="1.81620729931823">
                <text:p>1.81620729931823</text:p>
              </table:table-cell>
              <table:table-cell office:value-type="float" office:value="300">
                <text:p>300</text:p>
              </table:table-cell>
              <table:table-cell office:value-type="float" office:value="0.816504296621965">
                <text:p>0.816504296621965</text:p>
              </table:table-cell>
              <table:table-cell office:value-type="float" office:value="300">
                <text:p>300</text:p>
              </table:table-cell>
              <table:table-cell office:value-type="float" office:value="0.0750291766350748">
                <text:p>0.0750291766350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.071145475821">
                <text:p>432.071145475821</text:p>
              </table:table-cell>
              <table:table-cell office:value-type="float" office:value="23.2361607578903">
                <text:p>23.2361607578903</text:p>
              </table:table-cell>
              <table:table-cell office:value-type="float" office:value="350">
                <text:p>350</text:p>
              </table:table-cell>
              <table:table-cell office:value-type="float" office:value="11.84022">
                <text:p>11.84022</text:p>
              </table:table-cell>
              <table:table-cell office:value-type="float" office:value="350">
                <text:p>350</text:p>
              </table:table-cell>
              <table:table-cell office:value-type="float" office:value="0.8313001">
                <text:p>0.8313001</text:p>
              </table:table-cell>
              <table:table-cell office:value-type="float" office:value="350">
                <text:p>350</text:p>
              </table:table-cell>
              <table:table-cell office:value-type="float" office:value="8.096946">
                <text:p>8.096946</text:p>
              </table:table-cell>
              <table:table-cell office:value-type="float" office:value="350">
                <text:p>350</text:p>
              </table:table-cell>
              <table:table-cell office:value-type="float" office:value="1.820473">
                <text:p>1.820473</text:p>
              </table:table-cell>
              <table:table-cell office:value-type="float" office:value="350">
                <text:p>350</text:p>
              </table:table-cell>
              <table:table-cell office:value-type="float" office:value="0.9388483">
                <text:p>0.9388483</text:p>
              </table:table-cell>
              <table:table-cell office:value-type="float" office:value="350">
                <text:p>350</text:p>
              </table:table-cell>
              <table:table-cell office:value-type="float" office:value="0.1526476">
                <text:p>0.1526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4.766749479286">
                <text:p>434.766749479286</text:p>
              </table:table-cell>
              <table:table-cell office:value-type="float" office:value="22.6885031309255">
                <text:p>22.6885031309255</text:p>
              </table:table-cell>
              <table:table-cell office:value-type="float" office:value="400">
                <text:p>400</text:p>
              </table:table-cell>
              <table:table-cell office:value-type="float" office:value="12.694">
                <text:p>12.694</text:p>
              </table:table-cell>
              <table:table-cell office:value-type="float" office:value="400">
                <text:p>400</text:p>
              </table:table-cell>
              <table:table-cell office:value-type="float" office:value="0.8351975">
                <text:p>0.8351975</text:p>
              </table:table-cell>
              <table:table-cell office:value-type="float" office:value="400">
                <text:p>400</text:p>
              </table:table-cell>
              <table:table-cell office:value-type="float" office:value="8.825287">
                <text:p>8.825287</text:p>
              </table:table-cell>
              <table:table-cell office:value-type="float" office:value="400">
                <text:p>400</text:p>
              </table:table-cell>
              <table:table-cell office:value-type="float" office:value="1.825717">
                <text:p>1.825717</text:p>
              </table:table-cell>
              <table:table-cell office:value-type="float" office:value="400">
                <text:p>400</text:p>
              </table:table-cell>
              <table:table-cell office:value-type="float" office:value="1.054102">
                <text:p>1.054102</text:p>
              </table:table-cell>
              <table:table-cell office:value-type="float" office:value="400">
                <text:p>400</text:p>
              </table:table-cell>
              <table:table-cell office:value-type="float" office:value="0.1536974">
                <text:p>0.1536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2.734868098623">
                <text:p>452.734868098623</text:p>
              </table:table-cell>
              <table:table-cell office:value-type="float" office:value="22.5945817563439">
                <text:p>22.5945817563439</text:p>
              </table:table-cell>
              <table:table-cell office:value-type="float" office:value="450">
                <text:p>450</text:p>
              </table:table-cell>
              <table:table-cell office:value-type="float" office:value="13.61091">
                <text:p>13.61091</text:p>
              </table:table-cell>
              <table:table-cell office:value-type="float" office:value="450">
                <text:p>450</text:p>
              </table:table-cell>
              <table:table-cell office:value-type="float" office:value="0.8383315">
                <text:p>0.8383315</text:p>
              </table:table-cell>
              <table:table-cell office:value-type="float" office:value="450">
                <text:p>450</text:p>
              </table:table-cell>
              <table:table-cell office:value-type="float" office:value="9.61248">
                <text:p>9.61248</text:p>
              </table:table-cell>
              <table:table-cell office:value-type="float" office:value="450">
                <text:p>450</text:p>
              </table:table-cell>
              <table:table-cell office:value-type="float" office:value="1.831502">
                <text:p>1.831502</text:p>
              </table:table-cell>
              <table:table-cell office:value-type="float" office:value="450">
                <text:p>450</text:p>
              </table:table-cell>
              <table:table-cell office:value-type="float" office:value="1.17744">
                <text:p>1.17744</text:p>
              </table:table-cell>
              <table:table-cell office:value-type="float" office:value="450">
                <text:p>450</text:p>
              </table:table-cell>
              <table:table-cell office:value-type="float" office:value="0.1511576">
                <text:p>0.15115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9.238019604211">
                <text:p>469.238019604211</text:p>
              </table:table-cell>
              <table:table-cell office:value-type="float" office:value="22.3382397112772">
                <text:p>22.3382397112772</text:p>
              </table:table-cell>
              <table:table-cell office:value-type="float" office:value="500">
                <text:p>500</text:p>
              </table:table-cell>
              <table:table-cell office:value-type="float" office:value="14.56406">
                <text:p>14.56406</text:p>
              </table:table-cell>
              <table:table-cell office:value-type="float" office:value="500">
                <text:p>500</text:p>
              </table:table-cell>
              <table:table-cell office:value-type="float" office:value="0.8427263">
                <text:p>0.8427263</text:p>
              </table:table-cell>
              <table:table-cell office:value-type="float" office:value="500">
                <text:p>500</text:p>
              </table:table-cell>
              <table:table-cell office:value-type="float" office:value="10.42813">
                <text:p>10.42813</text:p>
              </table:table-cell>
              <table:table-cell office:value-type="float" office:value="500">
                <text:p>500</text:p>
              </table:table-cell>
              <table:table-cell office:value-type="float" office:value="1.83886">
                <text:p>1.83886</text:p>
              </table:table-cell>
              <table:table-cell office:value-type="float" office:value="500">
                <text:p>500</text:p>
              </table:table-cell>
              <table:table-cell office:value-type="float" office:value="1.303756">
                <text:p>1.303756</text:p>
              </table:table-cell>
              <table:table-cell office:value-type="float" office:value="500">
                <text:p>500</text:p>
              </table:table-cell>
              <table:table-cell office:value-type="float" office:value="0.1505846">
                <text:p>0.15058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1.620668291683">
                <text:p>491.620668291683</text:p>
              </table:table-cell>
              <table:table-cell office:value-type="float" office:value="22.5739827528453">
                <text:p>22.5739827528453</text:p>
              </table:table-cell>
              <table:table-cell office:value-type="float" office:value="550">
                <text:p>550</text:p>
              </table:table-cell>
              <table:table-cell office:value-type="float" office:value="15.54258">
                <text:p>15.54258</text:p>
              </table:table-cell>
              <table:table-cell office:value-type="float" office:value="550">
                <text:p>550</text:p>
              </table:table-cell>
              <table:table-cell office:value-type="float" office:value="0.8480639">
                <text:p>0.8480639</text:p>
              </table:table-cell>
              <table:table-cell office:value-type="float" office:value="550">
                <text:p>550</text:p>
              </table:table-cell>
              <table:table-cell office:value-type="float" office:value="11.26484">
                <text:p>11.26484</text:p>
              </table:table-cell>
              <table:table-cell office:value-type="float" office:value="550">
                <text:p>550</text:p>
              </table:table-cell>
              <table:table-cell office:value-type="float" office:value="1.846072">
                <text:p>1.846072</text:p>
              </table:table-cell>
              <table:table-cell office:value-type="float" office:value="550">
                <text:p>550</text:p>
              </table:table-cell>
              <table:table-cell office:value-type="float" office:value="1.431123">
                <text:p>1.431123</text:p>
              </table:table-cell>
              <table:table-cell office:value-type="float" office:value="550">
                <text:p>550</text:p>
              </table:table-cell>
              <table:table-cell office:value-type="float" office:value="0.1524754">
                <text:p>0.1524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1.703549217024">
                <text:p>521.703549217024</text:p>
              </table:table-cell>
              <table:table-cell office:value-type="float" office:value="23.0344668666309">
                <text:p>23.0344668666309</text:p>
              </table:table-cell>
              <table:table-cell office:value-type="float" office:value="600">
                <text:p>600</text:p>
              </table:table-cell>
              <table:table-cell office:value-type="float" office:value="16.52622">
                <text:p>16.52622</text:p>
              </table:table-cell>
              <table:table-cell office:value-type="float" office:value="600">
                <text:p>600</text:p>
              </table:table-cell>
              <table:table-cell office:value-type="float" office:value="0.8536427">
                <text:p>0.8536427</text:p>
              </table:table-cell>
              <table:table-cell office:value-type="float" office:value="600">
                <text:p>600</text:p>
              </table:table-cell>
              <table:table-cell office:value-type="float" office:value="12.10329">
                <text:p>12.10329</text:p>
              </table:table-cell>
              <table:table-cell office:value-type="float" office:value="600">
                <text:p>600</text:p>
              </table:table-cell>
              <table:table-cell office:value-type="float" office:value="1.853946">
                <text:p>1.853946</text:p>
              </table:table-cell>
              <table:table-cell office:value-type="float" office:value="600">
                <text:p>600</text:p>
              </table:table-cell>
              <table:table-cell office:value-type="float" office:value="1.561608">
                <text:p>1.561608</text:p>
              </table:table-cell>
              <table:table-cell office:value-type="float" office:value="600">
                <text:p>600</text:p>
              </table:table-cell>
              <table:table-cell office:value-type="float" office:value="0.153742">
                <text:p>0.1537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2.433802074882">
                <text:p>542.433802074882</text:p>
              </table:table-cell>
              <table:table-cell office:value-type="float" office:value="23.0849392735795">
                <text:p>23.0849392735795</text:p>
              </table:table-cell>
              <table:table-cell office:value-type="float" office:value="650">
                <text:p>650</text:p>
              </table:table-cell>
              <table:table-cell office:value-type="float" office:value="17.53242">
                <text:p>17.53242</text:p>
              </table:table-cell>
              <table:table-cell office:value-type="float" office:value="650">
                <text:p>650</text:p>
              </table:table-cell>
              <table:table-cell office:value-type="float" office:value="0.8594937">
                <text:p>0.8594937</text:p>
              </table:table-cell>
              <table:table-cell office:value-type="float" office:value="650">
                <text:p>650</text:p>
              </table:table-cell>
              <table:table-cell office:value-type="float" office:value="12.96016">
                <text:p>12.96016</text:p>
              </table:table-cell>
              <table:table-cell office:value-type="float" office:value="650">
                <text:p>650</text:p>
              </table:table-cell>
              <table:table-cell office:value-type="float" office:value="1.862814">
                <text:p>1.862814</text:p>
              </table:table-cell>
              <table:table-cell office:value-type="float" office:value="650">
                <text:p>650</text:p>
              </table:table-cell>
              <table:table-cell office:value-type="float" office:value="1.694906">
                <text:p>1.694906</text:p>
              </table:table-cell>
              <table:table-cell office:value-type="float" office:value="650">
                <text:p>650</text:p>
              </table:table-cell>
              <table:table-cell office:value-type="float" office:value="0.1550494">
                <text:p>0.15504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1.08479640021">
                <text:p>571.08479640021</text:p>
              </table:table-cell>
              <table:table-cell office:value-type="float" office:value="23.3404100168038">
                <text:p>23.3404100168038</text:p>
              </table:table-cell>
              <table:table-cell office:value-type="float" office:value="700">
                <text:p>700</text:p>
              </table:table-cell>
              <table:table-cell office:value-type="float" office:value="18.55459">
                <text:p>18.55459</text:p>
              </table:table-cell>
              <table:table-cell office:value-type="float" office:value="700">
                <text:p>700</text:p>
              </table:table-cell>
              <table:table-cell office:value-type="float" office:value="0.8659053">
                <text:p>0.8659053</text:p>
              </table:table-cell>
              <table:table-cell office:value-type="float" office:value="700">
                <text:p>700</text:p>
              </table:table-cell>
              <table:table-cell office:value-type="float" office:value="13.8309">
                <text:p>13.8309</text:p>
              </table:table-cell>
              <table:table-cell office:value-type="float" office:value="700">
                <text:p>700</text:p>
              </table:table-cell>
              <table:table-cell office:value-type="float" office:value="1.872899">
                <text:p>1.872899</text:p>
              </table:table-cell>
              <table:table-cell office:value-type="float" office:value="700">
                <text:p>700</text:p>
              </table:table-cell>
              <table:table-cell office:value-type="float" office:value="1.827763">
                <text:p>1.827763</text:p>
              </table:table-cell>
              <table:table-cell office:value-type="float" office:value="700">
                <text:p>700</text:p>
              </table:table-cell>
              <table:table-cell office:value-type="float" office:value="0.1571306">
                <text:p>0.1571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1.813761889517">
                <text:p>591.813761889517</text:p>
              </table:table-cell>
              <table:table-cell office:value-type="float" office:value="23.2708914010183">
                <text:p>23.2708914010183</text:p>
              </table:table-cell>
              <table:table-cell office:value-type="float" office:value="750">
                <text:p>750</text:p>
              </table:table-cell>
              <table:table-cell office:value-type="float" office:value="19.58205">
                <text:p>19.58205</text:p>
              </table:table-cell>
              <table:table-cell office:value-type="float" office:value="750">
                <text:p>750</text:p>
              </table:table-cell>
              <table:table-cell office:value-type="float" office:value="0.8729021">
                <text:p>0.8729021</text:p>
              </table:table-cell>
              <table:table-cell office:value-type="float" office:value="750">
                <text:p>750</text:p>
              </table:table-cell>
              <table:table-cell office:value-type="float" office:value="14.7053">
                <text:p>14.7053</text:p>
              </table:table-cell>
              <table:table-cell office:value-type="float" office:value="750">
                <text:p>750</text:p>
              </table:table-cell>
              <table:table-cell office:value-type="float" office:value="1.883519">
                <text:p>1.883519</text:p>
              </table:table-cell>
              <table:table-cell office:value-type="float" office:value="750">
                <text:p>750</text:p>
              </table:table-cell>
              <table:table-cell office:value-type="float" office:value="1.960935">
                <text:p>1.960935</text:p>
              </table:table-cell>
              <table:table-cell office:value-type="float" office:value="750">
                <text:p>750</text:p>
              </table:table-cell>
              <table:table-cell office:value-type="float" office:value="0.1593934">
                <text:p>0.15939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0.460772659333">
                <text:p>620.460772659333</text:p>
              </table:table-cell>
              <table:table-cell office:value-type="float" office:value="23.4242470031465">
                <text:p>23.4242470031465</text:p>
              </table:table-cell>
              <table:table-cell office:value-type="float" office:value="800">
                <text:p>800</text:p>
              </table:table-cell>
              <table:table-cell office:value-type="float" office:value="20.61164">
                <text:p>20.61164</text:p>
              </table:table-cell>
              <table:table-cell office:value-type="float" office:value="800">
                <text:p>800</text:p>
              </table:table-cell>
              <table:table-cell office:value-type="float" office:value="0.8805299">
                <text:p>0.8805299</text:p>
              </table:table-cell>
              <table:table-cell office:value-type="float" office:value="800">
                <text:p>800</text:p>
              </table:table-cell>
              <table:table-cell office:value-type="float" office:value="15.58073">
                <text:p>15.58073</text:p>
              </table:table-cell>
              <table:table-cell office:value-type="float" office:value="800">
                <text:p>800</text:p>
              </table:table-cell>
              <table:table-cell office:value-type="float" office:value="1.894171">
                <text:p>1.894171</text:p>
              </table:table-cell>
              <table:table-cell office:value-type="float" office:value="800">
                <text:p>800</text:p>
              </table:table-cell>
              <table:table-cell office:value-type="float" office:value="2.094439">
                <text:p>2.094439</text:p>
              </table:table-cell>
              <table:table-cell office:value-type="float" office:value="800">
                <text:p>800</text:p>
              </table:table-cell>
              <table:table-cell office:value-type="float" office:value="0.1617709">
                <text:p>0.16177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2.071085231823">
                <text:p>642.071085231823</text:p>
              </table:table-cell>
              <table:table-cell office:value-type="float" office:value="23.2223757916545">
                <text:p>23.2223757916545</text:p>
              </table:table-cell>
              <table:table-cell office:value-type="float" office:value="850">
                <text:p>850</text:p>
              </table:table-cell>
              <table:table-cell office:value-type="float" office:value="21.64852">
                <text:p>21.64852</text:p>
              </table:table-cell>
              <table:table-cell office:value-type="float" office:value="850">
                <text:p>850</text:p>
              </table:table-cell>
              <table:table-cell office:value-type="float" office:value="0.8886793">
                <text:p>0.8886793</text:p>
              </table:table-cell>
              <table:table-cell office:value-type="float" office:value="850">
                <text:p>850</text:p>
              </table:table-cell>
              <table:table-cell office:value-type="float" office:value="16.45931">
                <text:p>16.45931</text:p>
              </table:table-cell>
              <table:table-cell office:value-type="float" office:value="850">
                <text:p>850</text:p>
              </table:table-cell>
              <table:table-cell office:value-type="float" office:value="1.906006">
                <text:p>1.906006</text:p>
              </table:table-cell>
              <table:table-cell office:value-type="float" office:value="850">
                <text:p>850</text:p>
              </table:table-cell>
              <table:table-cell office:value-type="float" office:value="2.229889">
                <text:p>2.229889</text:p>
              </table:table-cell>
              <table:table-cell office:value-type="float" office:value="850">
                <text:p>850</text:p>
              </table:table-cell>
              <table:table-cell office:value-type="float" office:value="0.1646379">
                <text:p>0.1646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6.75757709907">
                <text:p>666.75757709907</text:p>
              </table:table-cell>
              <table:table-cell office:value-type="float" office:value="23.1109400974274">
                <text:p>23.1109400974274</text:p>
              </table:table-cell>
              <table:table-cell office:value-type="float" office:value="900">
                <text:p>900</text:p>
              </table:table-cell>
              <table:table-cell office:value-type="float" office:value="22.68906">
                <text:p>22.68906</text:p>
              </table:table-cell>
              <table:table-cell office:value-type="float" office:value="900">
                <text:p>900</text:p>
              </table:table-cell>
              <table:table-cell office:value-type="float" office:value="0.8974331">
                <text:p>0.8974331</text:p>
              </table:table-cell>
              <table:table-cell office:value-type="float" office:value="900">
                <text:p>900</text:p>
              </table:table-cell>
              <table:table-cell office:value-type="float" office:value="17.3389">
                <text:p>17.3389</text:p>
              </table:table-cell>
              <table:table-cell office:value-type="float" office:value="900">
                <text:p>900</text:p>
              </table:table-cell>
              <table:table-cell office:value-type="float" office:value="1.918662">
                <text:p>1.918662</text:p>
              </table:table-cell>
              <table:table-cell office:value-type="float" office:value="900">
                <text:p>900</text:p>
              </table:table-cell>
              <table:table-cell office:value-type="float" office:value="2.366241">
                <text:p>2.366241</text:p>
              </table:table-cell>
              <table:table-cell office:value-type="float" office:value="900">
                <text:p>900</text:p>
              </table:table-cell>
              <table:table-cell office:value-type="float" office:value="0.167817">
                <text:p>0.1678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7.591054613882">
                <text:p>697.591054613882</text:p>
              </table:table-cell>
              <table:table-cell office:value-type="float" office:value="23.3366523047666">
                <text:p>23.3366523047666</text:p>
              </table:table-cell>
              <table:table-cell office:value-type="float" office:value="950">
                <text:p>950</text:p>
              </table:table-cell>
              <table:table-cell office:value-type="float" office:value="23.732">
                <text:p>23.732</text:p>
              </table:table-cell>
              <table:table-cell office:value-type="float" office:value="950">
                <text:p>950</text:p>
              </table:table-cell>
              <table:table-cell office:value-type="float" office:value="0.9065527">
                <text:p>0.9065527</text:p>
              </table:table-cell>
              <table:table-cell office:value-type="float" office:value="950">
                <text:p>950</text:p>
              </table:table-cell>
              <table:table-cell office:value-type="float" office:value="18.21917">
                <text:p>18.21917</text:p>
              </table:table-cell>
              <table:table-cell office:value-type="float" office:value="950">
                <text:p>950</text:p>
              </table:table-cell>
              <table:table-cell office:value-type="float" office:value="1.931762">
                <text:p>1.931762</text:p>
              </table:table-cell>
              <table:table-cell office:value-type="float" office:value="950">
                <text:p>950</text:p>
              </table:table-cell>
              <table:table-cell office:value-type="float" office:value="2.503392">
                <text:p>2.503392</text:p>
              </table:table-cell>
              <table:table-cell office:value-type="float" office:value="950">
                <text:p>950</text:p>
              </table:table-cell>
              <table:table-cell office:value-type="float" office:value="0.1711229">
                <text:p>0.17112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8.423715985614">
                <text:p>728.423715985614</text:p>
              </table:table-cell>
              <table:table-cell office:value-type="float" office:value="23.5059645331344">
                <text:p>23.5059645331344</text:p>
              </table:table-cell>
              <table:table-cell office:value-type="float" office:value="1000">
                <text:p>1000</text:p>
              </table:table-cell>
              <table:table-cell office:value-type="float" office:value="24.77889">
                <text:p>24.77889</text:p>
              </table:table-cell>
              <table:table-cell office:value-type="float" office:value="1000">
                <text:p>1000</text:p>
              </table:table-cell>
              <table:table-cell office:value-type="float" office:value="0.9160255">
                <text:p>0.9160255</text:p>
              </table:table-cell>
              <table:table-cell office:value-type="float" office:value="1000">
                <text:p>1000</text:p>
              </table:table-cell>
              <table:table-cell office:value-type="float" office:value="19.10208">
                <text:p>19.10208</text:p>
              </table:table-cell>
              <table:table-cell office:value-type="float" office:value="1000">
                <text:p>1000</text:p>
              </table:table-cell>
              <table:table-cell office:value-type="float" office:value="1.944916">
                <text:p>1.944916</text:p>
              </table:table-cell>
              <table:table-cell office:value-type="float" office:value="1000">
                <text:p>1000</text:p>
              </table:table-cell>
              <table:table-cell office:value-type="float" office:value="2.641621">
                <text:p>2.641621</text:p>
              </table:table-cell>
              <table:table-cell office:value-type="float" office:value="1000">
                <text:p>1000</text:p>
              </table:table-cell>
              <table:table-cell office:value-type="float" office:value="0.1742404">
                <text:p>0.17424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6.171254494664">
                <text:p>756.171254494664</text:p>
              </table:table-cell>
              <table:table-cell office:value-type="float" office:value="23.635573833991">
                <text:p>23.635573833991</text:p>
              </table:table-cell>
              <table:table-cell office:value-type="float" office:value="1050">
                <text:p>1050</text:p>
              </table:table-cell>
              <table:table-cell office:value-type="float" office:value="25.8323">
                <text:p>25.8323</text:p>
              </table:table-cell>
              <table:table-cell office:value-type="float" office:value="1050">
                <text:p>1050</text:p>
              </table:table-cell>
              <table:table-cell office:value-type="float" office:value="0.9262307">
                <text:p>0.9262307</text:p>
              </table:table-cell>
              <table:table-cell office:value-type="float" office:value="1050">
                <text:p>1050</text:p>
              </table:table-cell>
              <table:table-cell office:value-type="float" office:value="19.98783">
                <text:p>19.98783</text:p>
              </table:table-cell>
              <table:table-cell office:value-type="float" office:value="1050">
                <text:p>1050</text:p>
              </table:table-cell>
              <table:table-cell office:value-type="float" office:value="1.95994">
                <text:p>1.95994</text:p>
              </table:table-cell>
              <table:table-cell office:value-type="float" office:value="1050">
                <text:p>1050</text:p>
              </table:table-cell>
              <table:table-cell office:value-type="float" office:value="2.780305">
                <text:p>2.780305</text:p>
              </table:table-cell>
              <table:table-cell office:value-type="float" office:value="1050">
                <text:p>1050</text:p>
              </table:table-cell>
              <table:table-cell office:value-type="float" office:value="0.1779899">
                <text:p>0.17798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7.008710706994">
                <text:p>787.008710706994</text:p>
              </table:table-cell>
              <table:table-cell office:value-type="float" office:value="23.5702064736051">
                <text:p>23.5702064736051</text:p>
              </table:table-cell>
              <table:table-cell office:value-type="float" office:value="1100">
                <text:p>1100</text:p>
              </table:table-cell>
              <table:table-cell office:value-type="float" office:value="26.88897">
                <text:p>26.88897</text:p>
              </table:table-cell>
              <table:table-cell office:value-type="float" office:value="1100">
                <text:p>1100</text:p>
              </table:table-cell>
              <table:table-cell office:value-type="float" office:value="0.9367008">
                <text:p>0.9367008</text:p>
              </table:table-cell>
              <table:table-cell office:value-type="float" office:value="1100">
                <text:p>1100</text:p>
              </table:table-cell>
              <table:table-cell office:value-type="float" office:value="20.87514">
                <text:p>20.87514</text:p>
              </table:table-cell>
              <table:table-cell office:value-type="float" office:value="1100">
                <text:p>1100</text:p>
              </table:table-cell>
              <table:table-cell office:value-type="float" office:value="1.975487">
                <text:p>1.975487</text:p>
              </table:table-cell>
              <table:table-cell office:value-type="float" office:value="1100">
                <text:p>1100</text:p>
              </table:table-cell>
              <table:table-cell office:value-type="float" office:value="2.919601">
                <text:p>2.919601</text:p>
              </table:table-cell>
              <table:table-cell office:value-type="float" office:value="1100">
                <text:p>1100</text:p>
              </table:table-cell>
              <table:table-cell office:value-type="float" office:value="0.1820344">
                <text:p>0.1820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0.920883957728">
                <text:p>820.920883957728</text:p>
              </table:table-cell>
              <table:table-cell office:value-type="float" office:value="23.607291070431">
                <text:p>23.607291070431</text:p>
              </table:table-cell>
              <table:table-cell office:value-type="float" office:value="1150">
                <text:p>1150</text:p>
              </table:table-cell>
              <table:table-cell office:value-type="float" office:value="27.95189">
                <text:p>27.95189</text:p>
              </table:table-cell>
              <table:table-cell office:value-type="float" office:value="1150">
                <text:p>1150</text:p>
              </table:table-cell>
              <table:table-cell office:value-type="float" office:value="0.9478801">
                <text:p>0.9478801</text:p>
              </table:table-cell>
              <table:table-cell office:value-type="float" office:value="1150">
                <text:p>1150</text:p>
              </table:table-cell>
              <table:table-cell office:value-type="float" office:value="21.76571">
                <text:p>21.76571</text:p>
              </table:table-cell>
              <table:table-cell office:value-type="float" office:value="1150">
                <text:p>1150</text:p>
              </table:table-cell>
              <table:table-cell office:value-type="float" office:value="1.991871">
                <text:p>1.991871</text:p>
              </table:table-cell>
              <table:table-cell office:value-type="float" office:value="1150">
                <text:p>1150</text:p>
              </table:table-cell>
              <table:table-cell office:value-type="float" office:value="3.060152">
                <text:p>3.060152</text:p>
              </table:table-cell>
              <table:table-cell office:value-type="float" office:value="1150">
                <text:p>1150</text:p>
              </table:table-cell>
              <table:table-cell office:value-type="float" office:value="0.1862788">
                <text:p>0.18627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7.915950251655">
                <text:p>857.915950251655</text:p>
              </table:table-cell>
              <table:table-cell office:value-type="float" office:value="23.5589673590887">
                <text:p>23.5589673590887</text:p>
              </table:table-cell>
              <table:table-cell office:value-type="float" office:value="1200">
                <text:p>1200</text:p>
              </table:table-cell>
              <table:table-cell office:value-type="float" office:value="29.01815">
                <text:p>29.01815</text:p>
              </table:table-cell>
              <table:table-cell office:value-type="float" office:value="1200">
                <text:p>1200</text:p>
              </table:table-cell>
              <table:table-cell office:value-type="float" office:value="0.9593018">
                <text:p>0.9593018</text:p>
              </table:table-cell>
              <table:table-cell office:value-type="float" office:value="1200">
                <text:p>1200</text:p>
              </table:table-cell>
              <table:table-cell office:value-type="float" office:value="22.65811">
                <text:p>22.65811</text:p>
              </table:table-cell>
              <table:table-cell office:value-type="float" office:value="1200">
                <text:p>1200</text:p>
              </table:table-cell>
              <table:table-cell office:value-type="float" office:value="2.008839">
                <text:p>2.008839</text:p>
              </table:table-cell>
              <table:table-cell office:value-type="float" office:value="1200">
                <text:p>1200</text:p>
              </table:table-cell>
              <table:table-cell office:value-type="float" office:value="3.201114">
                <text:p>3.201114</text:p>
              </table:table-cell>
              <table:table-cell office:value-type="float" office:value="1200">
                <text:p>1200</text:p>
              </table:table-cell>
              <table:table-cell office:value-type="float" office:value="0.1907812">
                <text:p>0.19078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0.30038536182">
                <text:p>910.30038536182</text:p>
              </table:table-cell>
              <table:table-cell office:value-type="float" office:value="23.9453114580153">
                <text:p>23.9453114580153</text:p>
              </table:table-cell>
              <table:table-cell office:value-type="float" office:value="1250">
                <text:p>1250</text:p>
              </table:table-cell>
              <table:table-cell office:value-type="float" office:value="30.08992">
                <text:p>30.08992</text:p>
              </table:table-cell>
              <table:table-cell office:value-type="float" office:value="1250">
                <text:p>1250</text:p>
              </table:table-cell>
              <table:table-cell office:value-type="float" office:value="0.9712056">
                <text:p>0.9712056</text:p>
              </table:table-cell>
              <table:table-cell office:value-type="float" office:value="1250">
                <text:p>1250</text:p>
              </table:table-cell>
              <table:table-cell office:value-type="float" office:value="23.55372">
                <text:p>23.55372</text:p>
              </table:table-cell>
              <table:table-cell office:value-type="float" office:value="1250">
                <text:p>1250</text:p>
              </table:table-cell>
              <table:table-cell office:value-type="float" office:value="2.026514">
                <text:p>2.026514</text:p>
              </table:table-cell>
              <table:table-cell office:value-type="float" office:value="1250">
                <text:p>1250</text:p>
              </table:table-cell>
              <table:table-cell office:value-type="float" office:value="3.342572">
                <text:p>3.342572</text:p>
              </table:table-cell>
              <table:table-cell office:value-type="float" office:value="1250">
                <text:p>1250</text:p>
              </table:table-cell>
              <table:table-cell office:value-type="float" office:value="0.1959065">
                <text:p>0.19590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8.844595599809">
                <text:p>968.844595599809</text:p>
              </table:table-cell>
              <table:table-cell office:value-type="float" office:value="24.3168791016357">
                <text:p>24.3168791016357</text:p>
              </table:table-cell>
              <table:table-cell office:value-type="float" office:value="1300">
                <text:p>1300</text:p>
              </table:table-cell>
              <table:table-cell office:value-type="float" office:value="31.16843">
                <text:p>31.16843</text:p>
              </table:table-cell>
              <table:table-cell office:value-type="float" office:value="1300">
                <text:p>1300</text:p>
              </table:table-cell>
              <table:table-cell office:value-type="float" office:value="0.983714">
                <text:p>0.983714</text:p>
              </table:table-cell>
              <table:table-cell office:value-type="float" office:value="1300">
                <text:p>1300</text:p>
              </table:table-cell>
              <table:table-cell office:value-type="float" office:value="24.45378">
                <text:p>24.45378</text:p>
              </table:table-cell>
              <table:table-cell office:value-type="float" office:value="1300">
                <text:p>1300</text:p>
              </table:table-cell>
              <table:table-cell office:value-type="float" office:value="2.045008">
                <text:p>2.045008</text:p>
              </table:table-cell>
              <table:table-cell office:value-type="float" office:value="1300">
                <text:p>1300</text:p>
              </table:table-cell>
              <table:table-cell office:value-type="float" office:value="3.484975">
                <text:p>3.484975</text:p>
              </table:table-cell>
              <table:table-cell office:value-type="float" office:value="1300">
                <text:p>1300</text:p>
              </table:table-cell>
              <table:table-cell office:value-type="float" office:value="0.2009566">
                <text:p>0.20095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7.38835242498">
                <text:p>1027.38835242498</text:p>
              </table:table-cell>
              <table:table-cell office:value-type="float" office:value="24.5625444693935">
                <text:p>24.5625444693935</text:p>
              </table:table-cell>
              <table:table-cell office:value-type="float" office:value="1350">
                <text:p>1350</text:p>
              </table:table-cell>
              <table:table-cell office:value-type="float" office:value="32.25132">
                <text:p>32.25132</text:p>
              </table:table-cell>
              <table:table-cell office:value-type="float" office:value="1350">
                <text:p>1350</text:p>
              </table:table-cell>
              <table:table-cell office:value-type="float" office:value="0.9968885">
                <text:p>0.9968885</text:p>
              </table:table-cell>
              <table:table-cell office:value-type="float" office:value="1350">
                <text:p>1350</text:p>
              </table:table-cell>
              <table:table-cell office:value-type="float" office:value="25.35581">
                <text:p>25.35581</text:p>
              </table:table-cell>
              <table:table-cell office:value-type="float" office:value="1350">
                <text:p>1350</text:p>
              </table:table-cell>
              <table:table-cell office:value-type="float" office:value="2.06463">
                <text:p>2.06463</text:p>
              </table:table-cell>
              <table:table-cell office:value-type="float" office:value="1350">
                <text:p>1350</text:p>
              </table:table-cell>
              <table:table-cell office:value-type="float" office:value="3.627712">
                <text:p>3.627712</text:p>
              </table:table-cell>
              <table:table-cell office:value-type="float" office:value="1350">
                <text:p>1350</text:p>
              </table:table-cell>
              <table:table-cell office:value-type="float" office:value="0.2062734">
                <text:p>0.20627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2.08698221985">
                <text:p>1092.08698221985</text:p>
              </table:table-cell>
              <table:table-cell office:value-type="float" office:value="24.8965329030914">
                <text:p>24.8965329030914</text:p>
              </table:table-cell>
              <table:table-cell office:value-type="float" office:value="1400">
                <text:p>1400</text:p>
              </table:table-cell>
              <table:table-cell office:value-type="float" office:value="33.33784">
                <text:p>33.33784</text:p>
              </table:table-cell>
              <table:table-cell office:value-type="float" office:value="1400">
                <text:p>1400</text:p>
              </table:table-cell>
              <table:table-cell office:value-type="float" office:value="1.010276">
                <text:p>1.010276</text:p>
              </table:table-cell>
              <table:table-cell office:value-type="float" office:value="1400">
                <text:p>1400</text:p>
              </table:table-cell>
              <table:table-cell office:value-type="float" office:value="26.25969">
                <text:p>26.25969</text:p>
              </table:table-cell>
              <table:table-cell office:value-type="float" office:value="1400">
                <text:p>1400</text:p>
              </table:table-cell>
              <table:table-cell office:value-type="float" office:value="2.084914">
                <text:p>2.084914</text:p>
              </table:table-cell>
              <table:table-cell office:value-type="float" office:value="1400">
                <text:p>1400</text:p>
              </table:table-cell>
              <table:table-cell office:value-type="float" office:value="3.771196">
                <text:p>3.771196</text:p>
              </table:table-cell>
              <table:table-cell office:value-type="float" office:value="1400">
                <text:p>1400</text:p>
              </table:table-cell>
              <table:table-cell office:value-type="float" office:value="0.2117669">
                <text:p>0.21176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9.85968912276">
                <text:p>1159.85968912276</text:p>
              </table:table-cell>
              <table:table-cell office:value-type="float" office:value="25.3046569414075">
                <text:p>25.3046569414075</text:p>
              </table:table-cell>
              <table:table-cell office:value-type="float" office:value="1450">
                <text:p>1450</text:p>
              </table:table-cell>
              <table:table-cell office:value-type="float" office:value="34.42754">
                <text:p>34.42754</text:p>
              </table:table-cell>
              <table:table-cell office:value-type="float" office:value="1450">
                <text:p>1450</text:p>
              </table:table-cell>
              <table:table-cell office:value-type="float" office:value="1.024059">
                <text:p>1.024059</text:p>
              </table:table-cell>
              <table:table-cell office:value-type="float" office:value="1450">
                <text:p>1450</text:p>
              </table:table-cell>
              <table:table-cell office:value-type="float" office:value="27.16522">
                <text:p>27.16522</text:p>
              </table:table-cell>
              <table:table-cell office:value-type="float" office:value="1450">
                <text:p>1450</text:p>
              </table:table-cell>
              <table:table-cell office:value-type="float" office:value="2.105895">
                <text:p>2.105895</text:p>
              </table:table-cell>
              <table:table-cell office:value-type="float" office:value="1450">
                <text:p>1450</text:p>
              </table:table-cell>
              <table:table-cell office:value-type="float" office:value="3.914755">
                <text:p>3.914755</text:p>
              </table:table-cell>
              <table:table-cell office:value-type="float" office:value="1450">
                <text:p>1450</text:p>
              </table:table-cell>
              <table:table-cell office:value-type="float" office:value="0.2176123">
                <text:p>0.21761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7.6327669998">
                <text:p>1227.6327669998</text:p>
              </table:table-cell>
              <table:table-cell office:value-type="float" office:value="25.5701711885147">
                <text:p>25.5701711885147</text:p>
              </table:table-cell>
              <table:table-cell office:value-type="float" office:value="1500">
                <text:p>1500</text:p>
              </table:table-cell>
              <table:table-cell office:value-type="float" office:value="35.52175">
                <text:p>35.52175</text:p>
              </table:table-cell>
              <table:table-cell office:value-type="float" office:value="1500">
                <text:p>1500</text:p>
              </table:table-cell>
              <table:table-cell office:value-type="float" office:value="1.03835">
                <text:p>1.03835</text:p>
              </table:table-cell>
              <table:table-cell office:value-type="float" office:value="1500">
                <text:p>1500</text:p>
              </table:table-cell>
              <table:table-cell office:value-type="float" office:value="28.07324">
                <text:p>28.07324</text:p>
              </table:table-cell>
              <table:table-cell office:value-type="float" office:value="1500">
                <text:p>1500</text:p>
              </table:table-cell>
              <table:table-cell office:value-type="float" office:value="2.127802">
                <text:p>2.127802</text:p>
              </table:table-cell>
              <table:table-cell office:value-type="float" office:value="1500">
                <text:p>1500</text:p>
              </table:table-cell>
              <table:table-cell office:value-type="float" office:value="4.058576">
                <text:p>4.058576</text:p>
              </table:table-cell>
              <table:table-cell office:value-type="float" office:value="1500">
                <text:p>1500</text:p>
              </table:table-cell>
              <table:table-cell office:value-type="float" office:value="0.223783">
                <text:p>0.2237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95.3999092908">
                <text:p>1295.3999092908</text:p>
              </table:table-cell>
              <table:table-cell office:value-type="float" office:value="25.9073313793419">
                <text:p>25.9073313793419</text:p>
              </table:table-cell>
              <table:table-cell office:value-type="float" office:value="1550">
                <text:p>1550</text:p>
              </table:table-cell>
              <table:table-cell office:value-type="float" office:value="36.62197">
                <text:p>36.62197</text:p>
              </table:table-cell>
              <table:table-cell office:value-type="float" office:value="1550">
                <text:p>1550</text:p>
              </table:table-cell>
              <table:table-cell office:value-type="float" office:value="1.053056">
                <text:p>1.053056</text:p>
              </table:table-cell>
              <table:table-cell office:value-type="float" office:value="1550">
                <text:p>1550</text:p>
              </table:table-cell>
              <table:table-cell office:value-type="float" office:value="28.98545">
                <text:p>28.98545</text:p>
              </table:table-cell>
              <table:table-cell office:value-type="float" office:value="1550">
                <text:p>1550</text:p>
              </table:table-cell>
              <table:table-cell office:value-type="float" office:value="2.150401">
                <text:p>2.150401</text:p>
              </table:table-cell>
              <table:table-cell office:value-type="float" office:value="1550">
                <text:p>1550</text:p>
              </table:table-cell>
              <table:table-cell office:value-type="float" office:value="4.202861">
                <text:p>4.202861</text:p>
              </table:table-cell>
              <table:table-cell office:value-type="float" office:value="1550">
                <text:p>1550</text:p>
              </table:table-cell>
              <table:table-cell office:value-type="float" office:value="0.2302038">
                <text:p>0.23020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63.16278537933">
                <text:p>1363.16278537933</text:p>
              </table:table-cell>
              <table:table-cell office:value-type="float" office:value="26.2873431686251">
                <text:p>26.2873431686251</text:p>
              </table:table-cell>
              <table:table-cell office:value-type="float" office:value="1600">
                <text:p>1600</text:p>
              </table:table-cell>
              <table:table-cell office:value-type="float" office:value="37.72819">
                <text:p>37.72819</text:p>
              </table:table-cell>
              <table:table-cell office:value-type="float" office:value="1600">
                <text:p>1600</text:p>
              </table:table-cell>
              <table:table-cell office:value-type="float" office:value="1.068517">
                <text:p>1.068517</text:p>
              </table:table-cell>
              <table:table-cell office:value-type="float" office:value="1600">
                <text:p>1600</text:p>
              </table:table-cell>
              <table:table-cell office:value-type="float" office:value="29.90123">
                <text:p>29.90123</text:p>
              </table:table-cell>
              <table:table-cell office:value-type="float" office:value="1600">
                <text:p>1600</text:p>
              </table:table-cell>
              <table:table-cell office:value-type="float" office:value="2.173925">
                <text:p>2.173925</text:p>
              </table:table-cell>
              <table:table-cell office:value-type="float" office:value="1600">
                <text:p>1600</text:p>
              </table:table-cell>
              <table:table-cell office:value-type="float" office:value="4.347441">
                <text:p>4.347441</text:p>
              </table:table-cell>
              <table:table-cell office:value-type="float" office:value="1600">
                <text:p>1600</text:p>
              </table:table-cell>
              <table:table-cell office:value-type="float" office:value="0.2370772">
                <text:p>0.23707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30.92529049373">
                <text:p>1430.92529049373</text:p>
              </table:table-cell>
              <table:table-cell office:value-type="float" office:value="26.5858212940398">
                <text:p>26.5858212940398</text:p>
              </table:table-cell>
              <table:table-cell office:value-type="float" office:value="1650">
                <text:p>1650</text:p>
              </table:table-cell>
              <table:table-cell office:value-type="float" office:value="38.84187">
                <text:p>38.84187</text:p>
              </table:table-cell>
              <table:table-cell office:value-type="float" office:value="1650">
                <text:p>1650</text:p>
              </table:table-cell>
              <table:table-cell office:value-type="float" office:value="1.084829">
                <text:p>1.084829</text:p>
              </table:table-cell>
              <table:table-cell office:value-type="float" office:value="1650">
                <text:p>1650</text:p>
              </table:table-cell>
              <table:table-cell office:value-type="float" office:value="30.82126">
                <text:p>30.82126</text:p>
              </table:table-cell>
              <table:table-cell office:value-type="float" office:value="1650">
                <text:p>1650</text:p>
              </table:table-cell>
              <table:table-cell office:value-type="float" office:value="2.198939">
                <text:p>2.198939</text:p>
              </table:table-cell>
              <table:table-cell office:value-type="float" office:value="1650">
                <text:p>1650</text:p>
              </table:table-cell>
              <table:table-cell office:value-type="float" office:value="4.492659">
                <text:p>4.492659</text:p>
              </table:table-cell>
              <table:table-cell office:value-type="float" office:value="1650">
                <text:p>1650</text:p>
              </table:table-cell>
              <table:table-cell office:value-type="float" office:value="0.2441807">
                <text:p>0.24418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97.4482041096">
                <text:p>1497.4482041096</text:p>
              </table:table-cell>
              <table:table-cell office:value-type="float" office:value="27.0847871806755">
                <text:p>27.0847871806755</text:p>
              </table:table-cell>
              <table:table-cell office:value-type="float" office:value="1700">
                <text:p>1700</text:p>
              </table:table-cell>
              <table:table-cell office:value-type="float" office:value="39.96062">
                <text:p>39.96062</text:p>
              </table:table-cell>
              <table:table-cell office:value-type="float" office:value="1700">
                <text:p>1700</text:p>
              </table:table-cell>
              <table:table-cell office:value-type="float" office:value="1.101162">
                <text:p>1.101162</text:p>
              </table:table-cell>
              <table:table-cell office:value-type="float" office:value="1700">
                <text:p>1700</text:p>
              </table:table-cell>
              <table:table-cell office:value-type="float" office:value="31.74541">
                <text:p>31.74541</text:p>
              </table:table-cell>
              <table:table-cell office:value-type="float" office:value="1700">
                <text:p>1700</text:p>
              </table:table-cell>
              <table:table-cell office:value-type="float" office:value="2.224478">
                <text:p>2.224478</text:p>
              </table:table-cell>
              <table:table-cell office:value-type="float" office:value="1700">
                <text:p>1700</text:p>
              </table:table-cell>
              <table:table-cell office:value-type="float" office:value="4.638021">
                <text:p>4.638021</text:p>
              </table:table-cell>
              <table:table-cell office:value-type="float" office:value="1700">
                <text:p>1700</text:p>
              </table:table-cell>
              <table:table-cell office:value-type="float" office:value="0.2515567">
                <text:p>0.25155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6.44065539522">
                <text:p>1566.44065539522</text:p>
              </table:table-cell>
              <table:table-cell office:value-type="float" office:value="27.2980020407078">
                <text:p>27.2980020407078</text:p>
              </table:table-cell>
              <table:table-cell office:value-type="float" office:value="1750">
                <text:p>1750</text:p>
              </table:table-cell>
              <table:table-cell office:value-type="float" office:value="41.08304">
                <text:p>41.08304</text:p>
              </table:table-cell>
              <table:table-cell office:value-type="float" office:value="1750">
                <text:p>1750</text:p>
              </table:table-cell>
              <table:table-cell office:value-type="float" office:value="1.117707">
                <text:p>1.117707</text:p>
              </table:table-cell>
              <table:table-cell office:value-type="float" office:value="1750">
                <text:p>1750</text:p>
              </table:table-cell>
              <table:table-cell office:value-type="float" office:value="32.67256">
                <text:p>32.67256</text:p>
              </table:table-cell>
              <table:table-cell office:value-type="float" office:value="1750">
                <text:p>1750</text:p>
              </table:table-cell>
              <table:table-cell office:value-type="float" office:value="2.250707">
                <text:p>2.250707</text:p>
              </table:table-cell>
              <table:table-cell office:value-type="float" office:value="1750">
                <text:p>1750</text:p>
              </table:table-cell>
              <table:table-cell office:value-type="float" office:value="4.783233">
                <text:p>4.783233</text:p>
              </table:table-cell>
              <table:table-cell office:value-type="float" office:value="1750">
                <text:p>1750</text:p>
              </table:table-cell>
              <table:table-cell office:value-type="float" office:value="0.2588355">
                <text:p>0.2588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34.1940716435">
                <text:p>1634.1940716435</text:p>
              </table:table-cell>
              <table:table-cell office:value-type="float" office:value="27.7216509650327">
                <text:p>27.7216509650327</text:p>
              </table:table-cell>
              <table:table-cell office:value-type="float" office:value="1800">
                <text:p>1800</text:p>
              </table:table-cell>
              <table:table-cell office:value-type="float" office:value="42.21081">
                <text:p>42.21081</text:p>
              </table:table-cell>
              <table:table-cell office:value-type="float" office:value="1800">
                <text:p>1800</text:p>
              </table:table-cell>
              <table:table-cell office:value-type="float" office:value="1.134891">
                <text:p>1.134891</text:p>
              </table:table-cell>
              <table:table-cell office:value-type="float" office:value="1800">
                <text:p>1800</text:p>
              </table:table-cell>
              <table:table-cell office:value-type="float" office:value="33.60353">
                <text:p>33.60353</text:p>
              </table:table-cell>
              <table:table-cell office:value-type="float" office:value="1800">
                <text:p>1800</text:p>
              </table:table-cell>
              <table:table-cell office:value-type="float" office:value="2.277495">
                <text:p>2.277495</text:p>
              </table:table-cell>
              <table:table-cell office:value-type="float" office:value="1800">
                <text:p>1800</text:p>
              </table:table-cell>
              <table:table-cell office:value-type="float" office:value="4.928186">
                <text:p>4.928186</text:p>
              </table:table-cell>
              <table:table-cell office:value-type="float" office:value="1800">
                <text:p>1800</text:p>
              </table:table-cell>
              <table:table-cell office:value-type="float" office:value="0.2667023">
                <text:p>0.26670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01.94804435297">
                <text:p>1701.94804435297</text:p>
              </table:table-cell>
              <table:table-cell office:value-type="float" office:value="28.0583859418939">
                <text:p>28.0583859418939</text:p>
              </table:table-cell>
              <table:table-cell office:value-type="float" office:value="1850">
                <text:p>1850</text:p>
              </table:table-cell>
              <table:table-cell office:value-type="float" office:value="43.34531">
                <text:p>43.34531</text:p>
              </table:table-cell>
              <table:table-cell office:value-type="float" office:value="1850">
                <text:p>1850</text:p>
              </table:table-cell>
              <table:table-cell office:value-type="float" office:value="1.152606">
                <text:p>1.152606</text:p>
              </table:table-cell>
              <table:table-cell office:value-type="float" office:value="1850">
                <text:p>1850</text:p>
              </table:table-cell>
              <table:table-cell office:value-type="float" office:value="34.5389">
                <text:p>34.5389</text:p>
              </table:table-cell>
              <table:table-cell office:value-type="float" office:value="1850">
                <text:p>1850</text:p>
              </table:table-cell>
              <table:table-cell office:value-type="float" office:value="2.305527">
                <text:p>2.305527</text:p>
              </table:table-cell>
              <table:table-cell office:value-type="float" office:value="1850">
                <text:p>1850</text:p>
              </table:table-cell>
              <table:table-cell office:value-type="float" office:value="5.07313">
                <text:p>5.07313</text:p>
              </table:table-cell>
              <table:table-cell office:value-type="float" office:value="1850">
                <text:p>1850</text:p>
              </table:table-cell>
              <table:table-cell office:value-type="float" office:value="0.2751511">
                <text:p>0.27515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69.69737988584">
                <text:p>1769.69737988584</text:p>
              </table:table-cell>
              <table:table-cell office:value-type="float" office:value="28.5464129700797">
                <text:p>28.5464129700797</text:p>
              </table:table-cell>
              <table:table-cell office:value-type="float" office:value="1900">
                <text:p>1900</text:p>
              </table:table-cell>
              <table:table-cell office:value-type="float" office:value="44.48647">
                <text:p>44.48647</text:p>
              </table:table-cell>
              <table:table-cell office:value-type="float" office:value="1900">
                <text:p>1900</text:p>
              </table:table-cell>
              <table:table-cell office:value-type="float" office:value="1.171216">
                <text:p>1.171216</text:p>
              </table:table-cell>
              <table:table-cell office:value-type="float" office:value="1900">
                <text:p>1900</text:p>
              </table:table-cell>
              <table:table-cell office:value-type="float" office:value="35.47817">
                <text:p>35.47817</text:p>
              </table:table-cell>
              <table:table-cell office:value-type="float" office:value="1900">
                <text:p>1900</text:p>
              </table:table-cell>
              <table:table-cell office:value-type="float" office:value="2.334847">
                <text:p>2.334847</text:p>
              </table:table-cell>
              <table:table-cell office:value-type="float" office:value="1900">
                <text:p>1900</text:p>
              </table:table-cell>
              <table:table-cell office:value-type="float" office:value="5.218081">
                <text:p>5.218081</text:p>
              </table:table-cell>
              <table:table-cell office:value-type="float" office:value="1900">
                <text:p>1900</text:p>
              </table:table-cell>
              <table:table-cell office:value-type="float" office:value="0.2841527">
                <text:p>0.28415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37.44727187991">
                <text:p>1837.44727187991</text:p>
              </table:table-cell>
              <table:table-cell office:value-type="float" office:value="28.959947712211">
                <text:p>28.959947712211</text:p>
              </table:table-cell>
              <table:table-cell office:value-type="float" office:value="1950">
                <text:p>1950</text:p>
              </table:table-cell>
              <table:table-cell office:value-type="float" office:value="45.63172">
                <text:p>45.63172</text:p>
              </table:table-cell>
              <table:table-cell office:value-type="float" office:value="1950">
                <text:p>1950</text:p>
              </table:table-cell>
              <table:table-cell office:value-type="float" office:value="1.189403">
                <text:p>1.189403</text:p>
              </table:table-cell>
              <table:table-cell office:value-type="float" office:value="1950">
                <text:p>1950</text:p>
              </table:table-cell>
              <table:table-cell office:value-type="float" office:value="36.42131">
                <text:p>36.42131</text:p>
              </table:table-cell>
              <table:table-cell office:value-type="float" office:value="1950">
                <text:p>1950</text:p>
              </table:table-cell>
              <table:table-cell office:value-type="float" office:value="2.364666">
                <text:p>2.364666</text:p>
              </table:table-cell>
              <table:table-cell office:value-type="float" office:value="1950">
                <text:p>1950</text:p>
              </table:table-cell>
              <table:table-cell office:value-type="float" office:value="5.363261">
                <text:p>5.363261</text:p>
              </table:table-cell>
              <table:table-cell office:value-type="float" office:value="1950">
                <text:p>1950</text:p>
              </table:table-cell>
              <table:table-cell office:value-type="float" office:value="0.2930856">
                <text:p>0.29308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05.19734936104">
                <text:p>1905.19734936104</text:p>
              </table:table-cell>
              <table:table-cell office:value-type="float" office:value="29.3146446829553">
                <text:p>29.3146446829553</text:p>
              </table:table-cell>
              <table:table-cell office:value-type="float" office:value="2000">
                <text:p>2000</text:p>
              </table:table-cell>
              <table:table-cell office:value-type="float" office:value="46.78339">
                <text:p>46.78339</text:p>
              </table:table-cell>
              <table:table-cell office:value-type="float" office:value="2000">
                <text:p>2000</text:p>
              </table:table-cell>
              <table:table-cell office:value-type="float" office:value="1.208562">
                <text:p>1.208562</text:p>
              </table:table-cell>
              <table:table-cell office:value-type="float" office:value="2000">
                <text:p>2000</text:p>
              </table:table-cell>
              <table:table-cell office:value-type="float" office:value="37.36854">
                <text:p>37.36854</text:p>
              </table:table-cell>
              <table:table-cell office:value-type="float" office:value="2000">
                <text:p>2000</text:p>
              </table:table-cell>
              <table:table-cell office:value-type="float" office:value="2.39534">
                <text:p>2.39534</text:p>
              </table:table-cell>
              <table:table-cell office:value-type="float" office:value="2000">
                <text:p>2000</text:p>
              </table:table-cell>
              <table:table-cell office:value-type="float" office:value="5.508669">
                <text:p>5.508669</text:p>
              </table:table-cell>
              <table:table-cell office:value-type="float" office:value="2000">
                <text:p>2000</text:p>
              </table:table-cell>
              <table:table-cell office:value-type="float" office:value="0.3022871">
                <text:p>0.30228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72.9370395666">
                <text:p>1972.9370395666</text:p>
              </table:table-cell>
              <table:table-cell office:value-type="float" office:value="30.1556280121483">
                <text:p>30.1556280121483</text:p>
              </table:table-cell>
              <table:table-cell office:value-type="float" office:value="2050">
                <text:p>2050</text:p>
              </table:table-cell>
              <table:table-cell office:value-type="float" office:value="47.93966">
                <text:p>47.93966</text:p>
              </table:table-cell>
              <table:table-cell office:value-type="float" office:value="2050">
                <text:p>2050</text:p>
              </table:table-cell>
              <table:table-cell office:value-type="float" office:value="1.228273">
                <text:p>1.228273</text:p>
              </table:table-cell>
              <table:table-cell office:value-type="float" office:value="2050">
                <text:p>2050</text:p>
              </table:table-cell>
              <table:table-cell office:value-type="float" office:value="38.31849">
                <text:p>38.31849</text:p>
              </table:table-cell>
              <table:table-cell office:value-type="float" office:value="2050">
                <text:p>2050</text:p>
              </table:table-cell>
              <table:table-cell office:value-type="float" office:value="2.426716">
                <text:p>2.426716</text:p>
              </table:table-cell>
              <table:table-cell office:value-type="float" office:value="2050">
                <text:p>2050</text:p>
              </table:table-cell>
              <table:table-cell office:value-type="float" office:value="5.654305">
                <text:p>5.654305</text:p>
              </table:table-cell>
              <table:table-cell office:value-type="float" office:value="2050">
                <text:p>2050</text:p>
              </table:table-cell>
              <table:table-cell office:value-type="float" office:value="0.3118785">
                <text:p>0.31187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40.68043951343">
                <text:p>2040.68043951343</text:p>
              </table:table-cell>
              <table:table-cell office:value-type="float" office:value="30.7846628889888">
                <text:p>30.7846628889888</text:p>
              </table:table-cell>
              <table:table-cell office:value-type="float" office:value="2100">
                <text:p>2100</text:p>
              </table:table-cell>
              <table:table-cell office:value-type="float" office:value="49.10165">
                <text:p>49.10165</text:p>
              </table:table-cell>
              <table:table-cell office:value-type="float" office:value="2100">
                <text:p>2100</text:p>
              </table:table-cell>
              <table:table-cell office:value-type="float" office:value="1.248147">
                <text:p>1.248147</text:p>
              </table:table-cell>
              <table:table-cell office:value-type="float" office:value="2100">
                <text:p>2100</text:p>
              </table:table-cell>
              <table:table-cell office:value-type="float" office:value="39.27299">
                <text:p>39.27299</text:p>
              </table:table-cell>
              <table:table-cell office:value-type="float" office:value="2100">
                <text:p>2100</text:p>
              </table:table-cell>
              <table:table-cell office:value-type="float" office:value="2.458828">
                <text:p>2.458828</text:p>
              </table:table-cell>
              <table:table-cell office:value-type="float" office:value="2100">
                <text:p>2100</text:p>
              </table:table-cell>
              <table:table-cell office:value-type="float" office:value="5.800081">
                <text:p>5.800081</text:p>
              </table:table-cell>
              <table:table-cell office:value-type="float" office:value="2100">
                <text:p>2100</text:p>
              </table:table-cell>
              <table:table-cell office:value-type="float" office:value="0.3216025">
                <text:p>0.32160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8.42346848614">
                <text:p>2108.42346848614</text:p>
              </table:table-cell>
              <table:table-cell office:value-type="float" office:value="31.4073454962004">
                <text:p>31.4073454962004</text:p>
              </table:table-cell>
              <table:table-cell office:value-type="float" office:value="2150">
                <text:p>2150</text:p>
              </table:table-cell>
              <table:table-cell office:value-type="float" office:value="50.26967">
                <text:p>50.26967</text:p>
              </table:table-cell>
              <table:table-cell office:value-type="float" office:value="2150">
                <text:p>2150</text:p>
              </table:table-cell>
              <table:table-cell office:value-type="float" office:value="1.268697">
                <text:p>1.268697</text:p>
              </table:table-cell>
              <table:table-cell office:value-type="float" office:value="2150">
                <text:p>2150</text:p>
              </table:table-cell>
              <table:table-cell office:value-type="float" office:value="40.23121">
                <text:p>40.23121</text:p>
              </table:table-cell>
              <table:table-cell office:value-type="float" office:value="2150">
                <text:p>2150</text:p>
              </table:table-cell>
              <table:table-cell office:value-type="float" office:value="2.491987">
                <text:p>2.491987</text:p>
              </table:table-cell>
              <table:table-cell office:value-type="float" office:value="2150">
                <text:p>2150</text:p>
              </table:table-cell>
              <table:table-cell office:value-type="float" office:value="5.946152">
                <text:p>5.946152</text:p>
              </table:table-cell>
              <table:table-cell office:value-type="float" office:value="2150">
                <text:p>2150</text:p>
              </table:table-cell>
              <table:table-cell office:value-type="float" office:value="0.3316201">
                <text:p>0.33162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76.16612648472">
                <text:p>2176.16612648472</text:p>
              </table:table-cell>
              <table:table-cell office:value-type="float" office:value="32.0256413160109">
                <text:p>32.0256413160109</text:p>
              </table:table-cell>
              <table:table-cell office:value-type="float" office:value="2200">
                <text:p>2200</text:p>
              </table:table-cell>
              <table:table-cell office:value-type="float" office:value="51.4423">
                <text:p>51.4423</text:p>
              </table:table-cell>
              <table:table-cell office:value-type="float" office:value="2200">
                <text:p>2200</text:p>
              </table:table-cell>
              <table:table-cell office:value-type="float" office:value="1.28862">
                <text:p>1.28862</text:p>
              </table:table-cell>
              <table:table-cell office:value-type="float" office:value="2200">
                <text:p>2200</text:p>
              </table:table-cell>
              <table:table-cell office:value-type="float" office:value="41.19303">
                <text:p>41.19303</text:p>
              </table:table-cell>
              <table:table-cell office:value-type="float" office:value="2200">
                <text:p>2200</text:p>
              </table:table-cell>
              <table:table-cell office:value-type="float" office:value="2.526026">
                <text:p>2.526026</text:p>
              </table:table-cell>
              <table:table-cell office:value-type="float" office:value="2200">
                <text:p>2200</text:p>
              </table:table-cell>
              <table:table-cell office:value-type="float" office:value="6.092708">
                <text:p>6.092708</text:p>
              </table:table-cell>
              <table:table-cell office:value-type="float" office:value="2200">
                <text:p>2200</text:p>
              </table:table-cell>
              <table:table-cell office:value-type="float" office:value="0.3419217">
                <text:p>0.34192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43.91267971163">
                <text:p>2243.91267971163</text:p>
              </table:table-cell>
              <table:table-cell office:value-type="float" office:value="32.3912346670095">
                <text:p>32.3912346670095</text:p>
              </table:table-cell>
              <table:table-cell office:value-type="float" office:value="2250">
                <text:p>2250</text:p>
              </table:table-cell>
              <table:table-cell office:value-type="float" office:value="52.62232">
                <text:p>52.62232</text:p>
              </table:table-cell>
              <table:table-cell office:value-type="float" office:value="2250">
                <text:p>2250</text:p>
              </table:table-cell>
              <table:table-cell office:value-type="float" office:value="1.310059">
                <text:p>1.310059</text:p>
              </table:table-cell>
              <table:table-cell office:value-type="float" office:value="2250">
                <text:p>2250</text:p>
              </table:table-cell>
              <table:table-cell office:value-type="float" office:value="42.15861">
                <text:p>42.15861</text:p>
              </table:table-cell>
              <table:table-cell office:value-type="float" office:value="2250">
                <text:p>2250</text:p>
              </table:table-cell>
              <table:table-cell office:value-type="float" office:value="2.561679">
                <text:p>2.561679</text:p>
              </table:table-cell>
              <table:table-cell office:value-type="float" office:value="2250">
                <text:p>2250</text:p>
              </table:table-cell>
              <table:table-cell office:value-type="float" office:value="6.239606">
                <text:p>6.239606</text:p>
              </table:table-cell>
              <table:table-cell office:value-type="float" office:value="2250">
                <text:p>2250</text:p>
              </table:table-cell>
              <table:table-cell office:value-type="float" office:value="0.3523743">
                <text:p>0.35237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11.65051504655">
                <text:p>2311.65051504655</text:p>
              </table:table-cell>
              <table:table-cell office:value-type="float" office:value="33.2457182453277">
                <text:p>33.2457182453277</text:p>
              </table:table-cell>
              <table:table-cell office:value-type="float" office:value="2300">
                <text:p>2300</text:p>
              </table:table-cell>
              <table:table-cell office:value-type="float" office:value="53.80854">
                <text:p>53.80854</text:p>
              </table:table-cell>
              <table:table-cell office:value-type="float" office:value="2300">
                <text:p>2300</text:p>
              </table:table-cell>
              <table:table-cell office:value-type="float" office:value="1.33242">
                <text:p>1.33242</text:p>
              </table:table-cell>
              <table:table-cell office:value-type="float" office:value="2300">
                <text:p>2300</text:p>
              </table:table-cell>
              <table:table-cell office:value-type="float" office:value="43.12798">
                <text:p>43.12798</text:p>
              </table:table-cell>
              <table:table-cell office:value-type="float" office:value="2300">
                <text:p>2300</text:p>
              </table:table-cell>
              <table:table-cell office:value-type="float" office:value="2.59847">
                <text:p>2.59847</text:p>
              </table:table-cell>
              <table:table-cell office:value-type="float" office:value="2300">
                <text:p>2300</text:p>
              </table:table-cell>
              <table:table-cell office:value-type="float" office:value="6.386592">
                <text:p>6.386592</text:p>
              </table:table-cell>
              <table:table-cell office:value-type="float" office:value="2300">
                <text:p>2300</text:p>
              </table:table-cell>
              <table:table-cell office:value-type="float" office:value="0.3630825">
                <text:p>0.36308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79.39206012275">
                <text:p>2379.39206012275</text:p>
              </table:table-cell>
              <table:table-cell office:value-type="float" office:value="33.8623053979982">
                <text:p>33.8623053979982</text:p>
              </table:table-cell>
              <table:table-cell office:value-type="float" office:value="2350">
                <text:p>2350</text:p>
              </table:table-cell>
              <table:table-cell office:value-type="float" office:value="54.99919">
                <text:p>54.99919</text:p>
              </table:table-cell>
              <table:table-cell office:value-type="float" office:value="2350">
                <text:p>2350</text:p>
              </table:table-cell>
              <table:table-cell office:value-type="float" office:value="1.354941">
                <text:p>1.354941</text:p>
              </table:table-cell>
              <table:table-cell office:value-type="float" office:value="2350">
                <text:p>2350</text:p>
              </table:table-cell>
              <table:table-cell office:value-type="float" office:value="44.10109">
                <text:p>44.10109</text:p>
              </table:table-cell>
              <table:table-cell office:value-type="float" office:value="2350">
                <text:p>2350</text:p>
              </table:table-cell>
              <table:table-cell office:value-type="float" office:value="2.635863">
                <text:p>2.635863</text:p>
              </table:table-cell>
              <table:table-cell office:value-type="float" office:value="2350">
                <text:p>2350</text:p>
              </table:table-cell>
              <table:table-cell office:value-type="float" office:value="6.533184">
                <text:p>6.533184</text:p>
              </table:table-cell>
              <table:table-cell office:value-type="float" office:value="2350">
                <text:p>2350</text:p>
              </table:table-cell>
              <table:table-cell office:value-type="float" office:value="0.3741179">
                <text:p>0.37411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47.13583104371">
                <text:p>2447.13583104371</text:p>
              </table:table-cell>
              <table:table-cell office:value-type="float" office:value="34.3163487974521">
                <text:p>34.3163487974521</text:p>
              </table:table-cell>
              <table:table-cell office:value-type="float" office:value="2400">
                <text:p>2400</text:p>
              </table:table-cell>
              <table:table-cell office:value-type="float" office:value="56.19543">
                <text:p>56.19543</text:p>
              </table:table-cell>
              <table:table-cell office:value-type="float" office:value="2400">
                <text:p>2400</text:p>
              </table:table-cell>
              <table:table-cell office:value-type="float" office:value="1.378211">
                <text:p>1.378211</text:p>
              </table:table-cell>
              <table:table-cell office:value-type="float" office:value="2400">
                <text:p>2400</text:p>
              </table:table-cell>
              <table:table-cell office:value-type="float" office:value="45.0789">
                <text:p>45.0789</text:p>
              </table:table-cell>
              <table:table-cell office:value-type="float" office:value="2400">
                <text:p>2400</text:p>
              </table:table-cell>
              <table:table-cell office:value-type="float" office:value="2.673529">
                <text:p>2.673529</text:p>
              </table:table-cell>
              <table:table-cell office:value-type="float" office:value="2400">
                <text:p>2400</text:p>
              </table:table-cell>
              <table:table-cell office:value-type="float" office:value="6.679446">
                <text:p>6.679446</text:p>
              </table:table-cell>
              <table:table-cell office:value-type="float" office:value="2400">
                <text:p>2400</text:p>
              </table:table-cell>
              <table:table-cell office:value-type="float" office:value="0.3853497">
                <text:p>0.38534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14.87236796918">
                <text:p>2514.87236796918</text:p>
              </table:table-cell>
              <table:table-cell office:value-type="float" office:value="35.2174737284768">
                <text:p>35.2174737284768</text:p>
              </table:table-cell>
              <table:table-cell office:value-type="float" office:value="2450">
                <text:p>2450</text:p>
              </table:table-cell>
              <table:table-cell office:value-type="float" office:value="57.41151">
                <text:p>57.41151</text:p>
              </table:table-cell>
              <table:table-cell office:value-type="float" office:value="2450">
                <text:p>2450</text:p>
              </table:table-cell>
              <table:table-cell office:value-type="float" office:value="1.401547">
                <text:p>1.401547</text:p>
              </table:table-cell>
              <table:table-cell office:value-type="float" office:value="2450">
                <text:p>2450</text:p>
              </table:table-cell>
              <table:table-cell office:value-type="float" office:value="46.07444">
                <text:p>46.07444</text:p>
              </table:table-cell>
              <table:table-cell office:value-type="float" office:value="2450">
                <text:p>2450</text:p>
              </table:table-cell>
              <table:table-cell office:value-type="float" office:value="2.711856">
                <text:p>2.711856</text:p>
              </table:table-cell>
              <table:table-cell office:value-type="float" office:value="2450">
                <text:p>2450</text:p>
              </table:table-cell>
              <table:table-cell office:value-type="float" office:value="6.826704">
                <text:p>6.826704</text:p>
              </table:table-cell>
              <table:table-cell office:value-type="float" office:value="2450">
                <text:p>2450</text:p>
              </table:table-cell>
              <table:table-cell office:value-type="float" office:value="0.396964">
                <text:p>0.3969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82.61502596776">
                <text:p>2582.61502596776</text:p>
              </table:table-cell>
              <table:table-cell office:value-type="float" office:value="35.703135916302">
                <text:p>35.703135916302</text:p>
              </table:table-cell>
              <table:table-cell office:value-type="float" office:value="2500">
                <text:p>2500</text:p>
              </table:table-cell>
              <table:table-cell office:value-type="float" office:value="58.61597">
                <text:p>58.61597</text:p>
              </table:table-cell>
              <table:table-cell office:value-type="float" office:value="2500">
                <text:p>2500</text:p>
              </table:table-cell>
              <table:table-cell office:value-type="float" office:value="1.424706">
                <text:p>1.424706</text:p>
              </table:table-cell>
              <table:table-cell office:value-type="float" office:value="2500">
                <text:p>2500</text:p>
              </table:table-cell>
              <table:table-cell office:value-type="float" office:value="47.05825">
                <text:p>47.05825</text:p>
              </table:table-cell>
              <table:table-cell office:value-type="float" office:value="2500">
                <text:p>2500</text:p>
              </table:table-cell>
              <table:table-cell office:value-type="float" office:value="2.751135">
                <text:p>2.751135</text:p>
              </table:table-cell>
              <table:table-cell office:value-type="float" office:value="2500">
                <text:p>2500</text:p>
              </table:table-cell>
              <table:table-cell office:value-type="float" office:value="6.973126">
                <text:p>6.973126</text:p>
              </table:table-cell>
              <table:table-cell office:value-type="float" office:value="2500">
                <text:p>2500</text:p>
              </table:table-cell>
              <table:table-cell office:value-type="float" office:value="0.4087554">
                <text:p>0.40875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0.353788738">
                <text:p>2650.353788738</text:p>
              </table:table-cell>
              <table:table-cell office:value-type="float" office:value="36.4341758079117">
                <text:p>36.4341758079117</text:p>
              </table:table-cell>
              <table:table-cell office:value-type="float" office:value="2550">
                <text:p>2550</text:p>
              </table:table-cell>
              <table:table-cell office:value-type="float" office:value="59.82304">
                <text:p>59.82304</text:p>
              </table:table-cell>
              <table:table-cell office:value-type="float" office:value="2550">
                <text:p>2550</text:p>
              </table:table-cell>
              <table:table-cell office:value-type="float" office:value="1.449158">
                <text:p>1.449158</text:p>
              </table:table-cell>
              <table:table-cell office:value-type="float" office:value="2550">
                <text:p>2550</text:p>
              </table:table-cell>
              <table:table-cell office:value-type="float" office:value="48.04215">
                <text:p>48.04215</text:p>
              </table:table-cell>
              <table:table-cell office:value-type="float" office:value="2550">
                <text:p>2550</text:p>
              </table:table-cell>
              <table:table-cell office:value-type="float" office:value="2.79158">
                <text:p>2.79158</text:p>
              </table:table-cell>
              <table:table-cell office:value-type="float" office:value="2550">
                <text:p>2550</text:p>
              </table:table-cell>
              <table:table-cell office:value-type="float" office:value="7.1194">
                <text:p>7.1194</text:p>
              </table:table-cell>
              <table:table-cell office:value-type="float" office:value="2550">
                <text:p>2550</text:p>
              </table:table-cell>
              <table:table-cell office:value-type="float" office:value="0.4207572">
                <text:p>0.42075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18.0912530988">
                <text:p>2718.0912530988</text:p>
              </table:table-cell>
              <table:table-cell office:value-type="float" office:value="37.2468753825619">
                <text:p>37.2468753825619</text:p>
              </table:table-cell>
              <table:table-cell office:value-type="float" office:value="2600">
                <text:p>2600</text:p>
              </table:table-cell>
              <table:table-cell office:value-type="float" office:value="61.03838">
                <text:p>61.03838</text:p>
              </table:table-cell>
              <table:table-cell office:value-type="float" office:value="2600">
                <text:p>2600</text:p>
              </table:table-cell>
              <table:table-cell office:value-type="float" office:value="1.473356">
                <text:p>1.473356</text:p>
              </table:table-cell>
              <table:table-cell office:value-type="float" office:value="2600">
                <text:p>2600</text:p>
              </table:table-cell>
              <table:table-cell office:value-type="float" office:value="49.03154">
                <text:p>49.03154</text:p>
              </table:table-cell>
              <table:table-cell office:value-type="float" office:value="2600">
                <text:p>2600</text:p>
              </table:table-cell>
              <table:table-cell office:value-type="float" office:value="2.835067">
                <text:p>2.835067</text:p>
              </table:table-cell>
              <table:table-cell office:value-type="float" office:value="2600">
                <text:p>2600</text:p>
              </table:table-cell>
              <table:table-cell office:value-type="float" office:value="7.265423">
                <text:p>7.265423</text:p>
              </table:table-cell>
              <table:table-cell office:value-type="float" office:value="2600">
                <text:p>2600</text:p>
              </table:table-cell>
              <table:table-cell office:value-type="float" office:value="0.4329917">
                <text:p>0.43299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85.83261268793">
                <text:p>2785.83261268793</text:p>
              </table:table-cell>
              <table:table-cell office:value-type="float" office:value="37.7704519837657">
                <text:p>37.7704519837657</text:p>
              </table:table-cell>
              <table:table-cell office:value-type="float" office:value="2650">
                <text:p>2650</text:p>
              </table:table-cell>
              <table:table-cell office:value-type="float" office:value="62.25818">
                <text:p>62.25818</text:p>
              </table:table-cell>
              <table:table-cell office:value-type="float" office:value="2650">
                <text:p>2650</text:p>
              </table:table-cell>
              <table:table-cell office:value-type="float" office:value="1.498255">
                <text:p>1.498255</text:p>
              </table:table-cell>
              <table:table-cell office:value-type="float" office:value="2650">
                <text:p>2650</text:p>
              </table:table-cell>
              <table:table-cell office:value-type="float" office:value="50.02537">
                <text:p>50.02537</text:p>
              </table:table-cell>
              <table:table-cell office:value-type="float" office:value="2650">
                <text:p>2650</text:p>
              </table:table-cell>
              <table:table-cell office:value-type="float" office:value="2.877354">
                <text:p>2.877354</text:p>
              </table:table-cell>
              <table:table-cell office:value-type="float" office:value="2650">
                <text:p>2650</text:p>
              </table:table-cell>
              <table:table-cell office:value-type="float" office:value="7.41181">
                <text:p>7.41181</text:p>
              </table:table-cell>
              <table:table-cell office:value-type="float" office:value="2650">
                <text:p>2650</text:p>
              </table:table-cell>
              <table:table-cell office:value-type="float" office:value="0.4453904">
                <text:p>0.44539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53.56636730744">
                <text:p>2853.56636730744</text:p>
              </table:table-cell>
              <table:table-cell office:value-type="float" office:value="38.840775439653">
                <text:p>38.840775439653</text:p>
              </table:table-cell>
              <table:table-cell office:value-type="float" office:value="2700">
                <text:p>2700</text:p>
              </table:table-cell>
              <table:table-cell office:value-type="float" office:value="63.48328">
                <text:p>63.48328</text:p>
              </table:table-cell>
              <table:table-cell office:value-type="float" office:value="2700">
                <text:p>2700</text:p>
              </table:table-cell>
              <table:table-cell office:value-type="float" office:value="1.522437">
                <text:p>1.522437</text:p>
              </table:table-cell>
              <table:table-cell office:value-type="float" office:value="2700">
                <text:p>2700</text:p>
              </table:table-cell>
              <table:table-cell office:value-type="float" office:value="51.0237">
                <text:p>51.0237</text:p>
              </table:table-cell>
              <table:table-cell office:value-type="float" office:value="2700">
                <text:p>2700</text:p>
              </table:table-cell>
              <table:table-cell office:value-type="float" office:value="2.920433">
                <text:p>2.920433</text:p>
              </table:table-cell>
              <table:table-cell office:value-type="float" office:value="2700">
                <text:p>2700</text:p>
              </table:table-cell>
              <table:table-cell office:value-type="float" office:value="7.558595">
                <text:p>7.558595</text:p>
              </table:table-cell>
              <table:table-cell office:value-type="float" office:value="2700">
                <text:p>2700</text:p>
              </table:table-cell>
              <table:table-cell office:value-type="float" office:value="0.4581134">
                <text:p>0.45811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12.06676137903">
                <text:p>2912.06676137903</text:p>
              </table:table-cell>
              <table:table-cell office:value-type="float" office:value="39.5383393862267">
                <text:p>39.5383393862267</text:p>
              </table:table-cell>
              <table:table-cell office:value-type="float" office:value="2750">
                <text:p>2750</text:p>
              </table:table-cell>
              <table:table-cell office:value-type="float" office:value="64.71601">
                <text:p>64.71601</text:p>
              </table:table-cell>
              <table:table-cell office:value-type="float" office:value="2750">
                <text:p>2750</text:p>
              </table:table-cell>
              <table:table-cell office:value-type="float" office:value="1.547054">
                <text:p>1.547054</text:p>
              </table:table-cell>
              <table:table-cell office:value-type="float" office:value="2750">
                <text:p>2750</text:p>
              </table:table-cell>
              <table:table-cell office:value-type="float" office:value="52.02725">
                <text:p>52.02725</text:p>
              </table:table-cell>
              <table:table-cell office:value-type="float" office:value="2750">
                <text:p>2750</text:p>
              </table:table-cell>
              <table:table-cell office:value-type="float" office:value="2.964706">
                <text:p>2.964706</text:p>
              </table:table-cell>
              <table:table-cell office:value-type="float" office:value="2750">
                <text:p>2750</text:p>
              </table:table-cell>
              <table:table-cell office:value-type="float" office:value="7.705842">
                <text:p>7.705842</text:p>
              </table:table-cell>
              <table:table-cell office:value-type="float" office:value="2750">
                <text:p>2750</text:p>
              </table:table-cell>
              <table:table-cell office:value-type="float" office:value="0.4711655">
                <text:p>0.47116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79.81301318947">
                <text:p>2979.81301318947</text:p>
              </table:table-cell>
              <table:table-cell office:value-type="float" office:value="39.6449998308958">
                <text:p>39.6449998308958</text:p>
              </table:table-cell>
              <table:table-cell office:value-type="float" office:value="2800">
                <text:p>2800</text:p>
              </table:table-cell>
              <table:table-cell office:value-type="float" office:value="65.96754">
                <text:p>65.96754</text:p>
              </table:table-cell>
              <table:table-cell office:value-type="float" office:value="2800">
                <text:p>2800</text:p>
              </table:table-cell>
              <table:table-cell office:value-type="float" office:value="1.575702">
                <text:p>1.575702</text:p>
              </table:table-cell>
              <table:table-cell office:value-type="float" office:value="2800">
                <text:p>2800</text:p>
              </table:table-cell>
              <table:table-cell office:value-type="float" office:value="53.04349">
                <text:p>53.04349</text:p>
              </table:table-cell>
              <table:table-cell office:value-type="float" office:value="2800">
                <text:p>2800</text:p>
              </table:table-cell>
              <table:table-cell office:value-type="float" office:value="3.009865">
                <text:p>3.009865</text:p>
              </table:table-cell>
              <table:table-cell office:value-type="float" office:value="2800">
                <text:p>2800</text:p>
              </table:table-cell>
              <table:table-cell office:value-type="float" office:value="7.854009">
                <text:p>7.854009</text:p>
              </table:table-cell>
              <table:table-cell office:value-type="float" office:value="2800">
                <text:p>2800</text:p>
              </table:table-cell>
              <table:table-cell office:value-type="float" office:value="0.4844731">
                <text:p>0.48447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61.47542314604">
                <text:p>3161.47542314604</text:p>
              </table:table-cell>
              <table:table-cell office:value-type="float" office:value="41.4579954771166">
                <text:p>41.4579954771166</text:p>
              </table:table-cell>
              <table:table-cell office:value-type="float" office:value="2850">
                <text:p>2850</text:p>
              </table:table-cell>
              <table:table-cell office:value-type="float" office:value="67.21154">
                <text:p>67.21154</text:p>
              </table:table-cell>
              <table:table-cell office:value-type="float" office:value="2850">
                <text:p>2850</text:p>
              </table:table-cell>
              <table:table-cell office:value-type="float" office:value="1.60315">
                <text:p>1.60315</text:p>
              </table:table-cell>
              <table:table-cell office:value-type="float" office:value="2850">
                <text:p>2850</text:p>
              </table:table-cell>
              <table:table-cell office:value-type="float" office:value="54.0524">
                <text:p>54.0524</text:p>
              </table:table-cell>
              <table:table-cell office:value-type="float" office:value="2850">
                <text:p>2850</text:p>
              </table:table-cell>
              <table:table-cell office:value-type="float" office:value="3.056224">
                <text:p>3.056224</text:p>
              </table:table-cell>
              <table:table-cell office:value-type="float" office:value="2850">
                <text:p>2850</text:p>
              </table:table-cell>
              <table:table-cell office:value-type="float" office:value="8.001748">
                <text:p>8.001748</text:p>
              </table:table-cell>
              <table:table-cell office:value-type="float" office:value="2850">
                <text:p>2850</text:p>
              </table:table-cell>
              <table:table-cell office:value-type="float" office:value="0.4980226">
                <text:p>0.49802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43.13083759048">
                <text:p>3343.13083759048</text:p>
              </table:table-cell>
              <table:table-cell office:value-type="float" office:value="43.8115429268323">
                <text:p>43.8115429268323</text:p>
              </table:table-cell>
              <table:table-cell office:value-type="float" office:value="2900">
                <text:p>2900</text:p>
              </table:table-cell>
              <table:table-cell office:value-type="float" office:value="68.45813">
                <text:p>68.45813</text:p>
              </table:table-cell>
              <table:table-cell office:value-type="float" office:value="2900">
                <text:p>2900</text:p>
              </table:table-cell>
              <table:table-cell office:value-type="float" office:value="1.628568">
                <text:p>1.628568</text:p>
              </table:table-cell>
              <table:table-cell office:value-type="float" office:value="2900">
                <text:p>2900</text:p>
              </table:table-cell>
              <table:table-cell office:value-type="float" office:value="55.06468">
                <text:p>55.06468</text:p>
              </table:table-cell>
              <table:table-cell office:value-type="float" office:value="2900">
                <text:p>2900</text:p>
              </table:table-cell>
              <table:table-cell office:value-type="float" office:value="3.10341">
                <text:p>3.10341</text:p>
              </table:table-cell>
              <table:table-cell office:value-type="float" office:value="2900">
                <text:p>2900</text:p>
              </table:table-cell>
              <table:table-cell office:value-type="float" office:value="8.14969">
                <text:p>8.14969</text:p>
              </table:table-cell>
              <table:table-cell office:value-type="float" office:value="2900">
                <text:p>2900</text:p>
              </table:table-cell>
              <table:table-cell office:value-type="float" office:value="0.5117851">
                <text:p>0.51178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24.78355584796">
                <text:p>3524.78355584796</text:p>
              </table:table-cell>
              <table:table-cell office:value-type="float" office:value="46.4098067638683">
                <text:p>46.4098067638683</text:p>
              </table:table-cell>
              <table:table-cell office:value-type="float" office:value="2950">
                <text:p>2950</text:p>
              </table:table-cell>
              <table:table-cell office:value-type="float" office:value="69.71635">
                <text:p>69.71635</text:p>
              </table:table-cell>
              <table:table-cell office:value-type="float" office:value="2950">
                <text:p>2950</text:p>
              </table:table-cell>
              <table:table-cell office:value-type="float" office:value="1.657564">
                <text:p>1.657564</text:p>
              </table:table-cell>
              <table:table-cell office:value-type="float" office:value="2950">
                <text:p>2950</text:p>
              </table:table-cell>
              <table:table-cell office:value-type="float" office:value="56.08129">
                <text:p>56.08129</text:p>
              </table:table-cell>
              <table:table-cell office:value-type="float" office:value="2950">
                <text:p>2950</text:p>
              </table:table-cell>
              <table:table-cell office:value-type="float" office:value="3.153789">
                <text:p>3.153789</text:p>
              </table:table-cell>
              <table:table-cell office:value-type="float" office:value="2950">
                <text:p>2950</text:p>
              </table:table-cell>
              <table:table-cell office:value-type="float" office:value="8.297817">
                <text:p>8.297817</text:p>
              </table:table-cell>
              <table:table-cell office:value-type="float" office:value="2950">
                <text:p>2950</text:p>
              </table:table-cell>
              <table:table-cell office:value-type="float" office:value="0.5258937">
                <text:p>0.52589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09.509963678">
                <text:p>3709.509963678</text:p>
              </table:table-cell>
              <table:table-cell office:value-type="float" office:value="49.5754340943408">
                <text:p>49.5754340943408</text:p>
              </table:table-cell>
              <table:table-cell office:value-type="float" office:value="3000">
                <text:p>3000</text:p>
              </table:table-cell>
              <table:table-cell office:value-type="float" office:value="70.97679">
                <text:p>70.97679</text:p>
              </table:table-cell>
              <table:table-cell office:value-type="float" office:value="3000">
                <text:p>3000</text:p>
              </table:table-cell>
              <table:table-cell office:value-type="float" office:value="1.686935">
                <text:p>1.686935</text:p>
              </table:table-cell>
              <table:table-cell office:value-type="float" office:value="3000">
                <text:p>3000</text:p>
              </table:table-cell>
              <table:table-cell office:value-type="float" office:value="57.10065">
                <text:p>57.10065</text:p>
              </table:table-cell>
              <table:table-cell office:value-type="float" office:value="3000">
                <text:p>3000</text:p>
              </table:table-cell>
              <table:table-cell office:value-type="float" office:value="3.203068">
                <text:p>3.203068</text:p>
              </table:table-cell>
              <table:table-cell office:value-type="float" office:value="3000">
                <text:p>3000</text:p>
              </table:table-cell>
              <table:table-cell office:value-type="float" office:value="8.445956">
                <text:p>8.445956</text:p>
              </table:table-cell>
              <table:table-cell office:value-type="float" office:value="3000">
                <text:p>3000</text:p>
              </table:table-cell>
              <table:table-cell office:value-type="float" office:value="0.5401844">
                <text:p>0.54018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08.02251422593">
                <text:p>3808.02251422593</text:p>
              </table:table-cell>
              <table:table-cell office:value-type="float" office:value="52.1087833889656">
                <text:p>52.1087833889656</text:p>
              </table:table-cell>
              <table:table-cell office:value-type="float" office:value="3050">
                <text:p>3050</text:p>
              </table:table-cell>
              <table:table-cell office:value-type="float" office:value="72.24577">
                <text:p>72.24577</text:p>
              </table:table-cell>
              <table:table-cell office:value-type="float" office:value="3050">
                <text:p>3050</text:p>
              </table:table-cell>
              <table:table-cell office:value-type="float" office:value="1.718867">
                <text:p>1.718867</text:p>
              </table:table-cell>
              <table:table-cell office:value-type="float" office:value="3050">
                <text:p>3050</text:p>
              </table:table-cell>
              <table:table-cell office:value-type="float" office:value="58.12434">
                <text:p>58.12434</text:p>
              </table:table-cell>
              <table:table-cell office:value-type="float" office:value="3050">
                <text:p>3050</text:p>
              </table:table-cell>
              <table:table-cell office:value-type="float" office:value="3.253419">
                <text:p>3.253419</text:p>
              </table:table-cell>
              <table:table-cell office:value-type="float" office:value="3050">
                <text:p>3050</text:p>
              </table:table-cell>
              <table:table-cell office:value-type="float" office:value="8.594412">
                <text:p>8.594412</text:p>
              </table:table-cell>
              <table:table-cell office:value-type="float" office:value="3050">
                <text:p>3050</text:p>
              </table:table-cell>
              <table:table-cell office:value-type="float" office:value="0.5547319">
                <text:p>0.55473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91.15892913471">
                <text:p>3891.15892913471</text:p>
              </table:table-cell>
              <table:table-cell office:value-type="float" office:value="52.6246441127769">
                <text:p>52.6246441127769</text:p>
              </table:table-cell>
              <table:table-cell office:value-type="float" office:value="3100">
                <text:p>3100</text:p>
              </table:table-cell>
              <table:table-cell office:value-type="float" office:value="73.52058">
                <text:p>73.52058</text:p>
              </table:table-cell>
              <table:table-cell office:value-type="float" office:value="3100">
                <text:p>3100</text:p>
              </table:table-cell>
              <table:table-cell office:value-type="float" office:value="1.750798">
                <text:p>1.750798</text:p>
              </table:table-cell>
              <table:table-cell office:value-type="float" office:value="3100">
                <text:p>3100</text:p>
              </table:table-cell>
              <table:table-cell office:value-type="float" office:value="59.15221">
                <text:p>59.15221</text:p>
              </table:table-cell>
              <table:table-cell office:value-type="float" office:value="3100">
                <text:p>3100</text:p>
              </table:table-cell>
              <table:table-cell office:value-type="float" office:value="3.304836">
                <text:p>3.304836</text:p>
              </table:table-cell>
              <table:table-cell office:value-type="float" office:value="3100">
                <text:p>3100</text:p>
              </table:table-cell>
              <table:table-cell office:value-type="float" office:value="8.743146">
                <text:p>8.743146</text:p>
              </table:table-cell>
              <table:table-cell office:value-type="float" office:value="3100">
                <text:p>3100</text:p>
              </table:table-cell>
              <table:table-cell office:value-type="float" office:value="0.5695944">
                <text:p>0.56959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75.89674110691">
                <text:p>4075.89674110691</text:p>
              </table:table-cell>
              <table:table-cell office:value-type="float" office:value="54.7161132915721">
                <text:p>54.7161132915721</text:p>
              </table:table-cell>
              <table:table-cell office:value-type="float" office:value="3150">
                <text:p>3150</text:p>
              </table:table-cell>
              <table:table-cell office:value-type="float" office:value="74.80018">
                <text:p>74.80018</text:p>
              </table:table-cell>
              <table:table-cell office:value-type="float" office:value="3150">
                <text:p>3150</text:p>
              </table:table-cell>
              <table:table-cell office:value-type="float" office:value="1.781974">
                <text:p>1.781974</text:p>
              </table:table-cell>
              <table:table-cell office:value-type="float" office:value="3150">
                <text:p>3150</text:p>
              </table:table-cell>
              <table:table-cell office:value-type="float" office:value="60.18432">
                <text:p>60.18432</text:p>
              </table:table-cell>
              <table:table-cell office:value-type="float" office:value="3150">
                <text:p>3150</text:p>
              </table:table-cell>
              <table:table-cell office:value-type="float" office:value="3.357043">
                <text:p>3.357043</text:p>
              </table:table-cell>
              <table:table-cell office:value-type="float" office:value="3150">
                <text:p>3150</text:p>
              </table:table-cell>
              <table:table-cell office:value-type="float" office:value="8.892171">
                <text:p>8.892171</text:p>
              </table:table-cell>
              <table:table-cell office:value-type="float" office:value="3150">
                <text:p>3150</text:p>
              </table:table-cell>
              <table:table-cell office:value-type="float" office:value="0.5846754">
                <text:p>0.58467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48.31028247211">
                <text:p>4248.31028247211</text:p>
              </table:table-cell>
              <table:table-cell office:value-type="float" office:value="57.5679407765629">
                <text:p>57.5679407765629</text:p>
              </table:table-cell>
              <table:table-cell office:value-type="float" office:value="3200">
                <text:p>3200</text:p>
              </table:table-cell>
              <table:table-cell office:value-type="float" office:value="76.0854">
                <text:p>76.0854</text:p>
              </table:table-cell>
              <table:table-cell office:value-type="float" office:value="3200">
                <text:p>3200</text:p>
              </table:table-cell>
              <table:table-cell office:value-type="float" office:value="1.812694">
                <text:p>1.812694</text:p>
              </table:table-cell>
              <table:table-cell office:value-type="float" office:value="3200">
                <text:p>3200</text:p>
              </table:table-cell>
              <table:table-cell office:value-type="float" office:value="61.22123">
                <text:p>61.22123</text:p>
              </table:table-cell>
              <table:table-cell office:value-type="float" office:value="3200">
                <text:p>3200</text:p>
              </table:table-cell>
              <table:table-cell office:value-type="float" office:value="3.410118">
                <text:p>3.410118</text:p>
              </table:table-cell>
              <table:table-cell office:value-type="float" office:value="3200">
                <text:p>3200</text:p>
              </table:table-cell>
              <table:table-cell office:value-type="float" office:value="9.041331">
                <text:p>9.041331</text:p>
              </table:table-cell>
              <table:table-cell office:value-type="float" office:value="3200">
                <text:p>3200</text:p>
              </table:table-cell>
              <table:table-cell office:value-type="float" office:value="0.6000267">
                <text:p>0.60002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05.33500552017">
                <text:p>4405.33500552017</text:p>
              </table:table-cell>
              <table:table-cell office:value-type="float" office:value="59.5997701653423">
                <text:p>59.5997701653423</text:p>
              </table:table-cell>
              <table:table-cell office:value-type="float" office:value="3250">
                <text:p>3250</text:p>
              </table:table-cell>
              <table:table-cell office:value-type="float" office:value="77.37498">
                <text:p>77.37498</text:p>
              </table:table-cell>
              <table:table-cell office:value-type="float" office:value="3250">
                <text:p>3250</text:p>
              </table:table-cell>
              <table:table-cell office:value-type="float" office:value="1.842327">
                <text:p>1.842327</text:p>
              </table:table-cell>
              <table:table-cell office:value-type="float" office:value="3250">
                <text:p>3250</text:p>
              </table:table-cell>
              <table:table-cell office:value-type="float" office:value="62.26226">
                <text:p>62.26226</text:p>
              </table:table-cell>
              <table:table-cell office:value-type="float" office:value="3250">
                <text:p>3250</text:p>
              </table:table-cell>
              <table:table-cell office:value-type="float" office:value="3.464095">
                <text:p>3.464095</text:p>
              </table:table-cell>
              <table:table-cell office:value-type="float" office:value="3250">
                <text:p>3250</text:p>
              </table:table-cell>
              <table:table-cell office:value-type="float" office:value="9.190685">
                <text:p>9.190685</text:p>
              </table:table-cell>
              <table:table-cell office:value-type="float" office:value="3250">
                <text:p>3250</text:p>
              </table:table-cell>
              <table:table-cell office:value-type="float" office:value="0.6156088">
                <text:p>0.61560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73.0702440362">
                <text:p>4473.0702440362</text:p>
              </table:table-cell>
              <table:table-cell office:value-type="float" office:value="60.581129415722">
                <text:p>60.581129415722</text:p>
              </table:table-cell>
              <table:table-cell office:value-type="float" office:value="3300">
                <text:p>3300</text:p>
              </table:table-cell>
              <table:table-cell office:value-type="float" office:value="78.67344">
                <text:p>78.67344</text:p>
              </table:table-cell>
              <table:table-cell office:value-type="float" office:value="3300">
                <text:p>3300</text:p>
              </table:table-cell>
              <table:table-cell office:value-type="float" office:value="1.874173">
                <text:p>1.874173</text:p>
              </table:table-cell>
              <table:table-cell office:value-type="float" office:value="3300">
                <text:p>3300</text:p>
              </table:table-cell>
              <table:table-cell office:value-type="float" office:value="63.30844">
                <text:p>63.30844</text:p>
              </table:table-cell>
              <table:table-cell office:value-type="float" office:value="3300">
                <text:p>3300</text:p>
              </table:table-cell>
              <table:table-cell office:value-type="float" office:value="3.519124">
                <text:p>3.519124</text:p>
              </table:table-cell>
              <table:table-cell office:value-type="float" office:value="3300">
                <text:p>3300</text:p>
              </table:table-cell>
              <table:table-cell office:value-type="float" office:value="9.340294">
                <text:p>9.340294</text:p>
              </table:table-cell>
              <table:table-cell office:value-type="float" office:value="3300">
                <text:p>3300</text:p>
              </table:table-cell>
              <table:table-cell office:value-type="float" office:value="0.6314083">
                <text:p>0.63140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40.8030712204">
                <text:p>4540.8030712204</text:p>
              </table:table-cell>
              <table:table-cell office:value-type="float" office:value="61.8502523434872">
                <text:p>61.8502523434872</text:p>
              </table:table-cell>
              <table:table-cell office:value-type="float" office:value="3350">
                <text:p>3350</text:p>
              </table:table-cell>
              <table:table-cell office:value-type="float" office:value="79.97768">
                <text:p>79.97768</text:p>
              </table:table-cell>
              <table:table-cell office:value-type="float" office:value="3350">
                <text:p>3350</text:p>
              </table:table-cell>
              <table:table-cell office:value-type="float" office:value="1.906914">
                <text:p>1.906914</text:p>
              </table:table-cell>
              <table:table-cell office:value-type="float" office:value="3350">
                <text:p>3350</text:p>
              </table:table-cell>
              <table:table-cell office:value-type="float" office:value="64.35807">
                <text:p>64.35807</text:p>
              </table:table-cell>
              <table:table-cell office:value-type="float" office:value="3350">
                <text:p>3350</text:p>
              </table:table-cell>
              <table:table-cell office:value-type="float" office:value="3.575133">
                <text:p>3.575133</text:p>
              </table:table-cell>
              <table:table-cell office:value-type="float" office:value="3350">
                <text:p>3350</text:p>
              </table:table-cell>
              <table:table-cell office:value-type="float" office:value="9.490085">
                <text:p>9.490085</text:p>
              </table:table-cell>
              <table:table-cell office:value-type="float" office:value="3350">
                <text:p>3350</text:p>
              </table:table-cell>
              <table:table-cell office:value-type="float" office:value="0.6474788">
                <text:p>0.64747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08.52829343498">
                <text:p>4608.52829343498</text:p>
              </table:table-cell>
              <table:table-cell office:value-type="float" office:value="64.04509524065">
                <text:p>64.04509524065</text:p>
              </table:table-cell>
              <table:table-cell office:value-type="float" office:value="3400">
                <text:p>3400</text:p>
              </table:table-cell>
              <table:table-cell office:value-type="float" office:value="81.28811">
                <text:p>81.28811</text:p>
              </table:table-cell>
              <table:table-cell office:value-type="float" office:value="3400">
                <text:p>3400</text:p>
              </table:table-cell>
              <table:table-cell office:value-type="float" office:value="1.939341">
                <text:p>1.939341</text:p>
              </table:table-cell>
              <table:table-cell office:value-type="float" office:value="3400">
                <text:p>3400</text:p>
              </table:table-cell>
              <table:table-cell office:value-type="float" office:value="65.41281">
                <text:p>65.41281</text:p>
              </table:table-cell>
              <table:table-cell office:value-type="float" office:value="3400">
                <text:p>3400</text:p>
              </table:table-cell>
              <table:table-cell office:value-type="float" office:value="3.63194">
                <text:p>3.63194</text:p>
              </table:table-cell>
              <table:table-cell office:value-type="float" office:value="3400">
                <text:p>3400</text:p>
              </table:table-cell>
              <table:table-cell office:value-type="float" office:value="9.640223">
                <text:p>9.640223</text:p>
              </table:table-cell>
              <table:table-cell office:value-type="float" office:value="3400">
                <text:p>3400</text:p>
              </table:table-cell>
              <table:table-cell office:value-type="float" office:value="0.6637966">
                <text:p>0.66379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57.79068978205">
                <text:p>4657.79068978205</text:p>
              </table:table-cell>
              <table:table-cell office:value-type="float" office:value="64.7296987984328">
                <text:p>64.7296987984328</text:p>
              </table:table-cell>
              <table:table-cell office:value-type="float" office:value="3450">
                <text:p>3450</text:p>
              </table:table-cell>
              <table:table-cell office:value-type="float" office:value="82.60576">
                <text:p>82.60576</text:p>
              </table:table-cell>
              <table:table-cell office:value-type="float" office:value="3450">
                <text:p>3450</text:p>
              </table:table-cell>
              <table:table-cell office:value-type="float" office:value="1.972619">
                <text:p>1.972619</text:p>
              </table:table-cell>
              <table:table-cell office:value-type="float" office:value="3450">
                <text:p>3450</text:p>
              </table:table-cell>
              <table:table-cell office:value-type="float" office:value="66.47216">
                <text:p>66.47216</text:p>
              </table:table-cell>
              <table:table-cell office:value-type="float" office:value="3450">
                <text:p>3450</text:p>
              </table:table-cell>
              <table:table-cell office:value-type="float" office:value="3.689927">
                <text:p>3.689927</text:p>
              </table:table-cell>
              <table:table-cell office:value-type="float" office:value="3450">
                <text:p>3450</text:p>
              </table:table-cell>
              <table:table-cell office:value-type="float" office:value="9.790638">
                <text:p>9.790638</text:p>
              </table:table-cell>
              <table:table-cell office:value-type="float" office:value="3450">
                <text:p>3450</text:p>
              </table:table-cell>
              <table:table-cell office:value-type="float" office:value="0.6804142">
                <text:p>0.68041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02.4836763688">
                <text:p>4802.4836763688</text:p>
              </table:table-cell>
              <table:table-cell office:value-type="float" office:value="68.6608644017169">
                <text:p>68.6608644017169</text:p>
              </table:table-cell>
              <table:table-cell office:value-type="float" office:value="3500">
                <text:p>3500</text:p>
              </table:table-cell>
              <table:table-cell office:value-type="float" office:value="83.93116">
                <text:p>83.93116</text:p>
              </table:table-cell>
              <table:table-cell office:value-type="float" office:value="3500">
                <text:p>3500</text:p>
              </table:table-cell>
              <table:table-cell office:value-type="float" office:value="2.007592">
                <text:p>2.007592</text:p>
              </table:table-cell>
              <table:table-cell office:value-type="float" office:value="3500">
                <text:p>3500</text:p>
              </table:table-cell>
              <table:table-cell office:value-type="float" office:value="67.53592">
                <text:p>67.53592</text:p>
              </table:table-cell>
              <table:table-cell office:value-type="float" office:value="3500">
                <text:p>3500</text:p>
              </table:table-cell>
              <table:table-cell office:value-type="float" office:value="3.749014">
                <text:p>3.749014</text:p>
              </table:table-cell>
              <table:table-cell office:value-type="float" office:value="3500">
                <text:p>3500</text:p>
              </table:table-cell>
              <table:table-cell office:value-type="float" office:value="9.94133">
                <text:p>9.94133</text:p>
              </table:table-cell>
              <table:table-cell office:value-type="float" office:value="3500">
                <text:p>3500</text:p>
              </table:table-cell>
              <table:table-cell office:value-type="float" office:value="0.6972964">
                <text:p>0.69729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4.13366200436">
                <text:p>4984.13366200436</text:p>
              </table:table-cell>
              <table:table-cell office:value-type="float" office:value="71.9225847635353">
                <text:p>71.9225847635353</text:p>
              </table:table-cell>
              <table:table-cell office:value-type="float" office:value="3550">
                <text:p>3550</text:p>
              </table:table-cell>
              <table:table-cell office:value-type="float" office:value="85.26263">
                <text:p>85.26263</text:p>
              </table:table-cell>
              <table:table-cell office:value-type="float" office:value="3550">
                <text:p>3550</text:p>
              </table:table-cell>
              <table:table-cell office:value-type="float" office:value="2.042338">
                <text:p>2.042338</text:p>
              </table:table-cell>
              <table:table-cell office:value-type="float" office:value="3550">
                <text:p>3550</text:p>
              </table:table-cell>
              <table:table-cell office:value-type="float" office:value="68.60439">
                <text:p>68.60439</text:p>
              </table:table-cell>
              <table:table-cell office:value-type="float" office:value="3550">
                <text:p>3550</text:p>
              </table:table-cell>
              <table:table-cell office:value-type="float" office:value="3.809247">
                <text:p>3.809247</text:p>
              </table:table-cell>
              <table:table-cell office:value-type="float" office:value="3550">
                <text:p>3550</text:p>
              </table:table-cell>
              <table:table-cell office:value-type="float" office:value="10.09224">
                <text:p>10.09224</text:p>
              </table:table-cell>
              <table:table-cell office:value-type="float" office:value="3550">
                <text:p>3550</text:p>
              </table:table-cell>
              <table:table-cell office:value-type="float" office:value="0.7144122">
                <text:p>0.71441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65.78109719279">
                <text:p>5165.78109719279</text:p>
              </table:table-cell>
              <table:table-cell office:value-type="float" office:value="75.5775091419446">
                <text:p>75.5775091419446</text:p>
              </table:table-cell>
              <table:table-cell office:value-type="float" office:value="3600">
                <text:p>3600</text:p>
              </table:table-cell>
              <table:table-cell office:value-type="float" office:value="86.60247">
                <text:p>86.60247</text:p>
              </table:table-cell>
              <table:table-cell office:value-type="float" office:value="3600">
                <text:p>3600</text:p>
              </table:table-cell>
              <table:table-cell office:value-type="float" office:value="2.078119">
                <text:p>2.078119</text:p>
              </table:table-cell>
              <table:table-cell office:value-type="float" office:value="3600">
                <text:p>3600</text:p>
              </table:table-cell>
              <table:table-cell office:value-type="float" office:value="69.6777">
                <text:p>69.6777</text:p>
              </table:table-cell>
              <table:table-cell office:value-type="float" office:value="3600">
                <text:p>3600</text:p>
              </table:table-cell>
              <table:table-cell office:value-type="float" office:value="3.871433">
                <text:p>3.871433</text:p>
              </table:table-cell>
              <table:table-cell office:value-type="float" office:value="3600">
                <text:p>3600</text:p>
              </table:table-cell>
              <table:table-cell office:value-type="float" office:value="10.24346">
                <text:p>10.24346</text:p>
              </table:table-cell>
              <table:table-cell office:value-type="float" office:value="3600">
                <text:p>3600</text:p>
              </table:table-cell>
              <table:table-cell office:value-type="float" office:value="0.7317696">
                <text:p>0.73176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76.61383763231">
                <text:p>5276.61383763231</text:p>
              </table:table-cell>
              <table:table-cell office:value-type="float" office:value="78.2553285470594">
                <text:p>78.2553285470594</text:p>
              </table:table-cell>
              <table:table-cell office:value-type="float" office:value="3650">
                <text:p>3650</text:p>
              </table:table-cell>
              <table:table-cell office:value-type="float" office:value="87.94965">
                <text:p>87.94965</text:p>
              </table:table-cell>
              <table:table-cell office:value-type="float" office:value="3650">
                <text:p>3650</text:p>
              </table:table-cell>
              <table:table-cell office:value-type="float" office:value="2.116067">
                <text:p>2.116067</text:p>
              </table:table-cell>
              <table:table-cell office:value-type="float" office:value="3650">
                <text:p>3650</text:p>
              </table:table-cell>
              <table:table-cell office:value-type="float" office:value="70.75571">
                <text:p>70.75571</text:p>
              </table:table-cell>
              <table:table-cell office:value-type="float" office:value="3650">
                <text:p>3650</text:p>
              </table:table-cell>
              <table:table-cell office:value-type="float" office:value="3.933539">
                <text:p>3.933539</text:p>
              </table:table-cell>
              <table:table-cell office:value-type="float" office:value="3650">
                <text:p>3650</text:p>
              </table:table-cell>
              <table:table-cell office:value-type="float" office:value="10.39493">
                <text:p>10.39493</text:p>
              </table:table-cell>
              <table:table-cell office:value-type="float" office:value="3650">
                <text:p>3650</text:p>
              </table:table-cell>
              <table:table-cell office:value-type="float" office:value="0.7494054">
                <text:p>0.7494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0">
                <text:p>3700</text:p>
              </table:table-cell>
              <table:table-cell office:value-type="float" office:value="89.30061">
                <text:p>89.30061</text:p>
              </table:table-cell>
              <table:table-cell office:value-type="float" office:value="3700">
                <text:p>3700</text:p>
              </table:table-cell>
              <table:table-cell office:value-type="float" office:value="2.151814">
                <text:p>2.151814</text:p>
              </table:table-cell>
              <table:table-cell office:value-type="float" office:value="3700">
                <text:p>3700</text:p>
              </table:table-cell>
              <table:table-cell office:value-type="float" office:value="71.83847">
                <text:p>71.83847</text:p>
              </table:table-cell>
              <table:table-cell office:value-type="float" office:value="3700">
                <text:p>3700</text:p>
              </table:table-cell>
              <table:table-cell office:value-type="float" office:value="3.99634">
                <text:p>3.99634</text:p>
              </table:table-cell>
              <table:table-cell office:value-type="float" office:value="3700">
                <text:p>3700</text:p>
              </table:table-cell>
              <table:table-cell office:value-type="float" office:value="10.54669">
                <text:p>10.54669</text:p>
              </table:table-cell>
              <table:table-cell office:value-type="float" office:value="3700">
                <text:p>3700</text:p>
              </table:table-cell>
              <table:table-cell office:value-type="float" office:value="0.7672902">
                <text:p>0.7672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0">
                <text:p>3750</text:p>
              </table:table-cell>
              <table:table-cell office:value-type="float" office:value="90.65927">
                <text:p>90.65927</text:p>
              </table:table-cell>
              <table:table-cell office:value-type="float" office:value="3750">
                <text:p>3750</text:p>
              </table:table-cell>
              <table:table-cell office:value-type="float" office:value="2.188743">
                <text:p>2.188743</text:p>
              </table:table-cell>
              <table:table-cell office:value-type="float" office:value="3750">
                <text:p>3750</text:p>
              </table:table-cell>
              <table:table-cell office:value-type="float" office:value="72.92628">
                <text:p>72.92628</text:p>
              </table:table-cell>
              <table:table-cell office:value-type="float" office:value="3750">
                <text:p>3750</text:p>
              </table:table-cell>
              <table:table-cell office:value-type="float" office:value="4.060072">
                <text:p>4.060072</text:p>
              </table:table-cell>
              <table:table-cell office:value-type="float" office:value="3750">
                <text:p>3750</text:p>
              </table:table-cell>
              <table:table-cell office:value-type="float" office:value="10.69879">
                <text:p>10.69879</text:p>
              </table:table-cell>
              <table:table-cell office:value-type="float" office:value="3750">
                <text:p>3750</text:p>
              </table:table-cell>
              <table:table-cell office:value-type="float" office:value="0.7853879">
                <text:p>0.78538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0">
                <text:p>3800</text:p>
              </table:table-cell>
              <table:table-cell office:value-type="float" office:value="92.0251">
                <text:p>92.0251</text:p>
              </table:table-cell>
              <table:table-cell office:value-type="float" office:value="3800">
                <text:p>3800</text:p>
              </table:table-cell>
              <table:table-cell office:value-type="float" office:value="2.225917">
                <text:p>2.225917</text:p>
              </table:table-cell>
              <table:table-cell office:value-type="float" office:value="3800">
                <text:p>3800</text:p>
              </table:table-cell>
              <table:table-cell office:value-type="float" office:value="74.01938">
                <text:p>74.01938</text:p>
              </table:table-cell>
              <table:table-cell office:value-type="float" office:value="3800">
                <text:p>3800</text:p>
              </table:table-cell>
              <table:table-cell office:value-type="float" office:value="4.124831">
                <text:p>4.124831</text:p>
              </table:table-cell>
              <table:table-cell office:value-type="float" office:value="3800">
                <text:p>3800</text:p>
              </table:table-cell>
              <table:table-cell office:value-type="float" office:value="10.85119">
                <text:p>10.85119</text:p>
              </table:table-cell>
              <table:table-cell office:value-type="float" office:value="3800">
                <text:p>3800</text:p>
              </table:table-cell>
              <table:table-cell office:value-type="float" office:value="0.8037743">
                <text:p>0.80377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0">
                <text:p>3850</text:p>
              </table:table-cell>
              <table:table-cell office:value-type="float" office:value="93.39914">
                <text:p>93.39914</text:p>
              </table:table-cell>
              <table:table-cell office:value-type="float" office:value="3850">
                <text:p>3850</text:p>
              </table:table-cell>
              <table:table-cell office:value-type="float" office:value="2.264289">
                <text:p>2.264289</text:p>
              </table:table-cell>
              <table:table-cell office:value-type="float" office:value="3850">
                <text:p>3850</text:p>
              </table:table-cell>
              <table:table-cell office:value-type="float" office:value="75.11789">
                <text:p>75.11789</text:p>
              </table:table-cell>
              <table:table-cell office:value-type="float" office:value="3850">
                <text:p>3850</text:p>
              </table:table-cell>
              <table:table-cell office:value-type="float" office:value="4.190583">
                <text:p>4.190583</text:p>
              </table:table-cell>
              <table:table-cell office:value-type="float" office:value="3850">
                <text:p>3850</text:p>
              </table:table-cell>
              <table:table-cell office:value-type="float" office:value="11.00396">
                <text:p>11.00396</text:p>
              </table:table-cell>
              <table:table-cell office:value-type="float" office:value="3850">
                <text:p>3850</text:p>
              </table:table-cell>
              <table:table-cell office:value-type="float" office:value="0.8224193">
                <text:p>0.8224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0">
                <text:p>3900</text:p>
              </table:table-cell>
              <table:table-cell office:value-type="float" office:value="94.78295">
                <text:p>94.78295</text:p>
              </table:table-cell>
              <table:table-cell office:value-type="float" office:value="3900">
                <text:p>3900</text:p>
              </table:table-cell>
              <table:table-cell office:value-type="float" office:value="2.305516">
                <text:p>2.305516</text:p>
              </table:table-cell>
              <table:table-cell office:value-type="float" office:value="3900">
                <text:p>3900</text:p>
              </table:table-cell>
              <table:table-cell office:value-type="float" office:value="76.22165">
                <text:p>76.22165</text:p>
              </table:table-cell>
              <table:table-cell office:value-type="float" office:value="3900">
                <text:p>3900</text:p>
              </table:table-cell>
              <table:table-cell office:value-type="float" office:value="4.257418">
                <text:p>4.257418</text:p>
              </table:table-cell>
              <table:table-cell office:value-type="float" office:value="3900">
                <text:p>3900</text:p>
              </table:table-cell>
              <table:table-cell office:value-type="float" office:value="11.15705">
                <text:p>11.15705</text:p>
              </table:table-cell>
              <table:table-cell office:value-type="float" office:value="3900">
                <text:p>3900</text:p>
              </table:table-cell>
              <table:table-cell office:value-type="float" office:value="0.8413133">
                <text:p>0.8413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0">
                <text:p>3950</text:p>
              </table:table-cell>
              <table:table-cell office:value-type="float" office:value="96.17135">
                <text:p>96.17135</text:p>
              </table:table-cell>
              <table:table-cell office:value-type="float" office:value="3950">
                <text:p>3950</text:p>
              </table:table-cell>
              <table:table-cell office:value-type="float" office:value="2.344778">
                <text:p>2.344778</text:p>
              </table:table-cell>
              <table:table-cell office:value-type="float" office:value="3950">
                <text:p>3950</text:p>
              </table:table-cell>
              <table:table-cell office:value-type="float" office:value="77.33068">
                <text:p>77.33068</text:p>
              </table:table-cell>
              <table:table-cell office:value-type="float" office:value="3950">
                <text:p>3950</text:p>
              </table:table-cell>
              <table:table-cell office:value-type="float" office:value="4.325074">
                <text:p>4.325074</text:p>
              </table:table-cell>
              <table:table-cell office:value-type="float" office:value="3950">
                <text:p>3950</text:p>
              </table:table-cell>
              <table:table-cell office:value-type="float" office:value="11.31041">
                <text:p>11.31041</text:p>
              </table:table-cell>
              <table:table-cell office:value-type="float" office:value="3950">
                <text:p>3950</text:p>
              </table:table-cell>
              <table:table-cell office:value-type="float" office:value="0.8604032">
                <text:p>0.8604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">
                <text:p>4000</text:p>
              </table:table-cell>
              <table:table-cell office:value-type="float" office:value="97.56635">
                <text:p>97.56635</text:p>
              </table:table-cell>
              <table:table-cell office:value-type="float" office:value="4000">
                <text:p>4000</text:p>
              </table:table-cell>
              <table:table-cell office:value-type="float" office:value="2.383787">
                <text:p>2.383787</text:p>
              </table:table-cell>
              <table:table-cell office:value-type="float" office:value="4000">
                <text:p>4000</text:p>
              </table:table-cell>
              <table:table-cell office:value-type="float" office:value="78.44511">
                <text:p>78.44511</text:p>
              </table:table-cell>
              <table:table-cell office:value-type="float" office:value="4000">
                <text:p>4000</text:p>
              </table:table-cell>
              <table:table-cell office:value-type="float" office:value="4.39366">
                <text:p>4.39366</text:p>
              </table:table-cell>
              <table:table-cell office:value-type="float" office:value="4000">
                <text:p>4000</text:p>
              </table:table-cell>
              <table:table-cell office:value-type="float" office:value="11.46401">
                <text:p>11.46401</text:p>
              </table:table-cell>
              <table:table-cell office:value-type="float" office:value="4000">
                <text:p>4000</text:p>
              </table:table-cell>
              <table:table-cell office:value-type="float" office:value="0.8797813">
                <text:p>0.8797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0">
                <text:p>4050</text:p>
              </table:table-cell>
              <table:table-cell office:value-type="float" office:value="98.97116">
                <text:p>98.97116</text:p>
              </table:table-cell>
              <table:table-cell office:value-type="float" office:value="4050">
                <text:p>4050</text:p>
              </table:table-cell>
              <table:table-cell office:value-type="float" office:value="2.425494">
                <text:p>2.425494</text:p>
              </table:table-cell>
              <table:table-cell office:value-type="float" office:value="4050">
                <text:p>4050</text:p>
              </table:table-cell>
              <table:table-cell office:value-type="float" office:value="79.56493">
                <text:p>79.56493</text:p>
              </table:table-cell>
              <table:table-cell office:value-type="float" office:value="4050">
                <text:p>4050</text:p>
              </table:table-cell>
              <table:table-cell office:value-type="float" office:value="4.463423">
                <text:p>4.463423</text:p>
              </table:table-cell>
              <table:table-cell office:value-type="float" office:value="4050">
                <text:p>4050</text:p>
              </table:table-cell>
              <table:table-cell office:value-type="float" office:value="11.61786">
                <text:p>11.61786</text:p>
              </table:table-cell>
              <table:table-cell office:value-type="float" office:value="4050">
                <text:p>4050</text:p>
              </table:table-cell>
              <table:table-cell office:value-type="float" office:value="0.8994457">
                <text:p>0.8994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0">
                <text:p>4100</text:p>
              </table:table-cell>
              <table:table-cell office:value-type="float" office:value="100.3793">
                <text:p>100.3793</text:p>
              </table:table-cell>
              <table:table-cell office:value-type="float" office:value="4100">
                <text:p>4100</text:p>
              </table:table-cell>
              <table:table-cell office:value-type="float" office:value="2.464586">
                <text:p>2.464586</text:p>
              </table:table-cell>
              <table:table-cell office:value-type="float" office:value="4100">
                <text:p>4100</text:p>
              </table:table-cell>
              <table:table-cell office:value-type="float" office:value="80.68994">
                <text:p>80.68994</text:p>
              </table:table-cell>
              <table:table-cell office:value-type="float" office:value="4100">
                <text:p>4100</text:p>
              </table:table-cell>
              <table:table-cell office:value-type="float" office:value="4.533625">
                <text:p>4.533625</text:p>
              </table:table-cell>
              <table:table-cell office:value-type="float" office:value="4100">
                <text:p>4100</text:p>
              </table:table-cell>
              <table:table-cell office:value-type="float" office:value="11.7719">
                <text:p>11.7719</text:p>
              </table:table-cell>
              <table:table-cell office:value-type="float" office:value="4100">
                <text:p>4100</text:p>
              </table:table-cell>
              <table:table-cell office:value-type="float" office:value="0.9192771">
                <text:p>0.9192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0">
                <text:p>4150</text:p>
              </table:table-cell>
              <table:table-cell office:value-type="float" office:value="101.795">
                <text:p>101.795</text:p>
              </table:table-cell>
              <table:table-cell office:value-type="float" office:value="4150">
                <text:p>4150</text:p>
              </table:table-cell>
              <table:table-cell office:value-type="float" office:value="2.503663">
                <text:p>2.503663</text:p>
              </table:table-cell>
              <table:table-cell office:value-type="float" office:value="4150">
                <text:p>4150</text:p>
              </table:table-cell>
              <table:table-cell office:value-type="float" office:value="81.82074">
                <text:p>81.82074</text:p>
              </table:table-cell>
              <table:table-cell office:value-type="float" office:value="4150">
                <text:p>4150</text:p>
              </table:table-cell>
              <table:table-cell office:value-type="float" office:value="4.604821">
                <text:p>4.604821</text:p>
              </table:table-cell>
              <table:table-cell office:value-type="float" office:value="4150">
                <text:p>4150</text:p>
              </table:table-cell>
              <table:table-cell office:value-type="float" office:value="11.92618">
                <text:p>11.92618</text:p>
              </table:table-cell>
              <table:table-cell office:value-type="float" office:value="4150">
                <text:p>4150</text:p>
              </table:table-cell>
              <table:table-cell office:value-type="float" office:value="0.939566">
                <text:p>0.939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">
                <text:p>4200</text:p>
              </table:table-cell>
              <table:table-cell office:value-type="float" office:value="103.2175">
                <text:p>103.2175</text:p>
              </table:table-cell>
              <table:table-cell office:value-type="float" office:value="4200">
                <text:p>4200</text:p>
              </table:table-cell>
              <table:table-cell office:value-type="float" office:value="2.542201">
                <text:p>2.542201</text:p>
              </table:table-cell>
              <table:table-cell office:value-type="float" office:value="4200">
                <text:p>4200</text:p>
              </table:table-cell>
              <table:table-cell office:value-type="float" office:value="82.95712">
                <text:p>82.95712</text:p>
              </table:table-cell>
              <table:table-cell office:value-type="float" office:value="4200">
                <text:p>4200</text:p>
              </table:table-cell>
              <table:table-cell office:value-type="float" office:value="4.677291">
                <text:p>4.677291</text:p>
              </table:table-cell>
              <table:table-cell office:value-type="float" office:value="4200">
                <text:p>4200</text:p>
              </table:table-cell>
              <table:table-cell office:value-type="float" office:value="12.0807">
                <text:p>12.0807</text:p>
              </table:table-cell>
              <table:table-cell office:value-type="float" office:value="4200">
                <text:p>4200</text:p>
              </table:table-cell>
              <table:table-cell office:value-type="float" office:value="0.9601634">
                <text:p>0.9601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0">
                <text:p>4250</text:p>
              </table:table-cell>
              <table:table-cell office:value-type="float" office:value="104.6501">
                <text:p>104.6501</text:p>
              </table:table-cell>
              <table:table-cell office:value-type="float" office:value="4250">
                <text:p>4250</text:p>
              </table:table-cell>
              <table:table-cell office:value-type="float" office:value="2.584481">
                <text:p>2.584481</text:p>
              </table:table-cell>
              <table:table-cell office:value-type="float" office:value="4250">
                <text:p>4250</text:p>
              </table:table-cell>
              <table:table-cell office:value-type="float" office:value="84.09859">
                <text:p>84.09859</text:p>
              </table:table-cell>
              <table:table-cell office:value-type="float" office:value="4250">
                <text:p>4250</text:p>
              </table:table-cell>
              <table:table-cell office:value-type="float" office:value="4.750835">
                <text:p>4.750835</text:p>
              </table:table-cell>
              <table:table-cell office:value-type="float" office:value="4250">
                <text:p>4250</text:p>
              </table:table-cell>
              <table:table-cell office:value-type="float" office:value="12.2354">
                <text:p>12.2354</text:p>
              </table:table-cell>
              <table:table-cell office:value-type="float" office:value="4250">
                <text:p>4250</text:p>
              </table:table-cell>
              <table:table-cell office:value-type="float" office:value="0.980837">
                <text:p>0.980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0">
                <text:p>4300</text:p>
              </table:table-cell>
              <table:table-cell office:value-type="float" office:value="106.0857">
                <text:p>106.0857</text:p>
              </table:table-cell>
              <table:table-cell office:value-type="float" office:value="4300">
                <text:p>4300</text:p>
              </table:table-cell>
              <table:table-cell office:value-type="float" office:value="2.623906">
                <text:p>2.623906</text:p>
              </table:table-cell>
              <table:table-cell office:value-type="float" office:value="4300">
                <text:p>4300</text:p>
              </table:table-cell>
              <table:table-cell office:value-type="float" office:value="85.24504">
                <text:p>85.24504</text:p>
              </table:table-cell>
              <table:table-cell office:value-type="float" office:value="4300">
                <text:p>4300</text:p>
              </table:table-cell>
              <table:table-cell office:value-type="float" office:value="4.824891">
                <text:p>4.824891</text:p>
              </table:table-cell>
              <table:table-cell office:value-type="float" office:value="4300">
                <text:p>4300</text:p>
              </table:table-cell>
              <table:table-cell office:value-type="float" office:value="12.39025">
                <text:p>12.39025</text:p>
              </table:table-cell>
              <table:table-cell office:value-type="float" office:value="4300">
                <text:p>4300</text:p>
              </table:table-cell>
              <table:table-cell office:value-type="float" office:value="1.001637">
                <text:p>1.001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0">
                <text:p>4350</text:p>
              </table:table-cell>
              <table:table-cell office:value-type="float" office:value="107.526">
                <text:p>107.526</text:p>
              </table:table-cell>
              <table:table-cell office:value-type="float" office:value="4350">
                <text:p>4350</text:p>
              </table:table-cell>
              <table:table-cell office:value-type="float" office:value="2.660814">
                <text:p>2.660814</text:p>
              </table:table-cell>
              <table:table-cell office:value-type="float" office:value="4350">
                <text:p>4350</text:p>
              </table:table-cell>
              <table:table-cell office:value-type="float" office:value="86.39724">
                <text:p>86.39724</text:p>
              </table:table-cell>
              <table:table-cell office:value-type="float" office:value="4350">
                <text:p>4350</text:p>
              </table:table-cell>
              <table:table-cell office:value-type="float" office:value="4.899935">
                <text:p>4.899935</text:p>
              </table:table-cell>
              <table:table-cell office:value-type="float" office:value="4350">
                <text:p>4350</text:p>
              </table:table-cell>
              <table:table-cell office:value-type="float" office:value="12.54531">
                <text:p>12.54531</text:p>
              </table:table-cell>
              <table:table-cell office:value-type="float" office:value="4350">
                <text:p>4350</text:p>
              </table:table-cell>
              <table:table-cell office:value-type="float" office:value="1.022682">
                <text:p>1.022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0">
                <text:p>4400</text:p>
              </table:table-cell>
              <table:table-cell office:value-type="float" office:value="108.9748">
                <text:p>108.9748</text:p>
              </table:table-cell>
              <table:table-cell office:value-type="float" office:value="4400">
                <text:p>4400</text:p>
              </table:table-cell>
              <table:table-cell office:value-type="float" office:value="2.699673">
                <text:p>2.699673</text:p>
              </table:table-cell>
              <table:table-cell office:value-type="float" office:value="4400">
                <text:p>4400</text:p>
              </table:table-cell>
              <table:table-cell office:value-type="float" office:value="87.55473">
                <text:p>87.55473</text:p>
              </table:table-cell>
              <table:table-cell office:value-type="float" office:value="4400">
                <text:p>4400</text:p>
              </table:table-cell>
              <table:table-cell office:value-type="float" office:value="4.975947">
                <text:p>4.975947</text:p>
              </table:table-cell>
              <table:table-cell office:value-type="float" office:value="4400">
                <text:p>4400</text:p>
              </table:table-cell>
              <table:table-cell office:value-type="float" office:value="12.70047">
                <text:p>12.70047</text:p>
              </table:table-cell>
              <table:table-cell office:value-type="float" office:value="4400">
                <text:p>4400</text:p>
              </table:table-cell>
              <table:table-cell office:value-type="float" office:value="1.044024">
                <text:p>1.044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0">
                <text:p>4450</text:p>
              </table:table-cell>
              <table:table-cell office:value-type="float" office:value="110.4416">
                <text:p>110.4416</text:p>
              </table:table-cell>
              <table:table-cell office:value-type="float" office:value="4450">
                <text:p>4450</text:p>
              </table:table-cell>
              <table:table-cell office:value-type="float" office:value="2.748589">
                <text:p>2.748589</text:p>
              </table:table-cell>
              <table:table-cell office:value-type="float" office:value="4450">
                <text:p>4450</text:p>
              </table:table-cell>
              <table:table-cell office:value-type="float" office:value="88.71793">
                <text:p>88.71793</text:p>
              </table:table-cell>
              <table:table-cell office:value-type="float" office:value="4450">
                <text:p>4450</text:p>
              </table:table-cell>
              <table:table-cell office:value-type="float" office:value="5.053518">
                <text:p>5.053518</text:p>
              </table:table-cell>
              <table:table-cell office:value-type="float" office:value="4450">
                <text:p>4450</text:p>
              </table:table-cell>
              <table:table-cell office:value-type="float" office:value="12.85576">
                <text:p>12.85576</text:p>
              </table:table-cell>
              <table:table-cell office:value-type="float" office:value="4450">
                <text:p>4450</text:p>
              </table:table-cell>
              <table:table-cell office:value-type="float" office:value="1.065774">
                <text:p>1.065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0">
                <text:p>4500</text:p>
              </table:table-cell>
              <table:table-cell office:value-type="float" office:value="111.9181">
                <text:p>111.9181</text:p>
              </table:table-cell>
              <table:table-cell office:value-type="float" office:value="4500">
                <text:p>4500</text:p>
              </table:table-cell>
              <table:table-cell office:value-type="float" office:value="2.800232">
                <text:p>2.800232</text:p>
              </table:table-cell>
              <table:table-cell office:value-type="float" office:value="4500">
                <text:p>4500</text:p>
              </table:table-cell>
              <table:table-cell office:value-type="float" office:value="89.88668">
                <text:p>89.88668</text:p>
              </table:table-cell>
              <table:table-cell office:value-type="float" office:value="4500">
                <text:p>4500</text:p>
              </table:table-cell>
              <table:table-cell office:value-type="float" office:value="5.132176">
                <text:p>5.132176</text:p>
              </table:table-cell>
              <table:table-cell office:value-type="float" office:value="4500">
                <text:p>4500</text:p>
              </table:table-cell>
              <table:table-cell office:value-type="float" office:value="13.01111">
                <text:p>13.01111</text:p>
              </table:table-cell>
              <table:table-cell office:value-type="float" office:value="4500">
                <text:p>4500</text:p>
              </table:table-cell>
              <table:table-cell office:value-type="float" office:value="1.087867">
                <text:p>1.087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0">
                <text:p>4550</text:p>
              </table:table-cell>
              <table:table-cell office:value-type="float" office:value="113.3895">
                <text:p>113.3895</text:p>
              </table:table-cell>
              <table:table-cell office:value-type="float" office:value="4550">
                <text:p>4550</text:p>
              </table:table-cell>
              <table:table-cell office:value-type="float" office:value="2.840636">
                <text:p>2.840636</text:p>
              </table:table-cell>
              <table:table-cell office:value-type="float" office:value="4550">
                <text:p>4550</text:p>
              </table:table-cell>
              <table:table-cell office:value-type="float" office:value="91.06156">
                <text:p>91.06156</text:p>
              </table:table-cell>
              <table:table-cell office:value-type="float" office:value="4550">
                <text:p>4550</text:p>
              </table:table-cell>
              <table:table-cell office:value-type="float" office:value="5.21086">
                <text:p>5.21086</text:p>
              </table:table-cell>
              <table:table-cell office:value-type="float" office:value="4550">
                <text:p>4550</text:p>
              </table:table-cell>
              <table:table-cell office:value-type="float" office:value="13.16648">
                <text:p>13.16648</text:p>
              </table:table-cell>
              <table:table-cell office:value-type="float" office:value="4550">
                <text:p>4550</text:p>
              </table:table-cell>
              <table:table-cell office:value-type="float" office:value="1.109932">
                <text:p>1.109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0">
                <text:p>4600</text:p>
              </table:table-cell>
              <table:table-cell office:value-type="float" office:value="114.8836">
                <text:p>114.8836</text:p>
              </table:table-cell>
              <table:table-cell office:value-type="float" office:value="4600">
                <text:p>4600</text:p>
              </table:table-cell>
              <table:table-cell office:value-type="float" office:value="2.895051">
                <text:p>2.895051</text:p>
              </table:table-cell>
              <table:table-cell office:value-type="float" office:value="4600">
                <text:p>4600</text:p>
              </table:table-cell>
              <table:table-cell office:value-type="float" office:value="92.24258">
                <text:p>92.24258</text:p>
              </table:table-cell>
              <table:table-cell office:value-type="float" office:value="4600">
                <text:p>4600</text:p>
              </table:table-cell>
              <table:table-cell office:value-type="float" office:value="5.291623">
                <text:p>5.291623</text:p>
              </table:table-cell>
              <table:table-cell office:value-type="float" office:value="4600">
                <text:p>4600</text:p>
              </table:table-cell>
              <table:table-cell office:value-type="float" office:value="13.32188">
                <text:p>13.32188</text:p>
              </table:table-cell>
              <table:table-cell office:value-type="float" office:value="4600">
                <text:p>4600</text:p>
              </table:table-cell>
              <table:table-cell office:value-type="float" office:value="1.132511">
                <text:p>1.132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0">
                <text:p>4650</text:p>
              </table:table-cell>
              <table:table-cell office:value-type="float" office:value="116.3885">
                <text:p>116.3885</text:p>
              </table:table-cell>
              <table:table-cell office:value-type="float" office:value="4650">
                <text:p>4650</text:p>
              </table:table-cell>
              <table:table-cell office:value-type="float" office:value="2.951857">
                <text:p>2.951857</text:p>
              </table:table-cell>
              <table:table-cell office:value-type="float" office:value="4650">
                <text:p>4650</text:p>
              </table:table-cell>
              <table:table-cell office:value-type="float" office:value="93.43051">
                <text:p>93.43051</text:p>
              </table:table-cell>
              <table:table-cell office:value-type="float" office:value="4650">
                <text:p>4650</text:p>
              </table:table-cell>
              <table:table-cell office:value-type="float" office:value="5.373418">
                <text:p>5.373418</text:p>
              </table:table-cell>
              <table:table-cell office:value-type="float" office:value="4650">
                <text:p>4650</text:p>
              </table:table-cell>
              <table:table-cell office:value-type="float" office:value="13.47734">
                <text:p>13.47734</text:p>
              </table:table-cell>
              <table:table-cell office:value-type="float" office:value="4650">
                <text:p>4650</text:p>
              </table:table-cell>
              <table:table-cell office:value-type="float" office:value="1.155355">
                <text:p>1.155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0">
                <text:p>4700</text:p>
              </table:table-cell>
              <table:table-cell office:value-type="float" office:value="117.898">
                <text:p>117.898</text:p>
              </table:table-cell>
              <table:table-cell office:value-type="float" office:value="4700">
                <text:p>4700</text:p>
              </table:table-cell>
              <table:table-cell office:value-type="float" office:value="3.006576">
                <text:p>3.006576</text:p>
              </table:table-cell>
              <table:table-cell office:value-type="float" office:value="4700">
                <text:p>4700</text:p>
              </table:table-cell>
              <table:table-cell office:value-type="float" office:value="94.62428">
                <text:p>94.62428</text:p>
              </table:table-cell>
              <table:table-cell office:value-type="float" office:value="4700">
                <text:p>4700</text:p>
              </table:table-cell>
              <table:table-cell office:value-type="float" office:value="5.456058">
                <text:p>5.456058</text:p>
              </table:table-cell>
              <table:table-cell office:value-type="float" office:value="4700">
                <text:p>4700</text:p>
              </table:table-cell>
              <table:table-cell office:value-type="float" office:value="13.63269">
                <text:p>13.63269</text:p>
              </table:table-cell>
              <table:table-cell office:value-type="float" office:value="4700">
                <text:p>4700</text:p>
              </table:table-cell>
              <table:table-cell office:value-type="float" office:value="1.178423">
                <text:p>1.178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0">
                <text:p>4750</text:p>
              </table:table-cell>
              <table:table-cell office:value-type="float" office:value="119.4157">
                <text:p>119.4157</text:p>
              </table:table-cell>
              <table:table-cell office:value-type="float" office:value="4750">
                <text:p>4750</text:p>
              </table:table-cell>
              <table:table-cell office:value-type="float" office:value="3.062463">
                <text:p>3.062463</text:p>
              </table:table-cell>
              <table:table-cell office:value-type="float" office:value="4750">
                <text:p>4750</text:p>
              </table:table-cell>
              <table:table-cell office:value-type="float" office:value="95.82381">
                <text:p>95.82381</text:p>
              </table:table-cell>
              <table:table-cell office:value-type="float" office:value="4750">
                <text:p>4750</text:p>
              </table:table-cell>
              <table:table-cell office:value-type="float" office:value="5.539715">
                <text:p>5.539715</text:p>
              </table:table-cell>
              <table:table-cell office:value-type="float" office:value="4750">
                <text:p>4750</text:p>
              </table:table-cell>
              <table:table-cell office:value-type="float" office:value="13.78798">
                <text:p>13.78798</text:p>
              </table:table-cell>
              <table:table-cell office:value-type="float" office:value="4750">
                <text:p>4750</text:p>
              </table:table-cell>
              <table:table-cell office:value-type="float" office:value="1.201768">
                <text:p>1.201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0">
                <text:p>4800</text:p>
              </table:table-cell>
              <table:table-cell office:value-type="float" office:value="120.9307">
                <text:p>120.9307</text:p>
              </table:table-cell>
              <table:table-cell office:value-type="float" office:value="4800">
                <text:p>4800</text:p>
              </table:table-cell>
              <table:table-cell office:value-type="float" office:value="3.109809">
                <text:p>3.109809</text:p>
              </table:table-cell>
              <table:table-cell office:value-type="float" office:value="4800">
                <text:p>4800</text:p>
              </table:table-cell>
              <table:table-cell office:value-type="float" office:value="97.02908">
                <text:p>97.02908</text:p>
              </table:table-cell>
              <table:table-cell office:value-type="float" office:value="4800">
                <text:p>4800</text:p>
              </table:table-cell>
              <table:table-cell office:value-type="float" office:value="5.623516">
                <text:p>5.623516</text:p>
              </table:table-cell>
              <table:table-cell office:value-type="float" office:value="4800">
                <text:p>4800</text:p>
              </table:table-cell>
              <table:table-cell office:value-type="float" office:value="13.9432">
                <text:p>13.9432</text:p>
              </table:table-cell>
              <table:table-cell office:value-type="float" office:value="4800">
                <text:p>4800</text:p>
              </table:table-cell>
              <table:table-cell office:value-type="float" office:value="1.225144">
                <text:p>1.225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0">
                <text:p>4850</text:p>
              </table:table-cell>
              <table:table-cell office:value-type="float" office:value="122.4535">
                <text:p>122.4535</text:p>
              </table:table-cell>
              <table:table-cell office:value-type="float" office:value="4850">
                <text:p>4850</text:p>
              </table:table-cell>
              <table:table-cell office:value-type="float" office:value="3.157958">
                <text:p>3.157958</text:p>
              </table:table-cell>
              <table:table-cell office:value-type="float" office:value="4850">
                <text:p>4850</text:p>
              </table:table-cell>
              <table:table-cell office:value-type="float" office:value="98.24009">
                <text:p>98.24009</text:p>
              </table:table-cell>
              <table:table-cell office:value-type="float" office:value="4850">
                <text:p>4850</text:p>
              </table:table-cell>
              <table:table-cell office:value-type="float" office:value="5.708182">
                <text:p>5.708182</text:p>
              </table:table-cell>
              <table:table-cell office:value-type="float" office:value="4850">
                <text:p>4850</text:p>
              </table:table-cell>
              <table:table-cell office:value-type="float" office:value="14.09839">
                <text:p>14.09839</text:p>
              </table:table-cell>
              <table:table-cell office:value-type="float" office:value="4850">
                <text:p>4850</text:p>
              </table:table-cell>
              <table:table-cell office:value-type="float" office:value="1.24884">
                <text:p>1.24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0">
                <text:p>4900</text:p>
              </table:table-cell>
              <table:table-cell office:value-type="float" office:value="123.9859">
                <text:p>123.9859</text:p>
              </table:table-cell>
              <table:table-cell office:value-type="float" office:value="4900">
                <text:p>4900</text:p>
              </table:table-cell>
              <table:table-cell office:value-type="float" office:value="3.20845">
                <text:p>3.20845</text:p>
              </table:table-cell>
              <table:table-cell office:value-type="float" office:value="4900">
                <text:p>4900</text:p>
              </table:table-cell>
              <table:table-cell office:value-type="float" office:value="99.45712">
                <text:p>99.45712</text:p>
              </table:table-cell>
              <table:table-cell office:value-type="float" office:value="4900">
                <text:p>4900</text:p>
              </table:table-cell>
              <table:table-cell office:value-type="float" office:value="5.79398">
                <text:p>5.79398</text:p>
              </table:table-cell>
              <table:table-cell office:value-type="float" office:value="4900">
                <text:p>4900</text:p>
              </table:table-cell>
              <table:table-cell office:value-type="float" office:value="14.25361">
                <text:p>14.25361</text:p>
              </table:table-cell>
              <table:table-cell office:value-type="float" office:value="4900">
                <text:p>4900</text:p>
              </table:table-cell>
              <table:table-cell office:value-type="float" office:value="1.272735">
                <text:p>1.272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0">
                <text:p>4950</text:p>
              </table:table-cell>
              <table:table-cell office:value-type="float" office:value="125.5244">
                <text:p>125.5244</text:p>
              </table:table-cell>
              <table:table-cell office:value-type="float" office:value="4950">
                <text:p>4950</text:p>
              </table:table-cell>
              <table:table-cell office:value-type="float" office:value="3.25826">
                <text:p>3.25826</text:p>
              </table:table-cell>
              <table:table-cell office:value-type="float" office:value="4950">
                <text:p>4950</text:p>
              </table:table-cell>
              <table:table-cell office:value-type="float" office:value="100.6799">
                <text:p>100.6799</text:p>
              </table:table-cell>
              <table:table-cell office:value-type="float" office:value="4950">
                <text:p>4950</text:p>
              </table:table-cell>
              <table:table-cell office:value-type="float" office:value="5.88062">
                <text:p>5.88062</text:p>
              </table:table-cell>
              <table:table-cell office:value-type="float" office:value="4950">
                <text:p>4950</text:p>
              </table:table-cell>
              <table:table-cell office:value-type="float" office:value="14.40881">
                <text:p>14.40881</text:p>
              </table:table-cell>
              <table:table-cell office:value-type="float" office:value="4950">
                <text:p>4950</text:p>
              </table:table-cell>
              <table:table-cell office:value-type="float" office:value="1.296846">
                <text:p>1.2968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">
                <text:p>5000</text:p>
              </table:table-cell>
              <table:table-cell office:value-type="float" office:value="127.0723">
                <text:p>127.0723</text:p>
              </table:table-cell>
              <table:table-cell office:value-type="float" office:value="5000">
                <text:p>5000</text:p>
              </table:table-cell>
              <table:table-cell office:value-type="float" office:value="3.30999">
                <text:p>3.30999</text:p>
              </table:table-cell>
              <table:table-cell office:value-type="float" office:value="5000">
                <text:p>5000</text:p>
              </table:table-cell>
              <table:table-cell office:value-type="float" office:value="101.9087">
                <text:p>101.9087</text:p>
              </table:table-cell>
              <table:table-cell office:value-type="float" office:value="5000">
                <text:p>5000</text:p>
              </table:table-cell>
              <table:table-cell office:value-type="float" office:value="5.968305">
                <text:p>5.968305</text:p>
              </table:table-cell>
              <table:table-cell office:value-type="float" office:value="5000">
                <text:p>5000</text:p>
              </table:table-cell>
              <table:table-cell office:value-type="float" office:value="14.56409">
                <text:p>14.56409</text:p>
              </table:table-cell>
              <table:table-cell office:value-type="float" office:value="5000">
                <text:p>5000</text:p>
              </table:table-cell>
              <table:table-cell office:value-type="float" office:value="1.321214">
                <text:p>1.3212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